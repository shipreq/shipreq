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FreeSans" svg:font-family="FreeSans" style:font-family-generic="system" style:font-pitch="variable"/>
    <style:font-face style:name="SetoFont" svg:font-family="SetoFont" style:font-family-generic="system" style:font-pitch="variable"/>
  </office:font-face-decls>
  <office:automatic-styles>
    <style:style style:name="co1" style:family="table-column">
      <style:table-column-properties fo:break-before="auto" style:column-width="28.79mm"/>
    </style:style>
    <style:style style:name="co2" style:family="table-column">
      <style:table-column-properties fo:break-before="auto" style:column-width="14.3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12.07mm"/>
    </style:style>
    <style:style style:name="co6" style:family="table-column">
      <style:table-column-properties fo:break-before="auto" style:column-width="10.09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16.19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16mm"/>
    </style:style>
    <style:style style:name="co12" style:family="table-column">
      <style:table-column-properties fo:break-before="auto" style:column-width="19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AU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10"/>
    <style:style style:name="ce10" style:family="table-cell" style:parent-style-name="Default" style:data-style-name="N110">
      <style:table-cell-properties fo:background-color="#e6e6e6"/>
    </style:style>
    <style:style style:name="ce11" style:family="table-cell" style:parent-style-name="Default" style:data-style-name="N110">
      <style:table-cell-properties style:text-align-source="fix" style:repeat-content="false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3" style:family="table-cell" style:parent-style-name="Default" style:data-style-name="N103"/>
    <style:style style:name="ce14" style:family="table-cell" style:parent-style-name="Default" style:data-style-name="N103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3">
      <style:table-cell-properties fo:background-color="#e6e6e6"/>
    </style:style>
    <style:style style:name="ce16" style:family="table-cell" style:parent-style-name="Default" style:data-style-name="N103">
      <style:text-properties fo:font-weight="bold" style:font-weight-asian="bold" style:font-weight-complex="bold"/>
    </style:style>
    <style:style style:name="ce17" style:family="table-cell" style:parent-style-name="Default" style:data-style-name="N10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mm"/>
      <style:text-properties fo:color="#b3b3b3"/>
    </style:style>
    <style:style style:name="ce19" style:family="table-cell" style:parent-style-name="Default" style:data-style-name="N103">
      <style:text-properties fo:font-style="italic" style:font-style-asian="italic" style:font-style-complex="italic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toFont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fo:color="#b3b3b3"/>
    </style:style>
  </office:automatic-styles>
  <office:body>
    <office:spreadsheet>
      <table:calculation-settings table:use-regular-expressions="false" table:use-wildcards="true"/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RAM</text:p>
          </table:table-cell>
        </table:table-row>
        <table:table-row table:style-name="ro1">
          <table:table-cell office:value-type="string" calcext:value-type="string">
            <text:p>taskman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style-name="ce1" office:value-type="string" calcext:value-type="string">
            <text:p>webapp</text:p>
          </table:table-cell>
          <table:table-cell table:style-name="ce1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postgres</text:p>
          </table:table-cell>
          <table:table-cell/>
        </table:table-row>
        <table:table-row table:style-name="ro1">
          <table:table-cell office:value-type="string" calcext:value-type="string">
            <text:p>port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prometheus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grafana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logstash</text:p>
          </table:table-cell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lasticsearch</text:p>
          </table:table-cell>
          <table:table-cell/>
        </table:table-row>
        <table:table-row table:style-name="ro1">
          <table:table-cell office:value-type="string" calcext:value-type="string">
            <text:p>kibana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Docker registry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Git repo</text:p>
          </table:table-cell>
          <table:table-cell/>
        </table:table-row>
        <table:table-row table:style-name="ro1">
          <table:table-cell office:value-type="string" calcext:value-type="string">
            <text:p>CI</text:p>
          </table:table-cell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/>
        </table:table-row>
      </table:table>
      <table:table table:name="Sydney pric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3" table:number-columns-repeated="1015" table:default-cell-style-name="Default"/>
        <table:table-row table:style-name="ro1">
          <table:table-cell table:number-columns-repeated="4"/>
          <table:table-cell table:style-name="ce7" office:value-type="string" calcext:value-type="string" table:number-columns-spanned="2" table:number-rows-spanned="1">
            <text:p>on-demand</text:p>
          </table:table-cell>
          <table:covered-table-cell/>
          <table:table-cell table:style-name="ce17" office:value-type="string" calcext:value-type="string" table:number-columns-spanned="3" table:number-rows-spanned="1">
            <text:p>std 1yr</text:p>
          </table:table-cell>
          <table:covered-table-cell table:style-name="ce17"/>
          <table:covered-table-cell table:style-name="ce14"/>
          <table:table-cell table:style-name="ce5" table:number-columns-repeated="1015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 office:value-type="string" calcext:value-type="string">
            <text:p>vCPU</text:p>
          </table:table-cell>
          <table:table-cell table:style-name="ce5" office:value-type="string" calcext:value-type="string">
            <text:p>ECU</text:p>
          </table:table-cell>
          <table:table-cell table:style-name="ce5" office:value-type="string" calcext:value-type="string">
            <text:p>RAM</text:p>
          </table:table-cell>
          <table:table-cell table:style-name="ce8" office:value-type="string" calcext:value-type="string">
            <text:p>$/hr</text:p>
          </table:table-cell>
          <table:table-cell table:number-columns-repeated="2" table:style-name="ce14" office:value-type="string" calcext:value-type="string">
            <text:p>$/month</text:p>
          </table:table-cell>
          <table:table-cell table:style-name="ce14" office:value-type="string" calcext:value-type="string">
            <text:p>$/yr</text:p>
          </table:table-cell>
          <table:table-cell table:style-name="ce20" office:value-type="string" calcext:value-type="string">
            <text:p>all upfr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3.nano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currency" office:currency="AUD" office:value="0.0066" calcext:value-type="currency">
            <text:p>$0.0066</text:p>
          </table:table-cell>
          <table:table-cell table:formula="of:=[.E3]*24*365/12" office:value-type="currency" office:currency="AUD" office:value="4.818" calcext:value-type="currency">
            <text:p>$5</text:p>
          </table:table-cell>
          <table:table-cell office:value-type="currency" office:currency="AUD" office:value="3.28" calcext:value-type="currency">
            <text:p>$3</text:p>
          </table:table-cell>
          <table:table-cell table:formula="of:=[.G3]*12" office:value-type="currency" office:currency="AUD" office:value="39.36" calcext:value-type="currency">
            <text:p>$39</text:p>
          </table:table-cell>
          <table:table-cell office:value-type="currency" office:currency="AUD" office:value="37" calcext:value-type="currency">
            <text:p>$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3.micro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132" calcext:value-type="currency">
            <text:p>$0.0132</text:p>
          </table:table-cell>
          <table:table-cell table:formula="of:=[.E4]*24*365/12" office:value-type="currency" office:currency="AUD" office:value="9.636" calcext:value-type="currency">
            <text:p>$10</text:p>
          </table:table-cell>
          <table:table-cell office:value-type="currency" office:currency="AUD" office:value="6.57" calcext:value-type="currency">
            <text:p>$7</text:p>
          </table:table-cell>
          <table:table-cell table:formula="of:=[.G4]*12" office:value-type="currency" office:currency="AUD" office:value="78.84" calcext:value-type="currency">
            <text:p>$79</text:p>
          </table:table-cell>
          <table:table-cell office:value-type="currency" office:currency="AUD" office:value="73" calcext:value-type="currency">
            <text:p>$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3.small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0264" calcext:value-type="currency">
            <text:p>$0.0264</text:p>
          </table:table-cell>
          <table:table-cell table:formula="of:=[.E5]*24*365/12" office:value-type="currency" office:currency="AUD" office:value="19.272" calcext:value-type="currency">
            <text:p>$19</text:p>
          </table:table-cell>
          <table:table-cell office:value-type="currency" office:currency="AUD" office:value="13.07" calcext:value-type="currency">
            <text:p>$13</text:p>
          </table:table-cell>
          <table:table-cell table:formula="of:=[.G5]*12" office:value-type="currency" office:currency="AUD" office:value="156.84" calcext:value-type="currency">
            <text:p>$157</text:p>
          </table:table-cell>
          <table:table-cell office:value-type="currency" office:currency="AUD" office:value="147" calcext:value-type="currency">
            <text:p>$147</text:p>
          </table:table-cell>
          <table:table-cell table:style-name="ce13"/>
          <table:table-cell table:number-columns-repeated="1014"/>
        </table:table-row>
        <table:table-row table:style-name="ro1">
          <table:table-cell office:value-type="string" calcext:value-type="string">
            <text:p>t3.medium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0528" calcext:value-type="currency">
            <text:p>$0.0528</text:p>
          </table:table-cell>
          <table:table-cell table:formula="of:=[.E6]*24*365/12" office:value-type="currency" office:currency="AUD" office:value="38.544" calcext:value-type="currency">
            <text:p>$39</text:p>
          </table:table-cell>
          <table:table-cell office:value-type="currency" office:currency="AUD" office:value="26.21" calcext:value-type="currency">
            <text:p>$26</text:p>
          </table:table-cell>
          <table:table-cell table:formula="of:=[.G6]*12" office:value-type="currency" office:currency="AUD" office:value="314.52" calcext:value-type="currency">
            <text:p>$315</text:p>
          </table:table-cell>
          <table:table-cell office:value-type="currency" office:currency="AUD" office:value="293" calcext:value-type="currency">
            <text:p>$2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5.lar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AUD" office:value="0.12" calcext:value-type="currency">
            <text:p>$0.1200</text:p>
          </table:table-cell>
          <table:table-cell table:formula="of:=[.E7]*24*365/12" office:value-type="currency" office:currency="AUD" office:value="87.6" calcext:value-type="currency">
            <text:p>$88</text:p>
          </table:table-cell>
          <table:table-cell office:value-type="currency" office:currency="AUD" office:value="60.59" calcext:value-type="currency">
            <text:p>$61</text:p>
          </table:table-cell>
          <table:table-cell table:formula="of:=[.G7]*12" office:value-type="currency" office:currency="AUD" office:value="727.08" calcext:value-type="currency">
            <text:p>$727</text:p>
          </table:table-cell>
          <table:table-cell office:value-type="currency" office:currency="AUD" office:value="680" calcext:value-type="currency">
            <text:p>$6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.larg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11" calcext:value-type="currency">
            <text:p>$0.1110</text:p>
          </table:table-cell>
          <table:table-cell table:formula="of:=[.E8]*24*365/12" office:value-type="currency" office:currency="AUD" office:value="81.03" calcext:value-type="currency">
            <text:p>$81</text:p>
          </table:table-cell>
          <table:table-cell office:value-type="currency" office:currency="AUD" office:value="51.83" calcext:value-type="currency">
            <text:p>$52</text:p>
          </table:table-cell>
          <table:table-cell table:formula="of:=[.G8]*12" office:value-type="currency" office:currency="AUD" office:value="621.96" calcext:value-type="currency">
            <text:p>$622</text:p>
          </table:table-cell>
          <table:table-cell office:value-type="currency" office:currency="AUD" office:value="578" calcext:value-type="currency">
            <text:p>$5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.xlarg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currency" office:currency="AUD" office:value="0.222" calcext:value-type="currency">
            <text:p>$0.2220</text:p>
          </table:table-cell>
          <table:table-cell table:formula="of:=[.E9]*24*365/12" office:value-type="currency" office:currency="AUD" office:value="162.06" calcext:value-type="currency">
            <text:p>$162</text:p>
          </table:table-cell>
          <table:table-cell office:value-type="currency" office:currency="AUD" office:value="102.93" calcext:value-type="currency">
            <text:p>$103</text:p>
          </table:table-cell>
          <table:table-cell table:formula="of:=[.G9]*12" office:value-type="currency" office:currency="AUD" office:value="1235.16" calcext:value-type="currency">
            <text:p>$1,235</text:p>
          </table:table-cell>
          <table:table-cell office:value-type="currency" office:currency="AUD" office:value="1157" calcext:value-type="currency">
            <text:p>$1,15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db.t2.micro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28" calcext:value-type="currency">
            <text:p>$0.0280</text:p>
          </table:table-cell>
          <table:table-cell table:formula="of:=[.E12]*24*365/12" office:value-type="currency" office:currency="AUD" office:value="20.44" calcext:value-type="currency">
            <text:p>$20</text:p>
          </table:table-cell>
          <table:table-cell office:value-type="currency" office:currency="AUD" office:value="16.352" calcext:value-type="currency">
            <text:p>$16</text:p>
          </table:table-cell>
          <table:table-cell table:formula="of:=[.G12]*12" office:value-type="currency" office:currency="AUD" office:value="196.224" calcext:value-type="currency">
            <text:p>$196</text:p>
          </table:table-cell>
          <table:table-cell office:value-type="currency" office:currency="AUD" office:value="181" calcext:value-type="currency">
            <text:p>$1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.t2.small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056" calcext:value-type="currency">
            <text:p>$0.0560</text:p>
          </table:table-cell>
          <table:table-cell table:formula="of:=[.E13]*24*365/12" office:value-type="currency" office:currency="AUD" office:value="40.88" calcext:value-type="currency">
            <text:p>$41</text:p>
          </table:table-cell>
          <table:table-cell office:value-type="currency" office:currency="AUD" office:value="32.704" calcext:value-type="currency">
            <text:p>$33</text:p>
          </table:table-cell>
          <table:table-cell table:formula="of:=[.G13]*12" office:value-type="currency" office:currency="AUD" office:value="392.448" calcext:value-type="currency">
            <text:p>$392</text:p>
          </table:table-cell>
          <table:table-cell office:value-type="currency" office:currency="AUD" office:value="361" calcext:value-type="currency">
            <text:p>$3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.t2.medium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12" calcext:value-type="currency">
            <text:p>$0.1120</text:p>
          </table:table-cell>
          <table:table-cell table:formula="of:=[.E14]*24*365/12" office:value-type="currency" office:currency="AUD" office:value="81.76" calcext:value-type="currency">
            <text:p>$82</text:p>
          </table:table-cell>
          <table:table-cell office:value-type="currency" office:currency="AUD" office:value="65.408" calcext:value-type="currency">
            <text:p>$65</text:p>
          </table:table-cell>
          <table:table-cell table:formula="of:=[.G14]*12" office:value-type="currency" office:currency="AUD" office:value="784.896" calcext:value-type="currency">
            <text:p>$785</text:p>
          </table:table-cell>
          <table:table-cell office:value-type="currency" office:currency="AUD" office:value="722" calcext:value-type="currency">
            <text:p>$72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2.micro.elasticsearch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28" calcext:value-type="currency">
            <text:p>$0.0280</text:p>
          </table:table-cell>
          <table:table-cell table:formula="of:=[.E17]*24*365/12" office:value-type="currency" office:currency="AUD" office:value="20.44" calcext:value-type="currency">
            <text:p>$20</text:p>
          </table:table-cell>
          <table:table-cell table:number-columns-repeated="2" table:style-name="ce18" office:value-type="string" calcext:value-type="string">
            <text:p>N/A</text:p>
          </table:table-cell>
          <table:table-cell table:style-name="ce21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2.small.elasticsearch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056" calcext:value-type="currency">
            <text:p>$0.0560</text:p>
          </table:table-cell>
          <table:table-cell table:formula="of:=[.E18]*24*365/12" office:value-type="currency" office:currency="AUD" office:value="40.88" calcext:value-type="currency">
            <text:p>$41</text:p>
          </table:table-cell>
          <table:table-cell table:number-columns-repeated="2" table:style-name="ce18" office:value-type="string" calcext:value-type="string">
            <text:p>N/A</text:p>
          </table:table-cell>
          <table:table-cell table:style-name="ce21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2.medium.elasticsearch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12" calcext:value-type="currency">
            <text:p>$0.1120</text:p>
          </table:table-cell>
          <table:table-cell table:formula="of:=[.E19]*24*365/12" office:value-type="currency" office:currency="AUD" office:value="81.76" calcext:value-type="currency">
            <text:p>$82</text:p>
          </table:table-cell>
          <table:table-cell table:number-columns-repeated="2" table:style-name="ce18" office:value-type="string" calcext:value-type="string">
            <text:p>N/A</text:p>
          </table:table-cell>
          <table:table-cell table:style-name="ce21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4.large.elasticsearch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currency" office:currency="AUD" office:value="0.188" calcext:value-type="currency">
            <text:p>$0.1880</text:p>
          </table:table-cell>
          <table:table-cell table:formula="of:=[.E20]*24*365/12" office:value-type="currency" office:currency="AUD" office:value="137.24" calcext:value-type="currency">
            <text:p>$137</text:p>
          </table:table-cell>
          <table:table-cell table:formula="of:=0.13*24*365/12" office:value-type="currency" office:currency="AUD" office:value="94.9" calcext:value-type="currency">
            <text:p>$95</text:p>
          </table:table-cell>
          <table:table-cell table:formula="of:=[.G20]*12" office:value-type="currency" office:currency="AUD" office:value="1138.8" calcext:value-type="currency">
            <text:p>$1,139</text:p>
          </table:table-cell>
          <table:table-cell office:value-type="currency" office:currency="AUD" office:value="1070" calcext:value-type="currency">
            <text:p>$1,070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Fine grained (too underpowered)</text:p>
          </table:table-cell>
          <table:table-cell table:style-name="ce4" table:number-columns-repeated="3"/>
          <table:table-cell table:style-name="ce10"/>
          <table:table-cell table:style-name="ce15" table:number-columns-repeated="4"/>
          <table:table-cell table:style-name="ce4" table:number-columns-repeated="1015"/>
        </table:table-row>
        <table:table-row table:style-name="ro1">
          <table:table-cell/>
          <table:table-cell table:style-name="ce5" office:value-type="string" calcext:value-type="string">
            <text:p>RAM</text:p>
          </table:table-cell>
          <table:table-cell table:number-columns-repeated="3"/>
          <table:table-cell table:style-name="ce14" office:value-type="string" calcext:value-type="string">
            <text:p>OD</text:p>
          </table:table-cell>
          <table:table-cell table:style-name="ce14" office:value-type="string" calcext:value-type="string">
            <text:p>1Y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app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t3.small</text:p>
          </table:table-cell>
          <table:table-cell table:formula="of:=[.F5]" office:value-type="currency" office:currency="AUD" office:value="19.272" calcext:value-type="currency">
            <text:p>$19</text:p>
          </table:table-cell>
          <table:table-cell table:formula="of:=[.G5]" office:value-type="currency" office:currency="AUD" office:value="13.07" calcext:value-type="currency">
            <text:p>$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skman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3.nano</text:p>
          </table:table-cell>
          <table:table-cell table:formula="of:=[.F3]" office:value-type="currency" office:currency="AUD" office:value="4.818" calcext:value-type="currency">
            <text:p>$5</text:p>
          </table:table-cell>
          <table:table-cell table:formula="of:=[.G3]" office:value-type="currency" office:currency="AUD" office:value="3.28" calcext:value-type="currency">
            <text:p>$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a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1" office:value-type="string" calcext:value-type="string" table:number-columns-spanned="1" table:number-rows-spanned="3">
            <text:p>t3.nano</text:p>
          </table:table-cell>
          <table:table-cell table:formula="of:=[.F3]" office:value-type="currency" office:currency="AUD" office:value="4.818" calcext:value-type="currency">
            <text:p>$5</text:p>
          </table:table-cell>
          <table:table-cell table:formula="of:=[.G3]" office:value-type="currency" office:currency="AUD" office:value="3.28" calcext:value-type="currency">
            <text:p>$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rafana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  <table:covered-table-cell/>
          <table:table-cell table:number-columns-repeated="1019"/>
        </table:table-row>
        <table:table-row table:style-name="ro1">
          <table:table-cell table:style-name="ce1" office:value-type="string" calcext:value-type="string">
            <text:p>prometheus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  <table:covered-table-cell/>
          <table:table-cell table:number-columns-repeated="1019"/>
        </table:table-row>
        <table:table-row table:style-name="ro1">
          <table:table-cell table:style-name="ce1" office:value-type="string" calcext:value-type="string">
            <text:p>logstash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3.nano</text:p>
          </table:table-cell>
          <table:table-cell table:formula="of:=[.F3]" office:value-type="currency" office:currency="AUD" office:value="4.818" calcext:value-type="currency">
            <text:p>$5</text:p>
          </table:table-cell>
          <table:table-cell table:formula="of:=[.G3]" office:value-type="currency" office:currency="AUD" office:value="3.28" calcext:value-type="currency">
            <text:p>$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asticsearch</text:p>
          </table:table-cell>
          <table:table-cell table:number-columns-repeated="3"/>
          <table:table-cell table:style-name="ce11" office:value-type="string" calcext:value-type="string" table:number-columns-spanned="1" table:number-rows-spanned="2">
            <text:p>t2.mirco</text:p>
          </table:table-cell>
          <table:table-cell table:formula="of:=[.F$17]" office:value-type="currency" office:currency="AUD" office:value="20.44" calcext:value-type="currency">
            <text:p>$20</text:p>
          </table:table-cell>
          <table:table-cell table:formula="of:=[.F$17]" office:value-type="currency" office:currency="AUD" office:value="20.44" calcext:value-type="currency">
            <text:p>$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bana</text:p>
          </table:table-cell>
          <table:table-cell table:number-columns-repeated="3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postgres</text:p>
          </table:table-cell>
          <table:table-cell table:number-columns-repeated="3"/>
          <table:table-cell office:value-type="string" calcext:value-type="string">
            <text:p>t2.mirco</text:p>
          </table:table-cell>
          <table:table-cell table:formula="of:=[.F$12]" office:value-type="currency" office:currency="AUD" office:value="20.44" calcext:value-type="currency">
            <text:p>$20</text:p>
          </table:table-cell>
          <table:table-cell table:formula="of:=[.G$12]" office:value-type="currency" office:currency="AUD" office:value="16.352" calcext:value-type="currency">
            <text:p>$1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6" table:formula="of:=SUM([.F27:.F35])" office:value-type="currency" office:currency="AUD" office:value="74.606" calcext:value-type="currency">
            <text:p>$75</text:p>
          </table:table-cell>
          <table:table-cell table:style-name="ce16" table:formula="of:=SUM([.G27:.G35])" office:value-type="currency" office:currency="AUD" office:value="59.702" calcext:value-type="currency">
            <text:p>$6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ingle large (everything on one host could be dangerous; also would need cpu prioritisation)</text:p>
          </table:table-cell>
          <table:table-cell table:style-name="ce4" table:number-columns-repeated="3"/>
          <table:table-cell table:style-name="ce10"/>
          <table:table-cell table:style-name="ce15" table:number-columns-repeated="4"/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webapp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/>
          <table:table-cell table:style-name="Default" office:value-type="string" calcext:value-type="string">
            <text:p>m5.large</text:p>
          </table:table-cell>
          <table:table-cell table:formula="of:=[.F7]" office:value-type="currency" office:currency="AUD" office:value="87.6" calcext:value-type="currency">
            <text:p>$88</text:p>
          </table:table-cell>
          <table:table-cell table:formula="of:=[.G7]" office:value-type="currency" office:currency="AUD" office:value="60.59" calcext:value-type="currency">
            <text:p>$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skman</text:p>
          </table:table-cell>
          <table:table-cell office:value-type="float" office:value="450" calcext:value-type="float">
            <text:p>4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al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fana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metheus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gstash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asticsearch</text:p>
          </table:table-cell>
          <table:table-cell table:number-columns-repeated="3"/>
          <table:table-cell table:style-name="ce11" office:value-type="string" calcext:value-type="string" table:number-columns-spanned="1" table:number-rows-spanned="2">
            <text:p>t2.mirco</text:p>
          </table:table-cell>
          <table:table-cell table:formula="of:=[.F$17]" office:value-type="currency" office:currency="AUD" office:value="20.44" calcext:value-type="currency">
            <text:p>$20</text:p>
          </table:table-cell>
          <table:table-cell table:style-name="ce19" table:formula="of:=[.F$17]" office:value-type="currency" office:currency="AUD" office:value="20.44" calcext:value-type="currency">
            <text:p>$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bana</text:p>
          </table:table-cell>
          <table:table-cell table:number-columns-repeated="3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postgres</text:p>
          </table:table-cell>
          <table:table-cell table:number-columns-repeated="3"/>
          <table:table-cell office:value-type="string" calcext:value-type="string">
            <text:p>t2.mirco</text:p>
          </table:table-cell>
          <table:table-cell table:formula="of:=[.F$12]" office:value-type="currency" office:currency="AUD" office:value="20.44" calcext:value-type="currency">
            <text:p>$20</text:p>
          </table:table-cell>
          <table:table-cell table:formula="of:=[.G$12]" office:value-type="currency" office:currency="AUD" office:value="16.352" calcext:value-type="currency">
            <text:p>$1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6" table:formula="of:=SUM([.F39:.F47])" office:value-type="currency" office:currency="AUD" office:value="128.48" calcext:value-type="currency">
            <text:p>$128</text:p>
          </table:table-cell>
          <table:table-cell table:style-name="ce16" table:formula="of:=SUM([.G39:.G47])" office:value-type="currency" office:currency="AUD" office:value="97.382" calcext:value-type="currency">
            <text:p>$9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User-facing + other (speed still a concern)</text:p>
          </table:table-cell>
          <table:table-cell table:style-name="ce4" table:number-columns-repeated="3"/>
          <table:table-cell table:style-name="ce10"/>
          <table:table-cell table:style-name="ce15" table:number-columns-repeated="4"/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webapp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/>
          <table:table-cell table:style-name="Default" office:value-type="string" calcext:value-type="string">
            <text:p>t3.small</text:p>
          </table:table-cell>
          <table:table-cell table:formula="of:=[.F5]" office:value-type="currency" office:currency="AUD" office:value="19.272" calcext:value-type="currency">
            <text:p>$19</text:p>
          </table:table-cell>
          <table:table-cell table:formula="of:=[.G5]" office:value-type="currency" office:currency="AUD" office:value="13.07" calcext:value-type="currency">
            <text:p>$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skman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style-name="ce12" office:value-type="string" calcext:value-type="string" table:number-columns-spanned="1" table:number-rows-spanned="5">
            <text:p>t3.small</text:p>
          </table:table-cell>
          <table:table-cell table:formula="of:=[.F5]" office:value-type="currency" office:currency="AUD" office:value="19.272" calcext:value-type="currency">
            <text:p>$19</text:p>
          </table:table-cell>
          <table:table-cell table:formula="of:=[.G5]" office:value-type="currency" office:currency="AUD" office:value="13.07" calcext:value-type="currency">
            <text:p>$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a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/>
          <table:table-cell table:number-columns-repeated="1019"/>
        </table:table-row>
        <table:table-row table:style-name="ro1">
          <table:table-cell table:style-name="ce1" office:value-type="string" calcext:value-type="string">
            <text:p>grafana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  <table:covered-table-cell/>
          <table:table-cell table:number-columns-repeated="1019"/>
        </table:table-row>
        <table:table-row table:style-name="ro1">
          <table:table-cell table:style-name="ce1" office:value-type="string" calcext:value-type="string">
            <text:p>prometheus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  <table:covered-table-cell/>
          <table:table-cell table:number-columns-repeated="1019"/>
        </table:table-row>
        <table:table-row table:style-name="ro1">
          <table:table-cell table:style-name="ce1" office:value-type="string" calcext:value-type="string">
            <text:p>logstash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elasticsearch</text:p>
          </table:table-cell>
          <table:table-cell table:number-columns-repeated="3"/>
          <table:table-cell table:style-name="ce11" office:value-type="string" calcext:value-type="string" table:number-columns-spanned="1" table:number-rows-spanned="2">
            <text:p>t2.mirco</text:p>
          </table:table-cell>
          <table:table-cell table:formula="of:=[.F$17]" office:value-type="currency" office:currency="AUD" office:value="20.44" calcext:value-type="currency">
            <text:p>$20</text:p>
          </table:table-cell>
          <table:table-cell table:style-name="ce19" table:formula="of:=[.F$17]" office:value-type="currency" office:currency="AUD" office:value="20.44" calcext:value-type="currency">
            <text:p>$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bana</text:p>
          </table:table-cell>
          <table:table-cell table:number-columns-repeated="3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postgres</text:p>
          </table:table-cell>
          <table:table-cell table:number-columns-repeated="3"/>
          <table:table-cell office:value-type="string" calcext:value-type="string">
            <text:p>t2.mirco</text:p>
          </table:table-cell>
          <table:table-cell table:formula="of:=[.F$12]" office:value-type="currency" office:currency="AUD" office:value="20.44" calcext:value-type="currency">
            <text:p>$20</text:p>
          </table:table-cell>
          <table:table-cell table:formula="of:=[.G$12]" office:value-type="currency" office:currency="AUD" office:value="16.352" calcext:value-type="currency">
            <text:p>$1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6" table:formula="of:=SUM([.F51:.F59])" office:value-type="currency" office:currency="AUD" office:value="79.424" calcext:value-type="currency">
            <text:p>$79</text:p>
          </table:table-cell>
          <table:table-cell table:style-name="ce16" table:formula="of:=SUM([.G51:.G59])" office:value-type="currency" office:currency="AUD" office:value="62.932" calcext:value-type="currency">
            <text:p>$63</text:p>
          </table:table-cell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FreeSans" svg:font-family="FreeSans" style:font-family-generic="system" style:font-pitch="variable"/>
    <style:font-face style:name="SetoFont" svg:font-family="Seto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Seto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AU">$</number:currency-symbol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AU">$</number:currency-symbol>
      <number:number number:decimal-places="4" loext:min-decimal-places="4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AU">$</number:currency-symbol>
      <number:number number:decimal-places="4" loext:min-decimal-places="4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AU">$</number:currency-symbol>
      <number:number number:decimal-places="5" loext:min-decimal-places="5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AU">$</number:currency-symbol>
      <number:number number:decimal-places="5" loext:min-decimal-places="5" number:min-integer-digits="1" number:grouping="true"/>
      <style:map style:condition="value()&gt;=0" style:apply-style-name="N111P0"/>
    </number:currency-style>
    <number:number-style style:name="N112">
      <number:number number:decimal-places="1" loext:min-decimal-places="1" number:min-integer-digits="1"/>
    </number:number-style>
    <number:currency-style style:name="N113P0" style:volatile="true">
      <number:currency-symbol number:language="en" number:country="AU">$</number:currency-symbol>
      <number:number number:decimal-places="1" loext:min-decimal-places="1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AU">$</number:currency-symbol>
      <number:number number:decimal-places="1" loext:min-decimal-places="1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20:42:28.325406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20:33:55.746914671</meta:creation-date>
    <dc:date>2018-11-20T22:50:35.423848832</dc:date>
    <meta:editing-duration>PT16M2S</meta:editing-duration>
    <meta:editing-cycles>8</meta:editing-cycles>
    <meta:generator>LibreOffice/6.1.2.1$Linux_X86_64 LibreOffice_project/10$Build-1</meta:generator>
    <meta:document-statistic meta:table-count="2" meta:cell-count="253" meta:object-count="0"/>
  </office:meta>
</office:document-meta>
</file>
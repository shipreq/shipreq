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ffffcc"/>
    </style:style>
    <style:style style:name="ce3" style:family="table-cell" style:parent-style-name="Default" style:data-style-name="N104"/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109"/>
    <style:style style:name="ce6" style:family="table-cell" style:parent-style-name="Default" style:data-style-name="N110"/>
  </office:automatic-styles>
  <office:body>
    <office:spreadsheet>
      <table:calculation-settings table:use-regular-expressions="false" table:use-wildcards="true"/>
      <table:table table:name="tech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BS pricing</text:p>
          </table:table-cell>
          <table:table-cell/>
        </table:table-row>
        <table:table-row table:style-name="ro1">
          <table:table-cell table:style-name="ce2" office:value-type="currency" office:currency="AUD" office:value="0.12" calcext:value-type="currency">
            <text:p>$0.12</text:p>
          </table:table-cell>
          <table:table-cell office:value-type="string" calcext:value-type="string">
            <text:p>/ GB / month</text:p>
          </table:table-cell>
        </table:table-row>
        <table:table-row table:style-name="ro1">
          <table:table-cell table:style-name="ce3" table:formula="of:=[.A2]*12" office:value-type="currency" office:currency="AUD" office:value="1.44" calcext:value-type="currency">
            <text:p>$1.44</text:p>
          </table:table-cell>
          <table:table-cell office:value-type="string" calcext:value-type="string">
            <text:p>/ GB / year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Observations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MB / day</text:p>
          </table:table-cell>
        </table:table-row>
        <table:table-row table:style-name="ro1">
          <table:table-cell table:formula="of:=[.A6]*365/1000" office:value-type="float" office:value="18.25" calcext:value-type="float">
            <text:p>18.25</text:p>
          </table:table-cell>
          <table:table-cell office:value-type="string" calcext:value-type="string">
            <text:p>GB / year</text:p>
          </table:table-cell>
        </table:table-row>
        <table:table-row table:style-name="ro1">
          <table:table-cell table:style-name="ce3" table:formula="of:=ROUNDUP([.A7])*[.A$2]" office:value-type="currency" office:currency="AUD" office:value="2.28" calcext:value-type="currency">
            <text:p>$2.28</text:p>
          </table:table-cell>
          <table:table-cell office:value-type="string" calcext:value-type="string">
            <text:p>/ month</text:p>
          </table:table-cell>
        </table:table-row>
        <table:table-row table:style-name="ro1">
          <table:table-cell table:style-name="ce3" table:formula="of:=[.A8]*12" office:value-type="currency" office:currency="AUD" office:value="27.36" calcext:value-type="currency">
            <text:p>$27.36</text:p>
          </table:table-cell>
          <table:table-cell office:value-type="string" calcext:value-type="string">
            <text:p>/ y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y retention period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formula="of:=[.A12]*7" office:value-type="float" office:value="56" calcext:value-type="float">
            <text:p>56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table:formula="of:=[.A13]*[.A6]" office:value-type="float" office:value="2800" calcext:value-type="float">
            <text:p>280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formula="of:=[.A14]/1000" office:value-type="float" office:value="2.8" calcext:value-type="float">
            <text:p>2.8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table:style-name="ce3" table:formula="of:=ROUNDUP([.A15])*[.A$2]" office:value-type="currency" office:currency="AUD" office:value="0.36" calcext:value-type="currency">
            <text:p>$0.36</text:p>
          </table:table-cell>
          <table:table-cell office:value-type="string" calcext:value-type="string">
            <text:p>/ mont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y size</text:p>
          </table:table-cell>
          <table:table-cell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table:formula="of:=[.A19]*1000" office:value-type="float" office:value="20000" calcext:value-type="float">
            <text:p>2000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formula="of:=[.A20]/[.A6]" office:value-type="float" office:value="400" calcext:value-type="float">
            <text:p>400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table:style-name="ce5" table:formula="of:=[.A21]/7" office:value-type="float" office:value="57.1428571428571" calcext:value-type="float">
            <text:p>57.1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style-name="ce6" table:formula="of:=12*[.A24]" office:value-type="float" office:value="13.1506849315068" calcext:value-type="float">
            <text:p>13.2</text:p>
          </table:table-cell>
          <table:table-cell office:value-type="string" calcext:value-type="string">
            <text:p>months</text:p>
          </table:table-cell>
        </table:table-row>
        <table:table-row table:style-name="ro1">
          <table:table-cell table:style-name="ce5" table:formula="of:=[.A21]/365" office:value-type="float" office:value="1.0958904109589" calcext:value-type="float">
            <text:p>1.1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table:style-name="ce3" table:formula="of:=ROUNDUP([.A19])*[.A$2]" office:value-type="currency" office:currency="AUD" office:value="2.4" calcext:value-type="currency">
            <text:p>$2.40</text:p>
          </table:table-cell>
          <table:table-cell office:value-type="string" calcext:value-type="string">
            <text:p>/ mon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6:44:25.511257711</meta:creation-date>
    <dc:date>2019-12-02T16:59:09.816475834</dc:date>
    <meta:editing-duration>PT5M42S</meta:editing-duration>
    <meta:editing-cycles>3</meta:editing-cycles>
    <meta:generator>LibreOffice/6.3.3.2.0$Linux_X86_64 LibreOffice_project/30$Build-2</meta:generator>
    <meta:document-statistic meta:table-count="1" meta:cell-count="40" meta:object-count="0"/>
  </office:meta>
</office:document-meta>
</file>
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erminus (TTF)" svg:font-family="'Terminus (TTF)'" style:font-pitch="fixed"/>
    <style:font-face style:name="Consolas" svg:font-family="Consolas" style:font-family-generic="swiss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494c" officeooo:paragraph-rsid="0010494c"/>
    </style:style>
    <style:style style:name="P2" style:family="paragraph" style:parent-style-name="Standard">
      <style:text-properties officeooo:rsid="0010494c" officeooo:paragraph-rsid="001b6cd2"/>
    </style:style>
    <style:style style:name="P3" style:family="paragraph" style:parent-style-name="Standard">
      <style:text-properties officeooo:rsid="00122aed" officeooo:paragraph-rsid="00122aed"/>
    </style:style>
    <style:style style:name="P4" style:family="paragraph" style:parent-style-name="Standard">
      <style:text-properties officeooo:rsid="00167d2f" officeooo:paragraph-rsid="00167d2f"/>
    </style:style>
    <style:style style:name="P5" style:family="paragraph" style:parent-style-name="Standard">
      <style:text-properties fo:font-weight="normal" officeooo:rsid="00167d2f" officeooo:paragraph-rsid="00167d2f" style:font-weight-asian="normal" style:font-weight-complex="normal"/>
    </style:style>
    <style:style style:name="P6" style:family="paragraph" style:parent-style-name="Standard">
      <style:text-properties fo:font-weight="normal" officeooo:rsid="001e4491" officeooo:paragraph-rsid="001e4491" style:font-weight-asian="normal" style:font-weight-complex="normal"/>
    </style:style>
    <style:style style:name="P7" style:family="paragraph" style:parent-style-name="Standard">
      <style:text-properties fo:font-weight="normal" officeooo:rsid="0016923c" officeooo:paragraph-rsid="0016923c" style:font-weight-asian="normal" style:font-weight-complex="normal"/>
    </style:style>
    <style:style style:name="P8" style:family="paragraph" style:parent-style-name="Standard">
      <style:text-properties fo:font-weight="normal" officeooo:rsid="00180d45" officeooo:paragraph-rsid="00180d45" style:font-weight-asian="normal" style:font-weight-complex="normal"/>
    </style:style>
    <style:style style:name="P9" style:family="paragraph" style:parent-style-name="Standard">
      <style:text-properties fo:font-weight="normal" officeooo:rsid="00190de3" officeooo:paragraph-rsid="00190de3" style:font-weight-asian="normal" style:font-weight-complex="normal"/>
    </style:style>
    <style:style style:name="P10" style:family="paragraph" style:parent-style-name="Standard">
      <style:text-properties fo:font-weight="normal" officeooo:rsid="001b6cd2" officeooo:paragraph-rsid="001b6cd2" style:font-weight-asian="normal" style:font-weight-complex="normal"/>
    </style:style>
    <style:style style:name="P11" style:family="paragraph" style:parent-style-name="Standard">
      <style:text-properties fo:font-weight="normal" officeooo:rsid="001dfb49" officeooo:paragraph-rsid="001dfb49" style:font-weight-asian="normal" style:font-weight-complex="normal"/>
    </style:style>
    <style:style style:name="P12" style:family="paragraph" style:parent-style-name="Standard">
      <style:text-properties fo:font-style="normal" fo:font-weight="normal" officeooo:rsid="0017fea8" officeooo:paragraph-rsid="00190de3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993dc" officeooo:paragraph-rsid="001993d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bold" officeooo:rsid="0017fea8" officeooo:paragraph-rsid="00190de3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weight="bold" officeooo:rsid="0010494c" officeooo:paragraph-rsid="0010494c" style:font-weight-asian="bold" style:font-weight-complex="bold"/>
    </style:style>
    <style:style style:name="P16" style:family="paragraph" style:parent-style-name="Standard">
      <style:text-properties fo:font-weight="bold" officeooo:rsid="0010494c" officeooo:paragraph-rsid="001b6cd2" style:font-weight-asian="bold" style:font-weight-complex="bold"/>
    </style:style>
    <style:style style:name="P17" style:family="paragraph" style:parent-style-name="Standard">
      <style:text-properties fo:font-weight="bold" officeooo:rsid="0010494c" officeooo:paragraph-rsid="001dfb49" style:font-weight-asian="bold" style:font-weight-complex="bold"/>
    </style:style>
    <style:style style:name="P18" style:family="paragraph" style:parent-style-name="Standard">
      <style:text-properties fo:font-weight="bold" officeooo:rsid="00122aed" officeooo:paragraph-rsid="00122aed" style:font-weight-asian="bold" style:font-weight-complex="bold"/>
    </style:style>
    <style:style style:name="P19" style:family="paragraph" style:parent-style-name="Standard">
      <style:text-properties fo:font-weight="bold" officeooo:rsid="00122aed" officeooo:paragraph-rsid="001dfb49" style:font-weight-asian="bold" style:font-weight-complex="bold"/>
    </style:style>
    <style:style style:name="P20" style:family="paragraph" style:parent-style-name="Standard">
      <style:text-properties fo:font-weight="bold" officeooo:rsid="0014ff5a" officeooo:paragraph-rsid="001dfb49" style:font-weight-asian="bold" style:font-weight-complex="bold"/>
    </style:style>
    <style:style style:name="P21" style:family="paragraph" style:parent-style-name="Standard">
      <style:text-properties fo:color="#ff420e" fo:font-weight="bold" officeooo:rsid="00167d2f" officeooo:paragraph-rsid="00167d2f" style:font-weight-asian="bold" style:font-weight-complex="bold"/>
    </style:style>
    <style:style style:name="P22" style:family="paragraph" style:parent-style-name="Standard">
      <style:text-properties fo:color="#ff420e" fo:font-weight="bold" officeooo:rsid="001c8cb8" officeooo:paragraph-rsid="001c8cb8" style:font-weight-asian="bold" style:font-weight-complex="bold"/>
    </style:style>
    <style:style style:name="P23" style:family="paragraph" style:parent-style-name="Standard">
      <style:text-properties fo:color="#ff420e" fo:font-weight="bold" officeooo:rsid="0016923c" officeooo:paragraph-rsid="0016923c" style:font-weight-asian="bold" style:font-weight-complex="bold"/>
    </style:style>
    <style:style style:name="P24" style:family="paragraph" style:parent-style-name="Standard">
      <style:text-properties fo:color="#ff420e" fo:font-weight="normal" officeooo:rsid="00167d2f" officeooo:paragraph-rsid="00167d2f" style:font-weight-asian="normal" style:font-weight-complex="normal"/>
    </style:style>
    <style:style style:name="P25" style:family="paragraph" style:parent-style-name="Standard">
      <style:text-properties fo:color="#ff420e" fo:font-style="normal" fo:font-weight="bold" officeooo:rsid="0017fea8" officeooo:paragraph-rsid="00190de3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color="#ff420e" officeooo:rsid="0010494c" officeooo:paragraph-rsid="0010494c"/>
    </style:style>
    <style:style style:name="P27" style:family="paragraph" style:parent-style-name="Standard">
      <style:text-properties fo:color="#ff0000" fo:font-weight="bold" officeooo:rsid="001b6cd2" officeooo:paragraph-rsid="001b6cd2" fo:background-color="#ffff00" style:font-weight-asian="bold" style:font-weight-complex="bold"/>
    </style:style>
    <style:style style:name="P28" style:family="paragraph" style:parent-style-name="Standard">
      <style:text-properties officeooo:rsid="001d0192" officeooo:paragraph-rsid="001d0192"/>
    </style:style>
    <style:style style:name="P29" style:family="paragraph" style:parent-style-name="Standard">
      <style:text-properties officeooo:rsid="001d112e" officeooo:paragraph-rsid="001d112e"/>
    </style:style>
    <style:style style:name="P30" style:family="paragraph" style:parent-style-name="Standard" style:list-style-name="L1">
      <style:text-properties fo:font-weight="normal" officeooo:rsid="001b6cd2" officeooo:paragraph-rsid="001b6cd2" style:font-weight-asian="normal" style:font-weight-complex="normal"/>
    </style:style>
    <style:style style:name="P31" style:family="paragraph" style:parent-style-name="Standard" style:list-style-name="L3">
      <style:text-properties fo:font-weight="normal" officeooo:rsid="001b6cd2" officeooo:paragraph-rsid="001b6cd2" style:font-weight-asian="normal" style:font-weight-complex="normal"/>
    </style:style>
    <style:style style:name="P32" style:family="paragraph" style:parent-style-name="Standard" style:list-style-name="L3">
      <style:text-properties fo:font-weight="normal" officeooo:rsid="001d0192" officeooo:paragraph-rsid="001d0192" style:font-weight-asian="normal" style:font-weight-complex="normal"/>
    </style:style>
    <style:style style:name="P33" style:family="paragraph" style:parent-style-name="Standard">
      <style:text-properties fo:font-weight="normal" officeooo:rsid="0021c1c9" officeooo:paragraph-rsid="0021c1c9" style:font-weight-asian="normal" style:font-weight-complex="normal"/>
    </style:style>
    <style:style style:name="P34" style:family="paragraph" style:parent-style-name="Standard" style:list-style-name="L2">
      <style:text-properties officeooo:rsid="001b6cd2" officeooo:paragraph-rsid="001b6cd2"/>
    </style:style>
    <style:style style:name="P35" style:family="paragraph" style:parent-style-name="Standard" style:list-style-name="L4">
      <style:text-properties officeooo:rsid="001d0192" officeooo:paragraph-rsid="001d0192"/>
    </style:style>
    <style:style style:name="P36" style:family="paragraph" style:parent-style-name="Standard" style:list-style-name="L5">
      <style:text-properties officeooo:rsid="001dfb49" officeooo:paragraph-rsid="001dfb49"/>
    </style:style>
    <style:style style:name="P37" style:family="paragraph" style:parent-style-name="Standard" style:list-style-name="L6">
      <style:text-properties officeooo:rsid="001dfb49" officeooo:paragraph-rsid="001dfb49"/>
    </style:style>
    <style:style style:name="P38" style:family="paragraph" style:parent-style-name="Standard">
      <style:text-properties officeooo:rsid="0021c1c9" officeooo:paragraph-rsid="0021c1c9"/>
    </style:style>
    <style:style style:name="P39" style:family="paragraph" style:parent-style-name="Standard">
      <style:text-properties fo:font-style="italic" officeooo:rsid="0021c1c9" officeooo:paragraph-rsid="0021c1c9" style:font-style-asian="italic" style:font-style-complex="italic"/>
    </style:style>
    <style:style style:name="P40" style:family="paragraph" style:parent-style-name="Standard">
      <style:text-properties fo:font-style="italic" officeooo:rsid="0014ff5a" officeooo:paragraph-rsid="001dfb49" style:font-style-asian="italic" style:font-style-complex="italic"/>
    </style:style>
    <style:style style:name="P41" style:family="paragraph" style:parent-style-name="Standard">
      <style:text-properties fo:font-style="italic" fo:font-weight="bold" officeooo:rsid="0014ff5a" officeooo:paragraph-rsid="0021c1c9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font-weight="bold" officeooo:rsid="0014ff5a" officeooo:paragraph-rsid="0014ff5a" style:font-weight-asian="bold" style:font-weight-complex="bold"/>
    </style:style>
    <style:style style:name="P43" style:family="paragraph" style:parent-style-name="Standard">
      <style:text-properties fo:font-weight="bold" officeooo:rsid="0014ff5a" officeooo:paragraph-rsid="001b6cd2" style:font-weight-asian="bold" style:font-weight-complex="bold"/>
    </style:style>
    <style:style style:name="P44" style:family="paragraph" style:parent-style-name="Standard">
      <style:text-properties fo:font-weight="bold" officeooo:rsid="00167d2f" officeooo:paragraph-rsid="00167d2f" style:font-weight-asian="bold" style:font-weight-complex="bold"/>
    </style:style>
    <style:style style:name="P45" style:family="paragraph" style:parent-style-name="Standard">
      <style:text-properties fo:font-weight="bold" officeooo:rsid="00190de3" officeooo:paragraph-rsid="00190de3" style:font-weight-asian="bold" style:font-weight-complex="bold"/>
    </style:style>
    <style:style style:name="T1" style:family="text">
      <style:text-properties officeooo:rsid="001b1d05"/>
    </style:style>
    <style:style style:name="T2" style:family="text">
      <style:text-properties officeooo:rsid="00190de3"/>
    </style:style>
    <style:style style:name="T3" style:family="text">
      <style:text-properties fo:color="#ff0000" officeooo:rsid="001b6cd2" fo:background-color="#ffff00"/>
    </style:style>
    <style:style style:name="T4" style:family="text">
      <style:text-properties fo:color="#ff0000" officeooo:rsid="001dfb49" fo:background-color="#ffff00"/>
    </style:style>
    <style:style style:name="T5" style:family="text">
      <style:text-properties officeooo:rsid="001dfb49"/>
    </style:style>
    <style:style style:name="T6" style:family="text">
      <style:text-properties style:font-name="Consolas" fo:font-size="10pt" style:font-size-asian="10pt" style:font-size-complex="10pt"/>
    </style:style>
    <style:style style:name="T7" style:family="text">
      <style:text-properties style:font-name="Consolas"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  <style:style style:name="T14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[Organisation]</text:p>
      <text:p text:style-name="P26"/>
      <text:p text:style-name="P15">You said previously “ <text:span text:style-name="T1">I need </text:span>[…] <text:span text:style-name="T1">organisation for other purposes”. </text:span>What purposes can you think of? <text:span text:style-name="T3">[Q is ambiguous]</text:span></text:p>
      <text:p text:style-name="P27"/>
      <text:p text:style-name="P10">I can think of these purposes:</text:p>
      <text:list xml:id="list7359471878880966741" text:style-name="L1">
        <text:list-item>
          <text:p text:style-name="P30">BA filtering UC scope when reading/printing/reviewing UCs.</text:p>
        </text:list-item>
        <text:list-item>
          <text:p text:style-name="P30">A share filtering UC scope when being accessed by Readers.</text:p>
        </text:list-item>
        <text:list-item>
          <text:p text:style-name="P30">PM/BA determining the scope of their versions.</text:p>
        </text:list-item>
        <text:list-item>
          <text:p text:style-name="P30">BA accessing the influence/scope/size of an organisational unit. Inverse of 1.</text:p>
          <text:p text:style-name="P30">Eg. How big is 1.0, how much work does Team A have to work with, what's completed.</text:p>
        </text:list-item>
      </text:list>
      <text:p text:style-name="P15"/>
      <text:p text:style-name="P15">Who is interested in those purposes and how important is it to them?</text:p>
      <text:p text:style-name="P1"/>
      <text:list xml:id="list4138106404483197835" text:style-name="L2">
        <text:list-item>
          <text:p text:style-name="P34">BA. Very important as project grows. 10 Ucs = slightly important, 50 UCs important. 100+ UCs critical.</text:p>
        </text:list-item>
        <text:list-item>
          <text:p text:style-name="P34">BA &amp; Readers. Same importance as above.</text:p>
        </text:list-item>
        <text:list-item>
          <text:p text:style-name="P34">BA/PM. Somewhat important.</text:p>
        </text:list-item>
        <text:list-item>
          <text:p text:style-name="P34">As above.</text:p>
        </text:list-item>
      </text:list>
      <text:p text:style-name="P1"/>
      <text:p text:style-name="P15">Why do those purposes matter?</text:p>
      <text:p text:style-name="P15"/>
      <text:list xml:id="list944264971135967428" text:style-name="L3">
        <text:list-item>
          <text:p text:style-name="P31">Near impossible to work without being to filter shit out.</text:p>
        </text:list-item>
        <text:list-item>
          <text:p text:style-name="P31">BA needs to manage amount of information washing over Reader. Also Reader, might not be privy to some requirements.</text:p>
        </text:list-item>
        <text:list-item>
          <text:p text:style-name="P32">PM/BA needs to estimate effort for Ucs in a version and balance it against time &amp; cost.</text:p>
        </text:list-item>
        <text:list-item>
          <text:p text:style-name="P32">BA: Confirm allocations match what they've got in their head.</text:p>
          <text:p text:style-name="P32">PM: estimate effort/workload and balance it against external factors.</text:p>
        </text:list-item>
      </text:list>
      <text:p text:style-name="P15"/>
      <text:p text:style-name="P15">What would happen if you couldn't use the product to organise you Ucs in the groups?</text:p>
      <text:p text:style-name="P15"/>
      <text:list xml:id="list2471563285034562471" text:style-name="L4">
        <text:list-item>
          <text:p text:style-name="P35">I would be very pissed off. I would have to use the editor to view each one-by-one. Wrt printing I'd just have to print everything and cross out certain UC titles.</text:p>
        </text:list-item>
        <text:list-item>
          <text:p text:style-name="P35">I would have to manually select Ucs. Every time a UC came in-scope or went out-of-scope I'd have to manually update all shares. Annoying.</text:p>
        </text:list-item>
        <text:list-item>
          <text:p text:style-name="P35">?</text:p>
        </text:list-item>
      </text:list>
      <text:p text:style-name="P28"/>
      <text:p text:style-name="P29">Actually I misread. If the product didn't have any org features in it then I'd have only 2 options.</text:p>
      <text:list xml:id="list3426945824102206822" text:style-name="L5">
        <text:list-item>
          <text:p text:style-name="P36">Use some external tool (Excel) to do the same thing. I'd have a row that matched the requirement Ids and then columns for the org stuff. That would be annoying because I would have to either omit titles from the external doc or copy titles into it and then they'd get out of sync.</text:p>
        </text:list-item>
        <text:list-item>
          <text:p text:style-name="P36">I'd abuse the titles of Ucs to add extra information. Things like [VERSION: 1.0]. Things would get ugly.</text:p>
        </text:list-item>
      </text:list>
      <text:p text:style-name="P2"/>
      <text:p text:style-name="P16">If versions are metadata instead of real UC content, why do some people want them to look like they are part of the UC?</text:p>
      <text:p text:style-name="P16"/>
      <text:list xml:id="list7237419069084076425" text:style-name="L6">
        <text:list-item>
          <text:p text:style-name="P37">People are used to it. It's the way it's commonly done. Decades of precedent.</text:p>
        </text:list-item>
        <text:list-item>
          <text:p text:style-name="P37">The distinction between content and org metadata is fine and not commonly recognised.</text:p>
        </text:list-item>
        <text:list-item>
          <text:p text:style-name="P37">When sharing/reviewing a UC the Reader will often like to see associated org data.</text:p>
        </text:list-item>
        <text:list-item>
          <text:p text:style-name="P37">Where else to put it?</text:p>
        </text:list-item>
      </text:list>
      <text:p text:style-name="P2"><text:soft-page-break/></text:p>
      <text:p text:style-name="P17">What about groupings <text:span text:style-name="T5">other than version</text:span>, do they all have the same relationship to Ucs? <text:span text:style-name="T3">[</text:span><text:span text:style-name="T4">Vague: Make relationships explicit.</text:span><text:span text:style-name="T3">]</text:span></text:p>
      <text:p text:style-name="P20">What attributes do &lt;grouping&gt; have?</text:p>
      <text:p text:style-name="P20"/>
      <text:p text:style-name="P39">See <text:span text:style-name="T6">feature-organisation.ods</text:span>.</text:p>
      <text:p text:style-name="P40"/>
      <text:p text:style-name="P19">If groupings were implemented without attributes, what problems would still exist, or arise?</text:p>
      <text:p text:style-name="P18"/>
      <text:p text:style-name="P38">Looking at the direct attributes, it wouldn't be a big deal. If everything had a single description attribute tht would probably be more than enough. If there were no attributes at all, I don't think it would matter too much.</text:p>
      <text:p text:style-name="P38"/>
      <text:p text:style-name="P38">For relation-attributes however, s<text:span text:style-name="T9">ee</text:span><text:span text:style-name="T8"> </text:span><text:span text:style-name="T7">feature-organisation.ods</text:span><text:span text:style-name="T8">.</text:span></text:p>
      <text:p text:style-name="P3"/>
      <text:p text:style-name="P42">What will the consequences be if &lt;each one&gt; is missing from the app?</text:p>
      <text:p text:style-name="P43">In the UC publish view, how is &lt;grouping&gt; normally integrated?</text:p>
      <text:p text:style-name="P43">Why do readers of the doc need to see it?</text:p>
      <text:p text:style-name="P42"/>
      <text:p text:style-name="P39">See <text:span text:style-name="T6">feature-organisation.ods</text:span>.</text:p>
      <text:p text:style-name="P41"/>
      <text:p text:style-name="P44">What's the trade-off between time and value?</text:p>
      <text:p text:style-name="P44"/>
      <text:p text:style-name="P38">Something <text:span text:style-name="T10">must</text:span><text:span text:style-name="T11"> be done to solve the scope problem. Everything else is nice to have.</text:span></text:p>
      <text:p text:style-name="P38"><text:span text:style-name="T11">The value should be sufficient to solve the scope problem with high value costing up to a month of time.</text:span></text:p>
      <text:p text:style-name="P4"/>
      <text:p text:style-name="P45">How can we judge the success of this solution?</text:p>
      <text:p text:style-name="P44"/>
      <text:p text:style-name="P33">Have an unorganised project of approx 100 Ucs.</text:p>
      <text:p text:style-name="P33">Organise all 100 in into 5 versions in under 10 minutes.</text:p>
      <text:p text:style-name="P33">Have a version with 40 Ucs in it, redistribute every 5<text:span text:style-name="T12">th</text:span> UC in a different version in under 5 minutes. (eg. 20% to ver A, 20% to ver B, etc.)</text:p>
      <text:p text:style-name="P33"><text:line-break/><text:span text:style-name="T14">???</text:span></text:p>
      <text:p text:style-name="P4"/>
      <text:p text:style-name="P22">[Completeness Evaluation]</text:p>
      <text:p text:style-name="P24"/>
      <text:p text:style-name="P5">How do you deal with this situation currently? How will you deal with it until an implementation is provided?</text:p>
      <text:p text:style-name="P5">Who is this important to? Why?</text:p>
      <text:p text:style-name="P5">What will they do after determining completeness?</text:p>
      <text:p text:style-name="P5">What will they do after discovering empty fields?</text:p>
      <text:p text:style-name="P5">What will they do after discovering placeholders?</text:p>
      <text:p text:style-name="P6"><text:span text:style-name="T1">W</text:span>hat problems could this feature create?</text:p>
      <text:p text:style-name="P7">How often would it be used?</text:p>
      <text:p text:style-name="P7">When would it be used?</text:p>
      <text:p text:style-name="P7"/>
      <text:p text:style-name="P7">When you say you want to see all incompletions in context without having to open each UC...</text:p>
      <text:p text:style-name="P7">- why is this important?</text:p>
      <text:p text:style-name="P7">- what would happen if you couldn't see them in context?</text:p>
      <text:p text:style-name="P7">- what do you expect to see when you say context? How much context?</text:p>
      <text:p text:style-name="P7"><text:soft-page-break/></text:p>
      <text:p text:style-name="P7">What kind of incompletions are there?</text:p>
      <text:p text:style-name="P7">What causes them in real-life?</text:p>
      <text:p text:style-name="P7">What is the typical lifecycle of such an incompletion?</text:p>
      <text:p text:style-name="P7">Can you think of or do you remember any variations?</text:p>
      <text:p text:style-name="P7"/>
      <text:p text:style-name="P7">Some fields are mandatory? How often does the mandatory-ness change?</text:p>
      <text:p text:style-name="P7"/>
      <text:p text:style-name="P11">WILL ALSO WANT TO SEE UCS MISSING VERSION, PRIORITIES.<text:tab/></text:p>
      <text:p text:style-name="P7"/>
      <text:p text:style-name="P23">[Field Management]</text:p>
      <text:p text:style-name="P7"/>
      <text:p text:style-name="P8">“Users will likely need to configure their own UC fields.”</text:p>
      <text:p text:style-name="P8">Why?</text:p>
      <text:p text:style-name="P8">How often?</text:p>
      <text:p text:style-name="P8">What will they do if they can't?</text:p>
      <text:p text:style-name="P8">When?</text:p>
      <text:p text:style-name="P8">Who?</text:p>
      <text:p text:style-name="P9">What problems could this feature create?</text:p>
      <text:p text:style-name="P9"/>
      <text:p text:style-name="P8">When you say change existing fields, what kind of changes can you imagine specifically?</text:p>
      <text:p text:style-name="P8"/>
      <text:p text:style-name="P8">When deleting a field, what should happen to its content?</text:p>
      <text:p text:style-name="P8">If a field is deleted it has content, should anyone still be able to see it? If so, how?</text:p>
      <text:p text:style-name="P8">If a field was deleted by mistake, in error or just by bad judgement, what would the consequences be? What are the time/cost/effort implications of said consequences? <text:span text:style-name="T2">What </text:span>would you <text:span text:style-name="T2">do </text:span>to remedy the situation?</text:p>
      <text:p text:style-name="P8"/>
      <text:p text:style-name="P9">How can we judge the success of a solution?</text:p>
      <text:p text:style-name="P14"/>
      <text:p text:style-name="P14"/>
      <text:p text:style-name="P25">[Read All UCs &amp; Generate PDF]</text:p>
      <text:p text:style-name="P12"/>
      <text:p text:style-name="P13">When &amp; why would you want to view/read multiple UCs at once?</text:p>
      <text:p text:style-name="P13"/>
      <text:p text:style-name="P13">When &amp; why would you want to print UCs?</text:p>
      <text:p text:style-name="P13"/>
      <text:p text:style-name="P13">How often would you want to perform &lt;answers above&gt;?</text:p>
      <text:p text:style-name="P13"/>
      <text:p text:style-name="P13">How important is a solution to you? What are the consequences of not having a solutio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erminus (TTF)" svg:font-family="'Terminus (TTF)'" style:font-pitch="fixed"/>
    <style:font-face style:name="Consolas" svg:font-family="Consolas" style:font-family-generic="swiss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AU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AU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14:43:53.051324719</meta:creation-date>
    <dc:date>2013-12-23T14:56:09.659775425</dc:date>
    <meta:editing-duration>PT1H8M8S</meta:editing-duration>
    <meta:editing-cycles>7</meta:editing-cycles>
    <meta:generator>LibreOffice/4.1.4.2$Linux_x86 LibreOffice_project/410m0$Build-2</meta:generator>
    <meta:document-statistic meta:table-count="0" meta:image-count="0" meta:object-count="0" meta:page-count="3" meta:paragraph-count="86" meta:word-count="996" meta:character-count="5580" meta:non-whitespace-character-count="4689"/>
  </office:meta>
</office:document-meta>
</file>
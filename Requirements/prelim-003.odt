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494c" officeooo:paragraph-rsid="0010494c"/>
    </style:style>
    <style:style style:name="P2" style:family="paragraph" style:parent-style-name="Standard">
      <style:text-properties officeooo:rsid="00122aed" officeooo:paragraph-rsid="00122aed"/>
    </style:style>
    <style:style style:name="P3" style:family="paragraph" style:parent-style-name="Standard">
      <style:text-properties officeooo:rsid="0014ff5a" officeooo:paragraph-rsid="0014ff5a"/>
    </style:style>
    <style:style style:name="T1" style:family="text">
      <style:text-properties officeooo:rsid="001b1d0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ou said previously “ <text:span text:style-name="T1">I need </text:span>[…] <text:span text:style-name="T1">organisation for other purposes”.</text:span></text:p>
      <text:p text:style-name="P1">What purposes can you think of?</text:p>
      <text:p text:style-name="P1"/>
      <text:p text:style-name="P1">Who is interested in those purposes and how important is it to them?</text:p>
      <text:p text:style-name="P1">Why do those purposes matter?</text:p>
      <text:p text:style-name="P1"/>
      <text:p text:style-name="P1">What would happen if you couldn't use the product to organise you Ucs in the groups?</text:p>
      <text:p text:style-name="P1"/>
      <text:p text:style-name="P1">If versions are metadata instead of real UC content, why do some people want them to look like they are part of the UC? What about the other groupings, do they all have the same relationship to Ucs?</text:p>
      <text:p text:style-name="P1"/>
      <text:p text:style-name="P2">If groupings were implemented without attributes, what problems would still exist, or arise?</text:p>
      <text:p text:style-name="P2"/>
      <text:p text:style-name="P3">What attributes do &lt;grouping&gt; have?</text:p>
      <text:p text:style-name="P3">What will the consequences be if &lt;each one&gt; is missing from the app?</text:p>
      <text:p text:style-name="P3"/>
      <text:p text:style-name="P3">In the UC publish view, how is &lt;grouping&gt; normally integrated? Why do readers of the doc need to see it?</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AU" style:letter-kerning="true" style:font-name-asian="AR PL UMing CN"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AU" style:letter-kerning="true" style:font-name-asian="AR PL UMing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mo" fo:font-family="Arimo" style:font-family-generic="swiss" style:font-pitch="variable" fo:font-size="14pt" style:font-name-asian="AR PL UMing CN" style:font-family-asian="'AR PL UMing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0T14:43:53.051324719</meta:creation-date>
    <dc:date>2013-12-20T15:26:35.218189703</dc:date>
    <meta:editing-duration>PT12M</meta:editing-duration>
    <meta:editing-cycles>2</meta:editing-cycles>
    <meta:generator>LibreOffice/4.1.4.2$Linux_x86 LibreOffice_project/410m0$Build-2</meta:generator>
    <meta:document-statistic meta:table-count="0" meta:image-count="0" meta:object-count="0" meta:page-count="1" meta:paragraph-count="10" meta:word-count="140" meta:character-count="775" meta:non-whitespace-character-count="645"/>
  </office:meta>
</office:document-meta>
</file>
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494c" officeooo:paragraph-rsid="0010494c"/>
    </style:style>
    <style:style style:name="P2" style:family="paragraph" style:parent-style-name="Standard">
      <style:text-properties officeooo:rsid="00122aed" officeooo:paragraph-rsid="00122aed"/>
    </style:style>
    <style:style style:name="P3" style:family="paragraph" style:parent-style-name="Standard">
      <style:text-properties officeooo:rsid="0014ff5a" officeooo:paragraph-rsid="0014ff5a"/>
    </style:style>
    <style:style style:name="P4" style:family="paragraph" style:parent-style-name="Standard">
      <style:text-properties officeooo:rsid="00167d2f" officeooo:paragraph-rsid="00167d2f"/>
    </style:style>
    <style:style style:name="P5" style:family="paragraph" style:parent-style-name="Standard">
      <style:text-properties fo:font-weight="bold" officeooo:rsid="00167d2f" officeooo:paragraph-rsid="00167d2f" style:font-weight-asian="bold" style:font-weight-complex="bold"/>
    </style:style>
    <style:style style:name="P6" style:family="paragraph" style:parent-style-name="Standard">
      <style:text-properties fo:font-weight="bold" officeooo:rsid="001c8cb8" officeooo:paragraph-rsid="001c8cb8" style:font-weight-asian="bold" style:font-weight-complex="bold"/>
    </style:style>
    <style:style style:name="P7" style:family="paragraph" style:parent-style-name="Standard">
      <style:text-properties fo:font-weight="bold" officeooo:rsid="0016923c" officeooo:paragraph-rsid="0016923c" style:font-weight-asian="bold" style:font-weight-complex="bold"/>
    </style:style>
    <style:style style:name="P8" style:family="paragraph" style:parent-style-name="Standard">
      <style:text-properties fo:font-weight="bold" officeooo:rsid="0017fea8" officeooo:paragraph-rsid="00190de3" style:font-weight-asian="bold" style:font-weight-complex="bold"/>
    </style:style>
    <style:style style:name="P9" style:family="paragraph" style:parent-style-name="Standard">
      <style:text-properties officeooo:rsid="0014ff5a" officeooo:paragraph-rsid="0014ff5a"/>
    </style:style>
    <style:style style:name="P10" style:family="paragraph" style:parent-style-name="Standard">
      <style:text-properties fo:font-weight="normal" officeooo:rsid="00167d2f" officeooo:paragraph-rsid="00167d2f" style:font-weight-asian="normal" style:font-weight-complex="normal"/>
    </style:style>
    <style:style style:name="P11" style:family="paragraph" style:parent-style-name="Standard">
      <style:text-properties fo:font-weight="normal" officeooo:rsid="001e4491" officeooo:paragraph-rsid="001e4491" style:font-weight-asian="normal" style:font-weight-complex="normal"/>
    </style:style>
    <style:style style:name="P12" style:family="paragraph" style:parent-style-name="Standard">
      <style:text-properties fo:font-weight="normal" officeooo:rsid="0016923c" officeooo:paragraph-rsid="0016923c" style:font-weight-asian="normal" style:font-weight-complex="normal"/>
    </style:style>
    <style:style style:name="P13" style:family="paragraph" style:parent-style-name="Standard">
      <style:text-properties fo:font-weight="normal" officeooo:rsid="00180d45" officeooo:paragraph-rsid="00180d45" style:font-weight-asian="normal" style:font-weight-complex="normal"/>
    </style:style>
    <style:style style:name="P14" style:family="paragraph" style:parent-style-name="Standard">
      <style:text-properties fo:font-weight="normal" officeooo:rsid="00190de3" officeooo:paragraph-rsid="00190de3" style:font-weight-asian="normal" style:font-weight-complex="normal"/>
    </style:style>
    <style:style style:name="P15" style:family="paragraph" style:parent-style-name="Standard">
      <style:text-properties officeooo:rsid="00190de3" officeooo:paragraph-rsid="00190de3"/>
    </style:style>
    <style:style style:name="P16" style:family="paragraph" style:parent-style-name="Standard">
      <style:text-properties fo:font-style="normal" fo:font-weight="normal" officeooo:rsid="0017fea8" officeooo:paragraph-rsid="00190de3" style:font-style-asian="normal" style:font-weight-asian="normal" style:font-style-complex="normal" style:font-weight-complex="normal"/>
    </style:style>
    <style:style style:name="P17" style:family="paragraph" style:parent-style-name="Standard">
      <style:text-properties fo:font-style="normal" fo:font-weight="normal" officeooo:rsid="001993dc" officeooo:paragraph-rsid="001993dc" style:font-style-asian="normal" style:font-weight-asian="normal" style:font-style-complex="normal" style:font-weight-complex="normal"/>
    </style:style>
    <style:style style:name="T1" style:family="text">
      <style:text-properties officeooo:rsid="001b1d05"/>
    </style:style>
    <style:style style:name="T2" style:family="text">
      <style:text-properties officeooo:rsid="00190de3"/>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rganisation]</text:p>
      <text:p text:style-name="P1">You said previously “ <text:span text:style-name="T1">I need </text:span>[…] <text:span text:style-name="T1">organisation for other purposes”.</text:span></text:p>
      <text:p text:style-name="P1">What purposes can you think of?</text:p>
      <text:p text:style-name="P1"/>
      <text:p text:style-name="P1">Who is interested in those purposes and how important is it to them?</text:p>
      <text:p text:style-name="P1">Why do those purposes matter?</text:p>
      <text:p text:style-name="P1"/>
      <text:p text:style-name="P1">What would happen if you couldn't use the product to organise you Ucs in the groups?</text:p>
      <text:p text:style-name="P1"/>
      <text:p text:style-name="P1">If versions are metadata instead of real UC content, why do some people want them to look like they are part of the UC? What about the other groupings, do they all have the same relationship to Ucs?</text:p>
      <text:p text:style-name="P1"/>
      <text:p text:style-name="P2">If groupings were implemented without attributes, what problems would still exist, or arise?</text:p>
      <text:p text:style-name="P2"/>
      <text:p text:style-name="P3">What attributes do &lt;grouping&gt; have?</text:p>
      <text:p text:style-name="P3">What will the consequences be if &lt;each one&gt; is missing from the app?</text:p>
      <text:p text:style-name="P3"/>
      <text:p text:style-name="P3">In the UC publish view, how is &lt;grouping&gt; normally integrated? Why do readers of the doc need to see it?</text:p>
      <text:p text:style-name="P3"/>
      <text:p text:style-name="P4">What's the trade-off between time and value?</text:p>
      <text:p text:style-name="P4"/>
      <text:p text:style-name="P15">How can we judge the success of this solution?</text:p>
      <text:p text:style-name="P4"/>
      <text:p text:style-name="P4"/>
      <text:p text:style-name="P6">[Completeness Evaluation]</text:p>
      <text:p text:style-name="P10"/>
      <text:p text:style-name="P10">How do you deal with this situation currently? How will you deal with it until an implementation is provided?</text:p>
      <text:p text:style-name="P10">Who is this important to? Why?</text:p>
      <text:p text:style-name="P10">What will they do after determining completeness?</text:p>
      <text:p text:style-name="P10">What will they do after discovering empty fields?</text:p>
      <text:p text:style-name="P10">What will they do after discovering placeholders?</text:p>
      <text:p text:style-name="P11"><text:span text:style-name="T1">W</text:span>hat problems could this feature create?</text:p>
      <text:p text:style-name="P12">How often would it be used?</text:p>
      <text:p text:style-name="P12">When would it be used?</text:p>
      <text:p text:style-name="P12"/>
      <text:p text:style-name="P12">When you say you want to see all incompletions in context without having to open each UC...</text:p>
      <text:p text:style-name="P12">- why is this important?</text:p>
      <text:p text:style-name="P12">- what would happen if you couldn't see them in context?</text:p>
      <text:p text:style-name="P12">- what do you expect to see when you say context? How much context?</text:p>
      <text:p text:style-name="P12"/>
      <text:p text:style-name="P12">What kind of incompletions are there?</text:p>
      <text:p text:style-name="P12">What causes them in real-life?</text:p>
      <text:p text:style-name="P12">What is the typical lifecycle of such an incompletion?</text:p>
      <text:p text:style-name="P12">Can you think of or do you remember any variations?</text:p>
      <text:p text:style-name="P12"/>
      <text:p text:style-name="P12">Some fields are mandatory? How often does the mandatory-ness change?</text:p>
      <text:p text:style-name="P12"/>
      <text:p text:style-name="P7">[Field Management]</text:p>
      <text:p text:style-name="P12"/>
      <text:p text:style-name="P13"><text:soft-page-break/>“Users will likely need to configure their own UC fields.”</text:p>
      <text:p text:style-name="P13">Why?</text:p>
      <text:p text:style-name="P13">How often?</text:p>
      <text:p text:style-name="P13">What will they do if they can't?</text:p>
      <text:p text:style-name="P13">When?</text:p>
      <text:p text:style-name="P13">Who?</text:p>
      <text:p text:style-name="P14">What problems could this feature create?</text:p>
      <text:p text:style-name="P14"/>
      <text:p text:style-name="P13">When you say change existing fields, what kind of changes can you imagine specifically?</text:p>
      <text:p text:style-name="P13"/>
      <text:p text:style-name="P13">When deleting a field, what should happen to its content?</text:p>
      <text:p text:style-name="P13">If a field is deleted it has content, should anyone still be able to see it? If so, how?</text:p>
      <text:p text:style-name="P13">If a field was deleted by mistake, in error or just by bad judgement, what would the consequences be? What are the time/cost/effort implications of said consequences? <text:span text:style-name="T2">What </text:span>would you <text:span text:style-name="T2">do </text:span>to remedy the situation?</text:p>
      <text:p text:style-name="P13"/>
      <text:p text:style-name="P14">How can we judge the success of a solution?</text:p>
      <text:p text:style-name="P8"><text:span text:style-name="T3"/></text:p>
      <text:p text:style-name="P8"><text:span text:style-name="T3"/></text:p>
      <text:p text:style-name="P8"><text:span text:style-name="T3">[Read All UCs &amp; Generate PDF]</text:span></text:p>
      <text:p text:style-name="P16"/>
      <text:p text:style-name="P17">When &amp; why would you want to view/read multiple UCs at once?</text:p>
      <text:p text:style-name="P17"/>
      <text:p text:style-name="P17">When &amp; why would you want to print UCs?</text:p>
      <text:p text:style-name="P17"/>
      <text:p text:style-name="P17">How often would you want to perform &lt;answers above&gt;?</text:p>
      <text:p text:style-name="P17"/>
      <text:p text:style-name="P17">How important is a solution to you? What are the consequences of not having a sol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mo" fo:font-family="Arimo"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0T14:43:53.051324719</meta:creation-date>
    <dc:date>2013-12-23T12:20:50.174740303</dc:date>
    <meta:editing-duration>PT1H8M8S</meta:editing-duration>
    <meta:editing-cycles>4</meta:editing-cycles>
    <meta:generator>LibreOffice/4.1.4.2$Linux_x86 LibreOffice_project/410m0$Build-2</meta:generator>
    <meta:document-statistic meta:table-count="0" meta:image-count="0" meta:object-count="0" meta:page-count="2" meta:paragraph-count="49" meta:word-count="479" meta:character-count="2679" meta:non-whitespace-character-count="2249"/>
  </office:meta>
</office:document-meta>
</file>
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3.074cm"/>
    </style:style>
    <style:style style:name="co2" style:family="table-column">
      <style:table-column-properties fo:break-before="auto" style:column-width="7.56cm"/>
    </style:style>
    <style:style style:name="co3" style:family="table-column">
      <style:table-column-properties fo:break-before="auto" style:column-width="1.0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96cm"/>
    </style:style>
    <style:style style:name="co6" style:family="table-column">
      <style:table-column-properties fo:break-before="auto" style:column-width="4.907cm"/>
    </style:style>
    <style:style style:name="co7" style:family="table-column">
      <style:table-column-properties fo:break-before="auto" style:column-width="4.1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ext-properties fo:color="#0047ff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ext-properties style:font-name="Arimo" style:font-name-asian="Lucida Sans Unicode" style:font-name-complex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mo" style:font-name-asian="Lucida Sans Unicode" style:font-name-complex=""/>
    </style:style>
  </office:automatic-styles>
  <office:body>
    <office:spreadsheet>
      <table:table table:name="Tags in Tex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ce5"/>
        <table:table-row table:style-name="ro1">
          <table:table-cell table:style-name="ce1" office:value-type="string" calcext:value-type="string">
            <text:p>Tags in text vs columns.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Qa:Y</text:p>
          </table:table-cell>
          <table:table-cell office:value-type="string" calcext:value-type="string">
            <text:p>Qa:N</text:p>
          </table:table-cell>
          <table:table-cell table:number-columns-repeated="2"/>
          <table:table-cell office:value-type="string" calcext:value-type="string">
            <text:p>Qb:Y</text:p>
          </table:table-cell>
          <table:table-cell office:value-type="string" calcext:value-type="string">
            <text:p>Qb:N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Location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gs column</text:p>
          </table:table-cell>
          <table:table-cell table:formula="of:=[.A15]" office:value-type="string" office:string-value="Joyful: Make output visually appealing." calcext:value-type="string">
            <text:p>Joyful: Make output visually appealing.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C4]*[.D4]" office:value-type="float" office:value="7" calcext:value-type="float">
            <text:p>7</text:p>
          </table:table-cell>
          <table:table-cell table:formula="of:=[.$C4]*[.E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4]*[.H4]" office:value-type="float" office:value="0" calcext:value-type="float">
            <text:p>0</text:p>
          </table:table-cell>
          <table:table-cell table:formula="of:=[.$C4]*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-field columns</text:p>
          </table:table-cell>
          <table:table-cell table:formula="of:=[.A16]" office:value-type="string" office:string-value="Joyful: Let the user feel in control." calcext:value-type="string">
            <text:p>Joyful: Let the user feel in control.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C5]*[.D5]" office:value-type="float" office:value="7" calcext:value-type="float">
            <text:p>7</text:p>
          </table:table-cell>
          <table:table-cell table:formula="of:=[.$C5]*[.E5]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$C5]*[.H5]" office:value-type="float" office:value="21" calcext:value-type="float">
            <text:p>21</text:p>
          </table:table-cell>
          <table:table-cell table:formula="of:=[.$C5]*[.I5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q title</text:p>
          </table:table-cell>
          <table:table-cell table:formula="of:=[.A17]" office:value-type="string" office:string-value="Easy: Minimise user thinking." calcext:value-type="string">
            <text:p>Easy: Minimise user thinking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C6]*[.D6]" office:value-type="float" office:value="0" calcext:value-type="float">
            <text:p>0</text:p>
          </table:table-cell>
          <table:table-cell table:formula="of:=[.$C6]*[.E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$C6]*[.H6]" office:value-type="float" office:value="0" calcext:value-type="float">
            <text:p>0</text:p>
          </table:table-cell>
          <table:table-cell table:formula="of:=[.$C6]*[.I6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xt-field columns</text:p>
          </table:table-cell>
          <table:table-cell table:formula="of:=[.A18]" office:value-type="string" office:string-value="Simple: Minimise intertwined features, functions." calcext:value-type="string">
            <text:p>Simple: Minimise intertwined features, functions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C7]*[.D7]" office:value-type="float" office:value="0" calcext:value-type="float">
            <text:p>0</text:p>
          </table:table-cell>
          <table:table-cell table:formula="of:=[.$C7]*[.E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C7]*[.H7]" office:value-type="float" office:value="0" calcext:value-type="float">
            <text:p>0</text:p>
          </table:table-cell>
          <table:table-cell table:formula="of:=[.$C7]*[.I7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C steps</text:p>
          </table:table-cell>
          <table:table-cell table:formula="of:=[.A19]" office:value-type="string" office:string-value="Powerful: Minimise constraints." calcext:value-type="string">
            <text:p>Powerful: Minimise constraints.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C8]*[.D8]" office:value-type="float" office:value="4" calcext:value-type="float">
            <text:p>4</text:p>
          </table:table-cell>
          <table:table-cell table:formula="of:=[.$C8]*[.E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8]*[.H8]" office:value-type="float" office:value="0" calcext:value-type="float">
            <text:p>0</text:p>
          </table:table-cell>
          <table:table-cell table:formula="of:=[.$C8]*[.I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asier to prevent now and allow lat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$C9]*[.D9]" office:value-type="float" office:value="0" calcext:value-type="float">
            <text:p>0</text:p>
          </table:table-cell>
          <table:table-cell table:formula="of:=[.$C9]*[.E9]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9]*[.H9]" office:value-type="float" office:value="0" calcext:value-type="float">
            <text:p>0</text:p>
          </table:table-cell>
          <table:table-cell table:formula="of:=[.$C9]*[.I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ctivities:</text:p>
          </table:table-cell>
          <table:table-cell table:number-columns-repeated="4"/>
          <table:table-cell table:style-name="ce6" table:formula="of:=SUM([.F4:.F9])" office:value-type="float" office:value="18" calcext:value-type="float">
            <text:p>18</text:p>
          </table:table-cell>
          <table:table-cell table:style-name="ce6" table:formula="of:=SUM([.G4:.G9])" office:value-type="float" office:value="83" calcext:value-type="float">
            <text:p>83</text:p>
          </table:table-cell>
          <table:table-cell table:number-columns-repeated="2"/>
          <table:table-cell table:style-name="ce6" table:formula="of:=SUM([.J4:.J9])" office:value-type="float" office:value="21" calcext:value-type="float">
            <text:p>21</text:p>
          </table:table-cell>
          <table:table-cell table:style-name="ce6" table:formula="of:=SUM([.K4:.K9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isplay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ation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roject attribute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yful: Make output visually appealing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yful: Let the user feel in control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sy: Minimise user thinking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mple: Minimise intertwined features, function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werful: Minimise constraints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nvarian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g columns allow display and specification of tag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 case fields allow display and specification of tag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 case steps allow display and specification of tag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sier to prevent now and allow later, than allow now then prevent later.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Question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q title is conceptually different to concepts expressed by tags. Validat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Counterexamples: “Interface for #SystemA”, “Email #FeatureA report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No: Req titles shouldn't have tags.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<text:s text:c="2"/>Yes: Suggests tags should be allowed in titles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Qb) Allow <text:span text:style-name="T1">reference</text:span> of a tag (in text) without its <text:span text:style-name="T1">application</text:span>?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<text:s text:c="2"/>Pro: Control to user, describe tag conditions &amp; reasoning in tex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<text:s text:c="2"/>Anti: Tags column &amp; filtering will be confusing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<text:s text:c="2"/>No by point evaluation. (↗)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hould GenericReq &amp; UC titles have the same behaviour?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<text:s text:c="2"/>Yes. No reason not to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Qa) Are GenericReq text-fields “subreqs” like in UCs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7"/>In other words, can they be referenced and have implications?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<text:s text:c="2"/>No by point evaluation. (↗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Should GenericReq &amp; UC text-fields have the same behaviour?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<text:s text:c="2"/>Anti: UCs have many more text fields than GenericReqs do.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<text:s text:c="2"/>Anti: Collective scope of concepts in UC text fields much larger than GenericReqs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f tags are applicable in text, should they be moved into tags column after parsing?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<text:s text:c="2"/>No. It will corrupt their work in cases like “Email #FeatureA report”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f tags are applicable in text, should they be appear in tags column too?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<text:s text:c="2"/>That would be clear &amp; good. It would just disappear when cell changes to edit-mode.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Conclu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se tags in titles &amp; text-field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tain tags in titles &amp; text-field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lude tags in titles &amp; text-fields, in the Tags column in display-mod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clude tags in titles &amp; text-fields, from the Tags column in edit-mode.</text:p>
          </table:table-cell>
          <table:table-cell table:number-columns-repeated="10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q Cod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7" office:value-type="string" calcext:value-type="string">
            <text:p>Target is Req</text:p>
          </table:table-cell>
          <table:table-cell table:style-name="ce7" office:value-type="string" calcext:value-type="string">
            <text:p>Target is RCGroup</text:p>
          </table:table-cell>
        </table:table-row>
        <table:table-row table:style-name="ro1">
          <table:table-cell office:value-type="string" calcext:value-type="string">
            <text:p>Create re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Target deleted</text:p>
          </table:table-cell>
          <table:table-cell office:value-type="string" calcext:value-type="string">
            <text:p>same as ReqRefs</text:p>
          </table:table-cell>
          <table:table-cell table:style-name="ce9" office:value-type="string" calcext:value-type="string">
            <text:p>Warn on delete, but allow</text:p>
            <text:p>Display but mark as erro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rget code renamed 1→1'</text:p>
          </table:table-cell>
          <table:table-cell table:number-columns-repeated="2" table:style-name="ce8" office:value-type="string" calcext:value-type="string">
            <text:p>Update ref</text:p>
          </table:table-cell>
        </table:table-row>
        <table:table-row table:style-name="ro1">
          <table:table-cell office:value-type="string" calcext:value-type="string">
            <text:p>Target code renamed 1→0</text:p>
          </table:table-cell>
          <table:table-cell office:value-type="string" calcext:value-type="string">
            <text:p>display pubid</text:p>
          </table:table-cell>
          <table:table-cell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 code renamed 1→n+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1→n</text:p>
          </table:table-cell>
          <table:table-cell table:style-name="ce9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1'</text:p>
          </table:table-cell>
          <table:table-cell table:style-name="ce8" office:value-type="string" calcext:value-type="string">
            <text:p>Update ref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0</text:p>
          </table:table-cell>
          <table:table-cell table:formula="of:=[.B7]" office:value-type="string" office:string-value="display pubid" calcext:value-type="string">
            <text:p>display pubid</text:p>
          </table:table-cell>
          <table:table-cell table:formula="of:=[.C7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 code renamed n+1→n+1</text:p>
          </table:table-cell>
          <table:table-cell table:formula="of:=[.B8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n</text:p>
          </table:table-cell>
          <table:table-cell table:style-name="ce9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stored</text:p>
          </table:table-cell>
          <table:table-cell table:number-columns-repeated="2" table:style-name="ce8" office:value-type="string" calcext:value-type="string">
            <text:p>must remember orig cod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an become unassociated</text:p>
          </table:table-cell>
          <table:table-cell office:value-type="string" calcext:value-type="string">
            <text:p>Never!</text:p>
          </table:table-cell>
          <table:table-cell table:style-name="ce9"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Reqs grouped by arbitrary trait in commo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Ref requirement</text:p>
          </table:table-cell>
          <table:table-cell office:value-type="string" calcext:value-type="string">
            <text:p>Refer to reqs with arbitrary trait in comm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 calcext:value-type="string">
            <text:p>Data available to atom</text:p>
          </table:table-cell>
          <table:table-cell office:value-type="string" calcext:value-type="string">
            <text:p>Req.Id</text:p>
            <text:p><text:span text:style-name="T2">ReqCode</text:span></text:p>
          </table:table-cell>
          <table:table-cell table:style-name="ce10" office:value-type="string" calcext:value-type="string">
            <text:p>ReqC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de in ref needs to outlive Code in active code tri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15:25:22.273908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2:40:14.793429355</meta:creation-date>
    <dc:date>2015-04-23T15:26:14.337828731</dc:date>
    <meta:editing-duration>PT2M52S</meta:editing-duration>
    <meta:editing-cycles>3</meta:editing-cycles>
    <meta:generator>LibreOffice/4.3.6.2$Linux_X86_64 LibreOffice_project/430m0$Build-2</meta:generator>
    <meta:document-statistic meta:table-count="2" meta:cell-count="162" meta:object-count="0"/>
  </office:meta>
</office:document-meta>
</file>
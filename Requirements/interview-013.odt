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Standard">
      <style:text-properties officeooo:rsid="0014938a" officeooo:paragraph-rsid="0014938a"/>
    </style:style>
    <style:style style:name="P2" style:family="paragraph" style:parent-style-name="Standard">
      <style:text-properties fo:font-weight="bold" officeooo:rsid="00158192" officeooo:paragraph-rsid="00158192" style:font-weight-asian="bold" style:font-weight-complex="bold"/>
    </style:style>
    <style:style style:name="P3" style:family="paragraph" style:parent-style-name="Standard">
      <style:text-properties fo:font-weight="normal" officeooo:rsid="00158192" officeooo:paragraph-rsid="00158192" style:font-weight-asian="normal" style:font-weight-complex="normal"/>
    </style:style>
    <style:style style:name="P4" style:family="paragraph" style:parent-style-name="Standard">
      <style:text-properties officeooo:rsid="00158192" officeooo:paragraph-rsid="00158192"/>
    </style:style>
    <style:style style:name="P5" style:family="paragraph" style:parent-style-name="Standard">
      <style:text-properties fo:font-style="normal" fo:font-weight="bold" officeooo:rsid="00158192" officeooo:paragraph-rsid="00158192" style:font-style-asian="normal" style:font-weight-asian="bold" style:font-style-complex="normal" style:font-weight-complex="bold"/>
    </style:style>
    <style:style style:name="P6" style:family="paragraph" style:parent-style-name="Standard" style:list-style-name="L1">
      <style:text-properties officeooo:rsid="0014938a" officeooo:paragraph-rsid="0014938a"/>
    </style:style>
    <style:style style:name="P7" style:family="paragraph" style:parent-style-name="Standard">
      <style:text-properties fo:font-style="normal" fo:font-weight="bold" officeooo:rsid="00158192" officeooo:paragraph-rsid="0017f7e5" style:font-style-asian="normal" style:font-weight-asian="bold" style:font-style-complex="normal" style:font-weight-complex="bold"/>
    </style:style>
    <style:style style:name="P8" style:family="paragraph" style:parent-style-name="Standard">
      <style:text-properties fo:font-style="normal" fo:font-weight="bold" officeooo:rsid="00158192" officeooo:paragraph-rsid="001bf21d" style:font-style-asian="normal" style:font-weight-asian="bold" style:font-style-complex="normal" style:font-weight-complex="bold"/>
    </style:style>
    <style:style style:name="P9" style:family="paragraph" style:parent-style-name="Standard">
      <style:text-properties fo:font-style="normal" fo:font-weight="bold" officeooo:rsid="00158192" officeooo:paragraph-rsid="001d3c56" style:font-style-asian="normal" style:font-weight-asian="bold" style:font-style-complex="normal" style:font-weight-complex="bold"/>
    </style:style>
    <style:style style:name="P10" style:family="paragraph" style:parent-style-name="Standard">
      <style:text-properties fo:font-style="normal" fo:font-weight="bold" officeooo:rsid="00158192" officeooo:paragraph-rsid="00207d70" style:font-style-asian="normal" style:font-weight-asian="bold" style:font-style-complex="normal" style:font-weight-complex="bold"/>
    </style:style>
    <style:style style:name="P11" style:family="paragraph" style:parent-style-name="Standard">
      <style:text-properties fo:font-style="normal" fo:font-weight="bold" officeooo:rsid="00158192" officeooo:paragraph-rsid="0029fdad" style:font-style-asian="normal" style:font-weight-asian="bold" style:font-style-complex="normal" style:font-weight-complex="bold"/>
    </style:style>
    <style:style style:name="P12" style:family="paragraph" style:parent-style-name="Standard">
      <style:text-properties fo:font-style="normal" fo:font-weight="bold" officeooo:rsid="0014938a" officeooo:paragraph-rsid="0017f7e5" style:font-style-asian="normal" style:font-weight-asian="bold" style:font-style-complex="normal" style:font-weight-complex="bold"/>
    </style:style>
    <style:style style:name="P13" style:family="paragraph" style:parent-style-name="Standard">
      <style:text-properties fo:font-style="normal" fo:font-weight="bold" officeooo:rsid="0014938a" officeooo:paragraph-rsid="001bf21d" style:font-style-asian="normal" style:font-weight-asian="bold" style:font-style-complex="normal" style:font-weight-complex="bold"/>
    </style:style>
    <style:style style:name="P14" style:family="paragraph" style:parent-style-name="Standard">
      <style:text-properties fo:font-style="normal" fo:font-weight="bold" officeooo:rsid="0014938a" officeooo:paragraph-rsid="001d3c56" style:font-style-asian="normal" style:font-weight-asian="bold" style:font-style-complex="normal" style:font-weight-complex="bold"/>
    </style:style>
    <style:style style:name="P15" style:family="paragraph" style:parent-style-name="Standard">
      <style:text-properties fo:font-style="normal" fo:font-weight="bold" officeooo:rsid="0014938a" officeooo:paragraph-rsid="001e2ecf" style:font-style-asian="normal" style:font-weight-asian="bold" style:font-style-complex="normal" style:font-weight-complex="bold"/>
    </style:style>
    <style:style style:name="P16" style:family="paragraph" style:parent-style-name="Standard">
      <style:text-properties fo:font-style="normal" fo:font-weight="bold" officeooo:rsid="0014938a" officeooo:paragraph-rsid="0029fdad" style:font-style-asian="normal" style:font-weight-asian="bold" style:font-style-complex="normal" style:font-weight-complex="bold"/>
    </style:style>
    <style:style style:name="P17" style:family="paragraph" style:parent-style-name="Standard">
      <style:text-properties fo:font-style="normal" fo:font-weight="bold" officeooo:rsid="001830b5" officeooo:paragraph-rsid="001830b5" style:font-style-asian="normal" style:font-weight-asian="bold" style:font-style-complex="normal" style:font-weight-complex="bold"/>
    </style:style>
    <style:style style:name="P18" style:family="paragraph" style:parent-style-name="Standard">
      <style:text-properties fo:font-style="normal" fo:font-weight="bold" officeooo:rsid="001830b5" officeooo:paragraph-rsid="001bf21d" style:font-style-asian="normal" style:font-weight-asian="bold" style:font-style-complex="normal" style:font-weight-complex="bold"/>
    </style:style>
    <style:style style:name="P19" style:family="paragraph" style:parent-style-name="Standard">
      <style:text-properties fo:font-style="normal" fo:font-weight="bold" officeooo:rsid="001830b5" officeooo:paragraph-rsid="0029fdad" style:font-style-asian="normal" style:font-weight-asian="bold" style:font-style-complex="normal" style:font-weight-complex="bold"/>
    </style:style>
    <style:style style:name="P20" style:family="paragraph" style:parent-style-name="Standard">
      <style:text-properties fo:font-style="normal" fo:font-weight="bold" officeooo:rsid="001bf21d" officeooo:paragraph-rsid="001bf21d" style:font-style-asian="normal" style:font-weight-asian="bold" style:font-style-complex="normal" style:font-weight-complex="bold"/>
    </style:style>
    <style:style style:name="P21" style:family="paragraph" style:parent-style-name="Standard">
      <style:text-properties fo:font-style="normal" fo:font-weight="normal" officeooo:rsid="0016a767" officeooo:paragraph-rsid="0016a767" style:font-style-asian="normal" style:font-weight-asian="normal" style:font-style-complex="normal" style:font-weight-complex="normal"/>
    </style:style>
    <style:style style:name="P22" style:family="paragraph" style:parent-style-name="Standard">
      <style:text-properties fo:font-style="normal" fo:font-weight="normal" officeooo:rsid="0014938a" officeooo:paragraph-rsid="0017f7e5" style:font-style-asian="normal" style:font-weight-asian="normal" style:font-style-complex="normal" style:font-weight-complex="normal"/>
    </style:style>
    <style:style style:name="P23" style:family="paragraph" style:parent-style-name="Standard">
      <style:text-properties fo:font-style="normal" fo:font-weight="normal" officeooo:rsid="0014938a" officeooo:paragraph-rsid="001bf21d" style:font-style-asian="normal" style:font-weight-asian="normal" style:font-style-complex="normal" style:font-weight-complex="normal"/>
    </style:style>
    <style:style style:name="P24" style:family="paragraph" style:parent-style-name="Standard">
      <style:text-properties fo:font-style="normal" fo:font-weight="normal" officeooo:rsid="0017f7e5" officeooo:paragraph-rsid="0017f7e5" style:font-style-asian="normal" style:font-weight-asian="normal" style:font-style-complex="normal" style:font-weight-complex="normal"/>
    </style:style>
    <style:style style:name="P25" style:family="paragraph" style:parent-style-name="Standard">
      <style:text-properties fo:font-style="normal" fo:font-weight="normal" officeooo:rsid="001830b5" officeooo:paragraph-rsid="001830b5" style:font-style-asian="normal" style:font-weight-asian="normal" style:font-style-complex="normal" style:font-weight-complex="normal"/>
    </style:style>
    <style:style style:name="P26" style:family="paragraph" style:parent-style-name="Standard">
      <style:text-properties fo:font-style="normal" fo:font-weight="normal" officeooo:rsid="001d3c56" officeooo:paragraph-rsid="001d3c56" style:font-style-asian="normal" style:font-weight-asian="normal" style:font-style-complex="normal" style:font-weight-complex="normal"/>
    </style:style>
    <style:style style:name="P27" style:family="paragraph" style:parent-style-name="Standard">
      <style:text-properties fo:font-style="normal" fo:font-weight="normal" officeooo:rsid="001da9ea" officeooo:paragraph-rsid="001da9ea" style:font-style-asian="normal" style:font-weight-asian="normal" style:font-style-complex="normal" style:font-weight-complex="normal"/>
    </style:style>
    <style:style style:name="P28" style:family="paragraph" style:parent-style-name="Standard">
      <style:text-properties fo:font-style="normal" fo:font-weight="normal" officeooo:rsid="00202b1f" officeooo:paragraph-rsid="00202b1f" style:font-style-asian="normal" style:font-weight-asian="normal" style:font-style-complex="normal" style:font-weight-complex="normal"/>
    </style:style>
    <style:style style:name="P29" style:family="paragraph" style:parent-style-name="Standard">
      <style:text-properties fo:font-style="normal" fo:font-weight="normal" officeooo:rsid="00207d70" officeooo:paragraph-rsid="00207d70" style:font-style-asian="normal" style:font-weight-asian="normal" style:font-style-complex="normal" style:font-weight-complex="normal"/>
    </style:style>
    <style:style style:name="P30" style:family="paragraph" style:parent-style-name="Standard">
      <style:text-properties fo:font-style="normal" fo:font-weight="normal" officeooo:rsid="00210972" officeooo:paragraph-rsid="00210972" style:font-style-asian="normal" style:font-weight-asian="normal" style:font-style-complex="normal" style:font-weight-complex="normal"/>
    </style:style>
    <style:style style:name="P31" style:family="paragraph" style:parent-style-name="Standard">
      <style:text-properties fo:font-style="normal" fo:font-weight="normal" officeooo:rsid="002229c1" officeooo:paragraph-rsid="002229c1" style:font-style-asian="normal" style:font-weight-asian="normal" style:font-style-complex="normal" style:font-weight-complex="normal"/>
    </style:style>
    <style:style style:name="P32" style:family="paragraph" style:parent-style-name="Standard">
      <style:text-properties fo:font-style="normal" fo:font-weight="normal" officeooo:rsid="0023c3a0" officeooo:paragraph-rsid="0023c3a0" style:font-style-asian="normal" style:font-weight-asian="normal" style:font-style-complex="normal" style:font-weight-complex="normal"/>
    </style:style>
    <style:style style:name="P33" style:family="paragraph" style:parent-style-name="Standard">
      <style:text-properties fo:font-style="normal" fo:font-weight="normal" officeooo:rsid="00244324" officeooo:paragraph-rsid="00244324" style:font-style-asian="normal" style:font-weight-asian="normal" style:font-style-complex="normal" style:font-weight-complex="normal"/>
    </style:style>
    <style:style style:name="P34" style:family="paragraph" style:parent-style-name="Standard">
      <style:text-properties fo:font-style="normal" fo:font-weight="normal" officeooo:rsid="00267159" officeooo:paragraph-rsid="00267159" style:font-style-asian="normal" style:font-weight-asian="normal" style:font-style-complex="normal" style:font-weight-complex="normal"/>
    </style:style>
    <style:style style:name="P35" style:family="paragraph" style:parent-style-name="Standard">
      <style:text-properties fo:font-style="normal" fo:font-weight="normal" officeooo:rsid="0026f7d6" officeooo:paragraph-rsid="0026f7d6" style:font-style-asian="normal" style:font-weight-asian="normal" style:font-style-complex="normal" style:font-weight-complex="normal"/>
    </style:style>
    <style:style style:name="P36" style:family="paragraph" style:parent-style-name="Standard">
      <style:text-properties fo:font-style="normal" fo:font-weight="normal" officeooo:rsid="0027875d" officeooo:paragraph-rsid="0027875d" style:font-style-asian="normal" style:font-weight-asian="normal" style:font-style-complex="normal" style:font-weight-complex="normal"/>
    </style:style>
    <style:style style:name="P37" style:family="paragraph" style:parent-style-name="Standard">
      <style:text-properties fo:font-style="normal" fo:font-weight="normal" officeooo:rsid="0029da4c" officeooo:paragraph-rsid="0029da4c" style:font-style-asian="normal" style:font-weight-asian="normal" style:font-style-complex="normal" style:font-weight-complex="normal"/>
    </style:style>
    <style:style style:name="P38" style:family="paragraph" style:parent-style-name="Standard">
      <style:text-properties fo:font-style="normal" fo:font-weight="normal" officeooo:rsid="0029da4c" officeooo:paragraph-rsid="0029fdad" style:font-style-asian="normal" style:font-weight-asian="normal" style:font-style-complex="normal" style:font-weight-complex="normal"/>
    </style:style>
    <style:style style:name="P39" style:family="paragraph" style:parent-style-name="Standard">
      <style:text-properties fo:font-style="normal" fo:font-weight="normal" officeooo:rsid="0029fdad" officeooo:paragraph-rsid="0029fdad" style:font-style-asian="normal" style:font-weight-asian="normal" style:font-style-complex="normal" style:font-weight-complex="normal"/>
    </style:style>
    <style:style style:name="P40" style:family="paragraph" style:parent-style-name="Standard">
      <style:text-properties fo:font-style="normal" fo:font-weight="normal" officeooo:rsid="002bb7d7" officeooo:paragraph-rsid="002bb7d7" style:font-style-asian="normal" style:font-weight-asian="normal" style:font-style-complex="normal" style:font-weight-complex="normal"/>
    </style:style>
    <style:style style:name="P41" style:family="paragraph" style:parent-style-name="Standard">
      <style:text-properties fo:font-style="normal" style:text-underline-style="none" fo:font-weight="normal" officeooo:rsid="0023c3a0" officeooo:paragraph-rsid="0023c3a0" style:font-style-asian="normal" style:font-weight-asian="normal" style:font-style-complex="normal" style:font-weight-complex="normal"/>
    </style:style>
    <style:style style:name="P42" style:family="paragraph" style:parent-style-name="Standard">
      <style:text-properties fo:font-style="italic" fo:font-weight="normal" officeooo:rsid="00158192" officeooo:paragraph-rsid="0014938a" style:font-style-asian="italic" style:font-weight-asian="normal" style:font-style-complex="italic" style:font-weight-complex="normal"/>
    </style:style>
    <style:style style:name="P43" style:family="paragraph" style:parent-style-name="Standard">
      <style:text-properties fo:font-style="italic" fo:font-weight="normal" officeooo:rsid="0014938a" officeooo:paragraph-rsid="0017f7e5" style:font-style-asian="italic" style:font-weight-asian="normal" style:font-style-complex="italic" style:font-weight-complex="normal"/>
    </style:style>
    <style:style style:name="P44" style:family="paragraph" style:parent-style-name="Standard">
      <style:text-properties fo:font-style="italic" fo:font-weight="normal" officeooo:rsid="0014938a" officeooo:paragraph-rsid="001bf21d" style:font-style-asian="italic" style:font-weight-asian="normal" style:font-style-complex="italic" style:font-weight-complex="normal"/>
    </style:style>
    <style:style style:name="P45" style:family="paragraph" style:parent-style-name="Standard">
      <style:text-properties fo:font-style="italic" fo:font-weight="normal" officeooo:rsid="0019f353" officeooo:paragraph-rsid="0019f353" style:font-style-asian="italic" style:font-weight-asian="normal" style:font-style-complex="italic" style:font-weight-complex="normal"/>
    </style:style>
    <style:style style:name="P46" style:family="paragraph" style:parent-style-name="Standard">
      <style:text-properties fo:font-style="italic" fo:font-weight="normal" officeooo:rsid="0019f353" officeooo:paragraph-rsid="001bf21d" style:font-style-asian="italic" style:font-weight-asian="normal" style:font-style-complex="italic" style:font-weight-complex="normal"/>
    </style:style>
    <style:style style:name="P47" style:family="paragraph" style:parent-style-name="Standard">
      <style:text-properties fo:font-style="italic" fo:font-weight="normal" officeooo:rsid="001bf21d" officeooo:paragraph-rsid="001bf21d" style:font-style-asian="italic" style:font-weight-asian="normal" style:font-style-complex="italic" style:font-weight-complex="normal"/>
    </style:style>
    <style:style style:name="P48" style:family="paragraph" style:parent-style-name="Standard">
      <style:text-properties fo:font-style="italic" fo:font-weight="normal" officeooo:rsid="001da9ea" officeooo:paragraph-rsid="001da9ea" style:font-style-asian="italic" style:font-weight-asian="normal" style:font-style-complex="italic" style:font-weight-complex="normal"/>
    </style:style>
    <style:style style:name="P49" style:family="paragraph" style:parent-style-name="Standard">
      <style:text-properties fo:font-style="italic" fo:font-weight="normal" officeooo:rsid="001da9ea" officeooo:paragraph-rsid="001e2ecf" style:font-style-asian="italic" style:font-weight-asian="normal" style:font-style-complex="italic" style:font-weight-complex="normal"/>
    </style:style>
    <style:style style:name="P50" style:family="paragraph" style:parent-style-name="Standard">
      <style:text-properties fo:font-style="italic" fo:font-weight="normal" officeooo:rsid="001da9ea" officeooo:paragraph-rsid="00244324" style:font-style-asian="italic" style:font-weight-asian="normal" style:font-style-complex="italic" style:font-weight-complex="normal"/>
    </style:style>
    <style:style style:name="P51" style:family="paragraph" style:parent-style-name="Standard">
      <style:text-properties fo:font-style="italic" fo:font-weight="normal" officeooo:rsid="001da9ea" officeooo:paragraph-rsid="0025e837" style:font-style-asian="italic" style:font-weight-asian="normal" style:font-style-complex="italic" style:font-weight-complex="normal"/>
    </style:style>
    <style:style style:name="P52" style:family="paragraph" style:parent-style-name="Standard">
      <style:text-properties fo:font-style="italic" fo:font-weight="normal" officeooo:rsid="001e2ecf" officeooo:paragraph-rsid="001e2ecf" style:font-style-asian="italic" style:font-weight-asian="normal" style:font-style-complex="italic" style:font-weight-complex="normal"/>
    </style:style>
    <style:style style:name="P53" style:family="paragraph" style:parent-style-name="Standard">
      <style:text-properties fo:font-style="italic" fo:font-weight="normal" officeooo:rsid="0027875d" officeooo:paragraph-rsid="0027875d" style:font-style-asian="italic" style:font-weight-asian="normal" style:font-style-complex="italic" style:font-weight-complex="normal"/>
    </style:style>
    <style:style style:name="P54" style:family="paragraph" style:parent-style-name="Standard">
      <style:text-properties fo:font-style="italic" fo:font-weight="normal" officeooo:rsid="0029da4c" officeooo:paragraph-rsid="0029da4c" style:font-style-asian="italic" style:font-weight-asian="normal" style:font-style-complex="italic" style:font-weight-complex="normal"/>
    </style:style>
    <style:style style:name="P55" style:family="paragraph" style:parent-style-name="Standard">
      <style:text-properties fo:font-style="italic" fo:font-weight="normal" officeooo:rsid="002eb25d" officeooo:paragraph-rsid="00301fdc" style:font-style-asian="italic" style:font-weight-asian="normal" style:font-style-complex="italic" style:font-weight-complex="normal"/>
    </style:style>
    <style:style style:name="P56" style:family="paragraph" style:parent-style-name="Standard">
      <style:text-properties fo:font-style="italic" fo:font-weight="normal" officeooo:rsid="00301fdc" officeooo:paragraph-rsid="00301fdc" style:font-style-asian="italic" style:font-weight-asian="normal" style:font-style-complex="italic" style:font-weight-complex="normal"/>
    </style:style>
    <style:style style:name="P57" style:family="paragraph" style:parent-style-name="Standard">
      <style:text-properties fo:font-style="italic" fo:font-weight="normal" officeooo:rsid="00321441" officeooo:paragraph-rsid="00321441" style:font-style-asian="italic" style:font-weight-asian="normal" style:font-style-complex="italic" style:font-weight-complex="normal"/>
    </style:style>
    <style:style style:name="P58" style:family="paragraph" style:parent-style-name="Standard">
      <style:text-properties fo:font-style="italic" fo:font-weight="bold" officeooo:rsid="00158192" officeooo:paragraph-rsid="0017f7e5" style:font-style-asian="italic" style:font-weight-asian="bold" style:font-style-complex="italic" style:font-weight-complex="bold"/>
    </style:style>
    <style:style style:name="P59" style:family="paragraph" style:parent-style-name="Standard">
      <style:text-properties fo:font-style="italic" fo:font-weight="bold" officeooo:rsid="001bf21d" officeooo:paragraph-rsid="001bf21d" style:font-style-asian="italic" style:font-weight-asian="bold" style:font-style-complex="italic" style:font-weight-complex="bold"/>
    </style:style>
    <style:style style:name="P60" style:family="paragraph" style:parent-style-name="Standard">
      <style:text-properties fo:font-style="italic" fo:font-weight="bold" officeooo:rsid="0027875d" officeooo:paragraph-rsid="0027875d" style:font-style-asian="italic" style:font-weight-asian="bold" style:font-style-complex="italic" style:font-weight-complex="bold"/>
    </style:style>
    <style:style style:name="P61" style:family="paragraph" style:parent-style-name="Standard">
      <style:text-properties fo:font-style="italic" fo:font-weight="bold" officeooo:rsid="00301fdc" officeooo:paragraph-rsid="00301fdc" style:font-style-asian="italic" style:font-weight-asian="bold" style:font-style-complex="italic" style:font-weight-complex="bold"/>
    </style:style>
    <style:style style:name="P62" style:family="paragraph" style:parent-style-name="Standard">
      <style:text-properties fo:font-style="italic" fo:font-weight="bold" officeooo:rsid="00321441" officeooo:paragraph-rsid="00321441" style:font-style-asian="italic" style:font-weight-asian="bold" style:font-style-complex="italic" style:font-weight-complex="bold"/>
    </style:style>
    <style:style style:name="P63" style:family="paragraph" style:parent-style-name="Standard">
      <style:text-properties officeooo:rsid="00158192" officeooo:paragraph-rsid="00158192"/>
    </style:style>
    <style:style style:name="P64" style:family="paragraph" style:parent-style-name="Standard">
      <style:text-properties fo:color="#ff0000" style:text-underline-style="none" officeooo:rsid="00158192" officeooo:paragraph-rsid="00158192"/>
    </style:style>
    <style:style style:name="P65" style:family="paragraph" style:parent-style-name="Standard">
      <style:text-properties fo:color="#0000ff" fo:font-style="normal" fo:font-weight="bold" officeooo:rsid="0019f353" officeooo:paragraph-rsid="0019f353" style:font-style-asian="normal" style:font-weight-asian="bold" style:font-style-complex="normal" style:font-weight-complex="bold"/>
    </style:style>
    <style:style style:name="P66" style:family="paragraph" style:parent-style-name="Standard">
      <style:text-properties style:text-underline-style="none" officeooo:rsid="00158192" officeooo:paragraph-rsid="00158192"/>
    </style:style>
    <style:style style:name="P67" style:family="paragraph" style:parent-style-name="Standard">
      <style:paragraph-properties fo:padding="0.074cm" fo:border-left="none" fo:border-right="none" fo:border-top="none" fo:border-bottom="0.06pt solid #000000" style:join-border="false"/>
      <style:text-properties fo:font-style="italic" fo:font-weight="normal" officeooo:rsid="0014938a" officeooo:paragraph-rsid="0014938a" style:font-style-asian="italic" style:font-weight-asian="normal" style:font-style-complex="italic" style:font-weight-complex="normal"/>
    </style:style>
    <style:style style:name="P68" style:family="paragraph" style:parent-style-name="Standard">
      <style:paragraph-properties fo:padding="0.074cm" fo:border-left="none" fo:border-right="none" fo:border-top="none" fo:border-bottom="0.06pt solid #000000" style:join-border="false"/>
      <style:text-properties fo:font-style="italic" fo:font-weight="normal" officeooo:rsid="0014938a" officeooo:paragraph-rsid="0017f7e5" style:font-style-asian="italic" style:font-weight-asian="normal" style:font-style-complex="italic" style:font-weight-complex="normal"/>
    </style:style>
    <style:style style:name="P69" style:family="paragraph" style:parent-style-name="Standard">
      <style:paragraph-properties fo:padding="0.074cm" fo:border-left="none" fo:border-right="none" fo:border-top="none" fo:border-bottom="0.06pt solid #000000" style:join-border="false"/>
      <style:text-properties fo:font-style="italic" fo:font-weight="normal" officeooo:rsid="00158192" officeooo:paragraph-rsid="001bf21d" style:font-style-asian="italic" style:font-weight-asian="normal" style:font-style-complex="italic" style:font-weight-complex="normal"/>
    </style:style>
    <style:style style:name="P70" style:family="paragraph" style:parent-style-name="Standard">
      <style:paragraph-properties fo:padding="0.074cm" fo:border-left="none" fo:border-right="none" fo:border-top="none" fo:border-bottom="0.06pt solid #000000" style:join-border="false"/>
      <style:text-properties fo:font-style="italic" fo:font-weight="normal" officeooo:rsid="001e2ecf" officeooo:paragraph-rsid="001e2ecf" style:font-style-asian="italic" style:font-weight-asian="normal" style:font-style-complex="italic" style:font-weight-complex="normal"/>
    </style:style>
    <style:style style:name="P71" style:family="paragraph" style:parent-style-name="Standard">
      <style:paragraph-properties fo:padding="0.074cm" fo:border-left="none" fo:border-right="none" fo:border-top="none" fo:border-bottom="0.06pt solid #000000" style:join-border="false"/>
      <style:text-properties fo:font-style="italic" fo:font-weight="bold" officeooo:rsid="00158192" officeooo:paragraph-rsid="001bf21d" style:font-style-asian="italic" style:font-weight-asian="bold" style:font-style-complex="italic" style:font-weight-complex="bold"/>
    </style:style>
    <style:style style:name="P72" style:family="paragraph" style:parent-style-name="Standard">
      <style:paragraph-properties fo:padding="0.074cm" fo:border-left="none" fo:border-right="none" fo:border-top="none" fo:border-bottom="0.06pt solid #000000" style:join-border="false"/>
      <style:text-properties officeooo:rsid="0014938a" officeooo:paragraph-rsid="0014938a"/>
    </style:style>
    <style:style style:name="T1" style:family="text">
      <style:text-properties officeooo:rsid="0015953d"/>
    </style:style>
    <style:style style:name="T2" style:family="text">
      <style:text-properties officeooo:rsid="001729c0"/>
    </style:style>
    <style:style style:name="T3" style:family="text">
      <style:text-properties officeooo:rsid="0019f353"/>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bold" officeooo:rsid="00158192" style:font-style-asian="normal" style:font-weight-asian="bold" style:font-style-complex="normal" style:font-weight-complex="bold"/>
    </style:style>
    <style:style style:name="T6" style:family="text">
      <style:text-properties fo:font-style="normal" style:font-style-asian="normal" style:font-style-complex="normal"/>
    </style:style>
    <style:style style:name="T7" style:family="text">
      <style:text-properties fo:font-style="normal" officeooo:rsid="00321441" style:font-style-asian="normal" style:font-style-complex="normal"/>
    </style:style>
    <style:style style:name="T8" style:family="text">
      <style:text-properties fo:font-weight="bold" style:font-weight-asian="bold" style:font-weight-complex="bold"/>
    </style:style>
    <style:style style:name="T9" style:family="text">
      <style:text-properties fo:color="#0000ff" fo:font-weight="bold" style:font-weight-asian="bold" style:font-weight-complex="bold"/>
    </style:style>
    <style:style style:name="T10" style:family="text">
      <style:text-properties officeooo:rsid="001bf21d"/>
    </style:style>
    <style:style style:name="T11" style:family="text">
      <style:text-properties officeooo:rsid="001d3c56"/>
    </style:style>
    <style:style style:name="T12" style:family="text">
      <style:text-properties officeooo:rsid="001e2ecf"/>
    </style:style>
    <style:style style:name="T13" style:family="text">
      <style:text-properties officeooo:rsid="00210972"/>
    </style:style>
    <style:style style:name="T14" style:family="text">
      <style:text-properties officeooo:rsid="002229c1"/>
    </style:style>
    <style:style style:name="T15" style:family="text">
      <style:text-properties officeooo:rsid="0023c3a0"/>
    </style:style>
    <style:style style:name="T16" style:family="text">
      <style:text-properties officeooo:rsid="00244324"/>
    </style:style>
    <style:style style:name="T17" style:family="text">
      <style:text-properties officeooo:rsid="0027875d"/>
    </style:style>
    <style:style style:name="T18" style:family="text">
      <style:text-properties officeooo:rsid="0029fdad"/>
    </style:style>
    <style:style style:name="T19" style:family="text">
      <style:text-properties officeooo:rsid="002bb7d7"/>
    </style:style>
    <style:style style:name="T20" style:family="text">
      <style:text-properties officeooo:rsid="002d99d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re have been some major changes that affect all requirements pertaining to deletion. Project storage is now via an append-only event-stream. As such history is never lost and can easily be made accessible to the user. </text:p>
      <text:p text:style-name="P1"/>
      <text:p text:style-name="P1">Deletion subjects:</text:p>
      <text:list xml:id="list8618088655754767593" text:style-name="L1">
        <text:list-item>
          <text:p text:style-name="P6">Config</text:p>
          <text:list>
            <text:list-item>
              <text:p text:style-name="P6">Tags</text:p>
            </text:list-item>
            <text:list-item>
              <text:p text:style-name="P6">Issue types</text:p>
            </text:list-item>
            <text:list-item>
              <text:p text:style-name="P6">Fields</text:p>
            </text:list-item>
            <text:list-item>
              <text:p text:style-name="P6">Req types</text:p>
            </text:list-item>
          </text:list>
        </text:list-item>
        <text:list-item>
          <text:p text:style-name="P6">Content</text:p>
          <text:list>
            <text:list-item>
              <text:p text:style-name="P6">Generic requirements</text:p>
            </text:list-item>
            <text:list-item>
              <text:p text:style-name="P6">Req code groups</text:p>
            </text:list-item>
          </text:list>
        </text:list-item>
      </text:list>
      <text:p text:style-name="P72"/>
      <text:p text:style-name="P66"><text:span text:style-name="T9">Tags</text:span></text:p>
      <text:p text:style-name="P64"/>
      <text:p text:style-name="P4"><text:span text:style-name="T8">Why would you delete a tag?</text:span></text:p>
      <text:p text:style-name="P4">Tags are fickle things. They often imprecise. Target versions changes all the time; after seeing how status are being used one might decide to merge some, remove some; tags representing components can be changed to cover different subsets of a solution. It's also why we need to see usage – tags that rarely get used are often potential candidates for <text:span text:style-name="T1">deletion.</text:span></text:p>
      <text:p text:style-name="P4"/>
      <text:p text:style-name="P5">What does it mean to be deleted? Can you explain without using the word delete?</text:p>
      <text:p text:style-name="P21">It means it shouldn't be used anymore.</text:p>
      <text:p text:style-name="P5"/>
      <text:p text:style-name="P5">What does that mean for existing data?</text:p>
      <text:p text:style-name="P21">It should be removed from existing data. Simple enough when it's just attached to something but it<text:span text:style-name="T2">'s a bit more involving when it's being used in text, like “Machine #should do ...”. In those cases you can't just remove it, you need to either change it to another tag that fits or reword it.</text:span></text:p>
      <text:p text:style-name="P2"/>
      <text:p text:style-name="P2">What if you couldn't delete tags?</text:p>
      <text:p text:style-name="P3">I'd have to rename them stupidly to avoid people using them anymore. I'd want them to display in some kind of obvious way, like big and red so that BAs could see that they are obviously wrong. In fact, maybe they could be part of the issue system, like how other types of issues are reported and easily actionable.</text:p>
      <text:p text:style-name="P4"/>
      <text:p text:style-name="P7">Can you think of any cases where deletion shouldn't be allowed? If so, why? What if it happens anyway?</text:p>
      <text:p text:style-name="P24">Maybe if it's still in use – because then it's not really deleted. And the intent of tag deletion is removal of use.</text:p>
      <text:p text:style-name="P22"/>
      <text:p text:style-name="P12">What is a reason you would change your mind about a deletion?</text:p>
      <text:p text:style-name="P25">Tags are fickle things like I said. Plus sometimes there's trial and error involved. You want tags to be decently distributed; you might delete stuff, add new tags, allocate them and realise you're worse off.</text:p>
      <text:p text:style-name="P12"/>
      <text:p text:style-name="P17">What would you need to do if you changed your mind about a deletion.</text:p>
      <text:p text:style-name="P25">I'd need to add the tag back (quick) and then re-tag everything (annoying).</text:p>
      <text:p text:style-name="P12"/>
      <text:p text:style-name="P58"><text:span text:style-name="T3">D</text:span>ata relationship<text:span text:style-name="T3">s:</text:span></text:p>
      <text:p text:style-name="P45">tag → parent tag</text:p>
      <text:p text:style-name="P45">tag → child tags</text:p>
      <text:p text:style-name="P45">tag → field</text:p>
      <text:p text:style-name="P46">tag → req/code-<text:span text:style-name="T10">group</text:span> tag-pool</text:p>
      <text:p text:style-name="P45">tag → req/code-<text:span text:style-name="T10">group </text:span>text</text:p>
      <text:p text:style-name="P43"/>
      <text:p text:style-name="P68"/>
      <text:p text:style-name="P65">Issue Types</text:p>
      <text:p text:style-name="P45"/>
      <text:p text:style-name="P13">Why <text:span text:style-name="T11">would you delete an issue type</text:span>?</text:p>
      <text:p text:style-name="P26">Like tags, it's just a fickle idea to reduce data into subsets.</text:p>
      <text:p text:style-name="P13"/>
      <text:p text:style-name="P8">What does it mean to be deleted? Can you explain without using the word delete?</text:p>
      <text:p text:style-name="P26">It means the issue shouldn't be usable anymore.</text:p>
      <text:p text:style-name="P8"/>
      <text:p text:style-name="P8">What does that mean for existing data?</text:p>
      <text:p text:style-name="P26">Those issues either need to change type, or be removed.</text:p>
      <text:p text:style-name="P8"/>
      <text:p text:style-name="P13">What would you do if you couldn't delete?</text:p>
      <text:p text:style-name="P26">Same as tags. Rename stupidly. Or actually, rename it the next time I want to create a new issue type.</text:p>
      <text:p text:style-name="P23"/>
      <text:p text:style-name="P8">Can you think of any cases where deletion shouldn't be allowed? If so, why? What if it happens anyway?</text:p>
      <text:p text:style-name="P26">If it's in use still – because something needs to be done about those issues.</text:p>
      <text:p text:style-name="P8"/>
      <text:p text:style-name="P13">What is a reason you would change your mind about a deletion?</text:p>
      <text:p text:style-name="P26">Same as tags.</text:p>
      <text:p text:style-name="P13"/>
      <text:p text:style-name="P18">What would you need to do if you changed your mind about a deletion.</text:p>
      <text:p text:style-name="P27">Add it back (quick). Maybe change some existing issues to use it again.</text:p>
      <text:p text:style-name="P20"/>
      <text:p text:style-name="P59">Data relationships:</text:p>
      <text:p text:style-name="P47">issue type → <text:span text:style-name="T3">req/code-</text:span>group <text:span text:style-name="T3">text</text:span></text:p>
      <text:p text:style-name="P47"/>
      <text:p text:style-name="P71"/>
      <text:p text:style-name="P65">Fields</text:p>
      <text:p text:style-name="P45"/>
      <text:p text:style-name="P14">Why <text:span text:style-name="T11">would you delete a field</text:span>?</text:p>
      <text:p text:style-name="P28">I'd delete a field if it wasn't really being used in practice.</text:p>
      <text:p text:style-name="P28">I'd delete a tag field it I deleted (without replacing) the underlying tag.</text:p>
      <text:p text:style-name="P28">I'd delete an implication field if I changes the req-types, say if I merged two req types into one and they both had fields. Actually if I deleted the underlying req type for any reason, I'd need to get rid of its field. Although that should probably be automatic right?</text:p>
      <text:p text:style-name="P14"/>
      <text:p text:style-name="P8">What does it mean to be deleted? Can you explain without using the word delete?</text:p>
      <text:p text:style-name="P28">That fields is gone. Can't add new data to it, can't see it anymore.</text:p>
      <text:p text:style-name="P8"/>
      <text:p text:style-name="P9">What does that mean for existing data?</text:p>
      <text:p text:style-name="P29">Hmm, I guess I'd probably still want to be able to see it if I need to. Like if it's a text field, if I deleted the field I probably wouldn't move that field data around. I'd just leave it but one day I might need to read it again and extract anything useful.</text:p>
      <text:p text:style-name="P10"/>
      <text:p text:style-name="P13">What would you do if you couldn't delete <text:span text:style-name="T14">a field</text:span>?</text:p>
      <text:p text:style-name="P29">Nothing I guess. But I'd want to rename the field at least to indicate not to add any new data to it.</text:p>
      <text:p text:style-name="P13"/>
      <text:p text:style-name="P8">Can you think of any cases where deletion shouldn't be allowed? If so, why? What if it happens anyway?</text:p>
      <text:p text:style-name="P30">Well I just wouldn't want to lose data. If it deleted the field and the data with it, that would be bad. Gathered BA data (usually from interviews and analysis) should never be lost.</text:p>
      <text:p text:style-name="P8"/>
      <text:p text:style-name="P13">What is a reason you would change your mind about a deletion?</text:p>
      <text:p text:style-name="P30">New requirements might come in that revalidate the existence of the field, so I'd wanna get it back again and populate new rows with it.</text:p>
      <text:p text:style-name="P30">Or someone with different needs might say they really need it.</text:p>
      <text:p text:style-name="P13"/>
      <text:p text:style-name="P18">What would you need to do if you changed your mind <text:span text:style-name="T13">after a field was deleted</text:span>.</text:p>
      <text:p text:style-name="P30">I'd want to add it back again and not lose any data.</text:p>
      <text:p text:style-name="P59"><text:span text:style-name="T4"/></text:p>
      <text:p text:style-name="P59">Data relationships:</text:p>
      <text:p text:style-name="P48">field ←req type (implication)</text:p>
      <text:p text:style-name="P48">field ←tag</text:p>
      <text:p text:style-name="P48">field ←<text:span text:style-name="T12">req types (applicability)</text:span></text:p>
      <text:p text:style-name="P52">field <text:span text:style-name="T10">→ req </text:span>field values</text:p>
      <text:p text:style-name="P52"/>
      <text:p text:style-name="P69"/>
      <text:p text:style-name="P65">Req Types</text:p>
      <text:p text:style-name="P45"/>
      <text:p text:style-name="P14">Why <text:span text:style-name="T11">would you delete a req type</text:span>?</text:p>
      <text:p text:style-name="P31">It might not be getting used. Or we might just look at our data differently and decide we have a better way of representing it.</text:p>
      <text:p text:style-name="P14"/>
      <text:p text:style-name="P8">What does it mean to be deleted? Can you explain without using the word delete?</text:p>
      <text:p text:style-name="P31">It means we shouldn't have any reqs allocated to it anymore.</text:p>
      <text:p text:style-name="P8"/>
      <text:p text:style-name="P8">What does that mean for existing data?</text:p>
      <text:p text:style-name="P31">They should be reallocated to a different req type. Or rarely, just deleted.</text:p>
      <text:p text:style-name="P8"/>
      <text:p text:style-name="P13">What would you do if you couldn't delete <text:span text:style-name="T14">a req type</text:span>?</text:p>
      <text:p text:style-name="P31">Rename it like my answers to the other questions.</text:p>
      <text:p text:style-name="P13"/>
      <text:p text:style-name="P8">Can you think of any cases where deletion shouldn't be allowed? If so, why? What if it happens anyway?</text:p>
      <text:p text:style-name="P31">We might have printed a report, or stored references to our reqs in other systems. In both cases the external entity will have an ID to a req that contains the req type. If we deleted the req type, it would break their references. They should always be able to use those references to look up the same reqs. If a req type is deleted, reqs should still remember their old req types &amp; IDs. <text:span text:style-name="T15">We should still be able to delete req types though.</text:span></text:p>
      <text:p text:style-name="P8"/>
      <text:p text:style-name="P13">What is a reason you would change your mind about a deletion?</text:p>
      <text:p text:style-name="P32">Same reason for why I would delete one.</text:p>
      <text:p text:style-name="P13"/>
      <text:p text:style-name="P18">What would you need to do if you changed your mind about a deletion.</text:p>
      <text:p text:style-name="P41">I'd want to add the req type back, maybe change reqs back to use it again.</text:p>
      <text:p text:style-name="P59"/>
      <text:p text:style-name="P59">Data relationships:</text:p>
      <text:p text:style-name="P49">req type <text:span text:style-name="T12">→ field </text:span>(implication)</text:p>
      <text:p text:style-name="P49"><text:span text:style-name="T12">req type → field (applicability)</text:span></text:p>
      <text:p text:style-name="P49"><text:span text:style-name="T12">req type → pubid register</text:span></text:p>
      <text:p text:style-name="P49"><text:span text:style-name="T12">req type → associated generic reqs</text:span></text:p>
      <text:p text:style-name="P50"><text:span text:style-name="T12">req type → refs in text</text:span></text:p>
      <text:p text:style-name="P50"/>
      <text:p text:style-name="P70"/>
      <text:p text:style-name="P65">Generic Requirements</text:p>
      <text:p text:style-name="P45"/>
      <text:p text:style-name="P15">Why <text:span text:style-name="T11">would you delete a req</text:span>?</text:p>
      <text:p text:style-name="P33">An underlying (implying) requirement could change.</text:p>
      <text:p text:style-name="P33">Or people's minds could change, or new information is discovered. Then existing requirements become obsolete and need to be deleted.</text:p>
      <text:p text:style-name="P15"/>
      <text:p text:style-name="P8">What does it mean to be deleted? Can you explain without using the word delete?</text:p>
      <text:p text:style-name="P33">Turned off. Not visible anymore unless someone wants to search or look through stuff that's been removed.</text:p>
      <text:p text:style-name="P8"/>
      <text:p text:style-name="P8">What does that mean for existing data?</text:p>
      <text:p text:style-name="P34">Refs to it (from non-deleted stuff) should probably be considered errors. Not just text refs, but implications too. In that nothing alive should be implied by something dead. <text:span text:style-name="T17">Wait, unless it's implied by something else in which case just ignore the dead implication. </text:span></text:p>
      <text:p text:style-name="P8"/>
      <text:p text:style-name="P13">What would you do if you couldn't delete?</text:p>
      <text:p text:style-name="P35">Tag them as deleted.</text:p>
      <text:p text:style-name="P13"/>
      <text:p text:style-name="P8">Can you think of any cases where deletion shouldn't be allowed? If so, why? What if it happens anyway?</text:p>
      <text:p text:style-name="P36">Dunno.</text:p>
      <text:p text:style-name="P8"/>
      <text:p text:style-name="P13">What is a reason you would change your mind about a deletion?</text:p>
      <text:p text:style-name="P36">Same reason you might delete one. Things change, life changes.</text:p>
      <text:p text:style-name="P13"/>
      <text:p text:style-name="P18">What would you need to do if you changed your mind about a deletion.</text:p>
      <text:p text:style-name="P53"><text:span text:style-name="T6">I'd probably just want to undo it. All it's old implications should be restored. It's req codes and their groups should come back. Text refs to it should be fine again (i.e. not an error anymore).</text:span></text:p>
      <text:p text:style-name="P53"><text:span text:style-name="T6"/></text:p>
      <text:p text:style-name="P60"><text:span text:style-name="T6">What if the req codes are in use now?</text:span></text:p>
      <text:p text:style-name="P53"><text:span text:style-name="T6">I guess the ones being undeleted should be renamed. they should still form the same trees though – I wouldn't want one renamed but not others. Why? Cos I'd need to manually take care of the conflict and for that I'd want to look at what exists now and then the entire undeleted tree with its structure as it was.</text:span></text:p>
      <text:p text:style-name="P59"><text:span text:style-name="T6"/></text:p>
      <text:p text:style-name="P59">Data relationships:</text:p>
      <text:p text:style-name="P50"><text:span text:style-name="T16">gen req ← refs in text</text:span></text:p>
      <text:p text:style-name="P50"><text:span text:style-name="T16">gen req ↔ gen reqs (implication)</text:span></text:p>
      <text:p text:style-name="P50"><text:span text:style-name="T16">gen req ↔ req codes associated</text:span></text:p>
      <text:p text:style-name="P50"><text:span text:style-name="T16">gen req -- req code groups (indirectly)</text:span></text:p>
      <text:p text:style-name="P51"><text:span text:style-name="T16">gen req → req data (fields, tags, text)</text:span></text:p>
      <text:p text:style-name="P51"><text:span text:style-name="T16">gen req ← pubid register</text:span></text:p>
      <text:p text:style-name="P51"/>
      <text:p text:style-name="P69"/>
      <text:p text:style-name="P65">Req Code Groups</text:p>
      <text:p text:style-name="P43"/>
      <text:p text:style-name="P13">Why <text:span text:style-name="T12">would you delete an RCG</text:span>?</text:p>
      <text:p text:style-name="P37">1) If I reorganise my reqs and it becomes obsolete.</text:p>
      <text:p text:style-name="P37">2) If I delete a bunch of reqs and the code group is only useful in that group of reqs.</text:p>
      <text:p text:style-name="P13"/>
      <text:p text:style-name="P8">What does it mean to be deleted? Can you explain without using the word delete?</text:p>
      <text:p text:style-name="P37">1) I don't need it anymore. I don't want to see it anymore.</text:p>
      <text:p text:style-name="P37">2) I want it removed with the reqs being removed.</text:p>
      <text:p text:style-name="P8"/>
      <text:p text:style-name="P8">What does that mean for existing data?</text:p>
      <text:p text:style-name="P37"><text:span text:style-name="T19">Refs to it need to be removed. Children are fine if they still exist.</text:span></text:p>
      <text:p text:style-name="P11"/>
      <text:p text:style-name="P13">What would you do if you couldn't delete <text:span text:style-name="T19">groups</text:span>?</text:p>
      <text:p text:style-name="P40">I'd rename them, eventually recycle them and hate you.</text:p>
      <text:p text:style-name="P11"><text:span text:style-name="T5"/></text:p>
      <text:p text:style-name="P11">Can you think of any cases where deletion shouldn't be allowed? If so, why? What if it happens anyway?</text:p>
      <text:p text:style-name="P40">Nope.</text:p>
      <text:p text:style-name="P11"><text:span text:style-name="T5"/></text:p>
      <text:p text:style-name="P16">What is a reason you would change your mind about a deletion?</text:p>
      <text:p text:style-name="P38">1) <text:span text:style-name="T19">Reorg, becomes relevant again.</text:span></text:p>
      <text:p text:style-name="P39">2) <text:span text:style-name="T20">I undelete a group of reqs that came under the group.</text:span></text:p>
      <text:p text:style-name="P11"><text:span text:style-name="T5"/></text:p>
      <text:p text:style-name="P19">What would you need to do if you changed your mind about a deletion.</text:p>
      <text:p text:style-name="P38">1) <text:span text:style-name="T20">Recreate it. Think of and re-enter a meaningful title again. Would be nice if I didn't have to do this.</text:span></text:p>
      <text:p text:style-name="P39">2) <text:span text:style-name="T20">Recreate all the req code groups I used to have. I'd have to remember titles or think of new ones. All of that would be annoying. Ideally they'd all just come back with the req undeletion.</text:span></text:p>
      <text:p text:style-name="P11"><text:span text:style-name="T5"/></text:p>
      <text:p text:style-name="P59">Data relationships:</text:p>
      <text:p text:style-name="P54">rcg → req code children</text:p>
      <text:p text:style-name="P54">rcg → text ref<text:span text:style-name="T18">s</text:span></text:p>
      <text:p text:style-name="P44"/>
      <text:p text:style-name="P67"/>
      <text:p text:style-name="P42"/>
      <text:p text:style-name="P55"><text:span text:style-name="T6">Also we should be able to record a reason for deletion. For example I might select 10 things, delete them all at once and give the reason “FR-201 makes this redundant” or something.</text:span></text:p>
      <text:p text:style-name="P55"><text:span text:style-name="T6"/></text:p>
      <text:p text:style-name="P61"><text:span text:style-name="T6">Why?</text:span></text:p>
      <text:p text:style-name="P56"><text:span text:style-name="T6">Because it's not always going to be obvious why something is deleted. You might search for something, find it dead and not be able to think of a reason why it shouldn't be alive, then you could undelete it without understanding that it's incompatible with another requirement.</text:span></text:p>
      <text:p text:style-name="P56"><text:span text:style-name="T7"/></text:p>
      <text:p text:style-name="P62"><text:span text:style-name="T6">What would you do if the system didn't support this?</text:span></text:p>
      <text:p text:style-name="P57"><text:span text:style-name="T6">I guess I'd edit requirements before I delete them so include the reason. But that would be super annoying when deleting an entire block of reqs.</text:span></text:p>
      <text:p text:style-name="P57"><text:span text:style-name="T6"/></text:p>
      <text:p text:style-name="P57"><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AU"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AU" style:letter-kerning="true"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mo" fo:font-family="Arimo"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7T12:28:51.129543232</meta:creation-date>
    <meta:editing-duration>PT33M26S</meta:editing-duration>
    <meta:editing-cycles>11</meta:editing-cycles>
    <meta:generator>LibreOffice/4.4.5.2$Linux_X86_64 LibreOffice_project/40m0$Build-2</meta:generator>
    <dc:date>2015-09-07T17:17:16.029280522</dc:date>
    <meta:document-statistic meta:table-count="0" meta:image-count="0" meta:object-count="0" meta:page-count="1" meta:paragraph-count="144" meta:word-count="1907" meta:character-count="10202" meta:non-whitespace-character-count="8441"/>
  </office:meta>
</office:document-meta>
</file>
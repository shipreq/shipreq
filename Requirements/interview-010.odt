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mo1" svg:font-family="Arimo" style:font-family-generic="roman"/>
    <style:font-face style:name="FreeSans" svg:font-family="FreeSans" style:font-family-generic="roman"/>
    <style:font-face style:name="FreeSans2" svg:font-family="FreeSans" style:font-family-generic="swiss"/>
    <style:font-face style:name="Tinos" svg:font-family="Tinos" style:font-family-generic="roman" style:font-pitch="variable"/>
    <style:font-face style:name="Arimo" svg:font-family="Arimo" style:font-family-generic="swiss" style:font-pitch="variable"/>
    <style:font-face style:name="AR PL UMing CN" svg:font-family="'AR PL UMing CN'" style:font-family-generic="system" style:font-pitch="variable"/>
    <style:font-face style:name="FreeSans1" svg:font-family="FreeSans" style:font-family-generic="system" style:font-pitch="variable"/>
  </office:font-face-decls>
  <office:automatic-styles>
    <style:style style:name="P1" style:family="paragraph" style:parent-style-name="Standard">
      <style:text-properties officeooo:rsid="00058ba9" officeooo:paragraph-rsid="00058ba9"/>
    </style:style>
    <style:style style:name="P2" style:family="paragraph" style:parent-style-name="Standard">
      <style:text-properties fo:font-weight="bold" officeooo:rsid="00069f07" officeooo:paragraph-rsid="00069f07" style:font-weight-asian="bold" style:font-weight-complex="bold"/>
    </style:style>
    <style:style style:name="P3" style:family="paragraph" style:parent-style-name="Standard">
      <style:text-properties fo:font-weight="bold" officeooo:rsid="00097298" officeooo:paragraph-rsid="00097298" style:font-weight-asian="bold" style:font-weight-complex="bold"/>
    </style:style>
    <style:style style:name="P4" style:family="paragraph" style:parent-style-name="Standard">
      <style:text-properties fo:font-weight="bold" officeooo:rsid="000b5895" officeooo:paragraph-rsid="000b5895" style:font-weight-asian="bold" style:font-weight-complex="bold"/>
    </style:style>
    <style:style style:name="P5" style:family="paragraph" style:parent-style-name="Standard">
      <style:text-properties style:use-window-font-color="true" fo:font-style="italic" officeooo:rsid="00058ba9" officeooo:paragraph-rsid="00058ba9" style:font-style-asian="italic" style:font-style-complex="italic"/>
    </style:style>
    <style:style style:name="P6" style:family="paragraph" style:parent-style-name="Standard">
      <style:paragraph-properties fo:text-align="start" style:justify-single-word="false"/>
      <style:text-properties style:use-window-font-color="true" fo:font-style="italic" officeooo:paragraph-rsid="00058ba9" style:font-style-asian="italic" style:font-style-complex="italic"/>
    </style:style>
    <style:style style:name="P7" style:family="paragraph" style:parent-style-name="Standard">
      <style:text-properties officeooo:rsid="00069f07" officeooo:paragraph-rsid="00069f07"/>
    </style:style>
    <style:style style:name="P8" style:family="paragraph" style:parent-style-name="Standard">
      <style:text-properties fo:font-weight="normal" officeooo:rsid="00097298" officeooo:paragraph-rsid="00097298" style:font-weight-asian="normal" style:font-weight-complex="normal"/>
    </style:style>
    <style:style style:name="P9" style:family="paragraph" style:parent-style-name="Standard">
      <style:text-properties fo:font-weight="normal" officeooo:rsid="000b5895" officeooo:paragraph-rsid="000b5895" style:font-weight-asian="normal" style:font-weight-complex="normal"/>
    </style:style>
    <style:style style:name="P10" style:family="paragraph" style:parent-style-name="Standard">
      <style:text-properties fo:color="#ff950e" style:text-outline="false" style:text-line-through-style="none" style:text-line-through-type="none" style:font-name="Arimo1" fo:font-size="10pt" fo:font-style="normal" fo:text-shadow="none" style:text-underline-style="none" fo:font-weight="bold" officeooo:rsid="00058ba9" officeooo:paragraph-rsid="00058ba9" style:font-size-asian="10pt" style:font-style-asian="normal" style:font-weight-asian="bold" style:font-weight-complex="bold" style:text-emphasize="none"/>
    </style:style>
    <style:style style:name="P11" style:family="paragraph" style:parent-style-name="Standard">
      <style:text-properties style:use-window-font-color="true" style:text-outline="false" style:text-line-through-style="none" style:text-line-through-type="none" style:font-name="FreeSans" fo:font-size="10pt" fo:font-style="italic" fo:text-shadow="none" style:text-underline-style="none" fo:font-weight="normal" officeooo:rsid="00058ba9" officeooo:paragraph-rsid="00058ba9" style:font-size-asian="10pt" style:font-style-asian="italic" style:font-weight-asian="normal" style:font-style-complex="italic" style:text-emphasize="none"/>
    </style:style>
    <style:style style:name="P12" style:family="paragraph" style:parent-style-name="Standard" style:list-style-name="L1">
      <style:text-properties officeooo:rsid="00058ba9" officeooo:paragraph-rsid="00058ba9"/>
    </style:style>
    <style:style style:name="P13" style:family="paragraph" style:parent-style-name="Standard" style:list-style-name="L2">
      <style:text-properties fo:font-weight="normal" officeooo:rsid="000b5895" officeooo:paragraph-rsid="000b5895" style:font-weight-asian="normal" style:font-weight-complex="normal"/>
    </style:style>
    <style:style style:name="P14" style:family="paragraph" style:parent-style-name="Standard">
      <style:text-properties fo:font-weight="normal" officeooo:rsid="000b5895" officeooo:paragraph-rsid="000b5895" style:font-weight-asian="normal" style:font-weight-complex="normal"/>
    </style:style>
    <style:style style:name="P15" style:family="paragraph" style:parent-style-name="Standard">
      <style:text-properties fo:font-weight="normal" officeooo:rsid="000e2602" officeooo:paragraph-rsid="000e2602" style:font-weight-asian="normal" style:font-weight-complex="normal"/>
    </style:style>
    <style:style style:name="P16" style:family="paragraph" style:parent-style-name="Standard">
      <style:text-properties fo:font-weight="normal" officeooo:rsid="000f7de5" officeooo:paragraph-rsid="000f7de5" style:font-weight-asian="normal" style:font-weight-complex="normal"/>
    </style:style>
    <style:style style:name="P17" style:family="paragraph" style:parent-style-name="Standard" style:list-style-name="L2">
      <style:text-properties fo:font-weight="normal" officeooo:rsid="0012d1b7" officeooo:paragraph-rsid="0012d1b7" style:font-weight-asian="normal" style:font-weight-complex="normal"/>
    </style:style>
    <style:style style:name="P18" style:family="paragraph" style:parent-style-name="Standard" style:list-style-name="L3">
      <style:text-properties fo:font-weight="normal" officeooo:rsid="001d9d41" officeooo:paragraph-rsid="001d9d41" style:font-weight-asian="normal" style:font-weight-complex="normal"/>
    </style:style>
    <style:style style:name="P19" style:family="paragraph" style:parent-style-name="Standard">
      <style:text-properties fo:font-weight="normal" officeooo:rsid="001d9d41" officeooo:paragraph-rsid="001d9d41" style:font-weight-asian="normal" style:font-weight-complex="normal"/>
    </style:style>
    <style:style style:name="P20" style:family="paragraph" style:parent-style-name="Standard">
      <style:text-properties fo:font-weight="normal" officeooo:rsid="001ef79a" officeooo:paragraph-rsid="001ef79a" style:font-weight-asian="normal" style:font-weight-complex="normal"/>
    </style:style>
    <style:style style:name="P21" style:family="paragraph" style:parent-style-name="Standard">
      <style:text-properties fo:font-weight="bold" officeooo:rsid="00149f10" officeooo:paragraph-rsid="00149f10" style:font-weight-asian="bold" style:font-weight-complex="bold"/>
    </style:style>
    <style:style style:name="P22" style:family="paragraph" style:parent-style-name="Standard" style:list-style-name="L3">
      <style:text-properties fo:font-weight="bold" officeooo:rsid="00149f10" officeooo:paragraph-rsid="00149f10" style:font-weight-asian="bold" style:font-weight-complex="bold"/>
    </style:style>
    <style:style style:name="P23" style:family="paragraph" style:parent-style-name="Standard" style:list-style-name="L3">
      <style:text-properties fo:font-weight="bold" officeooo:rsid="00161ac1" officeooo:paragraph-rsid="00161ac1" style:font-weight-asian="bold" style:font-weight-complex="bold"/>
    </style:style>
    <style:style style:name="P24" style:family="paragraph" style:parent-style-name="Standard" style:list-style-name="L3">
      <style:text-properties fo:font-weight="bold" officeooo:rsid="00167c0f" officeooo:paragraph-rsid="00193d3f" style:font-weight-asian="bold" style:font-weight-complex="bold"/>
    </style:style>
    <style:style style:name="P25" style:family="paragraph" style:parent-style-name="Standard" style:list-style-name="L3">
      <style:text-properties fo:font-weight="bold" officeooo:rsid="00167c0f" officeooo:paragraph-rsid="001a7c20" style:font-weight-asian="bold" style:font-weight-complex="bold"/>
    </style:style>
    <style:style style:name="P26" style:family="paragraph" style:parent-style-name="Standard" style:list-style-name="L3">
      <style:text-properties fo:font-weight="bold" officeooo:rsid="001776cf" officeooo:paragraph-rsid="001776cf" style:font-weight-asian="bold" style:font-weight-complex="bold"/>
    </style:style>
    <style:style style:name="P27" style:family="paragraph" style:parent-style-name="Standard" style:list-style-name="L3">
      <style:text-properties fo:font-weight="bold" officeooo:rsid="001a7c20" officeooo:paragraph-rsid="001a7c20" style:font-weight-asian="bold" style:font-weight-complex="bold"/>
    </style:style>
    <style:style style:name="P28" style:family="paragraph" style:parent-style-name="Standard" style:list-style-name="L3">
      <style:text-properties fo:font-weight="bold" officeooo:rsid="001b17ea" officeooo:paragraph-rsid="001b17ea" style:font-weight-asian="bold" style:font-weight-complex="bold"/>
    </style:style>
    <style:style style:name="P29" style:family="paragraph" style:parent-style-name="Standard" style:list-style-name="L3">
      <style:text-properties fo:font-weight="bold" officeooo:rsid="001c9dd7" officeooo:paragraph-rsid="001c9dd7" style:font-weight-asian="bold" style:font-weight-complex="bold"/>
    </style:style>
    <style:style style:name="T1" style:family="text">
      <style:text-properties style:text-outline="false" style:text-line-through-style="none" style:text-line-through-type="none" style:font-name="Arimo1" fo:font-size="10pt" fo:text-shadow="none" style:text-underline-style="none" fo:font-weight="normal" style:font-size-asian="10pt" style:font-weight-asian="normal" style:text-emphasize="none"/>
    </style:style>
    <style:style style:name="T2" style:family="text">
      <style:text-properties style:text-outline="false" style:text-line-through-style="none" style:text-line-through-type="none" style:font-name="FreeSans" fo:font-size="10pt" fo:text-shadow="none" style:text-underline-style="none" fo:font-weight="normal" style:font-size-asian="10pt" style:font-weight-asian="normal" style:text-emphasize="none"/>
    </style:style>
    <style:style style:name="T3" style:family="text">
      <style:text-properties officeooo:rsid="0007a3aa"/>
    </style:style>
    <style:style style:name="T4" style:family="text">
      <style:text-properties fo:font-weight="normal" style:font-weight-asian="normal" style:font-weight-complex="normal"/>
    </style:style>
    <style:style style:name="T5" style:family="text">
      <style:text-properties fo:font-weight="normal" officeooo:rsid="00193d3f" style:font-weight-asian="normal" style:font-weight-complex="normal"/>
    </style:style>
    <style:style style:name="T6" style:family="text">
      <style:text-properties fo:font-weight="normal" officeooo:rsid="001a7c20" style:font-weight-asian="normal" style:font-weight-complex="normal"/>
    </style:style>
    <style:style style:name="T7" style:family="text">
      <style:text-properties fo:font-weight="normal" officeooo:rsid="001d9d41" style:font-weight-asian="normal" style:font-weight-complex="normal"/>
    </style:style>
    <style:style style:name="T8" style:family="text">
      <style:text-properties officeooo:rsid="000b5895"/>
    </style:style>
    <style:style style:name="T9" style:family="text">
      <style:text-properties officeooo:rsid="000e2602"/>
    </style:style>
    <style:style style:name="T10" style:family="text">
      <style:text-properties officeooo:rsid="000ec98a"/>
    </style:style>
    <style:style style:name="T11" style:family="text">
      <style:text-properties style:text-position="super 58%"/>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officeooo:rsid="001ef79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MF-11: Collaboration: change mgnt &amp; approval</text:p>
      <text:p text:style-name="P11"/>
      <text:p text:style-name="P1">This MF is about the following:</text:p>
      <text:list xml:id="list2745673397560801724" text:style-name="L1">
        <text:list-item>
          <text:p text:style-name="P12">Reaching consensus.</text:p>
        </text:list-item>
        <text:list-item>
          <text:p text:style-name="P12">Dealing with change.</text:p>
        </text:list-item>
        <text:list-item>
          <text:p text:style-name="P12">Understanding the course of the project (i.e. the past &amp; present).</text:p>
        </text:list-item>
      </text:list>
      <text:p text:style-name="P1"/>
      <text:p text:style-name="P1">Taken from major_features.ods:</text:p>
      <text:p text:style-name="P5"><text:span text:style-name="T1">- Stakeholders (esp devs/testers) are often </text:span><text:span text:style-name="T2">unaware when requirements change.</text:span></text:p>
      <text:p text:style-name="P6"><text:span text:style-name="T1">- General practice: baseline, change request, </text:span><text:span text:style-name="T2">request reviewed/rejected/approved, request affects reqs.</text:span></text:p>
      <text:p text:style-name="P6"><text:span text:style-name="T1">- Stakeholders (esp. PMs) don't understand </text:span><text:span text:style-name="T2">why project delayed: features should provide all info to justify, blame and improve.</text:span></text:p>
      <text:p text:style-name="P6"><text:span text:style-name="T1">- Req change process often lacks </text:span><text:span text:style-name="T2">transparency.</text:span></text:p>
      <text:p text:style-name="P5"/>
      <text:p text:style-name="P1"/>
      <text:p text:style-name="P2">Reaching consensus.</text:p>
      <text:p text:style-name="P7">There are nearly always many parties involved in a project. A subset (normally user-class leaders) need to agree on the requirements and approve them for implementation. <text:span text:style-name="T3">They need to read a req subset (eg all for v1.0), approve | reject with a reason (usually a request for change, sometimes denial) | ask questions or request change before deciding. There can be a lot of back and forth between parties and BAs. Once someone agrees on something they shouldn't be asked to agree on it again (system detail) unless it changes, or they change their mind themselves. People will want to see how the process is going, there should be transparency and a summary of how far along the process is, and how contentious it is too. Once consensus is reached, the set of requirements are tagged like in VCS and are considered a baseline.</text:span></text:p>
      <text:p text:style-name="P7"/>
      <text:p text:style-name="P3">Dealing with change.</text:p>
      <text:p text:style-name="P8">Once a baseline is established, we still need to cater for inevitable change. The formal process is to create a Change Request, have everyone review then approve/reject it, then if approved have the change applied to the requirements, with traceability back the the Change Request. Afterwards it's important to make sure that everyone involved on the project knows that the change has occurred and ensure that they don't continue working to stale requirements. <text:span text:style-name="T8">Due to its severity some kind of auditable “acknowledged” flag for non-approvers may be important to prevent situations like a team BA approving change and the dev coding away saying later “she never told me it changed!” or “I didn't see any updated requirements!”</text:span></text:p>
      <text:p text:style-name="P8">That whole <text:span text:style-name="T8">formal </text:span>CR process feels a bit stuffy to me <text:span text:style-name="T8">though </text:span>and <text:span text:style-name="T8">it </text:span>quickly went out the window at Macquarie. It can definitely be too much overhead for small <text:span text:style-name="T10">and/or low-risk </text:span>changes, which leads to a loss of faith and then adherence to the process. Everyone gets busy and lazy and as the pressure mounts people became stressed and very time-and-attention-poor. A good CR process is essential because without it, change doesn't get tracked, communicated, or reviewed. The trick is to have it be quick and easy enough to keep it in the process. <text:span text:style-name="T8">Also it's a question of granularity &amp; necessity: if a single CR impacts multiple reqs, does it make sense for half of the req changes to be approved and integrated without the other half? Answer = Sometimes|Never|Always.</text:span></text:p>
      <text:p text:style-name="P15">Also another form of change is leaving req content intact, but moving them in/out of scope.</text:p>
      <text:p text:style-name="P16">Another though, if the whole process is transparent, when dev A is viewing a changed req pending approval, the System had better make it damn clear visually, that they are looking at something unapproved. Close the loophole on people sending around link on unapproved shit and coercing implementation before approval with excuses like “Oh I didn't realise it wasn't approved.”</text:p>
      <text:p text:style-name="P8"/>
      <text:p text:style-name="P4">Understanding.</text:p>
      <text:p text:style-name="P9">Understand what?</text:p>
      <text:list xml:id="list1647908157705263016" text:style-name="L2">
        <text:list-item>
          <text:p text:style-name="P13">Why a change occurred.</text:p>
        </text:list-item>
        <text:list-item>
          <text:p text:style-name="P13">Who approved.</text:p>
        </text:list-item>
        <text:list-item>
          <text:p text:style-name="P13">Why is so much change happening? (eg. reqs are ambiguous, contradictory, missing, <text:span text:style-name="T9">infeasible</text:span>, vague)</text:p>
        </text:list-item>
        <text:list-item>
          <text:p text:style-name="P13">Understanding can be push/pull. Above is pull, i.e. when someone wants to understand. In other cases, one may want to push that understanding out to people. This is obvious and frequent when reqs change and one wants to synchronise everyone's understanding of the project (i.e. its future/implementation). </text:p>
        </text:list-item>
        <text:list-item>
          <text:p text:style-name="P17">How many, and which changes where rejected, why they were rejected and why they were submitted.</text:p>
        </text:list-item>
      </text:list>
      <text:p text:style-name="P9"/>
      <text:p text:style-name="P9"/>
      <text:p text:style-name="P21">Software Requirements 3<text:span text:style-name="T11">rd</text:span> Ed</text:p>
      <text:list xml:id="list2009748332701033555" text:style-name="L3">
        <text:list-item>
          <text:p text:style-name="P22"><text:span text:style-name="T4">Change requests have a detailed workflow of status &amp; assignee, with special explicit roles &amp; responsibilities for each step.</text:span></text:p>
        </text:list-item>
        <text:list-item>
          <text:p text:style-name="P22"><text:span text:style-name="T4">Change requests can be cancelled after approval.</text:span></text:p>
        </text:list-item>
        <text:list-item>
          <text:p text:style-name="P22"><text:span text:style-name="T4">[</text:span><text:span text:style-name="T12">Indirectly</text:span><text:span text:style-name="T4">] When a change request is approved and requirements are modified, if those requirements have statuses (eg. Tested, Deployed, Implemented) they should be reset. If users were using groupings as statuses automation support would be needed.</text:span></text:p>
        </text:list-item>
        <text:list-item>
          <text:p text:style-name="P23"><text:span text:style-name="T4">Serious daddys will want to record analysis of tech feasibility, cost, alignment with business requirements, resource constraints, risk, impact.</text:span></text:p>
        </text:list-item>
        <text:list-item>
          <text:p text:style-name="P24"><text:span text:style-name="T4">CR may include a</text:span></text:p>
          <text:list>
            <text:list-item>
              <text:p text:style-name="P24"><text:span text:style-name="T4">priority </text:span><text:span text:style-name="T6">from originator's PoV</text:span></text:p>
            </text:list-item>
            <text:list-item>
              <text:p text:style-name="P25"><text:span text:style-name="T6">priority from Change Control Board's PoV</text:span></text:p>
            </text:list-item>
            <text:list-item>
              <text:p text:style-name="P29"><text:span text:style-name="T6">o</text:span><text:span text:style-name="T4">riginator's user group (eg. Marketting, Team B, Testers)</text:span></text:p>
            </text:list-item>
            <text:list-item>
              <text:p text:style-name="P24"><text:span text:style-name="T4">target impl date</text:span></text:p>
            </text:list-item>
            <text:list-item>
              <text:p text:style-name="P24"><text:span text:style-name="T4">allocation to specific iteration/release</text:span></text:p>
            </text:list-item>
            <text:list-item>
              <text:p text:style-name="P24"><text:span text:style-name="T5">type (same as issue types in jira et al)</text:span></text:p>
            </text:list-item>
            <text:list-item>
              <text:p text:style-name="P27"><text:span text:style-name="T4">person assigned to each role in {verifier, modifier}</text:span></text:p>
            </text:list-item>
          </text:list>
        </text:list-item>
        <text:list-item>
          <text:p text:style-name="P26"><text:span text:style-name="T4">CR is approved (presumably in higher-level) before reqs updated and verified (verification = approval in my ramblings above)</text:span></text:p>
        </text:list-item>
        <text:list-item>
          <text:p text:style-name="P28"><text:span text:style-name="T4">Recommended criteria for a change-control tool:</text:span></text:p>
          <text:list>
            <text:list-item>
              <text:p text:style-name="P28"><text:span text:style-name="T4">Customisable CR attributes.</text:span></text:p>
            </text:list-item>
            <text:list-item>
              <text:p text:style-name="P28"><text:span text:style-name="T4">Customisable workflow &amp; with multiple statuses (¿Key-Value?)</text:span></text:p>
            </text:list-item>
            <text:list-item>
              <text:p text:style-name="P28"><text:span text:style-name="T4">Customisable role-based authorisation on state transitions.</text:span></text:p>
            </text:list-item>
            <text:list-item>
              <text:p text:style-name="P28"><text:span text:style-name="T4">Audit trail of CR: Σ{change, time, user}</text:span></text:p>
            </text:list-item>
            <text:list-item>
              <text:p text:style-name="P29"><text:span text:style-name="T4">Email notification on CR creation &amp; change.</text:span></text:p>
            </text:list-item>
            <text:list-item>
              <text:p text:style-name="P29"><text:span text:style-name="T4">Custom reports &amp; charts. </text:span><text:span text:style-name="T7">(Examples on page 483)</text:span></text:p>
            </text:list-item>
          </text:list>
        </text:list-item>
        <text:list-item>
          <text:p text:style-name="P18">Companies may develop change impact questionnaires that need to be filled out as part of a CR. (Examples on page 485<text:span text:style-name="T13">~488</text:span>)</text:p>
        </text:list-item>
      </text:list>
      <text:p text:style-name="P19"/>
      <text:p text:style-name="P20">Continue from Ch 29, pg 49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mo1" svg:font-family="Arimo" style:font-family-generic="roman"/>
    <style:font-face style:name="FreeSans" svg:font-family="FreeSans" style:font-family-generic="roman"/>
    <style:font-face style:name="FreeSans2" svg:font-family="FreeSans" style:font-family-generic="swiss"/>
    <style:font-face style:name="Tinos" svg:font-family="Tinos" style:font-family-generic="roman" style:font-pitch="variable"/>
    <style:font-face style:name="Arimo" svg:font-family="Arimo" style:font-family-generic="swiss" style:font-pitch="variable"/>
    <style:font-face style:name="AR PL UMing CN" svg:font-family="'AR PL UMing CN'" style:font-family-generic="system" style:font-pitch="variable"/>
    <style:font-face style:name="FreeSans1"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nos" fo:font-size="12pt" fo:language="en" fo:country="AU"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page"/>
      <style:text-properties style:use-window-font-color="true" style:font-name="Tinos" fo:font-size="12pt" fo:language="en" fo:country="AU"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mo" fo:font-family="Arimo" style:font-family-generic="swiss" style:font-pitch="variable" fo:font-size="14pt" style:font-name-asian="AR PL UMing CN" style:font-family-asian="'AR PL UMing CN'"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23T11:46:27.010746882</meta:creation-date>
    <dc:date>2014-06-23T19:03:28.976721055</dc:date>
    <meta:editing-duration>PT1H22M43S</meta:editing-duration>
    <meta:editing-cycles>7</meta:editing-cycles>
    <meta:generator>LibreOffice/4.2.5.2$Linux_X86_64 LibreOffice_project/420m0$Build-2</meta:generator>
    <meta:document-statistic meta:table-count="0" meta:image-count="0" meta:object-count="0" meta:page-count="1" meta:paragraph-count="47" meta:word-count="887" meta:character-count="5461" meta:non-whitespace-character-count="4649"/>
  </office:meta>
</office:document-meta>
</file>
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8.8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0" style:family="table-cell" style:parent-style-name="Default">
      <style:table-cell-properties fo:wrap-option="wrap" fo:border="none" style:vertical-align="top"/>
    </style:style>
    <style:style style:name="ce11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RC</text:p>
          </table:table-cell>
          <table:table-cell table:style-name="ce4" office:value-type="string" calcext:value-type="string">
            <text:p>TO</text:p>
          </table:table-cell>
          <table:table-cell table:style-name="ce6" office:value-type="string" calcext:value-type="string">
            <text:p>DESC</text:p>
          </table:table-cell>
        </table:table-row>
        <table:table-row table:style-name="ro2">
          <table:table-cell table:style-name="ce2" office:value-type="float" office:value="5" calcext:value-type="float">
            <text:p>MF-5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I will usually be interested in fields for a single req type. Simplify the view in such cases.</text:p>
            <text:p>SI) Remove other req-types from view, all actions affect the req-type only (what about reorder with hidden fields? how to add existing field to selected req-type?)</text:p>
            <text:p>SI) Select req-type(s), fields that don't apply are shown in light grey instead of black.</text:p>
          </table:table-cell>
        </table:table-row>
        <table:table-row table:style-name="ro1">
          <table:table-cell table:style-name="ce2" office:value-type="float" office:value="7" calcext:value-type="float">
            <text:p>MF-7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Feature Tree diagram</text:p>
          </table:table-cell>
        </table:table-row>
        <table:table-row table:style-name="ro1">
          <table:table-cell table:style-name="ce2" office:value-type="float" office:value="7" calcext:value-type="float">
            <text:p>MF-7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Grouping graph/table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8" calcext:value-type="float">
            <text:p>MF-8</text:p>
          </table:table-cell>
          <table:table-cell table:style-name="ce8" office:value-type="string" calcext:value-type="string">
            <text:p>It would be nice to have a revision for LL reqs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11" calcext:value-type="float">
            <text:p>MF-11</text:p>
          </table:table-cell>
          <table:table-cell table:style-name="ce8" office:value-type="string" calcext:value-type="string">
            <text:p>LL reqs should be approved and signed-off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1" calcext:value-type="float">
            <text:p>MF-21</text:p>
          </table:table-cell>
          <table:table-cell table:style-name="ce8" office:value-type="string" calcext:value-type="string">
            <text:p>BA often copies a subset of LL reqs into a targetted doc. (SRS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8" office:value-type="string" calcext:value-type="string">
            <text:p>Reqs could be monitored for duplication (?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8" office:value-type="string" calcext:value-type="string">
            <text:p>Ability to have LL reqs monitored for ambiguous language.</text:p>
          </table:table-cell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8" office:value-type="string" calcext:value-type="string">
            <text:p>Having a checklist per LL req comprised of: complete, correct, feasible, necessary, prioritised, unambiguous, verifiable.</text:p>
          </table:table-cell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[QR/UX] I often don't know what my semantic IDs will be until I have written 5-15, then I go back and decide them, then sort them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[QR/UX] I change semantic IDs often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Choosing between ASC/DESC in sorting generally isn't too important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10" office:value-type="string" calcext:value-type="string">
            <text:p>Frequently there exist sets of requirements whose texts differ only by a word or two. (Enum)</text:p>
          </table:table-cell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10" office:value-type="string" calcext:value-type="string">
            <text:p>Frequently there exist sets of requirements that share a common suffix \&amp;/ infix \&amp;/ prefix. (Set of reqs describing system under same condition(s).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7" office:value-type="string" calcext:value-type="string">
            <text:p>Synthetic requirements. Eg. template with placeholders, provide values, system generates permutations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office:value-type="string" calcext:value-type="string">
            <text:p>User doesn't have the ability to store attributes in parent and have them applied to children.</text:p>
          </table:table-cell>
        </table:table-row>
        <table:table-row table:style-name="ro2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</table:table-row>
        <table:table-row table:style-name="ro1">
          <table:table-cell table:style-name="ce2" table:number-columns-repeated="2"/>
          <table:table-cell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text>MF-</number:text>
      <number:number number:decimal-places="0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3:29:57.25269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40:50.342178892</meta:creation-date>
    <dc:date>2014-06-27T13:32:21.022004778</dc:date>
    <meta:editing-duration>P0D</meta:editing-duration>
    <meta:editing-cycles>2</meta:editing-cycles>
    <meta:generator>LibreOffice/4.2.5.2$Linux_x86 LibreOffice_project/420m0$Build-2</meta:generator>
    <meta:document-statistic meta:table-count="1" meta:cell-count="54" meta:object-count="0"/>
  </office:meta>
</office:document-meta>
</file>
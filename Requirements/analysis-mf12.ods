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15.7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420e" style:text-outline="false" style:text-line-through-style="none" style:font-name="Tino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6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[Low-Level Requirements]</text:p>
          </table:table-cell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ow-level requirements are critical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ssumption</text:p>
          </table:table-cell>
          <table:table-cell table:style-name="ce7" office:value-type="string" calcext:value-type="string">
            <text:p>Atomic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Often exist as flat list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You end up with lots of requirements that are very long and only different to other requirements by a word or two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usiness Req</text:p>
          </table:table-cell>
          <table:table-cell table:style-name="ce7" office:value-type="string" calcext:value-type="string">
            <text:p>UX mustn't be worse with ShipReq than Excel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See multiple reqs simultaneously as row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Move cursor around rows editing different requirements in close succession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Filter visible req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Mass search/replace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reate a new req by copying an existing one, then editing it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Add/remove column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hange the requirement type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Colour incomplete requirements red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managing req IDs (unique, increment per type). Error-prone, distracting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managing last-updated date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LL Reqs normally don't have a revision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It would be nice to have a revision for LL req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Manually linking LL reqs to MF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s can be driven by more than just one MF.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The degree to which MFs drive reqs can differ.</text:p>
            <text:p>Eg. FR-5 is strongly driven by MF-3, and weakly driven by MF-1 and MF-8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Representing the driving MFs of a LL req is a difficult problem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LL reqs can have a weakly-related MF without a strongly-related MF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No way to reference other requirements without manually managed plain text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Have to restrain myself adding columns bcos too many causes horizontal scrolling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Storing UC headers in the LL req flat list is duplication and error-prone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Annoying to type “shall be able to” so often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BA often copies a subset of LL reqs into a targetted doc. (SRS)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LL reqs should be approved and signed-off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Ability to have LL reqs monitored for ambiguous language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style-name="ce7" office:value-type="string" calcext:value-type="string">
            <text:p>LL reqs should have the same incompletions functionality as UCs.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Having a checklist per LL req comprised of: complete, correct, feasible, necessary, prioritised, unambiguous, verifiable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FRs can be heirarchical/nested instead of flat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FRs can have semantic, text-based IDs instead of FR-n style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S</text:p>
          </table:table-cell>
          <table:table-cell table:style-name="ce7" office:value-type="string" calcext:value-type="string">
            <text:p>[SF3] Semantic FRs IDs in a heirarchy extend their parents IDs. Eg. A.B.C is a child of A.B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uirement type mnemonics exist with 3 letter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LL reqs are not always atomic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Not having to choose between semantic and numeric req type id schemes may be ideal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Semantic req-type ids may be producable using grouping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I</text:p>
          </table:table-cell>
          <table:table-cell table:style-name="ce7" office:value-type="string" calcext:value-type="string">
            <text:p>Allowing nesting of reqs using numeric req-type ids may be desirable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Requirement types are arbitrary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style-name="ce7" office:value-type="string" calcext:value-type="string">
            <text:p>Must be able to add / remove / modify requirement type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WM</text:p>
          </table:table-cell>
          <table:table-cell table:style-name="ce7" office:value-type="string" calcext:value-type="string">
            <text:p>Different requirement types may need different columns (attributes).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0:52:36.945258386</meta:creation-date>
    <dc:date>2014-02-18T11:41:28.677430003</dc:date>
    <meta:editing-duration>PT2M19S</meta:editing-duration>
    <meta:editing-cycles>1</meta:editing-cycles>
    <meta:document-statistic meta:table-count="1" meta:cell-count="127" meta:object-count="0"/>
    <meta:generator>LibreOffice/4.1.5.3$Linux_X86_64 LibreOffice_project/410m0$Build-3</meta:generator>
  </office:meta>
</office:document-meta>
</file>
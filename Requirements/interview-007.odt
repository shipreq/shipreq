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fo:font-weight="bold" officeooo:rsid="0009af58" officeooo:paragraph-rsid="0009af58" style:font-weight-asian="bold" style:font-weight-complex="bold"/>
    </style:style>
    <style:style style:name="P2" style:family="paragraph" style:parent-style-name="Standard">
      <style:text-properties fo:font-weight="bold" officeooo:rsid="0009af58" officeooo:paragraph-rsid="0009c1f5" style:font-weight-asian="bold" style:font-weight-complex="bold"/>
    </style:style>
    <style:style style:name="P3" style:family="paragraph" style:parent-style-name="Standard">
      <style:text-properties fo:font-weight="bold" officeooo:rsid="0009c1f5" officeooo:paragraph-rsid="0009c1f5" style:font-weight-asian="bold" style:font-weight-complex="bold"/>
    </style:style>
    <style:style style:name="P4" style:family="paragraph" style:parent-style-name="Standard">
      <style:text-properties fo:font-weight="bold" officeooo:rsid="0009c1f5" officeooo:paragraph-rsid="000b1aa6" style:font-weight-asian="bold" style:font-weight-complex="bold"/>
    </style:style>
    <style:style style:name="P5" style:family="paragraph" style:parent-style-name="Standard">
      <style:text-properties fo:font-weight="bold" officeooo:rsid="000b52a9" officeooo:paragraph-rsid="000b52a9" style:font-weight-asian="bold" style:font-weight-complex="bold"/>
    </style:style>
    <style:style style:name="P6" style:family="paragraph" style:parent-style-name="Standard">
      <style:text-properties fo:font-weight="bold" officeooo:rsid="000b52a9" officeooo:paragraph-rsid="0017efb2" style:font-weight-asian="bold" style:font-weight-complex="bold"/>
    </style:style>
    <style:style style:name="P7" style:family="paragraph" style:parent-style-name="Standard">
      <style:text-properties fo:font-weight="bold" officeooo:rsid="000b52a9" officeooo:paragraph-rsid="00186ca1" style:font-weight-asian="bold" style:font-weight-complex="bold"/>
    </style:style>
    <style:style style:name="P8" style:family="paragraph" style:parent-style-name="Standard">
      <style:text-properties fo:font-weight="bold" officeooo:rsid="000d77a3" officeooo:paragraph-rsid="000d77a3" style:font-weight-asian="bold" style:font-weight-complex="bold"/>
    </style:style>
    <style:style style:name="P9" style:family="paragraph" style:parent-style-name="Standard">
      <style:text-properties fo:font-weight="bold" officeooo:rsid="000d8cd1" officeooo:paragraph-rsid="000d8cd1" style:font-weight-asian="bold" style:font-weight-complex="bold"/>
    </style:style>
    <style:style style:name="P10" style:family="paragraph" style:parent-style-name="Standard">
      <style:text-properties fo:font-weight="normal" officeooo:rsid="000d77a3" officeooo:paragraph-rsid="000d77a3" style:font-weight-asian="normal" style:font-weight-complex="normal"/>
    </style:style>
    <style:style style:name="P11" style:family="paragraph" style:parent-style-name="Standard">
      <style:text-properties fo:font-weight="normal" officeooo:rsid="0010027d" officeooo:paragraph-rsid="0010027d" style:font-weight-asian="normal" style:font-weight-complex="normal"/>
    </style:style>
    <style:style style:name="P12" style:family="paragraph" style:parent-style-name="Standard">
      <style:text-properties fo:font-weight="normal" officeooo:rsid="001198e8" officeooo:paragraph-rsid="001198e8" style:font-weight-asian="normal" style:font-weight-complex="normal"/>
    </style:style>
    <style:style style:name="P13" style:family="paragraph" style:parent-style-name="Standard">
      <style:text-properties fo:font-weight="normal" officeooo:rsid="00132d34" officeooo:paragraph-rsid="00132d34" style:font-weight-asian="normal" style:font-weight-complex="normal"/>
    </style:style>
    <style:style style:name="P14" style:family="paragraph" style:parent-style-name="Standard">
      <style:text-properties fo:font-weight="normal" officeooo:rsid="0014e837" officeooo:paragraph-rsid="0014e837" style:font-weight-asian="normal" style:font-weight-complex="normal"/>
    </style:style>
    <style:style style:name="P15" style:family="paragraph" style:parent-style-name="Standard">
      <style:text-properties fo:font-weight="normal" officeooo:rsid="0017efb2" officeooo:paragraph-rsid="0017efb2" style:font-weight-asian="normal" style:font-weight-complex="normal"/>
    </style:style>
    <style:style style:name="P16" style:family="paragraph" style:parent-style-name="Standard">
      <style:text-properties fo:font-weight="normal" officeooo:rsid="00195d2f" officeooo:paragraph-rsid="00195d2f" style:font-weight-asian="normal" style:font-weight-complex="normal"/>
    </style:style>
    <style:style style:name="P17" style:family="paragraph" style:parent-style-name="Standard" style:list-style-name="L1">
      <style:text-properties officeooo:paragraph-rsid="0011f607"/>
    </style:style>
    <style:style style:name="P18" style:family="paragraph" style:parent-style-name="Standard" style:list-style-name="L1">
      <style:text-properties officeooo:rsid="0011f607" officeooo:paragraph-rsid="0011f607"/>
    </style:style>
    <style:style style:name="P19" style:family="paragraph" style:parent-style-name="Standard">
      <style:text-properties officeooo:rsid="0011f607" officeooo:paragraph-rsid="0011f607"/>
    </style:style>
    <style:style style:name="P20" style:family="paragraph" style:parent-style-name="Standard" style:list-style-name="L2">
      <style:text-properties officeooo:rsid="0011f607" officeooo:paragraph-rsid="0011f607"/>
    </style:style>
    <style:style style:name="P21" style:family="paragraph" style:parent-style-name="Standard" style:list-style-name="L2">
      <style:text-properties officeooo:rsid="0012c428" officeooo:paragraph-rsid="0012c428"/>
    </style:style>
    <style:style style:name="P22" style:family="paragraph" style:parent-style-name="Standard">
      <style:text-properties officeooo:rsid="0012c428" officeooo:paragraph-rsid="0012c428"/>
    </style:style>
    <style:style style:name="P23" style:family="paragraph" style:parent-style-name="Standard" style:list-style-name="L3">
      <style:text-properties officeooo:rsid="0012c428" officeooo:paragraph-rsid="0012c428"/>
    </style:style>
    <style:style style:name="P24" style:family="paragraph" style:parent-style-name="Standard" style:list-style-name="L3">
      <style:text-properties officeooo:paragraph-rsid="0012c428"/>
    </style:style>
    <style:style style:name="P25" style:family="paragraph" style:parent-style-name="Standard" style:list-style-name="L4">
      <style:text-properties officeooo:paragraph-rsid="00195d2f"/>
    </style:style>
    <style:style style:name="P26" style:family="paragraph" style:parent-style-name="Standard" style:list-style-name="L4">
      <style:text-properties officeooo:rsid="00195d2f" officeooo:paragraph-rsid="00195d2f"/>
    </style:style>
    <style:style style:name="P27" style:family="paragraph" style:parent-style-name="Standard">
      <style:text-properties officeooo:rsid="00195d2f" officeooo:paragraph-rsid="00195d2f"/>
    </style:style>
    <style:style style:name="P28" style:family="paragraph" style:parent-style-name="Standard" style:list-style-name="L5">
      <style:text-properties officeooo:rsid="001a005b" officeooo:paragraph-rsid="001a005b"/>
    </style:style>
    <style:style style:name="P29" style:family="paragraph" style:parent-style-name="Standard" style:list-style-name="L5">
      <style:text-properties officeooo:rsid="001aed70" officeooo:paragraph-rsid="001aed70"/>
    </style:style>
    <style:style style:name="P30" style:family="paragraph" style:parent-style-name="Standard">
      <style:text-properties officeooo:rsid="001aed70" officeooo:paragraph-rsid="001aed70"/>
    </style:style>
    <style:style style:name="T1" style:family="text">
      <style:text-properties officeooo:rsid="0009c1f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b1aa6"/>
    </style:style>
    <style:style style:name="T4" style:family="text">
      <style:text-properties officeooo:rsid="000b1aa6"/>
    </style:style>
    <style:style style:name="T5" style:family="text">
      <style:text-properties fo:font-style="italic" fo:font-weight="normal" officeooo:rsid="00195d2f"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bb6dc" style:font-style-asian="normal" style:font-style-complex="normal"/>
    </style:style>
    <style:style style:name="T8" style:family="text">
      <style:text-properties fo:font-style="normal" officeooo:rsid="0016dd39" style:font-style-asian="normal" style:font-style-complex="normal"/>
    </style:style>
    <style:style style:name="T9" style:family="text">
      <style:text-properties fo:font-style="normal" officeooo:rsid="0017efb2" style:font-style-asian="normal" style:font-style-complex="normal"/>
    </style:style>
    <style:style style:name="T10" style:family="text">
      <style:text-properties fo:font-style="normal" officeooo:rsid="00186ca1"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95d2f"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1198e8" style:font-weight-asian="normal" style:font-weight-complex="normal"/>
    </style:style>
    <style:style style:name="T16" style:family="text">
      <style:text-properties fo:font-weight="normal" officeooo:rsid="0011f607" style:font-weight-asian="normal" style:font-weight-complex="normal"/>
    </style:style>
    <style:style style:name="T17" style:family="text">
      <style:text-properties officeooo:rsid="0012c428"/>
    </style:style>
    <style:style style:name="T18" style:family="text">
      <style:text-properties officeooo:rsid="0014e8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would you need to <text:span text:style-name="T2">see the total number </text:span>of incompletions?</text:p>
      <text:p text:style-name="P11">When I'm gearing up to move on to the next phase, finish off a bunch of requirements, when I just want to know how close I am to completion... </text:p>
      <text:p text:style-name="P1"/>
      <text:p text:style-name="P1">When would you need to <text:span text:style-name="T2">filter the scope </text:span>and then see the new total number of incompletions?</text:p>
      <text:p text:style-name="P11">When I want to finish off a subset of requirements. I might want to make sure all the requirements for phase 1 are complete, or maybe everything pertaining to 3 Major Features.</text:p>
      <text:p text:style-name="P1"/>
      <text:p text:style-name="P2">When would you need to see a <text:span text:style-name="T2">list of UCs and the number of incompletions in each</text:span>? <text:span text:style-name="T1">If that feature were missing, when would you realise that it was missing? What would you do in that case?</text:span></text:p>
      <text:p text:style-name="P12">When I knew I had a bunch of incompletions outstanding and I wanted to</text:p>
      <text:list xml:id="list9048378086230192025" text:style-name="L1">
        <text:list-item>
          <text:p text:style-name="P17"><text:span text:style-name="T15">access their impact.</text:span></text:p>
          <text:p text:style-name="P17"><text:span text:style-name="T16">E</text:span><text:span text:style-name="T15">xample: if I see that 80% are in UC-3 which I don't care about right now, and see that UC-4 and UC-5 (both of which I want complete now) have 3 each.</text:span></text:p>
        </text:list-item>
        <text:list-item>
          <text:p text:style-name="P18"><text:span text:style-name="T15">q</text:span><text:span text:style-name="T14">uickly understand why there are as many as there are.</text:span></text:p>
          <text:p text:style-name="P18"><text:span text:style-name="T14">Example: there are 10 total, I think whaaaaaaaat there should only be 2 or 3, I see a list of UCs with number of incompletions in each, the combination of UC title and incompetion count is enough to jog my memory and/or for me to understand the validity of the total number.</text:span></text:p>
        </text:list-item>
      </text:list>
      <text:p text:style-name="P19"/>
      <text:p text:style-name="P19">I would realise the lack of this feature...</text:p>
      <text:list xml:id="list4967630089792756417" text:style-name="L2">
        <text:list-item>
          <text:p text:style-name="P20">If I saw a total number and thought “really? why?” and couldn't see a breakdown.</text:p>
        </text:list-item>
        <text:list-item>
          <text:p text:style-name="P20">If in the above scenario a few UCs had so many that they dominated the breakdown and have it hard to discern the 1 or 2 odd ones here-and-there that I was actually interested in.</text:p>
        </text:list-item>
        <text:list-item>
          <text:p text:style-name="P21">If I were interested in the completion of a subset of UCs not easily specified by a filter.</text:p>
        </text:list-item>
      </text:list>
      <text:p text:style-name="P22"/>
      <text:p text:style-name="P22">In that case I would...</text:p>
      <text:list xml:id="list2048302128347849213" text:style-name="L3">
        <text:list-item>
          <text:p text:style-name="P24"><text:span text:style-name="T17">spend more time and energy parsing the breakdown.</text:span></text:p>
        </text:list-item>
        <text:list-item>
          <text:p text:style-name="P24"><text:span text:style-name="T17">spend more time and energy fucking around with filters.</text:span></text:p>
        </text:list-item>
        <text:list-item>
          <text:p text:style-name="P23">jump from UC to UC manually looking for completions.</text:p>
        </text:list-item>
      </text:list>
      <text:p text:style-name="P19"><text:span text:style-name="T14"/></text:p>
      <text:p text:style-name="P1"/>
      <text:p text:style-name="P3"><text:span text:style-name="T2">When editing a UC</text:span>, would you ever want to see the number of incompletions therein? If that feature were missing, when would you realise that it was missing? What would you do in that case?</text:p>
      <text:p text:style-name="P13">I would want to know what was outstanding as incompetions. Seeing a single number somewhere on the screen would be one option, but then after seeing the number if it were non-zero I'd next want to find the incompletions themselves and probably edit them. If I were just expecting and looking for a zero, then cool. Presuming all incompletions are coloured red I would probably just quickly scan the screen for anything red.</text:p>
      <text:p text:style-name="P13"/>
      <text:p text:style-name="P13">Honestly I probably wouldn't realise the feature was missing. If I did, the UC would probably be massive, I'd be on a small screen with some shitty trackpad and even then I'd just blame the laptop. Ok, well if incompletions were not coloured red and didn't jump out at me, that's when I'd notice but then there'd be the problem of “ok, I see a number, now where are they?”.</text:p>
      <text:p text:style-name="P3"/>
      <text:p text:style-name="P3">What are some examples of <text:span text:style-name="T3">additional information</text:span><text:span text:style-name="T4"> that you would store with a </text:span><text:span text:style-name="T3">TODO</text:span><text:span text:style-name="T4">?</text:span></text:p>
      <text:p text:style-name="P13">Often nothing but when present, a free text explaination such as “<text:span text:style-name="T18">Analyse further”, “Ambiguous”, “Unverified”, “Conflicts with [uc-6]”.</text:span></text:p>
      <text:p text:style-name="P3"><text:soft-page-break/></text:p>
      <text:p text:style-name="P4">What are some examples of <text:span text:style-name="T3">additional information</text:span><text:span text:style-name="T4"> that you would store with a </text:span><text:span text:style-name="T3">TBD</text:span><text:span text:style-name="T4">?</text:span></text:p>
      <text:p text:style-name="P14">“Waiting on Bob”, “Pending arch meeting”</text:p>
      <text:p text:style-name="P4"/>
      <text:p text:style-name="P5"><text:span text:style-name="T6">Why would you ever need to add </text:span><text:span text:style-name="T11">new incompletion types</text:span><text:span text:style-name="T6">? How would you work without that ability?</text:span></text:p>
      <text:p text:style-name="P14"><text:span text:style-name="T6">If there were a few common reasons for incompletion. “Ambiguous.” “Pending </text:span><text:span text:style-name="T8">decision on A.B.C.”. Without that ability it would be super annoying to have to read every note attached to a TODO to determine it's underlying cause or classification. Things like ambiguity can usually be clarified anytime as they are an issue with language; a BA with free time would want to see those and filter out incompetions pending external information. On the other hand, if a specific decision is holding up many requirements, once that decision has been made a BA would want to see all incompetions that are waiting on it and resolve them all at once. Without custom incompetion types the BA'd have to read through everything which could make the incompetion summary useless; they might decide it would be less effort to go from memory to certain UCs they remember are related and manually scan for those specific incompetions there.</text:span></text:p>
      <text:p text:style-name="P5"/>
      <text:p text:style-name="P6"><text:span text:style-name="T9">[1] </text:span><text:span text:style-name="T6">What determines whether a UC </text:span><text:span text:style-name="T11">field is mandatory</text:span><text:span text:style-name="T6">?</text:span></text:p>
      <text:p text:style-name="P6"><text:span text:style-name="T9">[2] </text:span><text:span text:style-name="T6">What can cause that decision to </text:span><text:span text:style-name="T11">change</text:span><text:span text:style-name="T6">?</text:span></text:p>
      <text:p text:style-name="P6"><text:span text:style-name="T9">[3] </text:span><text:span text:style-name="T7">How often would you anticipate such a change?</text:span></text:p>
      <text:p text:style-name="P6"><text:span text:style-name="T9">[4] </text:span><text:span text:style-name="T7">What are the consequences of a field being mandatory or not?</text:span></text:p>
      <text:p text:style-name="P15"><text:span text:style-name="T6">[1] </text:span><text:span text:style-name="T7">C</text:span><text:span text:style-name="T6">ompany/project/team rules. Importance of a field.</text:span></text:p>
      <text:p text:style-name="P15">[2] <text:span text:style-name="T6">The wind. It's fairly arbitrary. Just based on human minds which are fickle. Also a field can seem mandatory and then after writing a few UCs people change their minds.</text:span></text:p>
      <text:p text:style-name="P15"><text:span text:style-name="T6">[3] If it's an organisation-driven mandate, then it will occur rarely/occasionally. If the decision is being made by a smaller team or single person and/or the project/org is young, then it will likely change often.</text:span></text:p>
      <text:p text:style-name="P15"><text:span text:style-name="T6">[4] Mandatory fields should be monitored for emptiness. UCs shouldn't be marked as complete or forgotten when mandatory fields are blank. </text:span><text:span text:style-name="T10">During review they are sought out and resolved.</text:span></text:p>
      <text:p text:style-name="P7"><text:span text:style-name="T6"/></text:p>
      <text:p text:style-name="P8"><text:span text:style-name="T7">I</text:span><text:span text:style-name="T6">f one were </text:span><text:span text:style-name="T11">editing UC fields</text:span><text:span text:style-name="T6">, would they ever need to </text:span><text:span text:style-name="T11">decide mandatory</text:span><text:span text:style-name="T6">-ness at the same time? What would happen if they couldn't select mandatory-ness when editing fields?</text:span></text:p>
      <text:p text:style-name="P16"><text:span text:style-name="T6">Yes, I think they would. If I couldn't decide when adding a field, that would mean the system defaults it to either being mandatory or optional; if that default is ever not what I want them I'm going to find it annoying to have to go to another screen to check and modify that.</text:span></text:p>
      <text:p text:style-name="P10"/>
      <text:p text:style-name="P9"><text:span text:style-name="T6">If the system didn't provide the ability to record </text:span><text:span text:style-name="T11">loose notes</text:span><text:span text:style-name="T6"> as incompletions, what affect would that have on your requirements work? What are some examples of loose-note incompletions?</text:span></text:p>
      <text:p text:style-name="P16"><text:span text:style-name="T6">I'd have to…</text:span></text:p>
      <text:list xml:id="list4005933623398627027" text:style-name="L4">
        <text:list-item>
          <text:p text:style-name="P25"><text:span text:style-name="T13">maintain a separate list elsewhere. As a team of 1 I'd be fine with that, having a piece of paper and TODO list </text:span><text:span text:style-name="T5">if</text:span><text:span text:style-name="T13"> it would be the full picture which it wouldn't be because the system would already be tracking a bunch of other incompletions. That would mean I'd have to look at my own list, and look at the screen, and mush them in my head. Also if I weren't working from home and didn't have my list of me I'd be unhappy.</text:span></text:p>
        </text:list-item>
        <text:list-item>
          <text:p text:style-name="P26"><text:span text:style-name="T12">bastardise the system. I would start storing TODOs in inappropriate requirements just to have them tracked.</text:span></text:p>
        </text:list-item>
      </text:list>
      <text:p text:style-name="P27"/>
      <text:p text:style-name="P27"><text:span text:style-name="T12">Example loose-note incompetions:</text:span></text:p>
      <text:list xml:id="list680472373833894630" text:style-name="L5">
        <text:list-item>
          <text:p text:style-name="P28"><text:span text:style-name="T12">ABC is has gone out-of-scope. Revise all the XYZ stuff to remove references/considerations.</text:span></text:p>
        </text:list-item>
        <text:list-item>
          <text:p text:style-name="P29"><text:soft-page-break/><text:span text:style-name="T12">Consider custom fields for MF-[12]2.</text:span></text:p>
        </text:list-item>
        <text:list-item>
          <text:p text:style-name="P29"><text:span text:style-name="T12">Modify everything under MF-0[67] to apply to all kinds of reqs instead of just UCs.</text:span></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10:18:15.583289189</meta:creation-date>
    <dc:date>2014-05-12T14:28:33.584999093</dc:date>
    <meta:editing-duration>PT3H57S</meta:editing-duration>
    <meta:editing-cycles>5</meta:editing-cycles>
    <meta:generator>LibreOffice/4.2.4.2$Linux_X86_64 LibreOffice_project/420m0$Build-2</meta:generator>
    <meta:document-statistic meta:table-count="0" meta:image-count="0" meta:object-count="0" meta:page-count="3" meta:paragraph-count="45" meta:word-count="1149" meta:character-count="6409" meta:non-whitespace-character-count="5317"/>
  </office:meta>
</office:document-meta>
</file>
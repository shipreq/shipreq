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ObjectReplacements/Object 1" manifest:media-type=""/>
  <manifest:file-entry manifest:full-path="settings.xml" manifest:media-type="text/xml"/>
  <manifest:file-entry manifest:full-path="content.xml" manifest:media-type="text/xml"/>
  <manifest:file-entry manifest:full-path="Object 1/content.xml" manifest:media-type="text/xml"/>
  <manifest:file-entry manifest:full-path="Object 1/manifest.rdf" manifest:media-type="application/rdf+xml"/>
  <manifest:file-entry manifest:full-path="Object 1/settings.xml" manifest:media-type="text/xml"/>
  <manifest:file-entry manifest:full-path="Object 1/styles.xml" manifest:media-type="text/xml"/>
  <manifest:file-entry manifest:full-path="Object 1/" manifest:version="1.2" manifest:media-type="application/vnd.oasis.opendocument.spreadsheet"/>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Tinos" svg:font-family="Tinos" style:font-family-generic="roman" style:font-pitch="variable"/>
    <style:font-face style:name="Arimo" svg:font-family="Arimo" style:font-family-generic="swiss" style:font-pitch="variable"/>
    <style:font-face style:name="FreeSans" svg:font-family="FreeSans" style:font-family-generic="system" style:font-pitch="variable"/>
    <style:font-face style:name="TianZhen" svg:font-family="TianZhen" style:font-family-generic="system" style:font-pitch="variable"/>
  </office:font-face-decls>
  <office:automatic-styles>
    <style:style style:name="P1" style:family="paragraph" style:parent-style-name="Standard">
      <style:text-properties fo:font-weight="normal" officeooo:rsid="0006c9ce" officeooo:paragraph-rsid="0006c9ce" style:font-weight-asian="normal" style:font-weight-complex="normal"/>
    </style:style>
    <style:style style:name="P2" style:family="paragraph" style:parent-style-name="Standard">
      <style:text-properties fo:font-weight="normal" officeooo:rsid="0006c9ce" officeooo:paragraph-rsid="00099cf4" style:font-weight-asian="normal" style:font-weight-complex="normal"/>
    </style:style>
    <style:style style:name="P3" style:family="paragraph" style:parent-style-name="Standard">
      <style:text-properties fo:font-weight="normal" officeooo:rsid="0006c9ce" officeooo:paragraph-rsid="000d58a8" style:font-weight-asian="normal" style:font-weight-complex="normal"/>
    </style:style>
    <style:style style:name="P4" style:family="paragraph" style:parent-style-name="Standard">
      <style:text-properties fo:font-weight="normal" officeooo:rsid="0006c9ce" officeooo:paragraph-rsid="0011da03" style:font-weight-asian="normal" style:font-weight-complex="normal"/>
    </style:style>
    <style:style style:name="P5" style:family="paragraph" style:parent-style-name="Standard">
      <style:text-properties fo:font-weight="normal" officeooo:rsid="0006c9ce" officeooo:paragraph-rsid="001a15ed" style:font-weight-asian="normal" style:font-weight-complex="normal"/>
    </style:style>
    <style:style style:name="P6" style:family="paragraph" style:parent-style-name="Standard">
      <style:text-properties fo:font-weight="normal" officeooo:rsid="00099cf4" officeooo:paragraph-rsid="000d58a8" style:font-weight-asian="normal" style:font-weight-complex="normal"/>
    </style:style>
    <style:style style:name="P7" style:family="paragraph" style:parent-style-name="Standard">
      <style:text-properties fo:font-weight="normal" officeooo:rsid="000e6dd1" officeooo:paragraph-rsid="000e6dd1" style:font-weight-asian="normal" style:font-weight-complex="normal"/>
    </style:style>
    <style:style style:name="P8" style:family="paragraph" style:parent-style-name="Standard">
      <style:text-properties fo:font-weight="normal" officeooo:rsid="000ffcf8" officeooo:paragraph-rsid="000ffcf8" style:font-weight-asian="normal" style:font-weight-complex="normal"/>
    </style:style>
    <style:style style:name="P9" style:family="paragraph" style:parent-style-name="Standard">
      <style:text-properties fo:font-weight="normal" officeooo:rsid="0012fc96" officeooo:paragraph-rsid="0012fc96" style:font-weight-asian="normal" style:font-weight-complex="normal"/>
    </style:style>
    <style:style style:name="P10" style:family="paragraph" style:parent-style-name="Standard">
      <style:text-properties fo:font-weight="normal" officeooo:rsid="0014acec" officeooo:paragraph-rsid="0014acec" style:font-weight-asian="normal" style:font-weight-complex="normal"/>
    </style:style>
    <style:style style:name="P11" style:family="paragraph" style:parent-style-name="Standard">
      <style:text-properties fo:font-weight="normal" officeooo:rsid="0014acec" officeooo:paragraph-rsid="0014d831" style:font-weight-asian="normal" style:font-weight-complex="normal"/>
    </style:style>
    <style:style style:name="P12" style:family="paragraph" style:parent-style-name="Standard">
      <style:text-properties fo:font-weight="normal" officeooo:rsid="0014d831" officeooo:paragraph-rsid="0014d831" style:font-weight-asian="normal" style:font-weight-complex="normal"/>
    </style:style>
    <style:style style:name="P13" style:family="paragraph" style:parent-style-name="Standard">
      <style:text-properties fo:font-weight="normal" officeooo:rsid="0015bfd8" officeooo:paragraph-rsid="0015bfd8" style:font-weight-asian="normal" style:font-weight-complex="normal"/>
    </style:style>
    <style:style style:name="P14" style:family="paragraph" style:parent-style-name="Standard">
      <style:text-properties fo:font-weight="normal" officeooo:rsid="00186c9d" officeooo:paragraph-rsid="00186c9d" style:font-weight-asian="normal" style:font-weight-complex="normal"/>
    </style:style>
    <style:style style:name="P15" style:family="paragraph" style:parent-style-name="Standard">
      <style:text-properties fo:font-weight="normal" officeooo:rsid="001a15ed" officeooo:paragraph-rsid="001bf6d4" style:font-weight-asian="normal" style:font-weight-complex="normal"/>
    </style:style>
    <style:style style:name="P16" style:family="paragraph" style:parent-style-name="Standard">
      <style:text-properties fo:font-weight="normal" officeooo:rsid="001c097e" officeooo:paragraph-rsid="001c097e" style:font-weight-asian="normal" style:font-weight-complex="normal"/>
    </style:style>
    <style:style style:name="P17" style:family="paragraph" style:parent-style-name="Standard">
      <style:text-properties fo:font-weight="normal" officeooo:rsid="001ddc9d" officeooo:paragraph-rsid="001ddc9d" style:font-weight-asian="normal" style:font-weight-complex="normal"/>
    </style:style>
    <style:style style:name="P18" style:family="paragraph" style:parent-style-name="Standard">
      <style:text-properties fo:color="#ff420e" fo:font-weight="bold" officeooo:rsid="00167d2f" officeooo:paragraph-rsid="0006c9ce" style:font-weight-asian="bold" style:font-weight-complex="bold"/>
    </style:style>
    <style:style style:name="P19" style:family="paragraph" style:parent-style-name="Standard">
      <style:text-properties fo:color="#ff420e" officeooo:rsid="0010494c" officeooo:paragraph-rsid="0006c9ce"/>
    </style:style>
    <style:style style:name="P20" style:family="paragraph" style:parent-style-name="Standard">
      <style:text-properties fo:font-weight="bold" officeooo:rsid="0006c9ce" officeooo:paragraph-rsid="0006c9ce" style:font-weight-asian="bold" style:font-weight-complex="bold"/>
    </style:style>
    <style:style style:name="P21" style:family="paragraph" style:parent-style-name="Standard">
      <style:text-properties fo:font-weight="bold" officeooo:rsid="0006c9ce" officeooo:paragraph-rsid="0011da03" style:font-weight-asian="bold" style:font-weight-complex="bold"/>
    </style:style>
    <style:style style:name="P22" style:family="paragraph" style:parent-style-name="Standard">
      <style:text-properties fo:font-weight="bold" officeooo:rsid="000863a7" officeooo:paragraph-rsid="00099cf4" style:font-weight-asian="bold" style:font-weight-complex="bold"/>
    </style:style>
    <style:style style:name="P23" style:family="paragraph" style:parent-style-name="Standard">
      <style:text-properties fo:font-weight="bold" officeooo:rsid="00099cf4" officeooo:paragraph-rsid="00099cf4" style:font-weight-asian="bold" style:font-weight-complex="bold"/>
    </style:style>
    <style:style style:name="P24" style:family="paragraph" style:parent-style-name="Standard">
      <style:text-properties fo:font-weight="bold" officeooo:rsid="00099cf4" officeooo:paragraph-rsid="000b8430" style:font-weight-asian="bold" style:font-weight-complex="bold"/>
    </style:style>
    <style:style style:name="P25" style:family="paragraph" style:parent-style-name="Standard">
      <style:text-properties fo:font-weight="bold" officeooo:rsid="00099cf4" officeooo:paragraph-rsid="000d58a8" style:font-weight-asian="bold" style:font-weight-complex="bold"/>
    </style:style>
    <style:style style:name="P26" style:family="paragraph" style:parent-style-name="Standard">
      <style:text-properties fo:font-weight="bold" officeooo:rsid="000d58a8" officeooo:paragraph-rsid="000d58a8" style:font-weight-asian="bold" style:font-weight-complex="bold"/>
    </style:style>
    <style:style style:name="P27" style:family="paragraph" style:parent-style-name="Standard">
      <style:text-properties fo:font-weight="bold" officeooo:rsid="000fd33c" officeooo:paragraph-rsid="000fd33c" style:font-weight-asian="bold" style:font-weight-complex="bold"/>
    </style:style>
    <style:style style:name="P28" style:family="paragraph" style:parent-style-name="Standard">
      <style:text-properties fo:font-weight="bold" officeooo:rsid="0011da03" officeooo:paragraph-rsid="0011da03" style:font-weight-asian="bold" style:font-weight-complex="bold"/>
    </style:style>
    <style:style style:name="P29" style:family="paragraph" style:parent-style-name="Standard">
      <style:text-properties fo:color="#ff0000" fo:font-weight="bold" officeooo:rsid="001b6cd2" officeooo:paragraph-rsid="0006c9ce" fo:background-color="#ffff00" style:font-weight-asian="bold" style:font-weight-complex="bold"/>
    </style:style>
    <style:style style:name="P30" style:family="paragraph" style:parent-style-name="Standard">
      <style:text-properties fo:color="#ff0000" fo:font-weight="bold" officeooo:rsid="001b6cd2" officeooo:paragraph-rsid="00099cf4" fo:background-color="#ffff00" style:font-weight-asian="bold" style:font-weight-complex="bold"/>
    </style:style>
    <style:style style:name="P31" style:family="paragraph" style:parent-style-name="Standard">
      <style:text-properties fo:color="#ff0000" fo:font-weight="bold" officeooo:rsid="001b6cd2" officeooo:paragraph-rsid="000d58a8" fo:background-color="#ffff00" style:font-weight-asian="bold" style:font-weight-complex="bold"/>
    </style:style>
    <style:style style:name="P32" style:family="paragraph" style:parent-style-name="Standard" style:list-style-name="L1">
      <style:text-properties fo:font-weight="normal" officeooo:rsid="0014d831" officeooo:paragraph-rsid="0014d831" style:font-weight-asian="normal" style:font-weight-complex="normal"/>
    </style:style>
    <style:style style:name="P33" style:family="paragraph" style:parent-style-name="Standard">
      <style:text-properties fo:font-weight="normal" officeooo:rsid="001bf6d4" officeooo:paragraph-rsid="001bf6d4" style:font-weight-asian="normal" style:font-weight-complex="normal"/>
    </style:style>
    <style:style style:name="P34" style:family="paragraph" style:parent-style-name="Standard">
      <style:text-properties fo:font-weight="normal" officeooo:rsid="001f0a7f" officeooo:paragraph-rsid="001f0a7f" style:font-weight-asian="normal" style:font-weight-complex="normal"/>
    </style:style>
    <style:style style:name="P35" style:family="paragraph" style:parent-style-name="Standard">
      <style:text-properties fo:font-weight="normal" officeooo:rsid="000ffcf8" officeooo:paragraph-rsid="000ffcf8" style:font-weight-asian="normal" style:font-weight-complex="normal"/>
    </style:style>
    <style:style style:name="P36" style:family="paragraph" style:parent-style-name="Standard">
      <style:text-properties fo:font-weight="normal" officeooo:rsid="00205222" officeooo:paragraph-rsid="00205222" style:font-weight-asian="normal" style:font-weight-complex="normal"/>
    </style:style>
    <style:style style:name="P37" style:family="paragraph" style:parent-style-name="Standard">
      <style:text-properties fo:font-weight="normal" officeooo:rsid="002264a7" officeooo:paragraph-rsid="002264a7" style:font-weight-asian="normal" style:font-weight-complex="normal"/>
    </style:style>
    <style:style style:name="P38" style:family="paragraph" style:parent-style-name="Standard">
      <style:text-properties fo:font-weight="bold" officeooo:rsid="000fd33c" officeooo:paragraph-rsid="000fd33c" style:font-weight-asian="bold" style:font-weight-complex="bold"/>
    </style:style>
    <style:style style:name="P39" style:family="paragraph" style:parent-style-name="Standard">
      <style:text-properties fo:font-weight="bold" officeooo:rsid="00205222" officeooo:paragraph-rsid="00205222" style:font-weight-asian="bold" style:font-weight-complex="bold"/>
    </style:style>
    <style:style style:name="T1" style:family="text">
      <style:text-properties officeooo:rsid="000b8430"/>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officeooo:rsid="000b8430"/>
    </style:style>
    <style:style style:name="T4" style:family="text">
      <style:text-properties style:text-underline-style="none"/>
    </style:style>
    <style:style style:name="T5" style:family="text">
      <style:text-properties style:text-underline-style="none" officeooo:rsid="001f0a7f"/>
    </style:style>
    <style:style style:name="T6" style:family="text">
      <style:text-properties officeooo:rsid="0014acec"/>
    </style:style>
    <style:style style:name="T7" style:family="text">
      <style:text-properties officeooo:rsid="0014d831"/>
    </style:style>
    <style:style style:name="T8" style:family="text">
      <style:text-properties fo:font-style="italic" style:font-style-asian="italic" style:font-style-complex="italic"/>
    </style:style>
    <style:style style:name="T9" style:family="text">
      <style:text-properties fo:font-style="normal" style:font-style-asian="normal" style:font-style-complex="normal"/>
    </style:style>
    <style:style style:name="T10" style:family="text">
      <style:text-properties officeooo:rsid="002086b0"/>
    </style:style>
    <style:style style:name="fr1" style:family="graphic" style:parent-style-name="OLE">
      <style:graphic-properties style:horizontal-pos="center" style:horizontal-rel="paragraph"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Organisation]</text:p>
      <text:p text:style-name="P19"/>
      <text:p text:style-name="P20">Grouping names: what are your thoughts on two different groupings with the same name in a project? Would you expect that to happen? If so, can you explain why and give an example? Finally how would you cope if same names weren't allowed?</text:p>
      <text:p text:style-name="P29"/>
      <text:p text:style-name="P9">I think it would be incredibly rare. The only scenario I can think of would be if there were two trees of groupings with the same nodes but named differently at the top, so like “Dev Status” and “Test Status” could both a grouping called Pending. If it were applied like a tag/level then “Pending” on its own would be useless without context, it would need to be “ Dev Status: Pending”.</text:p>
      <text:p text:style-name="P9"/>
      <text:p text:style-name="P9">If it were not permitted, I don't think it would be a problem. That would just mean that every now and then one would have to add a little more description to a name. No biggie.</text:p>
      <text:p text:style-name="P1"/>
      <text:p text:style-name="P28">Grouping names will need a length limit. What's the longest name you would need?</text:p>
      <text:p text:style-name="P1"/>
      <text:p text:style-name="P4">“<text:span text:style-name="T6">Version: Unreleased and/or pending allocation”</text:span></text:p>
      <text:p text:style-name="Standard">“Feature: Generic artifact storage (DOC, PDF, PNG, XLS)”</text:p>
      <text:p text:style-name="P4"/>
      <text:p text:style-name="P21">Groupings can sometimes apply to a portion of a use case, but not the entire use case. Can you think of an example? If groupings could only be applied to a use case as a whole, what impact would that have? How would you work around it? How much would the ability be worth to you?</text:p>
      <text:p text:style-name="P29"/>
      <text:p text:style-name="P10">When a use cases has many steps, it's not uncommon for a most steps to be implemented in version A, with the few remaining steps being scheduled for a later version, usually because they are dependent on another feature that is out-of-scope for version A. In this case Version, Status, and Feature are examples of groupings that would apply to different parts of the use case differently.</text:p>
      <text:p text:style-name="P10"/>
      <text:p text:style-name="P11">If they could only be applied to the whole... <text:span text:style-name="T7">I guess there would be two strategies:</text:span></text:p>
      <text:list xml:id="list7497944748242356944" text:style-name="L1">
        <text:list-item>
          <text:p text:style-name="P32">Apply only the groupings that apply to the majority and omit the others. The problem with that would be that someone looking at the v2.0 grouping wouldn't be aware that the UC was part of it. Which is bad.</text:p>
        </text:list-item>
        <text:list-item>
          <text:p text:style-name="P32">Apply everything relevant to any part of the UC. The groupings would make sense but then anyone reading the UC will likely not understand why it has multiple versions, which steps belong to the second version. To avoid this frustration users would probably start using one of the UC text fields to describe the situation. An idea might be to attach comments to groupings when they are applied, <text:span text:style-name="T10">e.g.</text:span> I would apply v1.0 without comment, then v2.0 with a comment saying “Applies to [3.5.c] only”. Of course if such a <text:span text:style-name="T10">mechanism</text:span> were implemented, then the step ref in the comment should be kept in sync when the label changes.</text:p>
        </text:list-item>
      </text:list>
      <text:p text:style-name="P12"/>
      <text:p text:style-name="P13">It'd certainly be nice to have but there are more interesting features pending. With the above workaround (2) I'd probably be well content.</text:p>
      <text:p text:style-name="P13"/>
      <text:p text:style-name="P13">Actually, being a detailed kinda guy, if I were able to apply groupings to steps I'd probably spend too much time mucking around with it to make sure it was always accurate. </text:p>
      <text:p text:style-name="P1"/>
      <text:p text:style-name="P20"><text:span text:style-name="T10">Currently</text:span> use cases have a revision number. What specifically is that revision number used for? Why does anyone care? Should the revision number increase when a grouping is applied or unapplied? Would there be issues if the revision number didn't change? Do you <text:span text:style-name="T10">foresee</text:span> any issues <text:soft-page-break/>with the revision number incrementing by 1 when a grouping is applied or unapplied?</text:p>
      <text:p text:style-name="P29"/>
      <text:p text:style-name="P14">The revision number is used when comparing UC copies to determine which is more recent (up-to-date) than the other. Admittedly I also use it to <text:span text:style-name="T10">gauge</text:span> amount of revision and/or complexity, which isn't a good idea; correcting a typo and adding 100 steps both only increase the number by 1.</text:p>
      <text:p text:style-name="P14"/>
      <text:p text:style-name="P15">The revision should definitely increase if a grouping displayed in a field changes. If the content of the UC stays the same then ideally it wouldn't change, else you might confuse people implying a change only for them not to be able to find one.</text:p>
      <text:p text:style-name="P15"/>
      <text:p text:style-name="P33">If the rev no increased by 1 when a grouping is (un)applied then that would be fine so long as the grouping change were dis<text:span text:style-name="T10">c</text:span>ernable in publish-mode or when exported.</text:p>
      <text:p text:style-name="P5"/>
      <text:p text:style-name="P23">If a grouping were renamed, for use cases with that grouping applied, what would happen if the revision number wasn't updated?</text:p>
      <text:p text:style-name="P29"/>
      <text:p text:style-name="P16">The revision number is basically a contract that users can depend on to say “I'm looking at rev XX, you're holding a copy of XX you printed last week, we can rely on both our presentations of the UC being identical.” Anything that violates that should change the revision number, this includes field changes, grouping changes (renamed), grouping applications. If a grouping change is invisible (eg. grouping description) fine, but a name change needs to update the revision number too, else it's a loophole for people to break the revision-number contract.</text:p>
      <text:p text:style-name="P1"/>
      <text:p text:style-name="P22">Would you ever want to copy groupings between projects? If so, why? Please give an example scenario. What would the consequences be if you were unable to do so? </text:p>
      <text:p text:style-name="P30"/>
      <text:p text:style-name="P17">Sure, I could create a tree of priority groupings, could/should/must, with detailed descriptions including examples and rules. That would be tedious to redo manually, I'd see myself copying that for every new project.</text:p>
      <text:p text:style-name="P17"/>
      <text:p text:style-name="P17">Being unable to copy select groupings (I don't want to copy all) would mean I need to recreate stuff manually. For large and/or detailed grouping trees, YUK. Waste of time. Annoying. I want to focus on real work.</text:p>
      <text:p text:style-name="P2"/>
      <text:p text:style-name="P24">If a grouping that is applied to use cases <text:span text:style-name="T1">and </text:span><text:span text:style-name="T3">displayed as a field</text:span><text:span text:style-name="T4"> is deleted</text:span>, what would happen <text:span text:style-name="T1">if it were deleted automatically from said use cases? What would happen if the revision number of those use cases remained the same? What would happen if the deletion was a mistake?</text:span></text:p>
      <text:p text:style-name="P29"/>
      <text:p text:style-name="P34">If I'm deleting a grouping I would expect it to disappear from UCs. Revision number: see contract.</text:p>
      <text:p text:style-name="P34"/>
      <text:p text:style-name="P34">If the deletion were a mistake I would need to recreate it, then reapply it. If I deleted just a grouping tree node, then recreation and reapplication aren't that big a deal (so long as I remember how it should be applied.) If I delete an entire tree then it's much harder. Very, very annoying. But realistically how often would someone accidentally delete a grouping <text:span text:style-name="T9">or change their mind later? It'd be pretty rare. If the grouping were a user-specified though, they'd be fucked.</text:span></text:p>
      <text:p text:style-name="P34"><text:span text:style-name="T9"/></text:p>
      <text:p text:style-name="P34"><text:span text:style-name="T9">Hard deletion here would introduce a lack of consistency around deletion semantics. Users can delete populated UC fields and recover them, it wouldn't be unfair for them to assume the same practice were possible here.</text:span></text:p>
      <text:p text:style-name="P1"><text:soft-page-break/></text:p>
      <text:p text:style-name="P25">If a grouping that is applied to use cases <text:span text:style-name="T1">and </text:span><text:span text:style-name="T3">not displayed as a field</text:span><text:span text:style-name="T4"> is deleted</text:span>, what would happen <text:span text:style-name="T1">if it were deleted automatically from said use cases? What would happen if the revision number of those use cases remained the same? What would happen if the deletion was a mistake?</text:span></text:p>
      <text:p text:style-name="P31"/>
      <text:p text:style-name="P34">Same as above. Not being displayed as a field implies that it's simply transient metadata for organisational (or other) purposes but I wouldn't want to gamble on that.</text:p>
      <text:p text:style-name="P34"/>
      <text:p text:style-name="P34">What is the deal with groupings that aren't specifically linked to fields anyway? Will they be displayed in export/publish mode?</text:p>
      <text:p text:style-name="P3"/>
      <text:p text:style-name="P26">When using groupings to filter requirements, have you ever needed to see everything <text:span text:style-name="T2">without</text:span><text:span text:style-name="T4"> a certain grouping? (i.e. NOT) Can you for</text:span><text:span text:style-name="T5">e</text:span><text:span text:style-name="T4">see a problem if this ability were not provided?</text:span></text:p>
      <text:p text:style-name="P31"/>
      <text:p text:style-name="P34">Sure, anything that's not <text:span text:style-name="T8">status:complete</text:span>, anything that's not <text:span text:style-name="T8">priority:low</text:span>, anything that doesn't have a priority yet.</text:p>
      <text:p text:style-name="P34">It depends on the interface, as a workaround you'd select everything else except the grouping you want to negate. It would be at least slightly annoying. Tremendously so for larger grouping trees.</text:p>
      <text:p text:style-name="P3"/>
      <text:p text:style-name="P26">Can you please give some examples of multiple-grouping criteria you would use to search/filter requirements?</text:p>
      <text:p text:style-name="P6"/>
      <text:p text:style-name="P34">Easy: version 1.0 AND (priority critical OR high).</text:p>
      <text:p text:style-name="P7"/>
      <text:p text:style-name="P27">If groupings were specifiable as trees (with nodes being allowed multiple parents), what would the impact be if you couldn't specify relationships between different grouping trees? Examples? How would you work around these scenarios?</text:p>
      <text:p text:style-name="P39">Here are previously collected examples:</text:p>
      <text:p text:style-name="P39"><draw:frame draw:style-name="fr1" draw:name="Object1" text:anchor-type="paragraph" svg:width="3.5374in" svg:height="0.8402in" draw:z-index="0"><draw:object xlink:href="./Object 1" xlink:type="simple" xlink:show="embed" xlink:actuate="onLoad"/><draw:image xlink:href="./ObjectReplacements/Object 1" xlink:type="simple" xlink:show="embed" xlink:actuate="onLoad"/></draw:frame></text:p>
      <text:p text:style-name="P27"/>
      <text:p text:style-name="P8"/>
      <text:p text:style-name="P8"/>
      <text:p text:style-name="P36"/>
      <text:p text:style-name="P36"><text:span text:style-name="T8">Version|Feature → Status <text:tab/></text:span>I can live without.</text:p>
      <text:p text:style-name="P36"><text:span text:style-name="T8">Feature → Priority <text:tab/><text:tab/></text:span><text:span text:style-name="T9">is nice to see but really the app is fine without it.</text:span></text:p>
      <text:p text:style-name="P36"><text:span text:style-name="T8">Feature → Version</text:span><text:span text:style-name="T9"><text:tab/><text:tab/>would be quite useful. Workarounds: 1) manually change version of everything in a given feature. 2) Cheat and put Features in the Version grouping tree, either is children of the target version, or as a parent node with the target version symlink as a child. <text:s/>Something like that.</text:span></text:p>
      <text:p text:style-name="P36"><text:span text:style-name="T9"/></text:p>
      <text:p text:style-name="P37"><text:span text:style-name="T9">What would be cool would be if I applied MF-05 to a UC, and the Version field was automatically populated with v1.2, that would be </text:span><text:span text:style-name="T8">AWESOME</text:span><text:span text:style-name="T9">.</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Tinos" svg:font-family="Tinos" style:font-family-generic="roman" style:font-pitch="variable"/>
    <style:font-face style:name="Arimo" svg:font-family="Arimo" style:font-family-generic="swiss" style:font-pitch="variable"/>
    <style:font-face style:name="FreeSans" svg:font-family="FreeSans" style:font-family-generic="system" style:font-pitch="variable"/>
    <style:font-face style:name="TianZhen" svg:font-family="TianZhe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nos" fo:font-size="12pt" fo:language="en" fo:country="AU" style:letter-kerning="true" style:font-name-asian="TianZhen"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3965in" style:writing-mode="page"/>
      <style:text-properties style:use-window-font-color="true" style:font-name="Tinos" fo:font-size="12pt" fo:language="en" fo:country="AU" style:letter-kerning="true" style:font-name-asian="TianZhen" style:font-size-asian="10.5pt" style:language-asian="zh" style:country-asian="CN" style:font-name-complex="FreeSans"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mo" fo:font-family="Arimo" style:font-family-generic="swiss" style:font-pitch="variable" fo:font-size="14pt" style:font-name-asian="TianZhen" style:font-family-asian="TianZhen"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11T13:57:25.556171481</meta:creation-date>
    <dc:date>2014-02-12T12:53:42.025311623</dc:date>
    <meta:editing-duration>PT37M52S</meta:editing-duration>
    <meta:editing-cycles>9</meta:editing-cycles>
    <meta:generator>LibreOffice/4.1.5.3$Linux_x86 LibreOffice_project/410m0$Build-3</meta:generator>
    <meta:document-statistic meta:table-count="0" meta:image-count="0" meta:object-count="1" meta:page-count="3" meta:paragraph-count="41" meta:word-count="1446" meta:character-count="8362" meta:non-whitespace-character-count="695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mo" svg:font-family="Arimo"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ianZhen" svg:font-family="TianZhen"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3.385cm"/>
    </style:style>
    <style:style style:name="co3" style:family="table-column">
      <style:table-column-properties fo:break-before="auto" style:column-width="3.343cm"/>
    </style:style>
    <style:style style:name="ro1" style:family="table-row">
      <style:table-row-properties style:row-height="0.452cm" fo:break-before="auto" style:use-optimal-row-height="true"/>
    </style:style>
    <style:style style:name="ro2"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start" fo:margin-left="0cm"/>
      <style:text-properties style:text-position=""/>
    </style:style>
    <style:style style:name="ce2" style:family="table-cell" style:parent-style-name="Default">
      <style:table-cell-properties style:text-align-source="fix" style:repeat-content="false"/>
      <style:paragraph-properties fo:text-align="start" fo:margin-left="0cm"/>
      <style:text-properties style:text-position="" fo:font-style="italic" style:font-style-asian="italic" style:font-style-complex="italic"/>
    </style:style>
    <style:style style:name="ce3" style:family="table-cell" style:parent-style-name="Default">
      <style:text-properties style:text-position="" fo:font-style="italic" style:text-underline-style="none" style:font-style-asian="italic" style:font-style-complex="italic"/>
    </style:style>
    <style:style style:name="ce4" style:family="table-cell" style:parent-style-name="Default">
      <style:table-cell-properties style:text-align-source="fix" style:repeat-content="false"/>
      <style:paragraph-properties fo:text-align="start" fo:margin-left="0cm"/>
    </style:style>
    <style:style style:name="ce5" style:family="table-cell" style:parent-style-name="Default">
      <style:table-cell-properties style:text-align-source="fix" style:repeat-content="false"/>
      <style:paragraph-properties fo:text-align="start" fo:margin-left="0cm"/>
      <style:text-properties fo:font-style="italic" style:font-style-asian="italic" style:font-style-complex="italic"/>
    </style:style>
    <style:style style:name="ce6" style:family="table-cell" style:parent-style-name="Default">
      <style:text-properties fo:font-style="italic" style:text-underline-style="none" style:font-style-asian="italic" style:font-style-complex="italic"/>
    </style:style>
  </office:automatic-styles>
  <office:body>
    <office:spreadsheet>
      <table:table table:name="relationships" table:style-name="ta1">
        <table:table-column table:style-name="co1" table:default-cell-style-name="Default"/>
        <table:table-column table:style-name="co2" table:default-cell-style-name="Default"/>
        <table:table-column table:style-name="co3" table:default-cell-style-name="Default"/>
        <table:table-row table:style-name="ro1" table:number-rows-repeated="6">
          <table:table-cell table:number-columns-repeated="3"/>
        </table:table-row>
        <table:table-row table:style-name="ro2">
          <table:table-cell table:style-name="ce4" office:value-type="string" calcext:value-type="string">
            <text:p>Version</text:p>
          </table:table-cell>
          <table:table-cell table:style-name="ce5" office:value-type="string" calcext:value-type="string">
            <text:p>has a</text:p>
          </table:table-cell>
          <table:table-cell table:style-name="ce4" office:value-type="string" calcext:value-type="string">
            <text:p>Status</text:p>
          </table:table-cell>
        </table:table-row>
        <table:table-row table:style-name="ro2">
          <table:table-cell table:style-name="ce4" office:value-type="string" calcext:value-type="string">
            <text:p>Feature</text:p>
          </table:table-cell>
          <table:table-cell table:style-name="ce5" office:value-type="string" calcext:value-type="string">
            <text:p>has a</text:p>
          </table:table-cell>
          <table:table-cell table:style-name="ce4" office:value-type="string" calcext:value-type="string">
            <text:p>Priority</text:p>
          </table:table-cell>
        </table:table-row>
        <table:table-row table:style-name="ro2">
          <table:table-cell table:style-name="ce4" office:value-type="string" calcext:value-type="string">
            <text:p>Feature</text:p>
          </table:table-cell>
          <table:table-cell table:style-name="ce5" office:value-type="string" calcext:value-type="string">
            <text:p>has a</text:p>
          </table:table-cell>
          <table:table-cell table:style-name="ce4" office:value-type="string" calcext:value-type="string">
            <text:p>Status</text:p>
          </table:table-cell>
        </table:table-row>
        <table:table-row table:style-name="ro2">
          <table:table-cell table:style-name="ce4" office:value-type="string" calcext:value-type="string">
            <text:p>Component</text:p>
          </table:table-cell>
          <table:table-cell table:style-name="ce5" office:value-type="string" calcext:value-type="string">
            <text:p>is owned by</text:p>
          </table:table-cell>
          <table:table-cell table:style-name="ce4" office:value-type="string" calcext:value-type="string">
            <text:p>Team</text:p>
          </table:table-cell>
        </table:table-row>
        <table:table-row table:style-name="ro2">
          <table:table-cell office:value-type="string" calcext:value-type="string">
            <text:p>Feature</text:p>
          </table:table-cell>
          <table:table-cell table:style-name="ce6" office:value-type="string" calcext:value-type="string">
            <text:p>scheduled for</text:p>
          </table:table-cell>
          <table:table-cell office:value-type="string" calcext:value-type="string">
            <text:p>Version</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mo" svg:font-family="Arimo"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ianZhen" svg:font-family="TianZhen" style:font-family-generic="system" style:font-pitch="variable"/>
  </office:font-face-decls>
  <office:styles>
    <style:default-style style:family="table-cell">
      <style:paragraph-properties style:tab-stop-distance="1.25cm"/>
      <style:text-properties style:font-name="Arimo" fo:language="en" fo:country="AU"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AU">$</number:currency-symbol>
      <number:number number:decimal-places="2" number:min-integer-digits="1" number:grouping="true"/>
    </number:currency-style>
    <number:currency-style style:name="N104">
      <style:text-properties fo:color="#ff0000"/>
      <number:text>-</number:text>
      <number:currency-symbol number:language="en" number:country="AU">$</number:currency-symbol>
      <number:number number:decimal-places="2" number:min-integer-digits="1" number:grouping="true"/>
      <style:map style:condition="value()&gt;=0" style:apply-style-name="N104P0"/>
    </number:currency-style>
    <number:number-style style:name="N109">
      <number:number number:decimal-places="9" number:min-integer-digits="1"/>
    </number:number-style>
    <number:number-style style:name="N110">
      <number:number number:decimal-places="8" number:min-integer-digits="1"/>
    </number:number-style>
    <number:number-style style:name="N111">
      <number:number number:decimal-places="7" number:min-integer-digits="1"/>
    </number:number-style>
    <number:number-style style:name="N112">
      <number:number number:decimal-places="6" number:min-integer-digits="1"/>
    </number:number-style>
    <number:number-style style:name="N113">
      <number:number number:decimal-places="5" number:min-integer-digits="1"/>
    </number:number-style>
    <number:number-style style:name="N114">
      <number:number number:decimal-places="4" number:min-integer-digits="1"/>
    </number:number-style>
    <number:number-style style:name="N115">
      <number:number number:decimal-places="3" number:min-integer-digits="1"/>
    </number:number-style>
    <number:number-style style:name="N116">
      <number:number number:decimal-places="1" number:min-integer-digits="1"/>
    </number:number-style>
    <style:style style:name="Default" style:family="table-cell">
      <style:text-properties style:font-name-asian="TianZhen" style:font-family-asian="TianZhen"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2-12">00/00/0000</text:date>, <text:time style:data-style-name="N2" text:time-value="0000-00-00T12:40:33.924812119">00:00:00</text:time></text:p>
        </style:region-right>
      </style:header>
      <style:header-left style:display="false"/>
      <style:footer>
        <text:p>Page <text:page-number>1</text:page-number> / <text:page-count>99</text:page-count></text:p>
      </style:footer>
      <style:footer-left style:display="false"/>
    </style:master-page>
  </office:master-styles>
</office:document-styles>
</file>
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parent-style-name="Standard">
      <style:text-properties fo:font-weight="normal" officeooo:rsid="0006c9ce" officeooo:paragraph-rsid="0006c9ce" style:font-weight-asian="normal" style:font-weight-complex="normal"/>
    </style:style>
    <style:style style:name="P2" style:family="paragraph" style:parent-style-name="Standard">
      <style:text-properties fo:font-weight="normal" officeooo:rsid="0006c9ce" officeooo:paragraph-rsid="00099cf4" style:font-weight-asian="normal" style:font-weight-complex="normal"/>
    </style:style>
    <style:style style:name="P3" style:family="paragraph" style:parent-style-name="Standard">
      <style:text-properties fo:font-weight="normal" officeooo:rsid="0006c9ce" officeooo:paragraph-rsid="000d58a8" style:font-weight-asian="normal" style:font-weight-complex="normal"/>
    </style:style>
    <style:style style:name="P4" style:family="paragraph" style:parent-style-name="Standard">
      <style:text-properties fo:font-weight="normal" officeooo:rsid="0006c9ce" officeooo:paragraph-rsid="0011da03" style:font-weight-asian="normal" style:font-weight-complex="normal"/>
    </style:style>
    <style:style style:name="P5" style:family="paragraph" style:parent-style-name="Standard">
      <style:text-properties fo:font-weight="normal" officeooo:rsid="00099cf4" officeooo:paragraph-rsid="000d58a8" style:font-weight-asian="normal" style:font-weight-complex="normal"/>
    </style:style>
    <style:style style:name="P6" style:family="paragraph" style:parent-style-name="Standard">
      <style:text-properties fo:font-weight="normal" officeooo:rsid="000e6dd1" officeooo:paragraph-rsid="000e6dd1" style:font-weight-asian="normal" style:font-weight-complex="normal"/>
    </style:style>
    <style:style style:name="P7" style:family="paragraph" style:parent-style-name="Standard">
      <style:text-properties fo:font-weight="normal" officeooo:rsid="000ffcf8" officeooo:paragraph-rsid="000ffcf8" style:font-weight-asian="normal" style:font-weight-complex="normal"/>
    </style:style>
    <style:style style:name="P8" style:family="paragraph" style:parent-style-name="Standard">
      <style:text-properties fo:color="#ff420e" fo:font-weight="bold" officeooo:rsid="00167d2f" officeooo:paragraph-rsid="0006c9ce" style:font-weight-asian="bold" style:font-weight-complex="bold"/>
    </style:style>
    <style:style style:name="P9" style:family="paragraph" style:parent-style-name="Standard">
      <style:text-properties fo:color="#ff420e" officeooo:rsid="0010494c" officeooo:paragraph-rsid="0006c9ce"/>
    </style:style>
    <style:style style:name="P10" style:family="paragraph" style:parent-style-name="Standard">
      <style:text-properties fo:font-weight="bold" officeooo:rsid="0006c9ce" officeooo:paragraph-rsid="0006c9ce" style:font-weight-asian="bold" style:font-weight-complex="bold"/>
    </style:style>
    <style:style style:name="P11" style:family="paragraph" style:parent-style-name="Standard">
      <style:text-properties fo:font-weight="bold" officeooo:rsid="0006c9ce" officeooo:paragraph-rsid="0011da03" style:font-weight-asian="bold" style:font-weight-complex="bold"/>
    </style:style>
    <style:style style:name="P12" style:family="paragraph" style:parent-style-name="Standard">
      <style:text-properties fo:font-weight="bold" officeooo:rsid="000863a7" officeooo:paragraph-rsid="00099cf4" style:font-weight-asian="bold" style:font-weight-complex="bold"/>
    </style:style>
    <style:style style:name="P13" style:family="paragraph" style:parent-style-name="Standard">
      <style:text-properties fo:font-weight="bold" officeooo:rsid="00099cf4" officeooo:paragraph-rsid="00099cf4" style:font-weight-asian="bold" style:font-weight-complex="bold"/>
    </style:style>
    <style:style style:name="P14" style:family="paragraph" style:parent-style-name="Standard">
      <style:text-properties fo:font-weight="bold" officeooo:rsid="00099cf4" officeooo:paragraph-rsid="000b8430" style:font-weight-asian="bold" style:font-weight-complex="bold"/>
    </style:style>
    <style:style style:name="P15" style:family="paragraph" style:parent-style-name="Standard">
      <style:text-properties fo:font-weight="bold" officeooo:rsid="00099cf4" officeooo:paragraph-rsid="000d58a8" style:font-weight-asian="bold" style:font-weight-complex="bold"/>
    </style:style>
    <style:style style:name="P16" style:family="paragraph" style:parent-style-name="Standard">
      <style:text-properties fo:font-weight="bold" officeooo:rsid="000d58a8" officeooo:paragraph-rsid="000d58a8" style:font-weight-asian="bold" style:font-weight-complex="bold"/>
    </style:style>
    <style:style style:name="P17" style:family="paragraph" style:parent-style-name="Standard">
      <style:text-properties fo:font-weight="bold" officeooo:rsid="000fd33c" officeooo:paragraph-rsid="000fd33c" style:font-weight-asian="bold" style:font-weight-complex="bold"/>
    </style:style>
    <style:style style:name="P18" style:family="paragraph" style:parent-style-name="Standard">
      <style:text-properties fo:font-weight="bold" officeooo:rsid="0011da03" officeooo:paragraph-rsid="0011da03" style:font-weight-asian="bold" style:font-weight-complex="bold"/>
    </style:style>
    <style:style style:name="P19" style:family="paragraph" style:parent-style-name="Standard">
      <style:text-properties fo:color="#ff0000" fo:font-weight="bold" officeooo:rsid="001b6cd2" officeooo:paragraph-rsid="0006c9ce" fo:background-color="#ffff00" style:font-weight-asian="bold" style:font-weight-complex="bold"/>
    </style:style>
    <style:style style:name="P20" style:family="paragraph" style:parent-style-name="Standard">
      <style:text-properties fo:color="#ff0000" fo:font-weight="bold" officeooo:rsid="001b6cd2" officeooo:paragraph-rsid="00099cf4" fo:background-color="#ffff00" style:font-weight-asian="bold" style:font-weight-complex="bold"/>
    </style:style>
    <style:style style:name="P21" style:family="paragraph" style:parent-style-name="Standard">
      <style:text-properties fo:color="#ff0000" fo:font-weight="bold" officeooo:rsid="001b6cd2" officeooo:paragraph-rsid="000d58a8" fo:background-color="#ffff00" style:font-weight-asian="bold" style:font-weight-complex="bold"/>
    </style:style>
    <style:style style:name="T1" style:family="text">
      <style:text-properties fo:font-weight="bold" officeooo:rsid="0011da03" style:font-weight-asian="bold" style:font-weight-complex="bold"/>
    </style:style>
    <style:style style:name="T2" style:family="text">
      <style:text-properties officeooo:rsid="000b843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b8430"/>
    </style:style>
    <style:style style:name="T5" style:family="text">
      <style:text-properties style:text-underline-style="none"/>
    </style:style>
    <style:style style:name="T6" style:family="text">
      <style:text-properties officeooo:rsid="000d58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rganisation]</text:p>
      <text:p text:style-name="P9"/>
      <text:p text:style-name="P10">Grouping names: what are your thoughts on two different groupings with the same name in a project? Would you expect that to happen? If so, can you explain why and give an example? Finally how would <text:s/>you cope if same names weren't allowed?</text:p>
      <text:p text:style-name="P19"/>
      <text:p text:style-name="P1">AA</text:p>
      <text:p text:style-name="P1"/>
      <text:p text:style-name="P18">Grouping names will need a length limit. What's the longest name you would need?</text:p>
      <text:p text:style-name="P1"/>
      <text:p text:style-name="P4">AA</text:p>
      <text:p text:style-name="P4"/>
      <text:p text:style-name="P11">Groupings can sometimes apply to a portion of a use case, but not the entire use case. Can you think of an example? If groupings could only be applied to a use case as a whole, what impact would that have? How would you work around it? How much would the ability be worth to you?</text:p>
      <text:p text:style-name="P19"/>
      <text:p text:style-name="P1">AA</text:p>
      <text:p text:style-name="P1"/>
      <text:p text:style-name="P10">Curently use cases have a revision number. What specifically is that revision number used for? Why does anyone care? Should the revision number increase when a grouping is applied or unapplied? Would there be issues if the revision number didn't change? Do you forsee any issues with the revision number incrementing by 1 when a grouping is applied or unapplied?</text:p>
      <text:p text:style-name="P19"/>
      <text:p text:style-name="P1">AA</text:p>
      <text:p text:style-name="P1"/>
      <text:p text:style-name="P13">If a grouping were renamed, for use cases with that grouping applied, what would happen if the revision number wasn't updated?</text:p>
      <text:p text:style-name="P19"/>
      <text:p text:style-name="P1">AA</text:p>
      <text:p text:style-name="P1"/>
      <text:p text:style-name="P12">Would you ever want to copy groupings between projects? If so, why? Please give an example scenario. What would the consequences be if you were unable to do so? </text:p>
      <text:p text:style-name="P20"/>
      <text:p text:style-name="P2">AA</text:p>
      <text:p text:style-name="P2"/>
      <text:p text:style-name="P14">If a grouping that is applied to use cases <text:span text:style-name="T2">and </text:span><text:span text:style-name="T4">displayed as a field</text:span><text:span text:style-name="T5"> is deleted</text:span>, what would happen <text:span text:style-name="T2">if it were deleted automatically from said use cases? What would happen if the revision number of those use cases remained the same? What would happen if the deletion was a mistake?</text:span></text:p>
      <text:p text:style-name="P19"/>
      <text:p text:style-name="P1">AA</text:p>
      <text:p text:style-name="P1"/>
      <text:p text:style-name="P15">If a grouping that is applied to use cases <text:span text:style-name="T2">and </text:span><text:span text:style-name="T4">not displayed as a field</text:span><text:span text:style-name="T5"> is deleted</text:span>, what would happen <text:span text:style-name="T2">if it were deleted automatically from said use cases? What would happen if the revision number of those use cases remained the same? What would happen if the deletion was a mistake?</text:span></text:p>
      <text:p text:style-name="P21"/>
      <text:p text:style-name="P3">AA</text:p>
      <text:p text:style-name="P3"/>
      <text:p text:style-name="P16">When using groupings to filter requirements, have you ever needed to see everything <text:span text:style-name="T3">without</text:span><text:span text:style-name="T5"> a certain grouping? (i.e. NOT) Can you forsee a problem if this ability were not provided?</text:span></text:p>
      <text:p text:style-name="P21"><text:soft-page-break/></text:p>
      <text:p text:style-name="P3">AA</text:p>
      <text:p text:style-name="P3"/>
      <text:p text:style-name="P15"><text:span text:style-name="T6">Can you please give some examples of multiple-grouping criteria you would use to search/filter requirements?</text:span></text:p>
      <text:p text:style-name="P5"/>
      <text:p text:style-name="P6">AA</text:p>
      <text:p text:style-name="P6"/>
      <text:p text:style-name="P17">If groupings were specifiable as trees (with nodes being allowed multiple parents), what would the impact be if you couldn't specify relationships between different grouping trees? Examples? How would you work around these scenarios?</text:p>
      <text:p text:style-name="P17"/>
      <text:p text:style-name="P7">A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3:57:25.556171481</meta:creation-date>
    <dc:date>2014-02-11T14:23:00.408141499</dc:date>
    <meta:editing-duration>PT7M33S</meta:editing-duration>
    <meta:editing-cycles>3</meta:editing-cycles>
    <meta:generator>LibreOffice/4.1.4.2$Linux_X86_64 LibreOffice_project/410m0$Build-2</meta:generator>
    <meta:document-statistic meta:table-count="0" meta:image-count="0" meta:object-count="0" meta:page-count="2" meta:paragraph-count="23" meta:word-count="417" meta:character-count="2367" meta:non-whitespace-character-count="1971"/>
  </office:meta>
</office:document-meta>
</file>
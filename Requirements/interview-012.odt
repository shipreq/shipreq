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45" officeooo:paragraph-rsid="000c6245"/>
    </style:style>
    <style:style style:name="P2" style:family="paragraph" style:parent-style-name="Standard">
      <style:text-properties officeooo:rsid="000c6245" officeooo:paragraph-rsid="000e0e00"/>
    </style:style>
    <style:style style:name="P3" style:family="paragraph" style:parent-style-name="Standard">
      <style:text-properties officeooo:rsid="000e0e00" officeooo:paragraph-rsid="000e0e00"/>
    </style:style>
    <style:style style:name="P4" style:family="paragraph" style:parent-style-name="Standard">
      <style:text-properties fo:color="#ff6633" fo:font-weight="bold" officeooo:rsid="000c6245" officeooo:paragraph-rsid="000c6245" style:font-weight-asian="bold" style:font-weight-complex="bold"/>
    </style:style>
    <style:style style:name="P5" style:family="paragraph" style:parent-style-name="Standard">
      <style:text-properties fo:color="#ff6633" fo:font-weight="bold" officeooo:rsid="000c6245" officeooo:paragraph-rsid="001142f8" style:font-weight-asian="bold" style:font-weight-complex="bold"/>
    </style:style>
    <style:style style:name="P6" style:family="paragraph" style:parent-style-name="Standard">
      <style:text-properties officeooo:rsid="000fd5e2" officeooo:paragraph-rsid="000fd5e2"/>
    </style:style>
    <style:style style:name="P7" style:family="paragraph" style:parent-style-name="Standard">
      <style:text-properties officeooo:rsid="001142f8" officeooo:paragraph-rsid="001142f8"/>
    </style:style>
    <style:style style:name="P8" style:family="paragraph" style:parent-style-name="Standard">
      <style:text-properties officeooo:rsid="001142f8" officeooo:paragraph-rsid="0011b302"/>
    </style:style>
    <style:style style:name="P9" style:family="paragraph" style:parent-style-name="Standard">
      <style:text-properties officeooo:rsid="0011806f" officeooo:paragraph-rsid="0011806f"/>
    </style:style>
    <style:style style:name="P10" style:family="paragraph" style:parent-style-name="Standard">
      <style:text-properties officeooo:rsid="0011b302" officeooo:paragraph-rsid="0011b302"/>
    </style:style>
    <style:style style:name="P11" style:family="paragraph" style:parent-style-name="Standard">
      <style:text-properties officeooo:rsid="00148c91" officeooo:paragraph-rsid="00148c91"/>
    </style:style>
    <style:style style:name="P12" style:family="paragraph" style:parent-style-name="Standard" style:list-style-name="L1">
      <style:text-properties officeooo:paragraph-rsid="0011b302"/>
    </style:style>
    <style:style style:name="P13" style:family="paragraph" style:parent-style-name="Standard" style:list-style-name="L1">
      <style:text-properties officeooo:rsid="00134416" officeooo:paragraph-rsid="00134416"/>
    </style:style>
    <style:style style:name="P14" style:family="paragraph" style:parent-style-name="Standard" style:list-style-name="L2">
      <style:text-properties fo:font-style="normal" officeooo:rsid="00148c91" officeooo:paragraph-rsid="00148c91" style:font-style-asian="normal" style:font-style-complex="normal"/>
    </style:style>
    <style:style style:name="P15" style:family="paragraph" style:parent-style-name="Standard">
      <style:text-properties fo:font-style="normal" officeooo:rsid="00148c91" officeooo:paragraph-rsid="00148c91" style:font-style-asian="normal" style:font-style-complex="normal"/>
    </style:style>
    <style:style style:name="P16" style:family="paragraph" style:parent-style-name="Standard">
      <style:text-properties fo:font-style="normal" officeooo:rsid="0014b398" officeooo:paragraph-rsid="0014b398" style:font-style-asian="normal" style:font-style-complex="normal"/>
    </style:style>
    <style:style style:name="T1" style:family="text">
      <style:text-properties officeooo:rsid="000e0e00"/>
    </style:style>
    <style:style style:name="T2" style:family="text">
      <style:text-properties fo:font-style="italic" style:font-style-asian="italic" style:font-style-complex="italic"/>
    </style:style>
    <style:style style:name="T3" style:family="text">
      <style:text-properties fo:font-style="italic" officeooo:rsid="0011b302" style:font-style-asian="italic" style:font-style-complex="italic"/>
    </style:style>
    <style:style style:name="T4" style:family="text">
      <style:text-properties officeooo:rsid="000fd5e2"/>
    </style:style>
    <style:style style:name="T5" style:family="text">
      <style:text-properties officeooo:rsid="001142f8"/>
    </style:style>
    <style:style style:name="T6" style:family="text">
      <style:text-properties officeooo:rsid="0011806f"/>
    </style:style>
    <style:style style:name="T7" style:family="text">
      <style:text-properties officeooo:rsid="0011b302"/>
    </style:style>
    <style:style style:name="T8" style:family="text">
      <style:text-properties officeooo:rsid="00134416"/>
    </style:style>
    <style:style style:name="T9" style:family="text">
      <style:text-properties fo:font-style="normal" style:font-style-asian="normal" style:font-style-complex="normal"/>
    </style:style>
    <style:style style:name="T10" style:family="text">
      <style:text-properties officeooo:rsid="0014b3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F-9: Collaboration: Authoring</text:p>
      <text:p text:style-name="P1"/>
      <text:p text:style-name="P1">Requirements are normally authored by BAs on a project. A project often has multiple BAs, usually on the same team. I'm sure places exist where they would want non-BAs contributing directly to requirements (without the bottleneck of going through the BA), in fact some places may want to store and track all <text:span text:style-name="T10">requirements</text:span> but not even have a BA; PM &amp; devs would edit reqs themselves.</text:p>
      <text:p text:style-name="P1"/>
      <text:p text:style-name="P1">So the system needs to allow multiple users writing to the same project, sometimes even the same requirement concurrently. <text:span text:style-name="T4">I also want to have multiple browser tabs open on the same computer (so same session, user, IP, MAC) and have concurrent editing without a problem.</text:span></text:p>
      <text:p text:style-name="P1"/>
      <text:p text:style-name="P2">As with any multi-user situation permissions and security management is necessary. Here are some examples of groups/roles: PM, Head BA, BAs, project owner, stakeholder, tester, dev, “reader” (grant read-access to some randoms), business users, client, ops, designers. Plus there will be cases where different teams need to collaborate on intersection reqs, <text:span text:style-name="T1">in which roles on their own may not suffice; it may become necessary to restrict access to a subset of a project. Example: I'm building a big system and component B requires collaboration with team X; I may want to grant team X read access to the entire project, edit access to reqs with grouping ComponentB, and create-req access with the constraint that reqs they create are tagged with grouping ComponentB.</text:span></text:p>
      <text:p text:style-name="P2"/>
      <text:p text:style-name="P3">Intersection with MF-6 here, if there are multiple authors on a project then it may become necessary to be able to assign incompletions to 0:<text:span text:style-name="T2">n</text:span> users and have users be able to filter out other people/team's tasks in incompletion views.</text:p>
      <text:p text:style-name="P3"/>
      <text:p text:style-name="P3">Intersection with MF-8, all changes will need to be attributable to a user.</text:p>
      <text:p text:style-name="P3"/>
      <text:p text:style-name="P3">A project owner will need to be able to hand ownership over to another user.</text:p>
      <text:p text:style-name="P3"/>
      <text:p text:style-name="P3">The scope of a project isn't governed by the laws of nature; sometimes a project splits off into smaller ones, sometimes separate projects merge into a single one. I'd say that these cases legitimately fall under the umbrella of collaboration. Actually there'd probably be a real-world need to have collaboration between projects without merging them (esp with intersections). What would be required? Maybe just references? Shared groupings? Who knows. Needs analysis. Plus it could probably safely be moved to its own MF.</text:p>
      <text:p text:style-name="P3"/>
      <text:p text:style-name="P6">With collaboration comes conflict, mistakes, idiocy; quite likely someone good or authoritative may be unsatisfied with the contribution of other authors and may want to: undo their shit, reject a contribution with a request of amendments, ask them questions about a contribution, create a discussion around a contentious contribution, ask another user to review/confirm an amendment. Most of these could (and probably should) be pushed outside the scope of ShipReq in which case the focus shifts to anything required to facilitate the manual process. Very importantly, this leads to...</text:p>
      <text:p text:style-name="P6"/>
      <text:p text:style-name="P6">Notifications and watching! This should probably be its own MF. I want to know of all changes that happen on a project, or that affect a subset of the requirements. I want an email for each one (<text:span text:style-name="T2">really?</text:span>). I want an email every 2 hours, every week, etc. summarising all the changes that occurred in that time period. I want to be able to notify other users in the system, eg. “@golly pls confirm”.</text:p>
      <text:p text:style-name="P6"/>
      <text:p text:style-name="P5">MF-<text:span text:style-name="T5">10</text:span>: Collaboration: <text:span text:style-name="T5">Stakeholders</text:span></text:p>
      <text:p text:style-name="P7"/>
      <text:p text:style-name="P7">Most of this will be similar. By stakeholders I mean people who have an interest in the project but are not on the project team, so clients, sponsors, business users, group heads, etc.</text:p>
      <text:p text:style-name="P7"/>
      <text:p text:style-name="P7">What do they need? There are two classifications here, 1) interest in the detail, 2) interest in the high-level.</text:p>
      <text:p text:style-name="P7"/>
      <text:p text:style-name="P8">With an interest in the detail are future end-users, marketers &amp; sales, often the client/sponsor for smaller projects of work, or in smaller organisations (esp. small businesses). They need to periodically review and approve requirements, comment on requirements to ask questions, request amendments. Similar to MF-11 you don't want them reviewing the same shit needlessly, if they approve something once and it doesn't change, they should never have to re-review it again. They should be able to filter out everything they've reviewed previously and read through only the remainder of reqs. <text:span text:style-name="T7">This is I think a powerful feature. Consensus is conventionally hard and off-putting but paramount to success. I want to attack the pain points of</text:span></text:p>
      <text:list xml:id="list3296032395270133473" text:style-name="L1">
        <text:list-item>
          <text:p text:style-name="P12"><text:span text:style-name="T3">Too much information.</text:span><text:span text:style-name="T7"> – don't demand the user remember what they haven't checked yet, or ask them to check the same thing twice. If a req was previously approved, modified and now needs re-approval, the system should make it super-obvious what changed (sometimes a req's text is large, a change small, and requiring the user to reread <text:s/>the entire requirement would be another instance of TMI).</text:span></text:p>
        </text:list-item>
        <text:list-item>
          <text:p text:style-name="P12"><text:span text:style-name="T3">Traceability.</text:span><text:span text:style-name="T7"> – Protects involved parties like contracts do. People can't bullshit and say they didn't agree, or didn't see, or wasn't told.</text:span></text:p>
        </text:list-item>
        <text:list-item>
          <text:p text:style-name="P13"><text:span text:style-name="T2">Time and effort</text:span>. <text:span text:style-name="T7">–</text:span> This is a massive deterrent. The review/approval process needs to be as quick and easy as possible which implies it must be as simple as possible too. Should come up with a bunch of QRs and UCs for this.</text:p>
        </text:list-item>
      </text:list>
      <text:p text:style-name="P10">There are surely other pain points; they should be discovered. <text:span text:style-name="T8">Oh and before I forget, approval should be freely revocable; prefer to push consequences outside the system as much as possible.</text:span></text:p>
      <text:p text:style-name="P7"/>
      <text:p text:style-name="P7">With an interest in the high-level are people concerned with the progress of the project, <text:span text:style-name="T6">to</text:span> a<text:span text:style-name="T6">ss</text:span>ess whether the project is on forecasted track (bcos their responsibility (PM) or financial (client/sponsor)), to a<text:span text:style-name="T6">ss</text:span>ess where contributions are coming from, <text:span text:style-name="T6">to assess what's holding the project up, to understand why progress has stalled. In these cases they'd mostly be interested in stats, charts, summaries. They're usually time-poor and non-technical won't give a shit about how ShipReqs or how to navigate it. They'd probably want a link, maybe a list of (arbitrary) things that make sense from their perspective (“Blockers”, “Features &amp; Progress”), then a single piece of info, maybe with the ability to go from their into more detail.</text:span></text:p>
      <text:p text:style-name="P7"/>
      <text:p text:style-name="P9">Actually there's the business stuff too. Requirement types like Major Feature, Business Objective, Success Critera, Business Risk, etc. are of interest to an entire class of users that have no interest in FRs, COs, etc.</text:p>
      <text:p text:style-name="P7"/>
      <text:p text:style-name="P7">Also a manager would want to know what tasks/work in pending on people in his/her team. eg. Minion A has 120 reqs to review.</text:p>
      <text:p text:style-name="P7"/>
      <text:p text:style-name="P11">I nearly forgot! One of the most important ingredients for requirement &amp; project success is communication and socialisation. Stakeholders, <text:span text:style-name="T2">everyone</text:span><text:span text:style-name="T9"> involved in the project, even if transitively, should be able to</text:span></text:p>
      <text:list xml:id="list4817118022669272129" text:style-name="L2">
        <text:list-item>
          <text:p text:style-name="P14">see what the latest requirements are.</text:p>
        </text:list-item>
        <text:list-item>
          <text:p text:style-name="P14">see what's changed since they last looked, cared, committed to memory.</text:p>
        </text:list-item>
        <text:list-item>
          <text:p text:style-name="P14">be notified what something they care about (or someone else wants them to care about) changes.</text:p>
        </text:list-item>
      </text:list>
      <text:p text:style-name="P15">Stakeholders often lack transparency.</text:p>
      <text:p text:style-name="P11"/>
      <text:p text:style-name="P11">Another idea, as noted above stakeholders need to provide feedback on reqs in the system, wi<text:span text:style-name="T10">l</text:span>l they need to record comments/feedback on reqs <text:span text:style-name="T2">not</text:span><text:span text:style-name="T9"> in the system (yet). How do they communicate that (existing req's are fine) but there are req's missing / other concerns haven't been addressed?</text:span></text:p>
      <text:p text:style-name="P15"/>
      <text:p text:style-name="P16">Similarly to how stakeholders want to approve/reject everything in an intensional subset of reqs, and only be shown updates henceforth, BAs would have use for an only-slightly abstracted feature: creating personal checklists. Say the BA or designer is creating a UI prototype externally, they'd want to tick all items in scope as they update the prototype, have those ticks disappear (or be archived) when a req is updated. The checklist should be able to be made private or else it will clutter everyone else's view. Similarly, this is also how a head BA could enforce a {Complete, Correct, Feasible, Necessary, Prioritised, Unambiguous, Verifiable} checklist for req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11:44:04.850263928</meta:creation-date>
    <dc:date>2014-06-30T10:18:59.939660060</dc:date>
    <meta:editing-duration>PT1H10M54S</meta:editing-duration>
    <meta:editing-cycles>7</meta:editing-cycles>
    <meta:generator>LibreOffice/4.2.5.2$Linux_X86_64 LibreOffice_project/420m0$Build-2</meta:generator>
    <meta:document-statistic meta:table-count="0" meta:image-count="0" meta:object-count="0" meta:page-count="1" meta:paragraph-count="28" meta:word-count="1283" meta:character-count="7849" meta:non-whitespace-character-count="6596"/>
  </office:meta>
</office:document-meta>
</file>
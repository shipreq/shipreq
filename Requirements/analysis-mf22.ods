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1" svg:font-family="FreeSans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20e" style:text-outline="false" style:text-line-through-styl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[High-Level Requirements]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Default" office:value-type="string" calcext:value-type="string">
            <text:p>Requirement types will not likely be shared between HL &amp; LL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ybe MF should just be FE then it would nest happily.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1" svg:font-family="FreeSans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2-18T15:21:08.726629785</dc:date>
    <meta:editing-duration>PT4M12S</meta:editing-duration>
    <meta:editing-cycles>1</meta:editing-cycles>
    <meta:document-statistic meta:table-count="1" meta:cell-count="37" meta:object-count="0"/>
    <meta:generator>LibreOffice/4.1.5.3$Linux_x86 LibreOffice_project/410m0$Build-3</meta:generator>
  </office:meta>
</office:document-meta>
</file>
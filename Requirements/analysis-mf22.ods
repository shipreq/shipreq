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1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[High-Level Requirement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Ep. Er. HL(r) ^ LL(r)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3"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Ep. Ar. HL(r) → ~LL(r)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office:value-type="string" calcext:value-type="string">
            <text:p>Also overlap with sem-ids in MF-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office:value-type="string" calcext:value-type="string">
            <text:p>Turn this into use case or at least provide a detailed example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  <table:table-cell office:value-type="string" calcext:value-type="string">
            <text:p>MF-13 then becomes the problem.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Default" office:value-type="string" calcext:value-type="string">
            <text:p>All “HL” reqs can be used for justification therefore it is important that System support them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table:style-name="ce4"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2" table:number-columns-repeated="1014" table:default-cell-style-name="Default"/>
        <table:table-row table:style-name="ro3">
          <table:table-cell table:style-name="ce5" table:number-columns-repeated="2"/>
          <table:table-cell table:style-name="ce14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14" office:value-type="string" calcext:value-type="string">
            <text:p>Business</text:p>
            <text:p>Risks</text:p>
          </table:table-cell>
          <table:table-cell table:style-name="ce14" office:value-type="string" calcext:value-type="string">
            <text:p>Major</text:p>
            <text:p>Feature</text:p>
          </table:table-cell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Exclusions &amp;</text:p>
            <text:p>Limitations</text:p>
          </table:table-cell>
          <table:table-cell table:style-name="ce14" office:value-type="string" calcext:value-type="string">
            <text:p>Assumptions &amp;</text:p>
            <text:p>Dependencies</text:p>
          </table:table-cell>
          <table:table-cell table:style-name="ce14" office:value-type="string" calcext:value-type="string">
            <text:p>Operating</text:p>
            <text:p>Environment</text:p>
          </table:table-cell>
          <table:table-cell table:style-name="ce14" office:value-type="string" calcext:value-type="string">
            <text:p>Quality</text:p>
            <text:p>Attributes</text:p>
          </table:table-cell>
          <table:table-cell table:style-name="ce36" table:number-columns-repeated="1014"/>
        </table:table-row>
        <table:table-row table:style-name="ro2">
          <table:table-cell table:style-name="ce6" office:value-type="string" calcext:value-type="string" table:number-columns-spanned="1" table:number-rows-spanned="6">
            <text:p><text:span text:style-name="T1">Impact within scope</text:span></text:p>
            <text:p><text:span text:style-name="T2">0=None</text:span></text:p>
            <text:p><text:span text:style-name="T2">1=Pedantically</text:span></text:p>
            <text:p><text:span text:style-name="T2">3=Indirectly</text:span></text:p>
            <text:p><text:span text:style-name="T2">5=Direct</text:span></text:p>
          </table:table-cell>
          <table:table-cell table:style-name="ce11" office:value-type="string" calcext:value-type="string">
            <text:p>Business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11" office:value-type="string" calcext:value-type="string">
            <text:p>Entire System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1" office:value-type="string" calcext:value-type="string">
            <text:p>Componen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1" office:value-type="string" calcext:value-type="string">
            <text:p>HL</text:p>
          </table:table-cell>
          <table:table-cell table:style-name="ce16" table:formula="of:=([.C2]*4+[.C3]*2+[.C4])/7" office:value-type="float" office:value="3.57142857142857" calcext:value-type="float">
            <text:p/>
          </table:table-cell>
          <table:table-cell table:style-name="ce16" table:formula="of:=([.D2]*4+[.D3]*2+[.D4])/7" office:value-type="float" office:value="3.57142857142857" calcext:value-type="float">
            <text:p/>
          </table:table-cell>
          <table:table-cell table:style-name="ce16" table:formula="of:=([.E2]*4+[.E3]*2+[.E4])/7" office:value-type="float" office:value="4.71428571428571" calcext:value-type="float">
            <text:p/>
          </table:table-cell>
          <table:table-cell table:style-name="ce29" table:formula="of:=([.F2]*4+[.F3]*2+[.F4])/7" office:value-type="float" office:value="3.42857142857143" calcext:value-type="float">
            <text:p/>
          </table:table-cell>
          <table:table-cell table:style-name="ce16" table:formula="of:=([.G2]*4+[.G3]*2+[.G4])/7" office:value-type="float" office:value="4.71428571428571" calcext:value-type="float">
            <text:p/>
          </table:table-cell>
          <table:table-cell table:style-name="ce18" table:formula="of:=([.H2]*4+[.H3]*2+[.H4])/7" office:value-type="float" office:value="3.14285714285714" calcext:value-type="float">
            <text:p/>
          </table:table-cell>
          <table:table-cell table:style-name="ce29" table:formula="of:=([.I2]*4+[.I3]*2+[.I4])/7" office:value-type="float" office:value="4.42857142857143" calcext:value-type="float">
            <text:p/>
          </table:table-cell>
          <table:table-cell table:style-name="ce18" table:formula="of:=([.J2]*4+[.J3]*2+[.J4])/7" office:value-type="float" office:value="3.85714285714286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1" office:value-type="string" calcext:value-type="string">
            <text:p>LL</text:p>
          </table:table-cell>
          <table:table-cell table:style-name="ce17" table:formula="of:=([.C2]+[.C3]*2+[.C4]*4)/7" office:value-type="float" office:value="1.85714285714286" calcext:value-type="float">
            <text:p/>
          </table:table-cell>
          <table:table-cell table:style-name="ce17" table:formula="of:=([.D2]+[.D3]*2+[.D4]*4)/7" office:value-type="float" office:value="1.85714285714286" calcext:value-type="float">
            <text:p/>
          </table:table-cell>
          <table:table-cell table:style-name="ce17" table:formula="of:=([.E2]+[.E3]*2+[.E4]*4)/7" office:value-type="float" office:value="3.85714285714286" calcext:value-type="float">
            <text:p/>
          </table:table-cell>
          <table:table-cell table:style-name="ce30" table:formula="of:=([.F2]+[.F3]*2+[.F4]*4)/7" office:value-type="float" office:value="3.85714285714286" calcext:value-type="float">
            <text:p/>
          </table:table-cell>
          <table:table-cell table:style-name="ce17" table:formula="of:=([.G2]+[.G3]*2+[.G4]*4)/7" office:value-type="float" office:value="3.85714285714286" calcext:value-type="float">
            <text:p/>
          </table:table-cell>
          <table:table-cell table:style-name="ce32" table:formula="of:=([.H2]+[.H3]*2+[.H4]*4)/7" office:value-type="float" office:value="4" calcext:value-type="float">
            <text:p/>
          </table:table-cell>
          <table:table-cell table:style-name="ce30" table:formula="of:=([.I2]+[.I3]*2+[.I4]*4)/7" office:value-type="float" office:value="4.85714285714286" calcext:value-type="float">
            <text:p/>
          </table:table-cell>
          <table:table-cell table:style-name="ce32" table:formula="of:=([.J2]+[.J3]*2+[.J4]*4)/7" office:value-type="float" office:value="4.71428571428571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1" office:value-type="string" calcext:value-type="string">
            <text:p>dist</text:p>
          </table:table-cell>
          <table:table-cell table:style-name="ce18" table:formula="of:=ABS([.C5]-[.C6])" office:value-type="float" office:value="1.71428571428571" calcext:value-type="float">
            <text:p/>
          </table:table-cell>
          <table:table-cell table:style-name="ce18" table:formula="of:=ABS([.D5]-[.D6])" office:value-type="float" office:value="1.71428571428571" calcext:value-type="float">
            <text:p/>
          </table:table-cell>
          <table:table-cell table:style-name="ce18" table:formula="of:=ABS([.E5]-[.E6])" office:value-type="float" office:value="0.857142857142857" calcext:value-type="float">
            <text:p/>
          </table:table-cell>
          <table:table-cell table:style-name="ce18" table:formula="of:=ABS([.F5]-[.F6])" office:value-type="float" office:value="0.428571428571429" calcext:value-type="float">
            <text:p/>
          </table:table-cell>
          <table:table-cell table:style-name="ce18" table:formula="of:=ABS([.G5]-[.G6])" office:value-type="float" office:value="0.857142857142857" calcext:value-type="float">
            <text:p/>
          </table:table-cell>
          <table:table-cell table:style-name="ce18" table:formula="of:=ABS([.H5]-[.H6])" office:value-type="float" office:value="0.857142857142857" calcext:value-type="float">
            <text:p/>
          </table:table-cell>
          <table:table-cell table:style-name="ce18" table:formula="of:=ABS([.I5]-[.I6])" office:value-type="float" office:value="0.428571428571428" calcext:value-type="float">
            <text:p/>
          </table:table-cell>
          <table:table-cell table:style-name="ce18" table:formula="of:=ABS([.J5]-[.J6])" office:value-type="float" office:value="0.857142857142857" calcext:value-type="float">
            <text:p/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8">
            <text:p><text:span text:style-name="T1">Interest/user-class</text:span></text:p>
            <text:p>S=Source of req</text:p>
            <text:p>I=Influenced by</text:p>
          </table:table-cell>
          <table:table-cell table:style-name="ce12" office:value-type="string" calcext:value-type="string">
            <text:p>Sponsor/client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31" office:value-type="string" calcext:value-type="string">
            <text:p>-</text:p>
          </table:table-cell>
          <table:table-cell table:style-name="ce19" office:value-type="string" calcext:value-type="string">
            <text:p>S</text:p>
          </table:table-cell>
          <table:table-cell table:number-columns-repeated="3" table:style-name="ce33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8"/>
          <table:table-cell office:value-type="string" calcext:value-type="string">
            <text:p>Stakeholder/bus-usrs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1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8"/>
          <table:table-cell office:value-type="string" calcext:value-type="string">
            <text:p>Sales/marketting/bus-mngr</text:p>
          </table:table-cell>
          <table:table-cell table:number-columns-repeated="2"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8"/>
          <table:table-cell office:value-type="string" calcext:value-type="string">
            <text:p>PM</text:p>
          </table:table-cell>
          <table:table-cell table:style-name="ce22" office:value-type="string" calcext:value-type="string">
            <text:p>I</text:p>
          </table:table-cell>
          <table:table-cell table:style-name="ce23" office:value-type="string" calcext:value-type="string">
            <text:p>i</text:p>
          </table:table-cell>
          <table:table-cell table:style-name="ce22" office:value-type="string" calcext:value-type="string">
            <text:p>I</text:p>
          </table:table-cell>
          <table:table-cell table:style-name="ce15" office:value-type="string" calcext:value-type="string">
            <text:p>-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22" office:value-type="string" calcext:value-type="string">
            <text:p>I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I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22" office:value-type="string" calcext:value-type="string">
            <text:p>I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I</text:p>
          </table:table-cell>
          <table:table-cell table:number-columns-repeated="2" table:style-name="ce23" office:value-type="string" calcext:value-type="string">
            <text:p>i</text:p>
          </table:table-cell>
          <table:table-cell table:number-columns-repeated="2" table:style-name="ce22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23" office:value-type="string" calcext:value-type="string">
            <text:p>i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i</text:p>
          </table:table-cell>
          <table:table-cell table:style-name="ce22" office:value-type="string" calcext:value-type="string">
            <text:p>I</text:p>
          </table:table-cell>
          <table:table-cell table:number-columns-repeated="2" table:style-name="ce23" office:value-type="string" calcext:value-type="string">
            <text:p>i</text:p>
          </table:table-cell>
          <table:table-cell table:number-columns-repeated="2" table:style-name="ce22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9"/>
          <table:table-cell table:style-name="ce9" office:value-type="string" calcext:value-type="string">
            <text:p>Ops</text:p>
          </table:table-cell>
          <table:table-cell table:style-name="ce24" office:value-type="string" calcext:value-type="string">
            <text:p>i</text:p>
          </table:table-cell>
          <table:table-cell table:style-name="ce27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i</text:p>
          </table:table-cell>
          <table:table-cell table:style-name="ce34" office:value-type="string" calcext:value-type="string">
            <text:p>I</text:p>
          </table:table-cell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Classification</text:p>
          </table:table-cell>
          <table:table-cell table:style-name="ce13" office:value-type="string" calcext:value-type="string">
            <text:p>Business?</text:p>
          </table:table-cell>
          <table:table-cell table:style-name="ce25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5"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6:38:43.522979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7T19:13:25.699691627</dc:date>
    <meta:editing-duration>PT3H25M43S</meta:editing-duration>
    <meta:editing-cycles>9</meta:editing-cycles>
    <meta:generator>LibreOffice/4.2.3.3$Linux_X86_64 LibreOffice_project/420m0$Build-3</meta:generator>
    <meta:document-statistic meta:table-count="2" meta:cell-count="201" meta:object-count="0"/>
  </office:meta>
</office:document-meta>
</file>
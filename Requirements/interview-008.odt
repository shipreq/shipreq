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76e8" officeooo:paragraph-rsid="001f76e8" style:font-weight-asian="bold" style:font-weight-complex="bold"/>
    </style:style>
    <style:style style:name="P2" style:family="paragraph" style:parent-style-name="Standard">
      <style:text-properties fo:color="#000080" fo:font-weight="normal" officeooo:rsid="00207ba3" officeooo:paragraph-rsid="00207ba3" style:font-weight-asian="normal" style:font-weight-complex="normal"/>
    </style:style>
    <style:style style:name="P3" style:family="paragraph" style:parent-style-name="Standard">
      <style:text-properties fo:font-weight="normal" officeooo:rsid="00102846" officeooo:paragraph-rsid="00102846" style:font-weight-asian="normal" style:font-weight-complex="normal"/>
    </style:style>
    <style:style style:name="P4" style:family="paragraph" style:parent-style-name="Standard">
      <style:text-properties fo:font-weight="normal" officeooo:rsid="00102846" officeooo:paragraph-rsid="00207ba3" style:font-weight-asian="normal" style:font-weight-complex="normal"/>
    </style:style>
    <style:style style:name="P5" style:family="paragraph" style:parent-style-name="Standard">
      <style:text-properties fo:font-weight="normal" officeooo:rsid="0010c013" officeooo:paragraph-rsid="0010c013" style:font-weight-asian="normal" style:font-weight-complex="normal"/>
    </style:style>
    <style:style style:name="P6" style:family="paragraph" style:parent-style-name="Standard">
      <style:text-properties fo:font-weight="normal" officeooo:rsid="000f7e57" officeooo:paragraph-rsid="000f7e57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f7e57" officeooo:paragraph-rsid="000f7e57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f7e57" officeooo:paragraph-rsid="000fbfca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fbfca" officeooo:paragraph-rsid="000fbfca" style:font-weight-asian="normal" style:font-weight-complex="normal"/>
    </style:style>
    <style:style style:name="P10" style:family="paragraph" style:parent-style-name="Standard">
      <style:text-properties fo:font-weight="normal" officeooo:rsid="001568f1" officeooo:paragraph-rsid="001568f1" style:font-weight-asian="normal" style:font-weight-complex="normal"/>
    </style:style>
    <style:style style:name="P11" style:family="paragraph" style:parent-style-name="Standard">
      <style:text-properties fo:font-weight="normal" officeooo:rsid="0019ad6e" officeooo:paragraph-rsid="0019ad6e" style:font-weight-asian="normal" style:font-weight-complex="normal"/>
    </style:style>
    <style:style style:name="P12" style:family="paragraph" style:parent-style-name="Standard">
      <style:text-properties fo:font-weight="normal" officeooo:rsid="001c08d7" officeooo:paragraph-rsid="001c08d7" style:font-weight-asian="normal" style:font-weight-complex="normal"/>
    </style:style>
    <style:style style:name="P13" style:family="paragraph" style:parent-style-name="Standard">
      <style:text-properties fo:font-weight="normal" officeooo:rsid="001d7227" officeooo:paragraph-rsid="001d7227" style:font-weight-asian="normal" style:font-weight-complex="normal"/>
    </style:style>
    <style:style style:name="P14" style:family="paragraph" style:parent-style-name="Standard">
      <style:text-properties fo:font-weight="normal" officeooo:rsid="001f76e8" officeooo:paragraph-rsid="001f76e8" style:font-weight-asian="normal" style:font-weight-complex="normal"/>
    </style:style>
    <style:style style:name="T1" style:family="text">
      <style:text-properties officeooo:rsid="000fbfca"/>
    </style:style>
    <style:style style:name="T2" style:family="text">
      <style:text-properties officeooo:rsid="0010c013"/>
    </style:style>
    <style:style style:name="T3" style:family="text">
      <style:text-properties officeooo:rsid="001f4b9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f4b93"/>
    </style:style>
    <style:style style:name="T7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es anyone ever <text:span text:style-name="T5">delete LL reqs</text:span>? What else needs to happen when a req is deleted? <text:span text:style-name="T2">What about references to it?</text:span></text:p>
      <text:p text:style-name="P2">aaaa</text:p>
      <text:p text:style-name="P3"/>
      <text:p text:style-name="P5">Does anyone ever need to <text:span text:style-name="T5">see</text:span><text:span text:style-name="T7"> what </text:span><text:span text:style-name="T5">a deleted req </text:span>was? Why? What happens if they can't?</text:p>
      <text:p text:style-name="P2">aaaa</text:p>
      <text:p text:style-name="P4"/>
      <text:p text:style-name="P5">Does anyone ever <text:span text:style-name="T5">restore a deleted req</text:span>? Why? What happens if they can't?</text:p>
      <text:p text:style-name="P2">aaaa</text:p>
      <text:p text:style-name="P4"/>
      <text:p text:style-name="P6">When <text:span text:style-name="T5">removing a requirement-type</text:span>, <text:span text:style-name="T1">please opine about the following effects:</text:span></text:p>
      <text:list xml:id="list1196761574510135687" text:style-name="L1">
        <text:list-item>
          <text:p text:style-name="P7"><text:span text:style-name="T1">Associated r</text:span>equirements are deleted.</text:p>
        </text:list-item>
        <text:list-item>
          <text:p text:style-name="P8"><text:span text:style-name="T1">Associated r</text:span>equirements are <text:span text:style-name="T1">moved into a different req type. If no other req types exist, prevent operation.</text:span></text:p>
        </text:list-item>
        <text:list-item>
          <text:p text:style-name="P9">If associated requirements exist, prevent operation.</text:p>
        </text:list-item>
      </text:list>
      <text:p text:style-name="P2">aaaa</text:p>
      <text:p text:style-name="P4"/>
      <text:p text:style-name="P10">Please list <text:span text:style-name="T5">custom columns and attributes</text:span> that LL reqs sometimes get. Please also list ones that are specific to certain requirement-types.</text:p>
      <text:p text:style-name="P2">aaaa</text:p>
      <text:p text:style-name="P4"/>
      <text:p text:style-name="P11">When would you ever want to assign a req <text:span text:style-name="T5">multiple semantic-IDs</text:span>? Why? What would the effect be if the system didn't allow this?</text:p>
      <text:p text:style-name="P2">aaaa</text:p>
      <text:p text:style-name="P4"/>
      <text:p text:style-name="P12">When sorting requirements, please provide <text:span text:style-name="T5">sorting examples</text:span>. When would you want to sort? After you accomplish your task, when would you need to sort next?</text:p>
      <text:p text:style-name="P2">aaaa</text:p>
      <text:p text:style-name="P4"/>
      <text:p text:style-name="P13">When sorting, if you were unable to select <text:span text:style-name="T5">DESC order</text:span> instead of ASC, how would that affect you? How important would that be to you?</text:p>
      <text:p text:style-name="P2">aaaa</text:p>
      <text:p text:style-name="P4"/>
      <text:p text:style-name="P13">When sorting is active and you change the content of a requirement which puts it out-of-order, <text:span text:style-name="T3">should the view </text:span><text:span text:style-name="T6">reorder immediately</text:span><text:span text:style-name="T3">?</text:span></text:p>
      <text:p text:style-name="P14">SI: It doesn't, but a little button appears saying “Out-of-order. Re-sort” which user can click when done.</text:p>
      <text:p text:style-name="P2">aaaa</text:p>
      <text:p text:style-name="P4"/>
      <text:p text:style-name="P14">When reqs are displayed heirarchically using their semantic-IDs, sometimes there are <text:span text:style-name="T5">rows that serve just as a header</text:span> for their children without being a req themselves. If this behaviour were not supported how would it affect you? How strongly would you feel when you realised it was missing? How would you work around it?</text:p>
      <text:p text:style-name="P2">aaaa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AU" style:letter-kerning="true" style:font-name-asian="TianZhe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AU" style:letter-kerning="true" style:font-name-asian="TianZhen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TianZhen" style:font-family-asian="TianZhen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1:12:07.474818885</meta:creation-date>
    <meta:generator>LibreOffice/4.2.4.2$Linux_X86_64 LibreOffice_project/420m0$Build-2</meta:generator>
    <dc:date>2014-05-14T11:09:04.783809207</dc:date>
    <meta:editing-duration>PT6H27M1S</meta:editing-duration>
    <meta:editing-cycles>4</meta:editing-cycles>
    <meta:document-statistic meta:table-count="0" meta:image-count="0" meta:object-count="0" meta:page-count="1" meta:paragraph-count="24" meta:word-count="287" meta:character-count="1694" meta:non-whitespace-character-count="1434"/>
  </office:meta>
</office:document-meta>
</file>
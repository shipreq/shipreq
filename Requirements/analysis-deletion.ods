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5.86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42.58mm"/>
    </style:style>
    <style:style style:name="co7" style:family="table-column">
      <style:table-column-properties fo:break-before="auto" style:column-width="89.8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43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12.86mm" fo:break-before="auto" style:use-optimal-row-height="true"/>
    </style:style>
    <style:style style:name="ro5" style:family="table-row">
      <style:table-row-properties style:row-height="8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vertical-align="top"/>
      <style:text-properties style:font-name="Arimo" fo:font-style="italic" fo:font-weight="normal" style:font-name-asian="Lucida Sans Unicode" style:font-style-asian="italic" style:font-weight-asian="normal" style:font-name-complex="FreeSans" style:font-style-complex="italic" style:font-weight-complex="normal"/>
    </style:style>
    <style:style style:name="ce5" style:family="table-cell" style:parent-style-name="Default">
      <style:table-cell-properties style:vertical-align="top"/>
      <style:text-properties style:font-name="Arimo" fo:font-weight="normal" style:font-name-asian="Lucida Sans Unicode" style:font-weight-asian="normal" style:font-name-complex="FreeSans" style:font-weight-complex="normal"/>
    </style:style>
    <style:style style:name="ce6" style:family="table-cell" style:parent-style-name="Default">
      <style:table-cell-properties style:vertical-align="top"/>
      <style:text-properties style:use-window-font-color="true"/>
    </style:style>
    <style:style style:name="ce7" style:family="table-cell" style:parent-style-name="Default">
      <style:table-cell-properties style:vertical-align="top"/>
      <style:text-properties fo:color="#ff950e"/>
    </style:style>
    <style:style style:name="ce8" style:family="table-cell" style:parent-style-name="Default">
      <style:table-cell-properties fo:background-color="transparent" style:vertical-align="top"/>
    </style:style>
    <style:style style:name="ce9" style:family="table-cell" style:parent-style-name="Default">
      <style:table-cell-properties style:vertical-align="top"/>
      <style:text-properties style:font-name="Arimo" style:font-name-asian="Lucida Sans Unicode" style:font-name-complex="FreeSans"/>
    </style:style>
    <style:style style:name="ce10" style:family="table-cell" style:parent-style-name="Default">
      <style:table-cell-properties style:vertical-align="top"/>
      <style:text-properties fo:color="#999999"/>
    </style:style>
    <style:style style:name="ce11" style:family="table-cell" style:parent-style-name="Default">
      <style:table-cell-properties fo:background-color="transparent" style:vertical-align="top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T1" style:family="text">
      <style:text-properties style:font-name="Arimo" style:font-name-asian="Lucida Sans Unicode" style:font-name-complex="FreeSans"/>
    </style:style>
    <style:style style:name="T2" style:family="text">
      <style:text-properties style:font-name-asian="Lucida Sans Unicode" style:font-name-complex="FreeSan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Issue Type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ReqTypes</text:p>
          </table:table-cell>
          <table:table-cell table:style-name="ce1" office:value-type="string" calcext:value-type="string">
            <text:p>GenReqs</text:p>
          </table:table-cell>
          <table:table-cell table:style-name="ce1" office:value-type="string" calcext:value-type="string">
            <text:p>RCG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ain outcome</text:p>
          </table:table-cell>
          <table:table-cell table:number-columns-repeated="2" office:value-type="string" calcext:value-type="string">
            <text:p>Prevent future use</text:p>
          </table:table-cell>
          <table:table-cell office:value-type="string" calcext:value-type="string">
            <text:p>Remove from view</text:p>
          </table:table-cell>
          <table:table-cell office:value-type="string" calcext:value-type="string">
            <text:p>Prevent any use</text:p>
          </table:table-cell>
          <table:table-cell office:value-type="string" calcext:value-type="string">
            <text:p>Descope</text:p>
          </table:table-cell>
          <table:table-cell office:value-type="string" calcext:value-type="string">
            <text:p>Remove from vie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isting data</text:p>
          </table:table-cell>
          <table:table-cell office:value-type="string" calcext:value-type="string">
            <text:p>As tag:</text:p>
            <text:p>* use = issue</text:p>
            <text:p>* hide use</text:p>
            <text:p>* prevent deletion</text:p>
            <text:p/>
            <text:p>In text:</text:p>
            <text:p><text:span text:style-name="T1">* use = issue</text:span></text:p>
            <text:p><text:span text:style-name="T1">* prevent deletion</text:span></text:p>
          </table:table-cell>
          <table:table-cell office:value-type="string" calcext:value-type="string">
            <text:p>Without desc:</text:p>
            <text:p>* use = issue</text:p>
            <text:p><text:span text:style-name="T1">* hide use</text:span></text:p>
            <text:p><text:span text:style-name="T1">* prevent deletion</text:span></text:p>
            <text:p/>
            <text:p><text:span text:style-name="T1">With desc:</text:span></text:p>
            <text:p><text:span text:style-name="T1">* use = issue</text:span></text:p>
            <text:p><text:span text:style-name="T1">* hide use</text:span></text:p>
            <text:p><text:span text:style-name="T1">* prevent deletion</text:span></text:p>
          </table:table-cell>
          <table:table-cell office:value-type="string" calcext:value-type="string">
            <text:p>Hide</text:p>
          </table:table-cell>
          <table:table-cell table:style-name="ce9" office:value-type="string" calcext:value-type="string">
            <text:p><text:span text:style-name="T2">* use = issue</text:span></text:p>
            <text:p><text:span text:style-name="T2">* reallocate reqs</text:span></text:p>
            <text:p><text:span text:style-name="T2">* delete reqs</text:span></text:p>
            <text:p><text:span text:style-name="T2">* prompt to delete or realloc</text:span></text:p>
            <text:p><text:span text:style-name="T2">* prevent deletion</text:span></text:p>
          </table:table-cell>
          <table:table-cell office:value-type="string" calcext:value-type="string">
            <text:p>hide.</text:p>
            <text:p/>
            <text:p>live ref = error.</text:p>
          </table:table-cell>
          <table:table-cell table:style-name="ce9" office:value-type="string" calcext:value-type="string">
            <text:p>* hard delete</text:p>
            <text:p>* hide</text:p>
            <text:p>* hard delete but remember and suggest on recreation</text:p>
            <text:p/>
            <text:p>live ref = erro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ual undo effort</text:p>
          </table:table-cell>
          <table:table-cell office:value-type="string" calcext:value-type="string">
            <text:p>tag itself = meh</text:p>
            <text:p>tag application = help!</text:p>
          </table:table-cell>
          <table:table-cell office:value-type="string" calcext:value-type="string">
            <text:p>issue itself = meh</text:p>
            <text:p>issue usage = ? rare</text:p>
          </table:table-cell>
          <table:table-cell office:value-type="string" calcext:value-type="string">
            <text:p>No big deal.</text:p>
            <text:p>Text fields would need to be seen to  make names match</text:p>
          </table:table-cell>
          <table:table-cell office:value-type="string" calcext:value-type="string">
            <text:p>Req type = meh</text:p>
            <text:p>Reallocating back = not too bad</text:p>
          </table:table-cell>
          <table:table-cell office:value-type="string" calcext:value-type="string">
            <text:p>NO!</text:p>
          </table:table-cell>
          <table:table-cell office:value-type="string" calcext:value-type="string">
            <text:p>If just one RCG, slightly annoying</text:p>
            <text:p>If part of many reqs being undeleted, very annoy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 not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Relations</text:p>
          </table:table-cell>
          <table:table-cell office:value-type="string" calcext:value-type="string">
            <text:p>Auto delete fields too?</text:p>
            <text:p>Tag children</text:p>
            <text:p>Tag paren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to delete fields too?</text:p>
          </table:table-cell>
          <table:table-cell office:value-type="string" calcext:value-type="string">
            <text:p>Auto delete/restore implications</text:p>
            <text:p><text:span text:style-name="T1">Auto delete/restore req codes</text:span></text:p>
            <text:p><text:span text:style-name="T1">Auto error/restore refs to it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clusion (in use)</text:p>
          </table:table-cell>
          <table:table-cell office:value-type="string" calcext:value-type="string">
            <text:p>Hide</text:p>
          </table:table-cell>
          <table:table-cell table:style-name="ce8" office:value-type="string" calcext:value-type="string">
            <text:p>Prevent</text:p>
          </table:table-cell>
          <table:table-cell office:value-type="string" calcext:value-type="string">
            <text:p>Hide (ex. view fields)</text:p>
          </table:table-cell>
          <table:table-cell table:number-columns-repeated="2" office:value-type="string" calcext:value-type="string">
            <text:p>Hide</text:p>
          </table:table-cell>
          <table:table-cell table:style-name="ce11" office:value-type="string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clusion (prev used)</text:p>
          </table:table-cell>
          <table:table-cell table:formula="of:=[.B9]" office:value-type="string" office:string-value="Hide" calcext:value-type="string">
            <text:p>Hide</text:p>
          </table:table-cell>
          <table:table-cell table:style-name="ce8" office:value-type="string" calcext:value-type="string">
            <text:p>Delete</text:p>
          </table:table-cell>
          <table:table-cell table:formula="of:=[.D9]" office:value-type="string" office:string-value="Hide (ex. view fields)" calcext:value-type="string">
            <text:p>Hide (ex. view fields)</text:p>
          </table:table-cell>
          <table:table-cell table:formula="of:=[.E9]" office:value-type="string" office:string-value="Hide" calcext:value-type="string">
            <text:p>Hide</text:p>
          </table:table-cell>
          <table:table-cell table:formula="of:=[.F9]" office:value-type="string" office:string-value="Hide" calcext:value-type="string">
            <text:p>Hide</text:p>
          </table:table-cell>
          <table:table-cell table:formula="of:=[.G9]" office:value-type="string" office:string-value="Details below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clusion (never used)</text:p>
          </table:table-cell>
          <table:table-cell table:formula="of:=[.B9]" office:value-type="string" office:string-value="Hide" calcext:value-type="string">
            <text:p>Hide</text:p>
          </table:table-cell>
          <table:table-cell table:style-name="ce8" office:value-type="string" calcext:value-type="string">
            <text:p>Delete</text:p>
          </table:table-cell>
          <table:table-cell table:formula="of:=[.D9]" office:value-type="string" office:string-value="Hide (ex. view fields)" calcext:value-type="string">
            <text:p>Hide (ex. view fields)</text:p>
          </table:table-cell>
          <table:table-cell table:formula="of:=[.E9]" office:value-type="string" office:string-value="Hide" calcext:value-type="string">
            <text:p>Hide</text:p>
          </table:table-cell>
          <table:table-cell table:formula="of:=[.F9]" office:value-type="string" office:string-value="Hide" calcext:value-type="string">
            <text:p>Hide</text:p>
          </table:table-cell>
          <table:table-cell table:formula="of:=[.G9]" office:value-type="string" office:string-value="Details below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asiest would be to do whatever in-use does. [in-use] has to happen 100%. No point guessing and adding conditions &amp; functionality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nReqs</text:p>
          </table:table-cell>
          <table:table-cell table:number-columns-repeated="5"/>
          <table:table-cell table:style-name="ce1" office:value-type="string" calcext:value-type="string">
            <text:p>ReqCode Group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Can delete.</text:p>
          </table:table-cell>
          <table:table-cell table:number-columns-repeated="5"/>
          <table:table-cell table:style-name="Default" office:value-type="string" calcext:value-type="string">
            <text:p>Shouldn't show multiple deleted RCGs – only current or last deleted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present implied for deletion too (- reqs implied by other live reqs)</text:p>
          </table:table-cell>
          <table:table-cell table:number-columns-repeated="5"/>
          <table:table-cell table:style-name="Default" office:value-type="string" calcext:value-type="string">
            <text:p>When creating, suggest title of last deleted.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req code groups that would no longer have children after deletion, should also be deleted in the same event.</text:p>
          </table:table-cell>
          <table:table-cell table:number-columns-repeated="5"/>
          <table:table-cell table:style-name="Default" office:value-type="string" calcext:value-type="string">
            <text:p>Cos of req deletion, RCGs <text:span text:style-name="T3">can</text:span><text:span text:style-name="T4"> be soft-deleted</text:span>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BA shall be able to specify reason.</text:p>
          </table:table-cell>
          <table:table-cell table:number-columns-repeated="5"/>
          <table:table-cell table:style-name="Default" office:value-type="string" calcext:value-type="string">
            <text:p>Remember for suggestion next time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A shall be able to view deletion reasons in Table.</text:p>
          </table:table-cell>
          <table:table-cell table:number-columns-repeated="5"/>
          <table:table-cell table:style-name="ce12" office:value-type="string" calcext:value-type="string">
            <text:p>Visible in Table when showing deleted content? Yes. Cos ↓</text:p>
            <text:p>If not, RCGs del by reqs shouldn't be visible either. Which would be misleading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reqs with dead implications and no live implications are issues</text:p>
          </table:table-cell>
          <table:table-cell table:number-columns-repeated="5"/>
          <table:table-cell table:style-name="ce6" office:value-type="string" calcext:value-type="string">
            <text:p>Restorable as well as recreatable – unless there's a confli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 to in live reqs to dead reqs are issues.</text:p>
          </table:table-cell>
          <table:table-cell table:number-columns-repeated="5"/>
          <table:table-cell table:style-name="ce6" office:value-type="string" calcext:value-type="string">
            <text:p>An RCG with no text is meaningles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 restore.</text:p>
          </table:table-cell>
          <table:table-cell table:number-columns-repeated="5"/>
          <table:table-cell table:style-name="ce6" office:value-type="string" calcext:value-type="string">
            <text:p>Deleted RCG with no-text ⇒ remove from del view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restoring, present implied for restoration too (needn't be solely implied)</text:p>
          </table:table-cell>
          <table:table-cell table:number-columns-repeated="5"/>
          <table:table-cell table:style-name="ce6" office:value-type="string" calcext:value-type="string">
            <text:p>Deleted RCG with no-text ⇒ don't suggest next time = easiest for data model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restoring, deleted req code groups that would become relevant again after restoration should also be restore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en selecting implied reqs for restoration, BA shall be able to see the reason they were deleted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If restoration would introduce a req code conflict, allow user to cancel, prefix roots, auto-rename conflicting nodes</text:p>
            <text:p>   (although RCGs with matching text can be merged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[UI issue] When viewing deleted content, should deleted RCGs be shown too? What about when there's reqcode group overlap?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[UI issue] When viewing deleted content sorting by code, what about when there's reqcode overlap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number-columns-repeated="3"/>
          <table:table-cell table:style-name="ce1" office:value-type="string" calcext:value-type="string">
            <text:p>Issue Type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Show usage (tag-pool / in-text separately? = whatever; trivial)</text:p>
          </table:table-cell>
          <table:table-cell table:number-columns-repeated="3"/>
          <table:table-cell office:value-type="string" calcext:value-type="string">
            <text:p>Shouldn't hide use as it's part of tex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 regardless of usage</text:p>
          </table:table-cell>
          <table:table-cell table:number-columns-repeated="3"/>
          <table:table-cell table:style-name="ce10" office:value-type="string" calcext:value-type="string">
            <text:p>If usable after deletion, it's an issue (as before or meta?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 tag application but hide (thus restore tag = restore application)</text:p>
          </table:table-cell>
          <table:table-cell table:number-columns-repeated="3"/>
          <table:table-cell table:style-name="ce6" office:value-type="string" calcext:value-type="string">
            <text:p>Allow/prevent deletion while in use? = prevent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ag usage in text = issue</text:p>
          </table:table-cell>
          <table:table-cell table:number-columns-repeated="3"/>
          <table:table-cell table:style-name="ce10" office:value-type="string" calcext:value-type="string">
            <text:p>Restoration required if post-deletion use allowed...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What about fields? - Cascade to fiel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What about tag children? - Cascade to sole children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What about tag parents? - nop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1" office:value-type="string" calcext:value-type="string">
            <text:p>ReqTyp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re will be an easy way to change req types in bul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 calcext:value-type="string">
            <text:p>Should deleted reqs be able to have deleted req types? Yes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 calcext:value-type="string">
            <text:p>Prevent undeletion of reqs associated with deleted req typ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nnot hard-delete req types – needed for pubid regis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r should be able to wipe out all OEs and restore them la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leting a reqtype hides i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oft-deletion cascades onto associated req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Restoring a reqtype should restore associated reqs <text:span text:style-name="T3">that were deleted due to req type deletion</text:span>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2:08:01.755450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7:51:46.244165826</meta:creation-date>
    <dc:date>2015-09-09T12:44:06.082904180</dc:date>
    <meta:editing-duration>PT1H34M53S</meta:editing-duration>
    <meta:editing-cycles>53</meta:editing-cycles>
    <meta:generator>LibreOffice/4.4.5.2$Linux_x86 LibreOffice_project/40m0$Build-2</meta:generator>
    <meta:document-statistic meta:table-count="1" meta:cell-count="109" meta:object-count="0"/>
  </office:meta>
</office:document-meta>
</file>
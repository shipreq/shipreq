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4.1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2.1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b3b3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999999"/>
    </style:style>
    <style:style style:name="ce5" style:family="table-cell" style:parent-style-name="Default">
      <style:table-cell-properties style:vertical-align="top"/>
      <style:text-properties style:font-name="Arimo" style:font-name-asian="AR PL UMing CN" style:font-name-complex="FreeSans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b3b300" style:vertical-align="top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ackground-color="#b3b300" fo:wrap-option="wrap" style:vertical-align="top"/>
    </style:style>
    <style:style style:name="ce14" style:family="table-cell" style:parent-style-name="Default">
      <style:table-cell-properties fo:wrap-option="wrap"/>
      <style:text-properties fo:color="#999999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fo:wrap-option="wrap" style:vertical-align="top"/>
      <style:text-properties style:font-name="Arimo" style:font-name-asian="AR PL UMing CN" style:font-name-complex="FreeSans"/>
    </style:style>
    <style:style style:name="ce18" style:family="table-cell" style:parent-style-name="Default">
      <style:table-cell-properties fo:wrap-option="wrap" style:vertical-align="top"/>
      <style:text-properties fo:color="#999999"/>
    </style:style>
    <style:style style:name="ce19" style:family="table-cell" style:parent-style-name="Default">
      <style:table-cell-properties fo:wrap-option="wrap" style:vertical-align="top"/>
      <style:text-properties fo:color="#8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9"/>
        <table:table-column table:style-name="co2" table:number-columns-repeated="1018" table:default-cell-style-name="ce9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office:value-type="string" calcext:value-type="string">
            <text:p>Question of all HL reqs being used in MF-13</text:p>
          </table:table-cell>
          <table:table-cell office:value-type="string" calcext:value-type="string">
            <text:p>HL &amp; MF-13</text:p>
          </table:table-cell>
          <table:table-cell office:value-type="string" calcext:value-type="string">
            <text:p>MF-1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eatures: MF ⊃ FE ≅ MF-07?</text:p>
          </table:table-cell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office:value-type="string" calcext:value-type="string">
            <text:p>Also overlap with sem-ids in MF-12</text:p>
          </table:table-cell>
          <table:table-cell office:value-type="string" calcext:value-type="string">
            <text:p>MF ≅ MF-07?</text:p>
            <text:p>MF ≅ sem-ids?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/>
          <table:table-cell office:value-type="string" calcext:value-type="string">
            <text:p>MF ⊃ FE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office:value-type="string" calcext:value-type="string">
            <text:p>Turn this into use case or at least provide a detailed example.</text:p>
          </table:table-cell>
          <table:table-cell office:value-type="string" calcext:value-type="string">
            <text:p>“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office:value-type="string" calcext:value-type="string">
            <text:p>Asked in I#009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ybe MF should just be FE then it would nest happily.</text:p>
          </table:table-cell>
          <table:table-cell office:value-type="string" calcext:value-type="string">
            <text:p>MF-13 then becomes the problem.</text:p>
          </table:table-cell>
          <table:table-cell office:value-type="string" calcext:value-type="string">
            <text:p>MF with MF-13?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/>
          <table:table-cell office:value-type="string" calcext:value-type="string">
            <text:p>?(Proj) → MF → .FE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office:value-type="string" calcext:value-type="string">
            <text:p>MF-13</text:p>
          </table:table-cell>
          <table:table-cell office:value-type="string" calcext:value-type="string">
            <text:p>Prof → MF → (FE→) LL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office:value-type="string" calcext:value-type="string">
            <text:p>Overlap between MF-13 &amp; MF-07</text:p>
          </table:table-cell>
          <table:table-cell office:value-type="string" calcext:value-type="string">
            <text:p>?(Ver) → MF → .FE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find missing requirements in intersections.</text:p>
          </table:table-cell>
          <table:table-cell office:value-type="string" calcext:value-type="string">
            <text:p>MF-13</text:p>
          </table:table-cell>
          <table:table-cell office:value-type="string" calcext:value-type="string">
            <text:p>MF⊗MF → LL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/>
          <table:table-cell office:value-type="string" calcext:value-type="string">
            <text:p>MF ⊃ FE</text:p>
            <text:p>MF∨FE→LL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/>
          <table:table-cell office:value-type="string" calcext:value-type="string">
            <text:p>Hide/show FE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/>
          <table:table-cell office:value-type="string" calcext:value-type="string">
            <text:p>MF (→s) LL</text:p>
          </table:table-cell>
          <table:table-cell table:number-columns-repeated="101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/>
          <table:table-cell office:value-type="string" calcext:value-type="string">
            <text:p>MF (→w) LL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/>
          <table:table-cell office:value-type="string" calcext:value-type="string">
            <text:p>filter by MF</text:p>
          </table:table-cell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RWS</text:p>
          </table:table-cell>
          <table:table-cell table:style-name="ce14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8" office:value-type="string" calcext:value-type="string">
            <text:p>Defer to MF-15</text:p>
          </table:table-cell>
          <table:table-cell table:style-name="ce11" office:value-type="string" calcext:value-type="string">
            <text:p>MF⊗phase = status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4">
          <table:table-cell table:style-name="Default"/>
          <table:table-cell/>
          <table:table-cell table:style-name="ce15" office:value-type="string" calcext:value-type="string">
            <text:p>What do I need to model?</text:p>
          </table:table-cell>
          <table:table-cell table:style-name="ce19" office:value-type="string" calcext:value-type="string">
            <text:p>What do I need to do?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ce9" office:value-type="string" calcext:value-type="string">
            <text:p>MF ⊃ FE</text:p>
          </table:table-cell>
          <table:table-cell table:style-name="ce9" office:value-type="string" calcext:value-type="string">
            <text:p>Hide/show FE</text:p>
          </table:table-cell>
          <table:table-cell table:number-columns-repeated="1019"/>
        </table:table-row>
        <table:table-row table:style-name="ro4">
          <table:table-cell table:style-name="Default"/>
          <table:table-cell/>
          <table:table-cell table:style-name="ce16" office:value-type="string" calcext:value-type="string">
            <text:p>{MF,FE} ↔ Version (?)</text:p>
          </table:table-cell>
          <table:table-cell office:value-type="string" calcext:value-type="string">
            <text:p>Filter by MF relationship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{MF,FE} ↔ {LL,UC}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(↔) = strong | weak</text:p>
          </table:table-cell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See relationship.</text:p>
            <text:p>Collapse/expand.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See relationship.</text:p>
            <text:p>Filter B by A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See relationship.</text:p>
            <text:p>Filter B by A.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style-name="ce8" office:value-type="string" calcext:value-type="string">
            <text:p>Can System represent relationship-types generically and still provide all required functionality?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o different types of relationships even need to be distinguished? Can we just have Req⊕Req?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5-29T14:23:44.518459069</dc:date>
    <meta:editing-duration>PT2M29S</meta:editing-duration>
    <meta:editing-cycles>2</meta:editing-cycles>
    <meta:generator>LibreOffice/4.2.3.3$Linux_X86_64 LibreOffice_project/420m0$Build-3</meta:generator>
    <meta:document-statistic meta:table-count="1" meta:cell-count="95" meta:object-count="0"/>
  </office:meta>
</office:document-meta>
</file>
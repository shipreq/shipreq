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b0e1" officeooo:paragraph-rsid="0017b0e1"/>
    </style:style>
    <style:style style:name="P2" style:family="paragraph" style:parent-style-name="Standard">
      <style:text-properties officeooo:rsid="0017b0e1" officeooo:paragraph-rsid="00193d16"/>
    </style:style>
    <style:style style:name="P3" style:family="paragraph" style:parent-style-name="Standard">
      <style:text-properties officeooo:rsid="00193d16" officeooo:paragraph-rsid="00193d16"/>
    </style:style>
    <style:style style:name="P4" style:family="paragraph" style:parent-style-name="Standard">
      <style:text-properties officeooo:rsid="00193d16" officeooo:paragraph-rsid="001adc92"/>
    </style:style>
    <style:style style:name="P5" style:family="paragraph" style:parent-style-name="Standard">
      <style:text-properties fo:color="#008000" officeooo:rsid="0017b0e1" officeooo:paragraph-rsid="0017b0e1"/>
    </style:style>
    <style:style style:name="P6" style:family="paragraph" style:parent-style-name="Standard">
      <style:text-properties fo:color="#008000" officeooo:rsid="00193d16" officeooo:paragraph-rsid="00193d16"/>
    </style:style>
    <style:style style:name="P7" style:family="paragraph" style:parent-style-name="Standard" style:list-style-name="L1">
      <style:text-properties fo:color="#008000" officeooo:rsid="00193d16" officeooo:paragraph-rsid="00193d16"/>
    </style:style>
    <style:style style:name="P8" style:family="paragraph" style:parent-style-name="Standard" style:list-style-name="L2">
      <style:text-properties fo:color="#008000" officeooo:rsid="00193d16" officeooo:paragraph-rsid="00193d16"/>
    </style:style>
    <style:style style:name="P9" style:family="paragraph" style:parent-style-name="Standard" style:list-style-name="L3">
      <style:text-properties fo:color="#008000" officeooo:rsid="00193d16" officeooo:paragraph-rsid="00193d16"/>
    </style:style>
    <style:style style:name="P10" style:family="paragraph" style:parent-style-name="Standard">
      <style:text-properties fo:color="#008000" officeooo:rsid="00193d16" officeooo:paragraph-rsid="001adc92"/>
    </style:style>
    <style:style style:name="P11" style:family="paragraph" style:parent-style-name="Standard">
      <style:text-properties fo:color="#008000" officeooo:rsid="001adc92" officeooo:paragraph-rsid="001adc92"/>
    </style:style>
    <style:style style:name="P12" style:family="paragraph" style:parent-style-name="Standard" style:list-style-name="L4">
      <style:text-properties officeooo:rsid="001adc92" officeooo:paragraph-rsid="001adc92"/>
    </style:style>
    <style:style style:name="P13" style:family="paragraph" style:parent-style-name="Standard" style:list-style-name="L4">
      <style:text-properties officeooo:paragraph-rsid="001adc92"/>
    </style:style>
    <style:style style:name="P14" style:family="paragraph" style:parent-style-name="Standard" style:list-style-name="L4">
      <style:text-properties officeooo:rsid="001e993d" officeooo:paragraph-rsid="001e993d"/>
    </style:style>
    <style:style style:name="P15" style:family="paragraph" style:parent-style-name="Standard">
      <style:text-properties fo:font-style="italic" officeooo:rsid="00193d16" officeooo:paragraph-rsid="001adc92" style:font-style-asian="italic" style:font-style-complex="italic"/>
    </style:style>
    <style:style style:name="P16" style:family="paragraph" style:parent-style-name="Standard">
      <style:text-properties fo:font-style="italic" officeooo:rsid="00193d16" officeooo:paragraph-rsid="001f362c" style:font-style-asian="italic" style:font-style-complex="italic"/>
    </style:style>
    <style:style style:name="P17" style:family="paragraph" style:parent-style-name="Standard">
      <style:text-properties fo:font-style="italic" officeooo:rsid="001adc92" officeooo:paragraph-rsid="001adc92" style:font-style-asian="italic" style:font-style-complex="italic"/>
    </style:style>
    <style:style style:name="T1" style:family="text">
      <style:text-properties fo:color="#008000"/>
    </style:style>
    <style:style style:name="T2" style:family="text">
      <style:text-properties fo:color="#008000" officeooo:rsid="001adc92"/>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ff0000"/>
    </style:style>
    <style:style style:name="T6" style:family="text">
      <style:text-properties officeooo:rsid="001adc9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do you currently use MFs?</text:p>
      <text:list xml:id="list1467782673351022386" text:style-name="L1">
        <text:list-item>
          <text:p text:style-name="P7">Comprehend what the project will do/provide.</text:p>
        </text:list-item>
        <text:list-item>
          <text:p text:style-name="P7">Communicate the intended direction of the project (roadmap).</text:p>
        </text:list-item>
        <text:list-item>
          <text:p text:style-name="P7">Break work down into smaller units.</text:p>
        </text:list-item>
        <text:list-item>
          <text:p text:style-name="P7">Plan versions. (eg. MF-1,2,3 in v1.0, MF-7 in v1.1, etc.)</text:p>
        </text:list-item>
        <text:list-item>
          <text:p text:style-name="P7">Find missing requirements by analysing feature/scope intersections.</text:p>
        </text:list-item>
        <text:list-item>
          <text:p text:style-name="P7">Organise low-level requirements.</text:p>
        </text:list-item>
      </text:list>
      <text:p text:style-name="P2"/>
      <text:p text:style-name="P2">How do you currently use FEs?</text:p>
      <text:p text:style-name="P3"><text:span text:style-name="T1">Actually, as requirements in the strict sense, I don't. However they are present in concept throughout the entire collection of project reqs in the following forms.</text:span></text:p>
      <text:list xml:id="list5098297384983362752" text:style-name="L2">
        <text:list-item>
          <text:p text:style-name="P8">As headers amongst low-level requirements for organisational purposes.</text:p>
        </text:list-item>
        <text:list-item>
          <text:p text:style-name="P8">As MFs sometimes.</text:p>
        </text:list-item>
      </text:list>
      <text:p text:style-name="P6"/>
      <text:p text:style-name="P2">When would you want to treat MFs differently to FEs? Or vica-versa.</text:p>
      <text:p text:style-name="P6">FEs would be too detailed and thus inappropriate for the following:</text:p>
      <text:list xml:id="list1496973544082274371" text:style-name="L3">
        <text:list-item>
          <text:p text:style-name="P9"><text:span text:style-name="T5">*</text:span>Comprehend what the project will do/provide.</text:p>
        </text:list-item>
        <text:list-item>
          <text:p text:style-name="P9"><text:span text:style-name="T5">*</text:span>Communicate the intended direction of the project (roadmap).</text:p>
        </text:list-item>
        <text:list-item>
          <text:p text:style-name="P9"><text:span text:style-name="T5">*</text:span>Plan versions. (eg. MF-1,2,3 in v1.0, MF-7 in v1.1, etc.)</text:p>
        </text:list-item>
        <text:list-item>
          <text:p text:style-name="P9">Find missing requirements by analysing feature/scope intersections.</text:p>
        </text:list-item>
      </text:list>
      <text:p text:style-name="P6">MFs and FEs both could be used for:</text:p>
      <text:list xml:id="list171820785020320" text:continue-numbering="true" text:style-name="L3">
        <text:list-item>
          <text:p text:style-name="P9">Break work down into smaller units.</text:p>
        </text:list-item>
        <text:list-item>
          <text:p text:style-name="P9">Organise low-level requirements.</text:p>
        </text:list-item>
      </text:list>
      <text:p text:style-name="P6">To be honest, it's like this: in most cases, for everything with a <text:span text:style-name="T5">*</text:span>, <text:span text:style-name="T3">at first</text:span><text:span text:style-name="T4"> one would only want to see MFs but there are times/cases where one would want more information and would benefit from being able to see a breakdown of FEs.</text:span></text:p>
      <text:p text:style-name="P2"/>
      <text:p text:style-name="P1">If MFs &amp; FEs were all stored together, how would that affect your usage?</text:p>
      <text:p text:style-name="P11">Often I would only want to see top-level FEs because logically they would be MFs. I'd want to hide the detail of FEs. I'd probably store FEs under a different reqtype or not at all. Maybe I'd use groupings instead.</text:p>
      <text:p text:style-name="P5"/>
      <text:p text:style-name="P1">Why are MFs normally stored separately from FEs?</text:p>
      <text:p text:style-name="P11">Because MFs encompass many smaller parts. Usually MFs correspond with users' perceptions of functionality, where are FEs don't. For most of the business planning, FEs are not even considered because MFs are the starting points and at the right level of detail as the level of planning.</text:p>
      <text:p text:style-name="P1"/>
      <text:p text:style-name="P4"><text:span text:style-name="T6">What is the relationship MFs have with other requirements? What do you need to do in that sense?</text:span></text:p>
      <text:list xml:id="list204726164057705033" text:style-name="L4">
        <text:list-item>
          <text:p text:style-name="P13"><text:span text:style-name="T2">Nearly all low-level requirements (90%+) are driven by MFs. Consequentially, MFs are used to filter low-level requirements, and for that to happen, of course, the LL reqs need to be attributed to MFs. It's also important for traceability.</text:span></text:p>
        </text:list-item>
        <text:list-item>
          <text:p text:style-name="P13"><text:span text:style-name="T2">LL-reqs can be strongly or weakly associated to multiple MFs. Example: MF-A is strongly related because MF-A cannot exist without the req. MF-B is weakly related because if MF-B is implemented, then MF-A needs to cater for it via this requirement, however MF-B can exist without it. </text:span></text:p>
        </text:list-item>
        <text:list-item>
          <text:p text:style-name="P12"><text:span text:style-name="T1">Because I usually use MFs to scope what I'm working on, I often want to filter my view of requirements by the associated MF. I usually just use the strongly related MF to filter what I'm interested in (whitelist). I'm often working on a few MFs at once. It would be nice to also see weakly related reqs of MFs I'm currently working on, I guess.</text:span></text:p>
        </text:list-item>
        <text:list-item>
          <text:p text:style-name="P14"><text:span text:style-name="T1">MFs are also used for progress tracking. Eg. For MF-03, reqs are in 'approved' status, prototype is in 'review' status, etc.</text:span></text:p>
        </text:list-item>
      </text:list>
      <text:p text:style-name="P10"/>
      <text:p text:style-name="P4"/>
      <text:p text:style-name="P15">MF &amp; groupings (MF-07): ?</text:p>
      <text:p text:style-name="P16">MF &amp; sem-ids (MF-12): ?</text:p>
      <text:p text:style-name="P16">MF &amp; req relationships (MF-13):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8T16:01:57.950469364</meta:creation-date>
    <dc:date>2014-05-28T17:18:18.607013696</dc:date>
    <meta:editing-duration>PT45M56S</meta:editing-duration>
    <meta:editing-cycles>5</meta:editing-cycles>
    <meta:generator>LibreOffice/4.2.4.2$Linux_x86 LibreOffice_project/420m0$Build-2</meta:generator>
    <meta:document-statistic meta:table-count="0" meta:image-count="0" meta:object-count="0" meta:page-count="1" meta:paragraph-count="33" meta:word-count="538" meta:character-count="3112" meta:non-whitespace-character-count="2624"/>
  </office:meta>
</office:document-meta>
</file>
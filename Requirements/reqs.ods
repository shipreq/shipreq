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color="#dc23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top"/>
      <style:text-properties style:use-window-font-color="true" style:text-outline="false" style:text-line-through-style="none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3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rganisatio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UCs into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Want to assign groupings to multiple UCs simultaneously, without using the UC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have relationships with other groupings. (Eg. teams are responsible for components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 are directly interested in indirect groupings (Eg. UC → component → team = UC → team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have relationships with groupings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arbitrarily (eg. User creates group of “Stuff they want to review this week”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need user-definable ordering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hould be able to have children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C selection in Shares should be filterable by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.Pri???</text:p>
          </table:table-cell>
          <table:table-cell office:value-type="string" calcext:value-type="string">
            <text:p>Versions have own attributes: release date; status = [pending, in progress, released]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R.PriLow</text:p>
          </table:table-cell>
          <table:table-cell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want to know when a mandatory grouping isn't applied to a req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ometimes apply only to a portion of a UC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4">st</text:span>-class like UCs, Projects, Share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office:annotation draw:style-name="gr1" draw:text-style-name="P1" svg:width="6.241cm" svg:height="3.507cm" svg:x="15.99cm" svg:y="11.767cm" draw:caption-point-x="4.196cm" draw:caption-point-y="-0.853cm">
              <dc:date>2014-02-05T00:00:00</dc:date>
              <text:p text:style-name="P1"><text:span text:style-name="T1">I can't remember wtf I meant by this. Probably: UC scheduled for v1 but step 2.0.4 can't be implemented until v2. This isn't an issue with atomic reqs rather than composite reqs (UCs).</text:span></text:p>
            </office:annotation>
            <text:p>There is overlap between groupings and UC fields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 attributes will be of little impact if absent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 descriptions will be useful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ample Groupi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ample Grouping Relations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onent ↔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ority ↔ Compon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ority ↔ Fe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sion ↔ Released Status (?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/UC. (?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 across all UCs. (?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to-populate mandatory fields with TODOs in new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usually coloured red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ncompletion, or pending condition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ifferent types of incompletions may be considered less of less importance than other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ncompletions, the user may not understand some incompletions without context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ncompletions, the user must be able to comprehend each item in context without leaving the pag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nam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field in which it occur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TODO/TBD's supplimentary info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TODO/TBD that doesn't contain supplimentary info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invalid referenc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the containing sentence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just a number of words before the tag (important) and a number after (less important)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ncompletion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ce8" office:value-type="string" calcext:value-type="string">
            <text:p>mandatoryness changes, analy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ncompletion typ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UC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-defined tags: TODO, TBD.</text:p>
          </table:table-cell>
          <table:table-cell/>
          <table:table-cell table:style-name="ce8" office:value-type="string" calcext:value-type="string">
            <text:p>how to CRUDL tags????</text:p>
          </table:table-cell>
          <table:table-cell table:number-columns-repeated="1020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5">
          <table:table-cell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Field Management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-sets apply to all UCs in a project. (Sometimes not true but not worth the effort.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pending on [Completeness Evaluation], provide a default FV when adding new field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considering fieldset changes, user doesn't have a way of knowing how in-use each field i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Different projects have need different fields in their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times people don't realise what fields they need until they write a few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need to use the same field-set as another project (without manually recreating the field-set)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must be able to rename fields while in use.</text:p>
          </table:table-cell>
          <table:table-cell table:style-name="ce8" office:value-type="string" calcext:value-type="string">
            <text:p>Consider affect on baselined docs &amp; audit trail?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must be able to change the order of fields.</text:p>
          </table:table-cell>
          <table:table-cell table:style-name="ce8" office:value-type="string" calcext:value-type="string">
            <text:p>Consider affect on baselined docs &amp; audit trail?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may need to see the content of a deleted field when editing a UC.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may need to restore a deleted field (and its content across all UCs).</text:p>
          </table:table-cell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ad All UCs &amp; Generate PDF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reading/printing multiple UCs in publish-mode, not all UCs are relevant to my needs. Must filter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printing multiple UCs, I'm unable to add a title or a preface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 want to share UCs out-of-the-system (eg. In-person), rather than online. This is a subset of the sharing featur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A needs to read multiple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A needs to print multiple UCs.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0:43:33.793033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06T11:52:17.519130136</dc:date>
    <meta:editing-duration>PT4H27M17S</meta:editing-duration>
    <meta:editing-cycles>12</meta:editing-cycles>
    <meta:generator>LibreOffice/4.1.4.2$Linux_X86_64 LibreOffice_project/410m0$Build-2</meta:generator>
    <meta:document-statistic meta:table-count="1" meta:cell-count="238" meta:object-count="0"/>
  </office:meta>
</office:document-meta>
</file>
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able table:name="Organisatio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verwhelming to view all UCs as flat lis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UCs into grouping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.</text:p>
          </table:table-cell>
        </table:table-row>
        <table:table-row table:style-name="ro2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Want to assign groupings to multiple UCs simultaneously, without using the UC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have relationships with other groupings. (Eg. teams are responsible for component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are directly interested in indirectly groupings (Eg. UC → component → team = UC → team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have relationships with groupings (eg. User A is <text:span text:style-name="T1">part of</text:span><text:span text:style-name="T2"> team X)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arbitrarily (eg. User creates group of “Stuff they want to review this week”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need user-definable order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hould be able to have children grouping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C selection in Shares should be filterable by grouping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.Pri???</text:p>
          </table:table-cell>
          <table:table-cell office:value-type="string" calcext:value-type="string">
            <text:p>Versions have own attributes: release date; status = [pending, in progress, released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.PriLow</text:p>
          </table:table-cell>
          <table:table-cell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are mandator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want to know when mandatory groupings are miss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ometimes apply only to a portion of a UC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3">st</text:span>-class like UCs, Projects, Shares.</text:p>
          </table:table-cell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There is overlap between groupings and UC fiel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mple Group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1.0, 1.1.x, 1.1.3, 1.2, 2.0, Post SEGA 2a</text:p>
          </table:table-cell>
        </table:table-row>
        <table:table-row table:style-name="ro2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ront-end, JS, Auth service</text:p>
          </table:table-cell>
        </table:table-row>
        <table:table-row table:style-name="ro1">
          <table:table-cell/>
          <table:table-cell office:value-type="string" calcext:value-type="string">
            <text:p>Issue Type</text:p>
          </table:table-cell>
          <table:table-cell office:value-type="string" calcext:value-type="string">
            <text:p>Enhancement, Defect, New Functionality</text:p>
          </table:table-cell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Change Management, Risk Analysis</text:p>
          </table:table-cell>
        </table:table-row>
        <table:table-row table:style-name="ro1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, L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mple Grouping Relationshi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nent ↔ Te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ority ↔ Compon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ority ↔ Fe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 ↔ Released Status (?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ag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/UC. (?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 across all Ucs. (?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have important attribut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to-populate mandatory fields with TODOs in new Ucs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ield Management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 sets apply to all Ucs in a project. (Sometimes not true but not worth the effort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pending on [Completeness Evaluation], provide a default FV when adding new field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considering fieldset changes, user doesn't have a way of knowing how in-use each field is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Read All Ucs &amp; Generate PDF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Ucs in publish-mode, not all Ucs are relevant to my needs. Must filt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printing multiple Ucs, I'm unable to add a title or a prefac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 want to share UCs out-of-the-system (eg. In-person), rather than online. This is a subset of the sharing feature.</text:p>
          </table:table-cell>
        </table:table-row>
        <table:table-row table:style-name="ro1" table:number-rows-repeated="104851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0:54:08.494827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3-12-23T12:20:47.977898712</dc:date>
    <meta:editing-duration>PT1H46M36S</meta:editing-duration>
    <meta:editing-cycles>8</meta:editing-cycles>
    <meta:generator>LibreOffice/4.1.4.2$Linux_x86 LibreOffice_project/410m0$Build-2</meta:generator>
    <meta:document-statistic meta:table-count="1" meta:cell-count="138" meta:object-count="0"/>
  </office:meta>
</office:document-meta>
</file>
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8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420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spreadsheet>
      <table:table table:name="Organisation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rganisation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Overwhelming to view all UCs as flat list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roup UCs into grouping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ilter by groupings.</text:p>
          </table:table-cell>
        </table:table-row>
        <table:table-row table:style-name="ro2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Want to assign groupings to multiple UCs simultaneously, without using the UCE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Groupings have relationships with other groupings. (Eg. teams are responsible for component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are directly interested in indirectly groupings (Eg. UC → component → team = UC → team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have relationships with groupings (eg. User A is <text:span text:style-name="T1">part of</text:span><text:span text:style-name="T2"> team X)</text:span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roup arbitrarily (eg. User creates group of “Stuff they want to review this week”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 groupings need user-definable ordering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Groupings should be able to have children grouping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C selection in Shares should be filterable by grouping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.Pri???</text:p>
          </table:table-cell>
          <table:table-cell office:value-type="string" calcext:value-type="string">
            <text:p>Versions have own attributes: release date; status = [pending, in progress, released]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.PriLow</text:p>
          </table:table-cell>
          <table:table-cell office:value-type="string" calcext:value-type="string">
            <text:p>Impose existential rules on UC→Groupings. (Eg. exactly 1 ver/UC, 0..n components/UC). NOTE: This is fails when groupings are applied conditionally, or only to a portion of a UC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 groupings are mandatory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want to know when mandatory groupings are missing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Groupings sometimes apply only to a portion of a UC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eature Tree diagr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ouping graph/t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 have their own prioritie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' priorities affect UCs' prioritie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iew and navigate top-level Groupings as 1<text:span text:style-name="T3">st</text:span>-class like UCs, Projects, Shares.</text:p>
          </table:table-cell>
        </table:table-row>
        <table:table-row table:style-name="ro1"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text:p>There is overlap between groupings and UC field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Some groupings should be displayed in publish-mode. (?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How will grouping affect UC revisions?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ample Group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1.0, 1.1.x, 1.1.3, 1.2, 2.0, Post SEGA 2a</text:p>
          </table:table-cell>
        </table:table-row>
        <table:table-row table:style-name="ro2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Front-end, JS, Auth service</text:p>
          </table:table-cell>
        </table:table-row>
        <table:table-row table:style-name="ro1">
          <table:table-cell/>
          <table:table-cell office:value-type="string" calcext:value-type="string">
            <text:p>Issue Type</text:p>
          </table:table-cell>
          <table:table-cell office:value-type="string" calcext:value-type="string">
            <text:p>Enhancement, Defect, New Functionality</text:p>
          </table:table-cell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Change Management, Risk Analysis</text:p>
          </table:table-cell>
        </table:table-row>
        <table:table-row table:style-name="ro1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High, Lo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ample Grouping Relationshi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onent ↔ Te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ority ↔ Compon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ority ↔ Feat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ion ↔ Released Status (?)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Completeness Evalua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determine whether it's complete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placeholders for pending info. (TODOs, TBDs et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empty field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invalid tokens. ([DELETED], [1.2?] etc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want to know how many incompletions/UC. (?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want to know how many incompletions across all Ucs. (?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 fields are mandatory, some are ok empty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ny bulk-UC incompleteness analysis should accept a filter on the UC scop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ncompletions have important attribute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uto-populate mandatory fields with TODOs in new Ucs.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Field Management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ield sets apply to all Ucs in a project. (Sometimes not true but not worth the effort.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pending on [Completeness Evaluation], provide a default FV when adding new field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considering fieldset changes, user doesn't have a way of knowing how in-use each field is.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style-name="ce1" office:value-type="string" calcext:value-type="string">
            <text:p>Read All Ucs &amp; Generate PDF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viewing multiple Ucs in publish-mode, not all Ucs are relevant to my needs. Must filter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printing multiple Ucs, I'm unable to add a title or a prefac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 want to share UCs out-of-the-system (eg. In-person), rather than online. This is a subset of the sharing feature.</text:p>
          </table:table-cell>
        </table:table-row>
        <table:table-row table:style-name="ro3">
          <table:table-cell table:number-columns-repeated="3"/>
        </table:table-row>
        <table:table-row table:style-name="ro1" table:number-rows-repeated="104851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 style:data-style-name="N2" text:time-value="0000-00-00T16:07:52.828604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7:45:55.440643359</meta:creation-date>
    <dc:date>2014-01-17T16:18:09.268388951</dc:date>
    <meta:editing-duration>PT1H46M36S</meta:editing-duration>
    <meta:editing-cycles>9</meta:editing-cycles>
    <meta:generator>LibreOffice/4.1.4.2$Linux_X86_64 LibreOffice_project/410m0$Build-2</meta:generator>
    <meta:document-statistic meta:table-count="1" meta:cell-count="138" meta:object-count="0"/>
  </office:meta>
</office:document-meta>
</file>
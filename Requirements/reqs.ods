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8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Overwhelming to view all UCs as flat lis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roup UCs into grouping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ilter by groupings.</text:p>
          </table:table-cell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Want to assign groupings to multiple UCs simultaneously, without using the UC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s have relationships with other groupings. (Eg. teams are responsible for component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are directly interested in indirectly groupings (Eg. UC → component → team = UC → tea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have relationships with groupings (eg. User A is <text:span text:style-name="T1">part of</text:span><text:span text:style-name="T2"> team X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roup arbitrarily (eg. User creates group of “Stuff they want to review this week”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groupings need user-definable ordering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s should be able to have children grouping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C selection in Shares should be filterable by grouping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S.Pri???</text:p>
          </table:table-cell>
          <table:table-cell office:value-type="string" calcext:value-type="string">
            <text:p>Versions have own attributes: release date; status = [pending, in progress, released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.PriLow</text:p>
          </table:table-cell>
          <table:table-cell office:value-type="string" calcext:value-type="string">
            <text:p>Impose existential rules on UC→Groupings. (Eg. exactly 1 ver/UC, 0..n components/UC). NOTE: This is fails when groupings are applied conditionally, or only to a portion of a UC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Some groupings are mandatory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Users want to know when mandatory groupings are missing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Groupings sometimes apply only to a portion of a UC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eature Tree diagra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ouping graph/tabl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 have their own prioriti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Features' priorities affect UCs' prioriti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iew and navigate top-level Groupings as 1<text:span text:style-name="T3">st</text:span>-class like UCs, Projects, Shares.</text:p>
          </table:table-cell>
        </table:table-row>
        <table:table-row table:style-name="ro2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There is overlap between groupings and UC field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me groupings should be displayed in publish-mode. (?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How will grouping affect UC revisions?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ample Grouping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1.0, 1.1.x, 1.1.3, 1.2, 2.0, Post SEGA 2a</text:p>
          </table:table-cell>
        </table:table-row>
        <table:table-row table:style-name="ro1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Front-end, JS, Auth service</text:p>
          </table:table-cell>
        </table:table-row>
        <table:table-row table:style-name="ro2">
          <table:table-cell/>
          <table:table-cell office:value-type="string" calcext:value-type="string">
            <text:p>Issue Type</text:p>
          </table:table-cell>
          <table:table-cell office:value-type="string" calcext:value-type="string">
            <text:p>Enhancement, Defect, New Functionality</text:p>
          </table:table-cell>
        </table:table-row>
        <table:table-row table:style-name="ro2"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Change Management, Risk Analysis</text:p>
          </table:table-cell>
        </table:table-row>
        <table:table-row table:style-name="ro2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High, Low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ample Grouping Relationship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ponent ↔ Te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ority ↔ Compon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ority ↔ Feat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sion ↔ Released Status (?)</text:p>
          </table:table-cell>
          <table:table-cell/>
        </table:table-row>
        <table:table-row table:style-name="ro2" table:number-rows-repeated="104853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ianZhen" style:font-family-asian="TianZhe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 style:data-style-name="N2" text:time-value="0000-00-00T14:30:27.864745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7:45:55.440643359</meta:creation-date>
    <dc:date>2013-12-20T15:27:15.883646677</dc:date>
    <meta:editing-duration>PT50M27S</meta:editing-duration>
    <meta:editing-cycles>5</meta:editing-cycles>
    <meta:generator>LibreOffice/4.1.4.2$Linux_x86 LibreOffice_project/410m0$Build-2</meta:generator>
    <meta:document-statistic meta:table-count="1" meta:cell-count="86" meta:object-count="0"/>
  </office:meta>
</office:document-meta>
</file>
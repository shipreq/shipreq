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4.817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5.9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ro4" style:family="table-row">
      <style:table-row-properties style:row-height="2.1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Arimo" style:font-name-asian="TianZhen" style:font-name-complex="FreeSans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color="#ff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vertical-align="top"/>
      <style:text-properties fo:color="#008000"/>
    </style:style>
    <style:style style:name="ce1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008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ll use cases in a project share the same field-set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A field-set cannot contain more than 30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Each field name in a field-set must be unique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C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 field-set cannot be empty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When modifying fields, BA shall be able to remove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When modifying fields, BA shall be able to add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When modifying fields, BA shall be able to modify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When modifying fields, BA shall be able to reorder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When modifying fields, System shall indicate how many UCs have non-default content for each field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When modifying fields, BA shall be able to see each instance of non-default content for a field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UC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Modify a Project's Fields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BA shall be able to apply groupings to multiple UCs simultaneously (without using the UCE)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A shall be able to remove groupings to multiple UCs simultaneously (without using the UCE)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BA shall be able to filter their view of a project's UCs b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When modifying groupings, BA shall be able to create a tree of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When modifying groupings in a tree, BA shall be able to specify the order of children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When modifying groupings in a tree, BA shall be able to specify multiple parents of a child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BA shall be able to create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ore detail required? constraints? fields = name, desc. 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BA shall be able to modif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ore detail required?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BA shall be able to delete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ore detail required?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BA shall be able to list all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UC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Inspect application of groupings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BA shall be able to apply groupings to UC using the UCE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A shall be able to remove groupings to UC using the UCE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ultiple? if so, \/ or /\ unions?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BA shall be able to filter shares' UC selection criteria b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When reading own UCs, BA shall be able to filter UCs b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When reading shared UCs, AnonReader shall be able to filter UCs by groupings. [Pri=Nice]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ntersection probs" table:style-name="ta1">
        <table:table-column table:style-name="co8" table:number-columns-repeated="2" table:default-cell-style-name="ce14"/>
        <table:table-column table:style-name="co9" table:default-cell-style-name="ce17"/>
        <table:table-column table:style-name="co10" table:default-cell-style-name="ce17"/>
        <table:table-column table:style-name="co7" table:number-columns-repeated="1020" table:default-cell-style-name="ce14"/>
        <table:table-row table:style-name="ro1">
          <table:table-cell table:style-name="ce13" office:value-type="string" calcext:value-type="string">
            <text:p>MF-α</text:p>
          </table:table-cell>
          <table:table-cell table:style-name="ce13" office:value-type="string" calcext:value-type="string">
            <text:p>MF-β</text:p>
          </table:table-cell>
          <table:table-cell table:style-name="ce16" office:value-type="string" calcext:value-type="string">
            <text:p>Concern</text:p>
          </table:table-cell>
          <table:table-cell table:style-name="ce16" office:value-type="string" calcext:value-type="string">
            <text:p>Conclusion</text:p>
          </table:table-cell>
          <table:table-cell table:style-name="ce13" table:number-columns-repeated="1020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Field Customisation</text:p>
          </table:table-cell>
          <table:table-cell table:style-name="ce15" office:value-type="string" calcext:value-type="string">
            <text:p>Organisation</text:p>
          </table:table-cell>
          <table:table-cell table:style-name="ce18" office:value-type="string" calcext:value-type="string">
            <text:p>When FSs with grouping-display-fields are shared, what happens when referenced groupings are updated.</text:p>
          </table:table-cell>
          <table:table-cell table:style-name="ce18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11" table:default-cell-style-name="Default"/>
        <table:table-column table:style-name="co7" table:number-columns-repeated="6" table:default-cell-style-name="ce4"/>
        <table:table-column table:style-name="co7" table:default-cell-style-name="Default"/>
        <table:table-row table:style-name="ro1">
          <table:table-cell table:style-name="ce6" office:value-type="string" calcext:value-type="string">
            <text:p>SUBJEC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" office:value-type="string" calcext:value-type="string">
            <text:p>CARD/QTY</text:p>
          </table:table-cell>
        </table:table-row>
        <table:table-row table:style-name="ro1">
          <table:table-cell table:style-name="ce7" office:value-type="string" calcext:value-type="string">
            <text:p>Field-set</text:p>
          </table:table-cell>
          <table:table-cell table:style-name="ce5" office:value-type="string" calcext:value-type="string">
            <text:p>invis</text:p>
          </table:table-cell>
          <table:table-cell table:number-columns-repeated="2" table:style-name="ce5" office:value-type="string" calcext:value-type="string">
            <text:p>UC-9</text:p>
          </table:table-cell>
          <table:table-cell table:style-name="ce5" office:value-type="string" calcext:value-type="string">
            <text:p>invis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UC-9</text:p>
          </table:table-cell>
        </table:table-row>
        <table:table-row table:style-name="ro1">
          <table:table-cell table:style-name="ce7" office:value-type="string" calcext:value-type="string">
            <text:p>Field</text:p>
          </table:table-cell>
          <table:table-cell table:number-columns-repeated="7" table:style-name="ce5" office:value-type="string" calcext:value-type="string">
            <text:p>UC-9</text:p>
          </table:table-cell>
        </table:table-row>
        <table:table-row table:style-name="ro1">
          <table:table-cell table:style-name="ce7" office:value-type="string" calcext:value-type="string">
            <text:p>Grouping</text:p>
          </table:table-cell>
          <table:table-cell table:style-name="ce5" table:number-columns-repeated="7"/>
        </table:table-row>
        <table:table-row table:style-name="ro1">
          <table:table-cell table:style-name="ce7" office:value-type="string" calcext:value-type="string">
            <text:p>Grouping link relationship</text:p>
          </table:table-cell>
          <table:table-cell table:style-name="ce5" table:number-columns-repeated="7"/>
        </table:table-row>
        <table:table-row table:style-name="ro1">
          <table:table-cell table:style-name="ce7" office:value-type="string" calcext:value-type="string">
            <text:p>Grouping tree relationship</text:p>
          </table:table-cell>
          <table:table-cell table:style-name="ce5" table:number-columns-repeated="7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eqs.A1:reqs.F2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15:32:51.593853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10T18:56:30.976536105</dc:date>
    <meta:editing-duration>PT1H29M27S</meta:editing-duration>
    <meta:editing-cycles>6</meta:editing-cycles>
    <meta:generator>LibreOffice/4.1.4.2$Linux_X86_64 LibreOffice_project/410m0$Build-2</meta:generator>
    <meta:document-statistic meta:table-count="3" meta:cell-count="201" meta:object-count="0"/>
  </office:meta>
</office:document-meta>
</file>
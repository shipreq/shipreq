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14.15mm"/>
    </style:style>
    <style:style style:name="co18" style:family="table-column">
      <style:table-column-properties fo:break-before="auto" style:column-width="11.87mm"/>
    </style:style>
    <style:style style:name="co19" style:family="table-column">
      <style:table-column-properties fo:break-before="auto" style:column-width="7.41mm"/>
    </style:style>
    <style:style style:name="co20" style:family="table-column">
      <style:table-column-properties fo:break-before="auto" style:column-width="148.17mm"/>
    </style:style>
    <style:style style:name="co21" style:family="table-column">
      <style:table-column-properties fo:break-before="auto" style:column-width="28.03mm"/>
    </style:style>
    <style:style style:name="co22" style:family="table-column">
      <style:table-column-properties fo:break-before="auto" style:column-width="45.31mm"/>
    </style:style>
    <style:style style:name="co15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32.35mm"/>
    </style:style>
    <style:style style:name="co24" style:family="table-column">
      <style:table-column-properties fo:break-before="auto" style:column-width="83.77mm"/>
    </style:style>
    <style:style style:name="co25" style:family="table-column">
      <style:table-column-properties fo:break-before="auto" style:column-width="24.52mm"/>
    </style:style>
    <style:style style:name="co27" style:family="table-column">
      <style:table-column-properties fo:break-before="auto" style:column-width="105.32mm"/>
    </style:style>
    <style:style style:name="co13" style:family="table-column">
      <style:table-column-properties fo:break-before="auto" style:column-width="13.81mm"/>
    </style:style>
    <style:style style:name="co14" style:family="table-column">
      <style:table-column-properties fo:break-before="auto" style:column-width="13.04mm"/>
    </style:style>
    <style:style style:name="co26" style:family="table-column">
      <style:table-column-properties fo:break-before="auto" style:column-width="19.01mm"/>
    </style:style>
    <style:style style:name="co28" style:family="table-column">
      <style:table-column-properties fo:break-before="auto" style:column-width="37.31mm"/>
    </style:style>
    <style:style style:name="co29" style:family="table-column">
      <style:table-column-properties fo:break-before="auto" style:column-width="149.15mm"/>
    </style:style>
    <style:style style:name="co30" style:family="table-column">
      <style:table-column-properties fo:break-before="auto" style:column-width="18.96mm"/>
    </style:style>
    <style:style style:name="co31" style:family="table-column">
      <style:table-column-properties fo:break-before="auto" style:column-width="42.9mm"/>
    </style:style>
    <style:style style:name="co32" style:family="table-column">
      <style:table-column-properties fo:break-before="auto" style:column-width="18.91mm"/>
    </style:style>
    <style:style style:name="co33" style:family="table-column">
      <style:table-column-properties fo:break-before="auto" style:column-width="15.7mm"/>
    </style:style>
    <style:style style:name="co34" style:family="table-column">
      <style:table-column-properties fo:break-before="auto" style:column-width="16.86mm"/>
    </style:style>
    <style:style style:name="co35" style:family="table-column">
      <style:table-column-properties fo:break-before="auto" style:column-width="20.96mm"/>
    </style:style>
    <style:style style:name="co36" style:family="table-column">
      <style:table-column-properties fo:break-before="auto" style:column-width="20.37mm"/>
    </style:style>
    <style:style style:name="co37" style:family="table-column">
      <style:table-column-properties fo:break-before="auto" style:column-width="25.91mm"/>
    </style:style>
    <style:style style:name="co38" style:family="table-column">
      <style:table-column-properties fo:break-before="auto" style:column-width="18.63mm"/>
    </style:style>
    <style:style style:name="co39" style:family="table-column">
      <style:table-column-properties fo:break-before="auto" style:column-width="61.24mm"/>
    </style:style>
    <style:style style:name="ro1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2.95mm" fo:break-before="auto" style:use-optimal-row-height="true"/>
    </style:style>
    <style:style style:name="ro14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5.08mm" fo:break-before="auto" style:use-optimal-row-height="false"/>
    </style:style>
    <style:style style:name="ro3" style:family="table-row">
      <style:table-row-properties style:row-height="8.96mm" fo:break-before="auto" style:use-optimal-row-height="true"/>
    </style:style>
    <style:style style:name="ro10" style:family="table-row">
      <style:table-row-properties style:row-height="17.18mm" fo:break-before="auto" style:use-optimal-row-height="true"/>
    </style:style>
    <style:style style:name="ro16" style:family="table-row">
      <style:table-row-properties style:row-height="4.78mm" fo:break-before="auto" style:use-optimal-row-height="true"/>
    </style:style>
    <style:style style:name="ro17" style:family="table-row">
      <style:table-row-properties style:row-height="25.65mm" fo:break-before="auto" style:use-optimal-row-height="true"/>
    </style:style>
    <style:style style:name="ro18" style:family="table-row">
      <style:table-row-properties style:row-height="13.14mm" fo:break-before="auto" style:use-optimal-row-height="true"/>
    </style:style>
    <style:style style:name="ro19" style:family="table-row">
      <style:table-row-properties style:row-height="21.41mm" fo:break-before="auto" style:use-optimal-row-height="true"/>
    </style:style>
    <style:style style:name="ro20" style:family="table-row">
      <style:table-row-properties style:row-height="29.88mm" fo:break-before="auto" style:use-optimal-row-height="true"/>
    </style:style>
    <style:style style:name="ro21" style:family="table-row">
      <style:table-row-properties style:row-height="42.3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text-position=""/>
    </style:style>
    <style:style style:name="ce105" style:family="table-cell" style:parent-style-name="Default">
      <style:table-cell-properties fo:wrap-option="wrap" style:vertical-align="top"/>
      <style:text-properties style:text-position=""/>
    </style:style>
    <style:style style:name="ce10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style:text-position=""/>
    </style:style>
    <style:style style:name="ce138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141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mm"/>
      <style:text-properties style:text-position=""/>
    </style:style>
    <style:style style:name="ce142" style:family="table-cell" style:parent-style-name="Default">
      <style:table-cell-properties fo:background-color="#e6e6e6" fo:wrap-option="wrap" fo:border="0.06pt solid #000000" style:vertical-align="top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wrap-option="wrap" fo:border="0.06pt solid #000000" style:vertical-align="top"/>
      <style:text-properties style:text-position="" fo:font-size="10pt" style:font-size-asian="10pt" style:font-size-complex="10pt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order="0.06pt solid #000000" style:vertical-align="top"/>
      <style:text-properties style:text-position=""/>
    </style:style>
    <style:style style:name="ce71" style:family="table-cell" style:parent-style-name="Default">
      <style:table-cell-properties style:vertical-align="top"/>
      <style:text-properties style:text-position=""/>
    </style:style>
    <style:style style:name="ce73" style:family="table-cell" style:parent-style-name="Default">
      <style:table-cell-properties fo:wrap-option="wrap" fo:border="0.06pt solid #000000" style:vertical-align="top"/>
      <style:text-properties style:text-position="" style:font-name="Arimo" style:font-name-asian="TianZhen" style:font-name-complex="FreeSans"/>
    </style:style>
    <style:style style:name="ce75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145" style:family="table-cell" style:parent-style-name="Default">
      <style:table-cell-properties fo:background-color="#aecf00" fo:border="0.06pt solid #000000"/>
      <style:text-properties style:text-position="" fo:font-weight="bold" style:font-weight-asian="bold" style:font-weight-complex="bold"/>
    </style:style>
    <style:style style:name="ce146" style:family="table-cell" style:parent-style-name="Default">
      <style:table-cell-properties fo:wrap-option="wrap"/>
      <style:text-properties style:text-position="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48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9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mm"/>
      <style:text-properties style:text-position="" fo:font-weight="bold" style:font-weight-asian="bold" style:font-weight-complex="bold"/>
    </style:style>
    <style:style style:name="ce15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51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mm"/>
      <style:text-properties style:text-position=""/>
    </style:style>
    <style:style style:name="ce152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color="#000080" style:text-position="" fo:font-weight="bold" style:font-weight-asian="bold" style:font-weight-complex="bold"/>
    </style:style>
    <style:style style:name="ce15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5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mm"/>
      <style:text-properties style:text-position="" fo:font-style="italic" style:font-style-asian="italic" style:font-style-complex="italic"/>
    </style:style>
    <style:style style:name="ce155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56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mm"/>
      <style:text-properties fo:color="#000080" style:text-position="" fo:font-weight="bold" style:font-weight-asian="bold" style:font-weight-complex="bold"/>
    </style:style>
    <style:style style:name="ce157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mm"/>
      <style:text-properties style:text-position=""/>
    </style:style>
    <style:style style:name="ce159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style:use-window-font-color="true" style:text-position="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51" style:family="table-cell" style:parent-style-name="Default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3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40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mm"/>
    </style:style>
    <style:style style:name="ce41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4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mm"/>
      <style:text-properties style:use-window-font-color="true"/>
    </style:style>
    <style:style style:name="ce43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mm"/>
      <style:text-properties fo:color="#ffffff"/>
    </style:style>
    <style:style style:name="ce45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4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4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52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53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5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5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5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 fo:font-style="italic" style:font-style-asian="italic" style:font-style-complex="italic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59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mm"/>
      <style:text-properties fo:color="#ffffff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style:use-window-font-color="true"/>
    </style:style>
    <style:style style:name="ce62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6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6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67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6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70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mm"/>
    </style:style>
    <style:style style:name="ce7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mm"/>
      <style:text-properties style:use-window-font-color="true"/>
    </style:style>
    <style:style style:name="ce80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82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8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8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 fo:font-weight="bold" style:font-weight-asian="bold" style:font-weight-complex="bold"/>
    </style:style>
    <style:style style:name="ce8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 fo:font-style="italic" style:font-style-asian="italic" style:font-style-complex="italic"/>
    </style:style>
    <style:style style:name="ce87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order="0.06pt solid #000000" style:vertical-align="top"/>
    </style:style>
    <style:style style:name="ce89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="0.06pt solid #000000"/>
    </style:style>
    <style:style style:name="ce93" style:family="table-cell" style:parent-style-name="Default">
      <style:table-cell-properties fo:background-color="#ffffcc" fo:border="0.06pt solid #000000" style:vertical-align="top"/>
    </style:style>
    <style:style style:name="ce94" style:family="table-cell" style:parent-style-name="Default">
      <style:table-cell-properties fo:border="0.06pt solid #000000" style:vertical-align="top"/>
      <style:text-properties style:use-window-font-color="true"/>
    </style:style>
    <style:style style:name="ce95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ackground-color="transparent" fo:border="0.06pt solid #000000" style:vertical-align="top"/>
    </style:style>
    <style:style style:name="ce98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99" style:family="table-cell" style:parent-style-name="Default">
      <style:table-cell-properties fo:border="0.06pt solid #000000" style:vertical-align="top"/>
      <style:text-properties style:use-window-font-color="true" fo:font-weight="normal" style:font-weight-asian="normal" style:font-weight-complex="normal"/>
    </style:style>
    <style:style style:name="ce100" style:family="table-cell" style:parent-style-name="Default">
      <style:table-cell-properties fo:background-color="#008000" style:vertical-align="top"/>
      <style:text-properties fo:color="#ffffff"/>
    </style:style>
    <style:style style:name="ce101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cccccc" style:vertical-align="top"/>
      <style:text-properties style:use-window-font-color="true"/>
    </style:style>
    <style:style style:name="ce103" style:family="table-cell" style:parent-style-name="Default">
      <style:table-cell-properties fo:border="0.06pt solid #000000" style:vertical-align="top"/>
      <style:text-properties fo:color="#b3b3b3"/>
    </style:style>
    <style:style style:name="ce104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107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108" style:family="table-cell" style:parent-style-name="Default">
      <style:table-cell-properties fo:border="0.06pt solid #000000" style:vertical-align="top"/>
      <style:text-properties fo:color="#999999"/>
    </style:style>
    <style:style style:name="ce109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110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111" style:family="table-cell" style:parent-style-name="Default">
      <style:table-cell-properties fo:border="0.06pt solid #000000" style:vertical-align="top"/>
      <style:text-properties fo:color="#b3b3b3" fo:font-style="italic" style:font-style-asian="italic" style:font-style-complex="italic"/>
    </style:style>
    <style:style style:name="ce112" style:family="table-cell" style:parent-style-name="Default">
      <style:table-cell-properties fo:border="0.06pt solid #000000" style:vertical-align="top"/>
      <style:text-properties fo:color="#b3b3b3" fo:font-weight="normal" style:font-weight-asian="normal" style:font-weight-complex="normal"/>
    </style:style>
    <style:style style:name="ce113" style:family="table-cell" style:parent-style-name="Default">
      <style:table-cell-properties style:vertical-align="top"/>
    </style:style>
    <style:style style:name="ce114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115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116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17" style:family="table-cell" style:parent-style-name="Default">
      <style:table-cell-properties fo:wrap-option="wrap" fo:border="0.06pt solid #000000" style:vertical-align="top"/>
    </style:style>
    <style:style style:name="ce118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119" style:family="table-cell" style:parent-style-name="Default">
      <style:table-cell-properties fo:wrap-option="wrap" fo:border="0.06pt solid #000000"/>
    </style:style>
    <style:style style:name="ce120" style:family="table-cell" style:parent-style-name="Default">
      <style:table-cell-properties fo:background-color="transparent" fo:wrap-option="wrap" fo:border="0.06pt solid #000000" style:vertical-align="top"/>
    </style:style>
    <style:style style:name="ce121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22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123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124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125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27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129" style:family="table-cell" style:parent-style-name="Default">
      <style:table-cell-properties fo:background-color="#ffffcc" fo:wrap-option="wrap" fo:border="0.06pt solid #000000"/>
    </style:style>
    <style:style style:name="ce130" style:family="table-cell" style:parent-style-name="Default">
      <style:table-cell-properties fo:wrap-option="wrap" fo:border="0.06pt solid #000000" style:vertical-align="top"/>
      <style:text-properties style:font-name="Arimo" style:font-name-asian="Lucida Sans Unicode" style:font-name-complex="FreeSans"/>
    </style:style>
    <style:style style:name="ce131" style:family="table-cell" style:parent-style-name="Default">
      <style:table-cell-properties fo:wrap-option="wrap" fo:border="0.06pt solid #000000" style:vertical-align="top"/>
      <style:text-properties style:use-window-font-color="true" style:font-name="Arimo" style:font-name-asian="TianZhen" style:font-name-complex="FreeSans"/>
    </style:style>
    <style:style style:name="ce132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133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134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135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136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137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140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161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163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164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65" style:family="table-cell" style:parent-style-name="Default">
      <style:table-cell-properties fo:wrap-option="wrap" fo:border="0.06pt solid #000000" style:vertical-align="top"/>
      <style:text-properties fo:color="#b3b3b3" fo:font-style="italic" style:font-style-asian="italic" style:font-style-complex="italic"/>
    </style:style>
    <style:style style:name="ce166" style:family="table-cell" style:parent-style-name="Default">
      <style:table-cell-properties fo:wrap-option="wrap" fo:border="0.06pt solid #000000"/>
      <style:text-properties fo:color="#b3b3b3"/>
    </style:style>
    <style:style style:name="ce167" style:family="table-cell" style:parent-style-name="Default">
      <style:table-cell-properties fo:wrap-option="wrap" style:vertical-align="top"/>
    </style:style>
    <style:style style:name="ce16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69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mm"/>
    </style:style>
    <style:style style:name="ce170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171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17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style:use-window-font-color="true"/>
    </style:style>
    <style:style style:name="ce173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7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176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77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17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17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180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 fo:font-style="italic" style:font-style-asian="italic" style:font-style-complex="italic"/>
    </style:style>
    <style:style style:name="ce181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82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83" style:family="table-cell" style:parent-style-name="Default">
      <style:table-cell-properties fo:background-color="#ffffcc" fo:wrap-option="wrap" fo:border="0.06pt solid #000000" style:vertical-align="top"/>
    </style:style>
    <style:style style:name="ce184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86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87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88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90" style:family="table-cell" style:parent-style-name="Default">
      <style:table-cell-properties fo:wrap-option="wrap" fo:border="0.06pt solid #000000" style:vertical-align="top"/>
      <style:text-properties fo:color="#b3b3b3" fo:font-style="normal" fo:font-weight="normal" style:font-style-asian="normal" style:font-weight-asian="normal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19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ff0000"/>
    </style:style>
    <style:style style:name="ce19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b3b3b3"/>
    </style:style>
    <style:style style:name="ce19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19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use-window-font-color="true"/>
    </style:style>
    <style:style style:name="ce19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color="#b3b3b3"/>
    </style:style>
    <style:style style:name="ce19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ff0000" fo:font-weight="bold" style:font-weight-asian="bold" style:font-weight-complex="bold"/>
    </style:style>
    <style:style style:name="ce19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00" style:family="table-cell" style:parent-style-name="Default">
      <style:table-cell-properties style:vertical-align="top"/>
      <style:text-properties style:use-window-font-color="true"/>
    </style:style>
    <style:style style:name="ce201" style:family="table-cell" style:parent-style-name="Default">
      <style:table-cell-properties style:vertical-align="top"/>
      <style:text-properties fo:color="#b3b3b3"/>
    </style:style>
    <style:style style:name="ce20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203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204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205" style:family="table-cell" style:parent-style-name="Default">
      <style:table-cell-properties fo:background-color="transparent" fo:wrap-option="wrap" fo:border="0.06pt solid #000000"/>
    </style:style>
    <style:style style:name="ce206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207" style:family="table-cell" style:parent-style-name="Default">
      <style:table-cell-properties fo:wrap-option="wrap"/>
    </style:style>
    <style:style style:name="ce20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09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2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2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mm"/>
    </style:style>
    <style:style style:name="ce213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color="#000080" fo:font-weight="bold" style:font-weight-asian="bold" style:font-weight-complex="bold"/>
    </style:style>
    <style:style style:name="ce2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5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mm"/>
      <style:text-properties fo:font-style="italic" style:font-style-asian="italic" style:font-style-complex="italic"/>
    </style:style>
    <style:style style:name="ce216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7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mm"/>
      <style:text-properties fo:color="#000080" fo:font-weight="bold" style:font-weight-asian="bold" style:font-weight-complex="bold"/>
    </style:style>
    <style:style style:name="ce218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mm"/>
    </style:style>
    <style:style style:name="ce220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style:use-window-font-color="true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 style:data-style-name="N125">
      <style:table-cell-properties style:text-align-source="fix" style:repeat-content="false"/>
      <style:paragraph-properties fo:text-align="center" fo:margin-left="0mm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5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2" style:family="text">
      <style:text-properties style:font-name="Arimo" style:font-name-asian="TianZhen" style:font-name-complex="FreeSans"/>
    </style:style>
    <style:style style:name="T3" style:family="text">
      <style:text-properties fo:color="#999999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666666" fo:font-style="italic" style:font-style-asian="italic" style:font-style-complex="italic"/>
    </style:style>
    <style:style style:name="T6" style:family="text">
      <style:text-properties fo:color="#666666"/>
    </style:style>
    <style:style style:name="T7" style:family="text">
      <style:text-properties fo:color="#999999"/>
    </style:style>
    <style:style style:name="T8" style:family="text">
      <style:text-properties fo:color="#999999" style:font-name="Arimo" style:font-name-asian="TianZhen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3" table:default-cell-style-name="ce58"/>
        <table:table-column table:style-name="co14" table:default-cell-style-name="ce58"/>
        <table:table-column table:style-name="co26" table:default-cell-style-name="ce58"/>
        <table:table-column table:style-name="co28" table:default-cell-style-name="ce113"/>
        <table:table-column table:style-name="co29" table:default-cell-style-name="ce167"/>
        <table:table-column table:style-name="co30" table:number-columns-repeated="2" table:default-cell-style-name="ce167"/>
        <table:table-column table:style-name="co31" table:default-cell-style-name="ce167"/>
        <table:table-column table:style-name="co32" table:default-cell-style-name="ce58"/>
        <table:table-column table:style-name="co33" table:default-cell-style-name="ce58"/>
        <table:table-column table:style-name="co34" table:default-cell-style-name="ce195"/>
        <table:table-column table:style-name="co35" table:default-cell-style-name="ce58"/>
        <table:table-column table:style-name="co36" table:default-cell-style-name="ce58"/>
        <table:table-column table:style-name="co37" table:default-cell-style-name="ce58"/>
        <table:table-column table:style-name="co38" table:default-cell-style-name="ce58"/>
        <table:table-column table:style-name="co15" table:number-columns-repeated="1009" table:default-cell-style-name="ce113"/>
        <table:table-row table:style-name="ro1">
          <table:table-cell table:style-name="ce37" office:value-type="string" calcext:value-type="string">
            <text:p>MF</text:p>
          </table:table-cell>
          <table:table-cell table:style-name="ce37" office:value-type="string" calcext:value-type="string">
            <text:p>MF-β</text:p>
          </table:table-cell>
          <table:table-cell table:style-name="ce67" table:formula="of:=MAX([.C$2:.C$594])+1" office:value-type="float" office:value="328" calcext:value-type="float">
            <text:p>NEXT: 328</text:p>
          </table:table-cell>
          <table:table-cell table:style-name="ce37" office:value-type="string" calcext:value-type="string">
            <text:p>SEMANTIC ID</text:p>
          </table:table-cell>
          <table:table-cell table:style-name="ce37" office:value-type="string" calcext:value-type="string">
            <text:p>REQUIREMENT</text:p>
          </table:table-cell>
          <table:table-cell table:style-name="ce37" office:value-type="string" calcext:value-type="string">
            <text:p>MEANING</text:p>
          </table:table-cell>
          <table:table-cell table:style-name="ce37" office:value-type="string" calcext:value-type="string">
            <text:p>SYNTAX</text:p>
          </table:table-cell>
          <table:table-cell table:style-name="ce37" office:value-type="string" calcext:value-type="string">
            <text:p>TODO</text:p>
          </table:table-cell>
          <table:table-cell table:style-name="ce191" office:value-type="string" calcext:value-type="string">
            <text:p>Complete</text:p>
          </table:table-cell>
          <table:table-cell table:style-name="ce191" office:value-type="string" calcext:value-type="string">
            <text:p>Correct</text:p>
          </table:table-cell>
          <table:table-cell table:style-name="ce191" office:value-type="string" calcext:value-type="string">
            <text:p>Feasible</text:p>
          </table:table-cell>
          <table:table-cell table:style-name="ce191" office:value-type="string" calcext:value-type="string">
            <text:p>Necessary</text:p>
          </table:table-cell>
          <table:table-cell table:style-name="ce191" office:value-type="string" calcext:value-type="string">
            <text:p>Prioritised</text:p>
          </table:table-cell>
          <table:table-cell table:style-name="ce191" office:value-type="string" calcext:value-type="string">
            <text:p>Unambiguous</text:p>
          </table:table-cell>
          <table:table-cell table:style-name="ce191" office:value-type="string" calcext:value-type="string">
            <text:p>Verifiable</text:p>
          </table:table-cell>
          <table:table-cell table:style-name="ce199" table:number-columns-repeated="1008"/>
          <table:table-cell/>
        </table:table-row>
        <table:table-row table:style-name="ro1">
          <table:table-cell table:style-name="ce38" office:value-type="float" office:value="1" calcext:value-type="float">
            <text:p>MF-01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uce</text:p>
          </table:table-cell>
          <table:table-cell table:style-name="ce114" office:value-type="string" calcext:value-type="string">
            <text:p>MF-01: Use Case Editor</text:p>
          </table:table-cell>
          <table:table-cell table:style-name="ce114" table:number-columns-repeated="3"/>
          <table:table-cell table:style-name="ce191" table:number-columns-repeated="7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82" calcext:value-type="float">
            <text:p>FR-82</text:p>
          </table:table-cell>
          <table:table-cell table:style-name="ce88" office:value-type="string" calcext:value-type="string">
            <text:p>.ref.reqs</text:p>
          </table:table-cell>
          <table:table-cell table:style-name="ce115" office:value-type="string" calcext:value-type="string">
            <text:p>BA shall be able to reference reqs from UC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150" calcext:value-type="float">
            <text:p>FR-150</text:p>
          </table:table-cell>
          <table:table-cell table:style-name="ce88" office:value-type="string" calcext:value-type="string">
            <text:p>.ref.shr</text:p>
          </table:table-cell>
          <table:table-cell table:style-name="ce115" office:value-type="string" calcext:value-type="string">
            <text:p>BA shall be able to reference SHRs from UC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" calcext:value-type="float">
            <text:p>MF-01</text:p>
          </table:table-cell>
          <table:table-cell table:style-name="ce39" office:value-type="string" calcext:value-type="string">
            <text:p>MF-05</text:p>
            <text:p>MF-06</text:p>
            <text:p>MF-07</text:p>
            <text:p>MF-13</text:p>
          </table:table-cell>
          <table:table-cell table:style-name="ce69" office:value-type="float" office:value="261" calcext:value-type="float">
            <text:p>FR-261</text:p>
          </table:table-cell>
          <table:table-cell table:style-name="ce88" office:value-type="string" calcext:value-type="string">
            <text:p>.subreq.fields</text:p>
          </table:table-cell>
          <table:table-cell table:style-name="ce115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" calcext:value-type="float">
            <text:p>MF-01</text:p>
          </table:table-cell>
          <table:table-cell table:style-name="ce39" office:value-type="string" calcext:value-type="string">
            <text:p>MF-05</text:p>
            <text:p>MF-06</text:p>
            <text:p>MF-07</text:p>
            <text:p>MF-13</text:p>
          </table:table-cell>
          <table:table-cell table:style-name="ce69" office:value-type="float" office:value="262" calcext:value-type="float">
            <text:p>FR-262</text:p>
          </table:table-cell>
          <table:table-cell table:style-name="ce88" office:value-type="string" calcext:value-type="string">
            <text:p>.subreq.steps</text:p>
          </table:table-cell>
          <table:table-cell table:style-name="ce115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7" calcext:value-type="float">
            <text:p>MF-07</text:p>
          </table:table-cell>
          <table:table-cell table:style-name="ce70" office:value-type="string" calcext:value-type="string">
            <text:p>-</text:p>
          </table:table-cell>
          <table:table-cell table:style-name="ce89" office:value-type="string" calcext:value-type="string">
            <text:p>.tag-ap</text:p>
          </table:table-cell>
          <table:table-cell table:style-name="ce116" office:value-type="string" calcext:value-type="string">
            <text:p>Tags</text:p>
          </table:table-cell>
          <table:table-cell table:style-name="ce116" table:number-columns-repeated="3"/>
          <table:table-cell table:number-columns-repeated="1016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7" calcext:value-type="float">
            <text:p>FR-07</text:p>
          </table:table-cell>
          <table:table-cell table:style-name="ce88" office:value-type="string" calcext:value-type="string">
            <text:p><text:s text:c="2"/>.add</text:p>
          </table:table-cell>
          <table:table-cell table:style-name="ce115" office:value-type="string" calcext:value-type="string">
            <text:p>BA shall be able to apply tags to UC using the UCE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8" calcext:value-type="float">
            <text:p>FR-08</text:p>
          </table:table-cell>
          <table:table-cell table:style-name="ce88" office:value-type="string" calcext:value-type="string">
            <text:p><text:s text:c="2"/>.remove</text:p>
          </table:table-cell>
          <table:table-cell table:style-name="ce115" office:value-type="string" calcext:value-type="string">
            <text:p>BA shall be able to remove tags to UC using the UCE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3" calcext:value-type="float">
            <text:p>FR-23</text:p>
          </table:table-cell>
          <table:table-cell table:style-name="ce88" office:value-type="string" calcext:value-type="string">
            <text:p><text:s text:c="2"/>.fields</text:p>
          </table:table-cell>
          <table:table-cell table:style-name="ce117" office:value-type="string" calcext:value-type="string">
            <text:p>BA shall be able to apply tags to fields within a UC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8" office:value-type="float" office:value="5" calcext:value-type="float">
            <text:p>MF-05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fieldset</text:p>
          </table:table-cell>
          <table:table-cell table:style-name="ce114" office:value-type="string" calcext:value-type="string">
            <text:p>MF-05: Field Customisation</text:p>
          </table:table-cell>
          <table:table-cell table:style-name="ce114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6</text:p>
            <text:p>MF-01</text:p>
          </table:table-cell>
          <table:table-cell table:style-name="ce69" office:value-type="float" office:value="65" calcext:value-type="float">
            <text:p>FR-65</text:p>
          </table:table-cell>
          <table:table-cell table:style-name="ce90" office:value-type="string" calcext:value-type="string">
            <text:p><text:s text:c="2"/>.mandatory</text:p>
          </table:table-cell>
          <table:table-cell table:style-name="ce117" office:value-type="string" calcext:value-type="string">
            <text:p>BA shall be able to specify mandatory-ness of field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81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55" calcext:value-type="float">
            <text:p>FR-255</text:p>
          </table:table-cell>
          <table:table-cell table:style-name="ce88" office:value-type="string" calcext:value-type="string">
            <text:p><text:s text:c="2"/>.reqtype</text:p>
          </table:table-cell>
          <table:table-cell table:style-name="ce117" office:value-type="string" calcext:value-type="string">
            <text:p>BA shall be able to specify which req-types each custom field applies to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56" calcext:value-type="float">
            <text:p>FR-256</text:p>
          </table:table-cell>
          <table:table-cell table:style-name="ce88" office:value-type="string" calcext:value-type="string">
            <text:p><text:s text:c="4"/>.all</text:p>
          </table:table-cell>
          <table:table-cell table:style-name="ce117" office:value-type="string" calcext:value-type="string">
            <text:p>BA shall be able to specify that a field applies to all req-type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57" calcext:value-type="float">
            <text:p>FR-257</text:p>
          </table:table-cell>
          <table:table-cell table:style-name="ce88" office:value-type="string" calcext:value-type="string">
            <text:p><text:s text:c="4"/>.whitelist</text:p>
          </table:table-cell>
          <table:table-cell table:style-name="ce117" office:value-type="string" calcext:value-type="string">
            <text:p>BA shall be able to specify applicable field req-types using a whitelist. (i.e. “Only A, B, C”)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58" calcext:value-type="float">
            <text:p>FR-258</text:p>
          </table:table-cell>
          <table:table-cell table:style-name="ce88" office:value-type="string" calcext:value-type="string">
            <text:p><text:s text:c="4"/>.blacklist</text:p>
          </table:table-cell>
          <table:table-cell table:style-name="ce117" office:value-type="string" calcext:value-type="string">
            <text:p>BA shall be able to specify applicable field req-types using a blacklist. (i.e. “Not A, B, C”)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66" calcext:value-type="float">
            <text:p>FR-66</text:p>
          </table:table-cell>
          <table:table-cell table:style-name="ce90" office:value-type="string" calcext:value-type="string">
            <text:p><text:s text:c="2"/>.zero</text:p>
          </table:table-cell>
          <table:table-cell table:style-name="ce117" office:value-type="string" calcext:value-type="string">
            <text:p>All field types that have a concept of mandatory-ness must also provide an emptiness test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81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5" calcext:value-type="float">
            <text:p>MF-05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mod</text:p>
          </table:table-cell>
          <table:table-cell table:style-name="ce118" office:value-type="string" calcext:value-type="string">
            <text:p>Modifying a field set</text:p>
          </table:table-cell>
          <table:table-cell table:style-name="ce118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114" calcext:value-type="float">
            <text:p>FR-114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7" office:value-type="string" calcext:value-type="string">
            <text:p>BA shall be able to see a list of all existing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2" calcext:value-type="float">
            <text:p>FR-02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7" office:value-type="string" calcext:value-type="string">
            <text:p>BA shall be able to add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3" calcext:value-type="float">
            <text:p>FR-03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modify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263" calcext:value-type="float">
            <text:p>FR-263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System shall appear to rename all references to a field after it is renamed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4" calcext:value-type="float">
            <text:p>FR-04</text:p>
          </table:table-cell>
          <table:table-cell table:style-name="ce90" office:value-type="string" calcext:value-type="string">
            <text:p><text:s text:c="4"/>.order</text:p>
          </table:table-cell>
          <table:table-cell table:style-name="ce117" office:value-type="string" calcext:value-type="string">
            <text:p>BA shall be able to reorder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1" calcext:value-type="float">
            <text:p>FR-0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delete fields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5" calcext:value-type="float">
            <text:p>FR-05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5" office:value-type="string" calcext:value-type="string">
            <text:p>System shall indicate how many reqs have content for each field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6" calcext:value-type="float">
            <text:p>FR-06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5" office:value-type="string" calcext:value-type="string">
            <text:p>BA shall be able to see each instance of content for a field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264" calcext:value-type="float">
            <text:p>FR-264</text:p>
          </table:table-cell>
          <table:table-cell table:style-name="ce88" office:value-type="string" calcext:value-type="string">
            <text:p><text:s text:c="4"/>.hard</text:p>
          </table:table-cell>
          <table:table-cell table:style-name="ce119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47" calcext:value-type="float">
            <text:p>FR-47</text:p>
          </table:table-cell>
          <table:table-cell table:style-name="ce90" office:value-type="string" calcext:value-type="string">
            <text:p><text:s text:c="4"/>.bin</text:p>
          </table:table-cell>
          <table:table-cell table:style-name="ce117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40" calcext:value-type="float">
            <text:p>FR-40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7" office:value-type="string" calcext:value-type="string">
            <text:p>BA shall be able to restore deleted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41" calcext:value-type="float">
            <text:p>FR-41</text:p>
          </table:table-cell>
          <table:table-cell table:style-name="ce90" office:value-type="string" calcext:value-type="string">
            <text:p><text:s text:c="4"/>.data</text:p>
          </table:table-cell>
          <table:table-cell table:style-name="ce117" office:value-type="string" calcext:value-type="string">
            <text:p>When a field is restored, System shall restore corresponding field values for each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5" calcext:value-type="float">
            <text:p>MF-05</text:p>
          </table:table-cell>
          <table:table-cell table:number-columns-repeated="2" table:style-name="ce52" office:value-type="string" calcext:value-type="string">
            <text:p>-</text:p>
          </table:table-cell>
          <table:table-cell table:style-name="ce91" office:value-type="string" calcext:value-type="string">
            <text:p>.types</text:p>
          </table:table-cell>
          <table:table-cell table:style-name="ce118" office:value-type="string" calcext:value-type="string">
            <text:p>Field types</text:p>
          </table:table-cell>
          <table:table-cell table:style-name="ce118" table:number-columns-repeated="3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43" calcext:value-type="float">
            <text:p>FR-43</text:p>
          </table:table-cell>
          <table:table-cell table:style-name="ce90" office:value-type="string" calcext:value-type="string">
            <text:p><text:s text:c="2"/>.text</text:p>
          </table:table-cell>
          <table:table-cell table:style-name="ce117" office:value-type="string" calcext:value-type="string">
            <text:p>System shall provide a field type: Text field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44" calcext:value-type="float">
            <text:p>FR-44</text:p>
          </table:table-cell>
          <table:table-cell table:style-name="ce90" office:value-type="string" calcext:value-type="string">
            <text:p><text:s text:c="4"/>.name</text:p>
          </table:table-cell>
          <table:table-cell table:style-name="ce117" office:value-type="string" calcext:value-type="string">
            <text:p>BA shall be able to configure text fields' names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46" calcext:value-type="float">
            <text:p>FR-46</text:p>
          </table:table-cell>
          <table:table-cell table:style-name="ce90" office:value-type="string" calcext:value-type="string">
            <text:p><text:s text:c="2"/>.tag</text:p>
          </table:table-cell>
          <table:table-cell table:style-name="ce117" office:value-type="string" calcext:value-type="string">
            <text:p>BA shall be able to define a field type based on a tag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52" calcext:value-type="float">
            <text:p>FR-252</text:p>
          </table:table-cell>
          <table:table-cell table:style-name="ce90" office:value-type="string" calcext:value-type="string">
            <text:p><text:s text:c="4"/>.unique</text:p>
          </table:table-cell>
          <table:table-cell table:style-name="ce117" office:value-type="string" calcext:value-type="string">
            <text:p>System shall prevent the existence of more than one field based on the same tag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6</text:p>
            <text:p>MF-07</text:p>
          </table:table-cell>
          <table:table-cell table:style-name="ce69" office:value-type="float" office:value="251" calcext:value-type="float">
            <text:p>FR-251</text:p>
          </table:table-cell>
          <table:table-cell table:style-name="ce90" office:value-type="string" calcext:value-type="string">
            <text:p><text:s text:c="4"/>.mandatory</text:p>
          </table:table-cell>
          <table:table-cell table:style-name="ce117" office:value-type="string" calcext:value-type="string">
            <text:p>BA shall be able to specify whether a tag field is mandatory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50" calcext:value-type="float">
            <text:p>FR-250</text:p>
          </table:table-cell>
          <table:table-cell table:style-name="ce90" office:value-type="string" calcext:value-type="string">
            <text:p><text:s text:c="4"/>.name</text:p>
          </table:table-cell>
          <table:table-cell table:style-name="ce117" office:value-type="string" calcext:value-type="string">
            <text:p>System shall automatically name tag fields according to the names of underlying tag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49" calcext:value-type="float">
            <text:p>FR-249</text:p>
          </table:table-cell>
          <table:table-cell table:style-name="ce90" office:value-type="string" calcext:value-type="string">
            <text:p><text:s text:c="4"/>.view</text:p>
          </table:table-cell>
          <table:table-cell table:style-name="ce117" office:value-type="string" calcext:value-type="string">
            <text:p>A tag field shall just be a view over the req's tags. It shall not require dedicated storage. This means that adding and removing tag fields has no impact on a req's data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83" calcext:value-type="float">
            <text:p>FR-283</text:p>
          </table:table-cell>
          <table:table-cell table:style-name="ce90" office:value-type="string" calcext:value-type="string">
            <text:p><text:s text:c="2"/>.implication</text:p>
          </table:table-cell>
          <table:table-cell table:style-name="ce120" office:value-type="string" calcext:value-type="string">
            <text:p>BA shall be able to define a field type based on transitive implication from a req-type.</text:p>
          </table:table-cell>
          <table:table-cell table:number-columns-repeated="2" table:style-name="ce168" office:value-type="date" office:date-value="2014-07-10" calcext:value-type="date">
            <text:p>10/07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84" calcext:value-type="float">
            <text:p>FR-284</text:p>
          </table:table-cell>
          <table:table-cell table:style-name="ce90" office:value-type="string" calcext:value-type="string">
            <text:p><text:s text:c="4"/>.unique</text:p>
          </table:table-cell>
          <table:table-cell table:style-name="ce120" office:value-type="string" calcext:value-type="string">
            <text:p>System shall prevent the existence of more than one field based on the same implying req-type.</text:p>
          </table:table-cell>
          <table:table-cell table:number-columns-repeated="2" table:style-name="ce168" office:value-type="date" office:date-value="2014-07-10" calcext:value-type="date">
            <text:p>10/07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85" calcext:value-type="float">
            <text:p>FR-285</text:p>
          </table:table-cell>
          <table:table-cell table:style-name="ce90" office:value-type="string" calcext:value-type="string">
            <text:p><text:s text:c="4"/>.name</text:p>
          </table:table-cell>
          <table:table-cell table:style-name="ce120" office:value-type="string" calcext:value-type="string">
            <text:p>System shall automatically name implication fields according to the names of underlying req-types.</text:p>
          </table:table-cell>
          <table:table-cell table:number-columns-repeated="2" table:style-name="ce168" office:value-type="date" office:date-value="2014-07-10" calcext:value-type="date">
            <text:p>10/07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0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86" calcext:value-type="float">
            <text:p>FR-286</text:p>
          </table:table-cell>
          <table:table-cell table:style-name="ce90" office:value-type="string" calcext:value-type="string">
            <text:p><text:s text:c="4"/>.view</text:p>
          </table:table-cell>
          <table:table-cell table:style-name="ce120" office:value-type="string" calcext:value-type="string">
            <text:p>A field based on transitive implication from a req-type, shall be a read-only view that displays all reqs of the underlying req-type, that transitively imply a subject req.</text:p>
            <text:p><text:span text:style-name="T3">Eg. Req X is directly implied by MF-3 and UC-5. UC-5 is implied by MF-7. MF field for req X displays MF-3, MF-7.</text:span></text:p>
          </table:table-cell>
          <table:table-cell table:number-columns-repeated="2" table:style-name="ce168" office:value-type="date" office:date-value="2014-07-10" calcext:value-type="date">
            <text:p>10/07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59" calcext:value-type="float">
            <text:p>FR-259</text:p>
          </table:table-cell>
          <table:table-cell table:style-name="ce90" office:value-type="string" calcext:value-type="string">
            <text:p><text:s text:c="2"/>.uc.courses</text:p>
          </table:table-cell>
          <table:table-cell table:style-name="ce117" office:value-type="string" calcext:value-type="string">
            <text:p>System shall provide a field type '”Courses” which is applicable to UCs only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60" calcext:value-type="float">
            <text:p>FR-260</text:p>
          </table:table-cell>
          <table:table-cell table:style-name="ce90" office:value-type="string" calcext:value-type="string">
            <text:p><text:s text:c="4"/>.forced</text:p>
          </table:table-cell>
          <table:table-cell table:style-name="ce117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45" calcext:value-type="float">
            <text:p>FR-45</text:p>
          </table:table-cell>
          <table:table-cell table:style-name="ce90" office:value-type="string" calcext:value-type="string">
            <text:p><text:s text:c="2"/>.uc.flowgraph</text:p>
          </table:table-cell>
          <table:table-cell table:style-name="ce117" office:value-type="string" calcext:value-type="string">
            <text:p>System shall provide a field type '”Flow graph” which is applicable to UCs only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6">
          <table:table-cell table:style-name="ce38" office:value-type="float" office:value="6" calcext:value-type="float">
            <text:p>MF-06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issues</text:p>
          </table:table-cell>
          <table:table-cell table:style-name="ce114" office:value-type="string" calcext:value-type="string">
            <text:p>MF-06: Issues</text:p>
          </table:table-cell>
          <table:table-cell table:style-name="ce114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52" calcext:value-type="float">
            <text:p>FR-52</text:p>
          </table:table-cell>
          <table:table-cell table:style-name="ce88" office:value-type="string" calcext:value-type="string">
            <text:p><text:s text:c="2"/>.render.txt</text:p>
          </table:table-cell>
          <table:table-cell table:style-name="ce117" office:value-type="string" calcext:value-type="string">
            <text:p>System shall render issues in reqs, red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92" calcext:value-type="float">
            <text:p>FR-92</text:p>
          </table:table-cell>
          <table:table-cell table:style-name="ce88" office:value-type="string" calcext:value-type="string">
            <text:p><text:s text:c="2"/>.render.empty</text:p>
          </table:table-cell>
          <table:table-cell table:style-name="ce117" office:value-type="string" calcext:value-type="string">
            <text:p>System shall render blank, mandatory fields with a red background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<text:s text:c="2"/>.inspect</text:p>
          </table:table-cell>
          <table:table-cell table:style-name="ce121" office:value-type="string" calcext:value-type="string">
            <text:p>Inspection</text:p>
          </table:table-cell>
          <table:table-cell table:style-name="ce121" table:number-columns-repeated="3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48" calcext:value-type="float">
            <text:p>FR-48</text:p>
          </table:table-cell>
          <table:table-cell table:style-name="ce88" office:value-type="string" calcext:value-type="string">
            <text:p><text:s text:c="4"/>.total</text:p>
          </table:table-cell>
          <table:table-cell table:style-name="ce117" office:value-type="string" calcext:value-type="string">
            <text:p>BA shall be able to see the sum total of issue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91"/>
          <table:table-cell table:number-columns-repeated="1015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49" calcext:value-type="float">
            <text:p>FR-49</text:p>
          </table:table-cell>
          <table:table-cell table:style-name="ce88" office:value-type="string" calcext:value-type="string">
            <text:p><text:s text:c="4"/>.breakdown.uc</text:p>
          </table:table-cell>
          <table:table-cell table:style-name="ce117" office:value-type="string" calcext:value-type="string">
            <text:p>BA shall be able to see a list of UCs and the number of issues in each. [Pri=?]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24" office:value-type="string" calcext:value-type="string">
            <text:p>Filtering should be enough.</text:p>
          </table:table-cell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195" calcext:value-type="float">
            <text:p>FR-195</text:p>
          </table:table-cell>
          <table:table-cell table:style-name="ce88" office:value-type="string" calcext:value-type="string">
            <text:p><text:s text:c="4"/>.breakdown.llreq</text:p>
          </table:table-cell>
          <table:table-cell table:style-name="ce117" office:value-type="string" calcext:value-type="string">
            <text:p>BA shall be able to see a list of reqs and the number of issues in each. [Pri=?]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67" calcext:value-type="float">
            <text:p>FR-267</text:p>
          </table:table-cell>
          <table:table-cell table:style-name="ce88" office:value-type="string" calcext:value-type="string">
            <text:p><text:s text:c="4"/>.filter</text:p>
          </table:table-cell>
          <table:table-cell table:style-name="ce117" office:value-type="string" calcext:value-type="string">
            <text:p>BA shall be able to filter issue inspection view. (See <text:span text:style-name="T4">Filtering</text:span> section.)</text:p>
          </table:table-cell>
          <table:table-cell table:style-name="ce168" office:value-type="date" office:date-value="2014-06-30" calcext:value-type="date">
            <text:p>3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91"/>
          <table:table-cell table:number-columns-repeated="1015"/>
        </table:table-row>
        <table:table-row table:style-name="ro3">
          <table:table-cell table:style-name="ce40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2" office:value-type="float" office:value="67" calcext:value-type="float">
            <text:p>FR-67</text:p>
          </table:table-cell>
          <table:table-cell table:style-name="ce89" office:value-type="string" calcext:value-type="string">
            <text:p><text:s text:c="4"/>.list</text:p>
          </table:table-cell>
          <table:table-cell table:style-name="ce116" office:value-type="string" calcext:value-type="string">
            <text:p>BA shall be able to see a list of issues.</text:p>
            <text:p><text:span text:style-name="T5">When viewing a list of issues...</text:span></text:p>
          </table:table-cell>
          <table:table-cell table:style-name="ce116" table:number-columns-repeated="3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13" calcext:value-type="float">
            <text:p>FR-113</text:p>
          </table:table-cell>
          <table:table-cell table:style-name="ce88" office:value-type="string" calcext:value-type="string">
            <text:p><text:s text:c="6"/>.req-id</text:p>
          </table:table-cell>
          <table:table-cell table:style-name="ce117" office:value-type="string" calcext:value-type="string">
            <text:p>System shall display the ID of the requirement in which the issues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1" calcext:value-type="float">
            <text:p>FR-61</text:p>
          </table:table-cell>
          <table:table-cell table:style-name="ce88" office:value-type="string" calcext:value-type="string">
            <text:p><text:s text:c="6"/>.req-name</text:p>
          </table:table-cell>
          <table:table-cell table:style-name="ce117" office:value-type="string" calcext:value-type="string">
            <text:p>System shall display the name of the requirement in which the issues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2" calcext:value-type="float">
            <text:p>FR-62</text:p>
          </table:table-cell>
          <table:table-cell table:style-name="ce88" office:value-type="string" calcext:value-type="string">
            <text:p><text:s text:c="6"/>.ucf</text:p>
          </table:table-cell>
          <table:table-cell table:style-name="ce117" office:value-type="string" calcext:value-type="string">
            <text:p>System shall display the name of the UC field in which the issues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6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3" calcext:value-type="float">
            <text:p>FR-63</text:p>
          </table:table-cell>
          <table:table-cell table:style-name="ce88" office:value-type="string" calcext:value-type="string">
            <text:p><text:s text:c="6"/>.supp</text:p>
          </table:table-cell>
          <table:table-cell table:style-name="ce117" office:value-type="string" calcext:value-type="string">
            <text:p>System shall display issues' additional info (if specified as per [FR-57])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7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4" calcext:value-type="float">
            <text:p>FR-64</text:p>
          </table:table-cell>
          <table:table-cell table:style-name="ce88" office:value-type="string" calcext:value-type="string">
            <text:p><text:s text:c="6"/>.surrounds</text:p>
          </table:table-cell>
          <table:table-cell table:style-name="ce117" office:value-type="string" calcext:value-type="string">
            <text:p>System shall display an except of any text surrounding an issue. Something along the lines of first 100 chars before and after with an elipsis if needed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24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6"/>
        </table:table-row>
        <table:table-row table:style-name="ro1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<text:s text:c="2"/>.track</text:p>
          </table:table-cell>
          <table:table-cell table:style-name="ce121" office:value-type="string" calcext:value-type="string">
            <text:p>Tracking</text:p>
          </table:table-cell>
          <table:table-cell table:style-name="ce121" table:number-columns-repeated="3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3" calcext:value-type="float">
            <text:p>FR-53</text:p>
          </table:table-cell>
          <table:table-cell table:style-name="ce88" office:value-type="string" calcext:value-type="string">
            <text:p><text:s text:c="4"/>.field.empty</text:p>
          </table:table-cell>
          <table:table-cell table:style-name="ce117" office:value-type="string" calcext:value-type="string">
            <text:p>System shall track emptiness of mandatory fields as issu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16" calcext:value-type="float">
            <text:p>FR-316</text:p>
          </table:table-cell>
          <table:table-cell table:style-name="ce88" office:value-type="string" calcext:value-type="string">
            <text:p><text:s text:c="4"/>.ref.dead</text:p>
          </table:table-cell>
          <table:table-cell table:style-name="ce117" office:value-type="string" calcext:value-type="string">
            <text:p>System shall track live refs to dead reqs as issues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4" calcext:value-type="float">
            <text:p>FR-54</text:p>
          </table:table-cell>
          <table:table-cell table:style-name="ce88" office:value-type="string" calcext:value-type="string">
            <text:p><text:s text:c="4"/>.ref.invalid</text:p>
          </table:table-cell>
          <table:table-cell table:style-name="ce117" office:value-type="string" calcext:value-type="string">
            <text:p>System shall track invalid refs as issu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5" calcext:value-type="float">
            <text:p>FR-55</text:p>
          </table:table-cell>
          <table:table-cell table:style-name="ce88" office:value-type="string" calcext:value-type="string">
            <text:p><text:s text:c="4"/>.ref.deleted</text:p>
          </table:table-cell>
          <table:table-cell table:style-name="ce117" office:value-type="string" calcext:value-type="string">
            <text:p>System shall track [DELETED] refs as issu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6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07" calcext:value-type="float">
            <text:p>FR-207</text:p>
          </table:table-cell>
          <table:table-cell table:style-name="ce88" office:value-type="string" calcext:value-type="string">
            <text:p><text:s text:c="4"/>.imp.missing</text:p>
          </table:table-cell>
          <table:table-cell table:style-name="ce117" office:value-type="string" calcext:value-type="string">
            <text:p>Where the req-type is marked for such behaviour [FR-205,206], BA shall be able to track live reqs without live implying reqs (MF-13) as issues.</text:p>
            <text:p>This doesn't apply to subreqs (UC fields,  UC steps).</text:p>
          </table:table-cell>
          <table:table-cell table:style-name="ce168" office:value-type="date" office:date-value="2014-06-18" calcext:value-type="date">
            <text:p>18/06/14</text:p>
          </table:table-cell>
          <table:table-cell table:style-name="ce168" office:value-type="date" office:date-value="2015-09-10" calcext:value-type="date">
            <text:p>10/09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74" calcext:value-type="float">
            <text:p>FR-74</text:p>
          </table:table-cell>
          <table:table-cell table:style-name="ce88" office:value-type="string" calcext:value-type="string">
            <text:p><text:s text:c="4"/>.tag.missing</text:p>
          </table:table-cell>
          <table:table-cell table:style-name="ce117" office:value-type="string" calcext:value-type="string">
            <text:p>BA shall be able to track missing tag (MF-07) by making a tag field (FR-46) mandatory.</text:p>
            <text:p><text:span text:style-name="T6">Example: UC missing priority should be an issue.</text:span>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75" calcext:value-type="float">
            <text:p>FR-275</text:p>
          </table:table-cell>
          <table:table-cell table:style-name="ce88" office:value-type="string" calcext:value-type="string">
            <text:p><text:s text:c="4"/>.tag.nokids</text:p>
          </table:table-cell>
          <table:table-cell table:style-name="ce117" office:value-type="string" calcext:value-type="string">
            <text:p>System shall track non-applicable tags without children as issues.</text:p>
          </table:table-cell>
          <table:table-cell table:style-name="ce168" office:value-type="date" office:date-value="2014-07-02" calcext:value-type="date">
            <text:p>02/07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54" calcext:value-type="float">
            <text:p>FR-254</text:p>
          </table:table-cell>
          <table:table-cell table:style-name="ce88" office:value-type="string" calcext:value-type="string">
            <text:p><text:s text:c="4"/>.tag.enum</text:p>
          </table:table-cell>
          <table:table-cell table:style-name="ce117" office:value-type="string" calcext:value-type="string">
            <text:p>BA shall be able to track when two or more enum-tags (FR-253) (or its children) are applied to the same req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308" calcext:value-type="float">
            <text:p>FR-308</text:p>
          </table:table-cell>
          <table:table-cell table:style-name="ce88" office:value-type="string" calcext:value-type="string">
            <text:p><text:s text:c="4"/>.tag.dead-in-text</text:p>
          </table:table-cell>
          <table:table-cell table:style-name="ce117" office:value-type="string" calcext:value-type="string">
            <text:p>BA shall be able to track when a dead tag is used in a text field of a live req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145" calcext:value-type="float">
            <text:p>FR-145</text:p>
          </table:table-cell>
          <table:table-cell table:style-name="ce88" office:value-type="string" calcext:value-type="string">
            <text:p><text:s text:c="4"/>.shr</text:p>
          </table:table-cell>
          <table:table-cell table:style-name="ce117" office:value-type="string" calcext:value-type="string">
            <text:p>System shall track Semantic Header Rows without children as issue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68" office:value-type="date" office:date-value="2015-06-01" calcext:value-type="date">
            <text:p>01/06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74" calcext:value-type="float">
            <text:p>FR-274</text:p>
          </table:table-cell>
          <table:table-cell table:style-name="ce88" office:value-type="string" calcext:value-type="string">
            <text:p><text:s text:c="4"/>.steps.empty</text:p>
          </table:table-cell>
          <table:table-cell table:style-name="ce117" office:value-type="string" calcext:value-type="string">
            <text:p>System shall track emptiness of UC steps as issues.</text:p>
          </table:table-cell>
          <table:table-cell table:style-name="ce168" office:value-type="date" office:date-value="2014-07-02" calcext:value-type="date">
            <text:p>02/07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6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<text:s text:c="2"/>.tag</text:p>
          </table:table-cell>
          <table:table-cell table:style-name="ce121" office:value-type="string" calcext:value-type="string">
            <text:p>Issues in rich text (hashtags)</text:p>
          </table:table-cell>
          <table:table-cell table:style-name="ce121" table:number-columns-repeated="3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6" calcext:value-type="float">
            <text:p>FR-56</text:p>
          </table:table-cell>
          <table:table-cell table:style-name="ce88" office:value-type="string" calcext:value-type="string">
            <text:p><text:s text:c="4"/>.ap</text:p>
          </table:table-cell>
          <table:table-cell table:style-name="ce117" office:value-type="string" calcext:value-type="string">
            <text:p>BA shall be able to specify issues in req text.</text:p>
            <text:p><text:span text:style-name="T7">Example: “#TODO”</text:span>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7" calcext:value-type="float">
            <text:p>FR-57</text:p>
          </table:table-cell>
          <table:table-cell table:style-name="ce88" office:value-type="string" calcext:value-type="string">
            <text:p><text:s text:c="4"/>.supp</text:p>
          </table:table-cell>
          <table:table-cell table:style-name="ce117" office:value-type="string" calcext:value-type="string">
            <text:p>BA shall be able to specify an issue with additional information as free text.</text:p>
            <text:p><text:span text:style-name="T7">Example “#TODO{ Waiting for Bob's report }”</text:span>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8" calcext:value-type="float">
            <text:p>FR-58</text:p>
          </table:table-cell>
          <table:table-cell table:style-name="ce88" office:value-type="string" calcext:value-type="string">
            <text:p><text:s text:c="4"/>.loose</text:p>
          </table:table-cell>
          <table:table-cell table:style-name="ce117" office:value-type="string" calcext:value-type="string">
            <text:p>BA shall be able to specify issues as loose notes, i.e. bound to a project but not a specific req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9" calcext:value-type="float">
            <text:p>FR-59</text:p>
          </table:table-cell>
          <table:table-cell table:style-name="ce88" office:value-type="string" calcext:value-type="string">
            <text:p><text:s text:c="4"/>.refs</text:p>
          </table:table-cell>
          <table:table-cell table:style-name="ce122" office:value-type="string" calcext:value-type="string">
            <text:p>BA shall be able to specify req refs when providing additional info to an issues.</text:p>
            <text:p><text:span text:style-name="T7">Example: “#TODO{ [3.4.5] blocks this.}”</text:span>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6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93" office:value-type="string" calcext:value-type="string">
            <text:p><text:s text:c="4"/>.type</text:p>
          </table:table-cell>
          <table:table-cell table:style-name="ce116" office:value-type="string" calcext:value-type="string">
            <text:p>Custom issue types</text:p>
          </table:table-cell>
          <table:table-cell table:style-name="ce169" table:number-columns-repeated="2"/>
          <table:table-cell table:style-name="ce183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15" calcext:value-type="float">
            <text:p>FR-115</text:p>
          </table:table-cell>
          <table:table-cell table:style-name="ce88" office:value-type="string" calcext:value-type="string">
            <text:p><text:s text:c="6"/>.list</text:p>
          </table:table-cell>
          <table:table-cell table:style-name="ce117" office:value-type="string" calcext:value-type="string">
            <text:p>BA shall be able to see a list of all custom issue typ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8" calcext:value-type="float">
            <text:p>FR-68</text:p>
          </table:table-cell>
          <table:table-cell table:style-name="ce88" office:value-type="string" calcext:value-type="string">
            <text:p><text:s text:c="6"/>.create</text:p>
          </table:table-cell>
          <table:table-cell table:style-name="ce117" office:value-type="string" calcext:value-type="string">
            <text:p>BA shall be able to create new types of custom issue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9" calcext:value-type="float">
            <text:p>FR-69</text:p>
          </table:table-cell>
          <table:table-cell table:style-name="ce88" office:value-type="string" calcext:value-type="string">
            <text:p><text:s text:c="6"/>.update</text:p>
          </table:table-cell>
          <table:table-cell table:style-name="ce117" office:value-type="string" calcext:value-type="string">
            <text:p>BA shall be able to rename custom issue type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70" calcext:value-type="float">
            <text:p>FR-70</text:p>
          </table:table-cell>
          <table:table-cell table:style-name="ce88" office:value-type="string" calcext:value-type="string">
            <text:p><text:s text:c="8"/>.refs</text:p>
          </table:table-cell>
          <table:table-cell table:style-name="ce117" office:value-type="string" calcext:value-type="string">
            <text:p>System shall appear to rename all instances of a custom issue when it's renamed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71" calcext:value-type="float">
            <text:p>FR-7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delete custom issue types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72" calcext:value-type="float">
            <text:p>FR-72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7" office:value-type="string" calcext:value-type="string">
            <text:p>Before custom issue type deletion, user shall be able to see a summary of usage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73" calcext:value-type="float">
            <text:p>FR-73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7" office:value-type="string" calcext:value-type="string">
            <text:p>Before custom issue type deletion, user shall be able to see each instance of entity's values and association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27" calcext:value-type="float">
            <text:p>FR-327</text:p>
          </table:table-cell>
          <table:table-cell table:style-name="ce88" office:value-type="string" calcext:value-type="string">
            <text:p><text:s text:c="4"/>.restore</text:p>
          </table:table-cell>
          <table:table-cell table:style-name="ce117" office:value-type="string" calcext:value-type="string">
            <text:p>BA shall be able to restore a deleted custom issue type.</text:p>
          </table:table-cell>
          <table:table-cell table:number-columns-repeated="2" table:style-name="ce168" office:value-type="date" office:date-value="2015-09-14" calcext:value-type="date">
            <text:p>14/09/15</text:p>
          </table:table-cell>
          <table:table-cell table:style-name="ce182"/>
          <table:table-cell table:style-name="ce113" table:number-columns-repeated="7"/>
          <table:table-cell table:number-columns-repeated="1009"/>
        </table:table-row>
        <table:table-row table:style-name="ro16">
          <table:table-cell table:style-name="ce38" office:value-type="float" office:value="7" calcext:value-type="float">
            <text:p>MF-07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tags</text:p>
          </table:table-cell>
          <table:table-cell table:style-name="ce114" office:value-type="string" calcext:value-type="string">
            <text:p>MF-07: Tags</text:p>
          </table:table-cell>
          <table:table-cell table:style-name="ce114" table:number-columns-repeated="3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5" calcext:value-type="float">
            <text:p>FR-25</text:p>
          </table:table-cell>
          <table:table-cell table:style-name="ce88" office:value-type="string" calcext:value-type="string">
            <text:p>.contra</text:p>
          </table:table-cell>
          <table:table-cell table:style-name="ce117" office:value-type="string" calcext:value-type="string">
            <text:p>When a req has a tag, System shall consider all parent tags applied.</text:p>
            <text:p>i.e. G₁ ∈ G₂ ∧ G₂ ⊗ R → G₁ ⊗ R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69" calcext:value-type="float">
            <text:p>FR-269</text:p>
          </table:table-cell>
          <table:table-cell table:style-name="ce88" office:value-type="string" calcext:value-type="string">
            <text:p>.trans.subreq</text:p>
          </table:table-cell>
          <table:table-cell table:style-name="ce117" office:value-type="string" calcext:value-type="string">
            <text:p>When a req has a tag, System shall consider all subreqs as having the same tags applied.</text:p>
            <text:p>i.e. G⊗a ∧ a⊏b → G⊗b</text:p>
          </table:table-cell>
          <table:table-cell table:style-name="ce168" office:value-type="date" office:date-value="2014-06-30" calcext:value-type="date">
            <text:p>3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290" calcext:value-type="float">
            <text:p>FR-290</text:p>
          </table:table-cell>
          <table:table-cell table:style-name="ce88" office:value-type="string" calcext:value-type="string">
            <text:p>.col.display</text:p>
          </table:table-cell>
          <table:table-cell table:style-name="ce117" office:value-type="string" calcext:value-type="string">
            <text:p>Where there is a Tags column or field in display-mode, System shall include tags specified as refs in the subject req's title and text fields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291" calcext:value-type="float">
            <text:p>FR-291</text:p>
          </table:table-cell>
          <table:table-cell table:style-name="ce88" office:value-type="string" calcext:value-type="string">
            <text:p>.col.edit</text:p>
          </table:table-cell>
          <table:table-cell table:style-name="ce117" office:value-type="string" calcext:value-type="string">
            <text:p>Where there is a Tags column or field in edit-mode, System shall exclude tags specified as refs in the subject req's title and text fields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305" calcext:value-type="float">
            <text:p>FR-305</text:p>
          </table:table-cell>
          <table:table-cell table:style-name="ce88" office:value-type="string" calcext:value-type="string">
            <text:p>.col.deleted</text:p>
          </table:table-cell>
          <table:table-cell table:style-name="ce117" office:value-type="string" calcext:value-type="string">
            <text:p>Deleted tags should be hidden in tag-based columns (unless viewing deleted content)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6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276" calcext:value-type="float">
            <text:p>FR-276</text:p>
          </table:table-cell>
          <table:table-cell table:style-name="ce88" office:value-type="string" calcext:value-type="string">
            <text:p>.txt.specify</text:p>
          </table:table-cell>
          <table:table-cell table:style-name="ce117" office:value-type="string" calcext:value-type="string">
            <text:p>BA shall be able to specify a tag in any req text field by specifying a hash followed by the refkey. Includes UC titles, generic req titles, custom text fields.</text:p>
            <text:p><text:span text:style-name="T7">Example: #pri=low</text:span>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289" calcext:value-type="float">
            <text:p>FR-289</text:p>
          </table:table-cell>
          <table:table-cell table:style-name="ce88" office:value-type="string" calcext:value-type="string">
            <text:p>.txt.retain</text:p>
          </table:table-cell>
          <table:table-cell table:style-name="ce117" office:value-type="string" calcext:value-type="string">
            <text:p>System shall retain tag refs in req text [FR-276].</text:p>
            <text:p>i.e. System shall not move tag refs out of text to store them separately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306" calcext:value-type="float">
            <text:p>FR-306</text:p>
          </table:table-cell>
          <table:table-cell table:style-name="ce88" office:value-type="string" calcext:value-type="string">
            <text:p>.txt.deleted.always</text:p>
          </table:table-cell>
          <table:table-cell table:style-name="ce117" office:value-type="string" calcext:value-type="string">
            <text:p>Deleted tags should always be shown in text-based columns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6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<text:span text:style-name="T2">MF-06</text:span></text:p>
            <text:p>MF-12</text:p>
          </table:table-cell>
          <table:table-cell table:style-name="ce69" office:value-type="float" office:value="307" calcext:value-type="float">
            <text:p>FR-307</text:p>
          </table:table-cell>
          <table:table-cell table:style-name="ce88" office:value-type="string" calcext:value-type="string">
            <text:p>.txt.deleted.issue</text:p>
          </table:table-cell>
          <table:table-cell table:style-name="ce117" office:value-type="string" calcext:value-type="string">
            <text:p>Deleted tags in text-based columns of live reqs should be rendered red or similar to indicate an issue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41" office:value-type="float" office:value="7" calcext:value-type="float">
            <text:p>MF-07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types</text:p>
          </table:table-cell>
          <table:table-cell table:style-name="ce118" office:value-type="string" calcext:value-type="string">
            <text:p>Tag types</text:p>
          </table:table-cell>
          <table:table-cell table:style-name="ce118" table:number-columns-repeated="3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46" calcext:value-type="float">
            <text:p>FR-246</text:p>
          </table:table-cell>
          <table:table-cell table:style-name="ce88" office:value-type="string" calcext:value-type="string">
            <text:p><text:s text:c="2"/>.unapplicable</text:p>
          </table:table-cell>
          <table:table-cell table:style-name="ce120" office:value-type="string" calcext:value-type="string">
            <text:p>BA shall be able to specify that a tag cannot be applied.</text:p>
            <text:p><text:span text:style-name="T7">e.g. “Priority” shouldn't be applicable but its children should.</text:span>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53" calcext:value-type="float">
            <text:p>FR-253</text:p>
          </table:table-cell>
          <table:table-cell table:style-name="ce88" office:value-type="string" calcext:value-type="string">
            <text:p><text:s text:c="2"/>.enum</text:p>
          </table:table-cell>
          <table:table-cell table:style-name="ce120" office:value-type="string" calcext:value-type="string">
            <text:p>BA shall be able to specify that a tag's children are mutually-exclusive (like an enum or sum-type)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3" calcext:value-type="float">
            <text:p>FR-13</text:p>
          </table:table-cell>
          <table:table-cell table:style-name="ce88" office:value-type="string" calcext:value-type="string">
            <text:p><text:s text:c="2"/>.tree</text:p>
          </table:table-cell>
          <table:table-cell table:style-name="ce117" office:value-type="string" calcext:value-type="string">
            <text:p>BA shall be able to create a tree of ta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4" calcext:value-type="float">
            <text:p>FR-14</text:p>
          </table:table-cell>
          <table:table-cell table:style-name="ce88" office:value-type="string" calcext:value-type="string">
            <text:p><text:s text:c="4"/>.order</text:p>
          </table:table-cell>
          <table:table-cell table:style-name="ce117" office:value-type="string" calcext:value-type="string">
            <text:p>When modifying tags in a tree, BA shall be able to specify the order of children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5" calcext:value-type="float">
            <text:p>FR-15</text:p>
          </table:table-cell>
          <table:table-cell table:style-name="ce94" office:value-type="string" calcext:value-type="string">
            <text:p><text:s text:c="4"/>.many2many</text:p>
          </table:table-cell>
          <table:table-cell table:style-name="ce117" office:value-type="string" calcext:value-type="string">
            <text:p>When modifying tags in a tree, BA shall be able to specify multiple parents of a child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9" calcext:value-type="float">
            <text:p>FR-19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7" office:value-type="string" calcext:value-type="string">
            <text:p>BA shall be able to list all ta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6" calcext:value-type="float">
            <text:p>FR-16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7" office:value-type="string" calcext:value-type="string">
            <text:p>BA shall be able to create ta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7" calcext:value-type="float">
            <text:p>FR-17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modify ta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47" calcext:value-type="float">
            <text:p>FR-247</text:p>
          </table:table-cell>
          <table:table-cell table:style-name="ce88" office:value-type="string" calcext:value-type="string">
            <text:p><text:s text:c="4"/>.unapplicable</text:p>
          </table:table-cell>
          <table:table-cell table:style-name="ce117" office:value-type="string" calcext:value-type="string">
            <text:p>BA shall not be able to change the unapplicability (FR-246) of a tag once it's been created.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85" calcext:value-type="float">
            <text:p>FR-185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System shall appear to rename all references of a tag after it is renamed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8" calcext:value-type="float">
            <text:p>FR-18</text:p>
          </table:table-cell>
          <table:table-cell table:style-name="ce88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(soft) delete tags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86" calcext:value-type="float">
            <text:p>FR-186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9" office:value-type="string" calcext:value-type="string">
            <text:p>Before tag deletion, user shall be able to see a summary of usage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87" calcext:value-type="float">
            <text:p>FR-187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9" office:value-type="string" calcext:value-type="string">
            <text:p>Before tag deletion, user shall be able to see each instance of tag's values and associations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16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02" calcext:value-type="float">
            <text:p>FR-302</text:p>
          </table:table-cell>
          <table:table-cell table:style-name="ce88" office:value-type="string" calcext:value-type="string">
            <text:p><text:s text:c="4"/>.children</text:p>
          </table:table-cell>
          <table:table-cell table:style-name="ce119" office:value-type="string" calcext:value-type="string">
            <text:p>When a tag is deleted, System should also delete its tags to which it is the sole live paren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304" calcext:value-type="float">
            <text:p>FR-304</text:p>
          </table:table-cell>
          <table:table-cell table:style-name="ce88" office:value-type="string" calcext:value-type="string">
            <text:p><text:s text:c="4"/>.fields</text:p>
          </table:table-cell>
          <table:table-cell table:style-name="ce119" office:value-type="string" calcext:value-type="string">
            <text:p>When tags are deleted, System should also delete affected tag fields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1" calcext:value-type="float">
            <text:p>FR-31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7" office:value-type="string" calcext:value-type="string">
            <text:p>BA shall be able to restore deleted tags.</text:p>
          </table:table-cell>
          <table:table-cell table:style-name="ce168" office:value-type="date" office:date-value="2014-02-13" calcext:value-type="date">
            <text:p>13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2" calcext:value-type="float">
            <text:p>FR-32</text:p>
          </table:table-cell>
          <table:table-cell table:style-name="ce88" office:value-type="string" calcext:value-type="string">
            <text:p><text:s text:c="4"/>.aps</text:p>
          </table:table-cell>
          <table:table-cell table:style-name="ce117" office:value-type="string" calcext:value-type="string">
            <text:p>When a tag is restored, its requirement applications should be restored too.</text:p>
          </table:table-cell>
          <table:table-cell table:style-name="ce168" office:value-type="date" office:date-value="2014-02-13" calcext:value-type="date">
            <text:p>13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03" calcext:value-type="float">
            <text:p>FR-303</text:p>
          </table:table-cell>
          <table:table-cell table:style-name="ce88" office:value-type="string" calcext:value-type="string">
            <text:p><text:s text:c="4"/>.children</text:p>
          </table:table-cell>
          <table:table-cell table:style-name="ce119" office:value-type="string" calcext:value-type="string">
            <text:p>When a tag is restored, System should also delete its tags to which it is the sole dead paren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41" office:value-type="float" office:value="7" calcext:value-type="float">
            <text:p>MF-07</text:p>
          </table:table-cell>
          <table:table-cell table:style-name="ce41"/>
          <table:table-cell table:style-name="ce74" office:value-type="float" office:value="34" calcext:value-type="float">
            <text:p>FR-34</text:p>
          </table:table-cell>
          <table:table-cell table:style-name="ce91" office:value-type="string" calcext:value-type="string">
            <text:p>.browse</text:p>
          </table:table-cell>
          <table:table-cell table:style-name="ce118" office:value-type="string" calcext:value-type="string">
            <text:p>BA shall be able to browse tags.</text:p>
          </table:table-cell>
          <table:table-cell table:number-columns-repeated="2" table:style-name="ce170" office:value-type="date" office:date-value="2014-02-13" calcext:value-type="date">
            <text:p>13/02/14</text:p>
          </table:table-cell>
          <table:table-cell table:style-name="ce118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5" calcext:value-type="float">
            <text:p>FR-225</text:p>
          </table:table-cell>
          <table:table-cell table:style-name="ce88" office:value-type="string" calcext:value-type="string">
            <text:p><text:s text:c="2"/>.req-filter</text:p>
          </table:table-cell>
          <table:table-cell table:style-name="ce120" office:value-type="string" calcext:value-type="string">
            <text:p>When browsing tags, BA shall be able to apply a filter to the requirement scope.</text:p>
            <text:p>(This affects allocations graphs and req lists. See Filtering section.)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2"/>.bars</text:p>
          </table:table-cell>
          <table:table-cell table:style-name="ce123" office:value-type="string" calcext:value-type="string">
            <text:p>Tag allocation graph</text:p>
          </table:table-cell>
          <table:table-cell table:style-name="ce127" table:number-columns-repeated="3"/>
          <table:table-cell table:number-columns-repeated="1016"/>
        </table:table-row>
        <table:table-row table:style-name="ro6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2" calcext:value-type="float">
            <text:p>FR-222</text:p>
          </table:table-cell>
          <table:table-cell table:style-name="ce88" office:value-type="string" calcext:value-type="string">
            <text:p><text:s text:c="4"/>.seg-not</text:p>
          </table:table-cell>
          <table:table-cell table:style-name="ce117" office:value-type="string" calcext:value-type="string">
            <text:p>When displaying a tag allocation graph, System shall display a segment corresponding to reqs without the subject applied. This doesn't apply to subreqs (UC fields, <text:s/>UC steps) or SHRs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3" calcext:value-type="float">
            <text:p>FR-223</text:p>
          </table:table-cell>
          <table:table-cell table:style-name="ce88" office:value-type="string" calcext:value-type="string">
            <text:p><text:s text:c="4"/>.seg-parent</text:p>
          </table:table-cell>
          <table:table-cell table:style-name="ce117" office:value-type="string" calcext:value-type="string">
            <text:p>When displaying a tag allocation graph, System shall display a segment corresponding to reqs with the subject applied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4" calcext:value-type="float">
            <text:p>FR-224</text:p>
          </table:table-cell>
          <table:table-cell table:style-name="ce88" office:value-type="string" calcext:value-type="string">
            <text:p><text:s text:c="4"/>.seq-child</text:p>
          </table:table-cell>
          <table:table-cell table:style-name="ce117" office:value-type="string" calcext:value-type="string">
            <text:p>When displaying a tag allocation graph, System shall display a segment for each child of the subject with reqs applied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8" calcext:value-type="float">
            <text:p>FR-238</text:p>
          </table:table-cell>
          <table:table-cell table:style-name="ce88" office:value-type="string" calcext:value-type="string">
            <text:p><text:s text:c="4"/>.seq-inspect</text:p>
          </table:table-cell>
          <table:table-cell table:style-name="ce117" office:value-type="string" calcext:value-type="string">
            <text:p>When a tag allocation graph is visible, BA shall be able to inspect a segment to see its details such as: Name, number of assignments, %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0" calcext:value-type="float">
            <text:p>FR-220</text:p>
          </table:table-cell>
          <table:table-cell table:style-name="ce88" office:value-type="string" calcext:value-type="string">
            <text:p><text:s text:c="2"/>.top</text:p>
          </table:table-cell>
          <table:table-cell table:style-name="ce117" office:value-type="string" calcext:value-type="string">
            <text:p>When first browsing tags, System presents top-level tag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1" calcext:value-type="float">
            <text:p>FR-221</text:p>
          </table:table-cell>
          <table:table-cell table:style-name="ce88" office:value-type="string" calcext:value-type="string">
            <text:p><text:s text:c="2"/>.top-bars</text:p>
          </table:table-cell>
          <table:table-cell table:style-name="ce117" office:value-type="string" calcext:value-type="string">
            <text:p>When browsing top-level tags, System shall present a (stacked-bar) tag allocation graph for each top-level ta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8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8" office:value-type="float" office:value="226" calcext:value-type="float">
            <text:p>FR-226</text:p>
          </table:table-cell>
          <table:table-cell table:style-name="ce95" office:value-type="string" calcext:value-type="string">
            <text:p><text:s text:c="2"/>.detail</text:p>
          </table:table-cell>
          <table:table-cell table:style-name="ce123" office:value-type="string" calcext:value-type="string">
            <text:p>When browsing tags, BA shall be able to select a tag to see tag detail with the specified tag as the total scope (aka subject).</text:p>
            <text:p>When browsing a tag in detail...</text:p>
          </table:table-cell>
          <table:table-cell table:style-name="ce171" office:value-type="date" office:date-value="2014-06-03" calcext:value-type="date">
            <text:p>03/06/14</text:p>
          </table:table-cell>
          <table:table-cell table:style-name="ce171" office:value-type="date" office:date-value="2015-04-23" calcext:value-type="date">
            <text:p>23/04/15</text:p>
          </table:table-cell>
          <table:table-cell table:style-name="ce12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7" calcext:value-type="float">
            <text:p>FR-227</text:p>
          </table:table-cell>
          <table:table-cell table:style-name="ce88" office:value-type="string" calcext:value-type="string">
            <text:p><text:s text:c="4"/>.bar</text:p>
          </table:table-cell>
          <table:table-cell table:style-name="ce117" office:value-type="string" calcext:value-type="string">
            <text:p>System shall present a (stacked-bar) tag allocation graph for the subject ta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9" office:value-type="float" office:value="35" calcext:value-type="float">
            <text:p>FR-35</text:p>
          </table:table-cell>
          <table:table-cell table:style-name="ce94" office:value-type="string" calcext:value-type="string">
            <text:p><text:s text:c="4"/>.rescope-down</text:p>
          </table:table-cell>
          <table:table-cell table:style-name="ce124" office:value-type="string" calcext:value-type="string">
            <text:p>BA shall be able to change the tag scope to a child of the subject tag.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24"/>
          <table:table-cell table:style-name="ce192" table:number-columns-repeated="2"/>
          <table:table-cell table:style-name="ce196"/>
          <table:table-cell table:style-name="ce192" table:number-columns-repeated="4"/>
          <table:table-cell table:style-name="ce200" table:number-columns-repeated="1009"/>
        </table:table-row>
        <table:table-row table:style-name="ro1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9" office:value-type="float" office:value="239" calcext:value-type="float">
            <text:p>FR-239</text:p>
          </table:table-cell>
          <table:table-cell table:style-name="ce94" office:value-type="string" calcext:value-type="string">
            <text:p><text:s text:c="4"/>.rescope-up</text:p>
          </table:table-cell>
          <table:table-cell table:style-name="ce124" office:value-type="string" calcext:value-type="string">
            <text:p>BA shall be able to change the tag scope to the subject tag's parent.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24"/>
          <table:table-cell table:style-name="ce192" table:number-columns-repeated="2"/>
          <table:table-cell table:style-name="ce196"/>
          <table:table-cell table:style-name="ce192" table:number-columns-repeated="4"/>
          <table:table-cell table:style-name="ce200" table:number-columns-repeated="1009"/>
        </table:table-row>
        <table:table-row table:style-name="ro1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9" office:value-type="float" office:value="240" calcext:value-type="float">
            <text:p>FR-240</text:p>
          </table:table-cell>
          <table:table-cell table:style-name="ce94" office:value-type="string" calcext:value-type="string">
            <text:p><text:s text:c="4"/>.rescope-root</text:p>
          </table:table-cell>
          <table:table-cell table:style-name="ce124" office:value-type="string" calcext:value-type="string">
            <text:p>BA shall be able to change the tag scope to the top-level. [FR-220]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24"/>
          <table:table-cell table:style-name="ce192" table:number-columns-repeated="2"/>
          <table:table-cell table:style-name="ce196"/>
          <table:table-cell table:style-name="ce192" table:number-columns-repeated="4"/>
          <table:table-cell table:style-name="ce200" table:number-columns-repeated="1009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8" calcext:value-type="float">
            <text:p>FR-228</text:p>
          </table:table-cell>
          <table:table-cell table:style-name="ce96" office:value-type="string" calcext:value-type="string">
            <text:p><text:s text:c="4"/>.reqs</text:p>
          </table:table-cell>
          <table:table-cell table:style-name="ce117" office:value-type="string" calcext:value-type="string">
            <text:p>System shall present a list of all requirements (in scope [FR-225])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4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9" calcext:value-type="float">
            <text:p>FR-229</text:p>
          </table:table-cell>
          <table:table-cell table:style-name="ce88" office:value-type="string" calcext:value-type="string">
            <text:p><text:s text:c="6"/>.ord-seg</text:p>
          </table:table-cell>
          <table:table-cell table:style-name="ce117" office:value-type="string" calcext:value-type="string">
            <text:p>System order requirements so that they are grouped the same way that segments are in the allocation graph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0" calcext:value-type="float">
            <text:p>FR-230</text:p>
          </table:table-cell>
          <table:table-cell table:style-name="ce88" office:value-type="string" calcext:value-type="string">
            <text:p><text:s text:c="6"/>.select</text:p>
          </table:table-cell>
          <table:table-cell table:style-name="ce117" office:value-type="string" calcext:value-type="string">
            <text:p>BA shall be able to select and deselect requirements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1" calcext:value-type="float">
            <text:p>FR-231</text:p>
          </table:table-cell>
          <table:table-cell table:style-name="ce88" office:value-type="string" calcext:value-type="string">
            <text:p><text:s text:c="8"/>.apply</text:p>
          </table:table-cell>
          <table:table-cell table:style-name="ce117" office:value-type="string" calcext:value-type="string">
            <text:p>BA shall be able to apply the subject tag or one of its children, to selected requirement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2" calcext:value-type="float">
            <text:p>FR-232</text:p>
          </table:table-cell>
          <table:table-cell table:style-name="ce88" office:value-type="string" calcext:value-type="string">
            <text:p><text:s text:c="8"/>.remove</text:p>
          </table:table-cell>
          <table:table-cell table:style-name="ce117" office:value-type="string" calcext:value-type="string">
            <text:p>BA shall be able to remove the subject tag or one of its children, from selected requirement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3" calcext:value-type="float">
            <text:p>FR-233</text:p>
          </table:table-cell>
          <table:table-cell table:style-name="ce88" office:value-type="string" calcext:value-type="string">
            <text:p><text:s text:c="8"/>.replace</text:p>
          </table:table-cell>
          <table:table-cell table:style-name="ce117" office:value-type="string" calcext:value-type="string">
            <text:p>BA shall be able to replace G in selected requirements with another G, where G is the subject ta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4"/>.tags</text:p>
          </table:table-cell>
          <table:table-cell table:style-name="ce125" office:value-type="string" calcext:value-type="string">
            <text:p>Edit tags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4" calcext:value-type="float">
            <text:p>FR-234</text:p>
          </table:table-cell>
          <table:table-cell table:style-name="ce88" office:value-type="string" calcext:value-type="string">
            <text:p><text:s text:c="6"/>.add</text:p>
          </table:table-cell>
          <table:table-cell table:style-name="ce117" office:value-type="string" calcext:value-type="string">
            <text:p>BA shall be able to add a new tag as a child of the subject ta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5" calcext:value-type="float">
            <text:p>FR-235</text:p>
          </table:table-cell>
          <table:table-cell table:style-name="ce88" office:value-type="string" calcext:value-type="string">
            <text:p><text:s text:c="6"/>.edit</text:p>
          </table:table-cell>
          <table:table-cell table:style-name="ce117" office:value-type="string" calcext:value-type="string">
            <text:p>BA shall be able to edit the subject ta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6" calcext:value-type="float">
            <text:p>FR-236</text:p>
          </table:table-cell>
          <table:table-cell table:style-name="ce88" office:value-type="string" calcext:value-type="string">
            <text:p><text:s text:c="6"/>.delete</text:p>
          </table:table-cell>
          <table:table-cell table:style-name="ce117" office:value-type="string" calcext:value-type="string">
            <text:p>BA shall be able to delete the subject ta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7" calcext:value-type="float">
            <text:p>FR-237</text:p>
          </table:table-cell>
          <table:table-cell table:style-name="ce88" office:value-type="string" calcext:value-type="string">
            <text:p><text:s text:c="6"/>.restore</text:p>
          </table:table-cell>
          <table:table-cell table:style-name="ce117" office:value-type="string" calcext:value-type="string">
            <text:p>BA shall be able to restore a deleted child tag of <text:s/>the subject ta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8" office:value-type="float" office:value="12" calcext:value-type="float">
            <text:p>MF-12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llreq</text:p>
          </table:table-cell>
          <table:table-cell table:style-name="ce114" office:value-type="string" calcext:value-type="string">
            <text:p>MF-12: Low-level Requirements</text:p>
          </table:table-cell>
          <table:table-cell table:style-name="ce114" table:number-columns-repeated="3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data</text:p>
          </table:table-cell>
          <table:table-cell table:style-name="ce121" office:value-type="string" calcext:value-type="string">
            <text:p>Req Data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78" calcext:value-type="float">
            <text:p>FR-78</text:p>
          </table:table-cell>
          <table:table-cell table:style-name="ce88" office:value-type="string" calcext:value-type="string">
            <text:p><text:s text:c="2"/>.id.auto</text:p>
          </table:table-cell>
          <table:table-cell table:style-name="ce115" office:value-type="string" calcext:value-type="string">
            <text:p>System shall allocate reqs a unique ID automatically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79" calcext:value-type="float">
            <text:p>FR-79</text:p>
          </table:table-cell>
          <table:table-cell table:style-name="ce88" office:value-type="string" calcext:value-type="string">
            <text:p><text:s text:c="2"/>.id.fmt</text:p>
          </table:table-cell>
          <table:table-cell table:style-name="ce115" office:value-type="string" calcext:value-type="string">
            <text:p>System shall create unique ID reqs by combining a req-type's mnemonic &amp; a number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77" calcext:value-type="float">
            <text:p>FR-77</text:p>
          </table:table-cell>
          <table:table-cell table:style-name="ce88" office:value-type="string" calcext:value-type="string">
            <text:p><text:s text:c="2"/>.last-updated</text:p>
          </table:table-cell>
          <table:table-cell table:style-name="ce115" office:value-type="string" calcext:value-type="string">
            <text:p>System shall maintain the last-updated timestamp of reqs automatically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0" calcext:value-type="float">
            <text:p>FR-80</text:p>
          </table:table-cell>
          <table:table-cell table:style-name="ce88" office:value-type="string" calcext:value-type="string">
            <text:p><text:s text:c="2"/>.ref.reqs</text:p>
          </table:table-cell>
          <table:table-cell table:style-name="ce115" office:value-type="string" calcext:value-type="string">
            <text:p>BA shall be able to reference reqs from req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8" calcext:value-type="float">
            <text:p>FR-148</text:p>
          </table:table-cell>
          <table:table-cell table:style-name="ce88" office:value-type="string" calcext:value-type="string">
            <text:p><text:s text:c="2"/>.ref.shr</text:p>
          </table:table-cell>
          <table:table-cell table:style-name="ce115" office:value-type="string" calcext:value-type="string">
            <text:p>BA shall be able to reference SHRs from req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1" calcext:value-type="float">
            <text:p>FR-81</text:p>
          </table:table-cell>
          <table:table-cell table:style-name="ce88" office:value-type="string" calcext:value-type="string">
            <text:p><text:s text:c="2"/>.ref.ucs</text:p>
          </table:table-cell>
          <table:table-cell table:style-name="ce115" office:value-type="string" calcext:value-type="string">
            <text:p>BA shall be able to reference UCs from req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80" office:value-type="float" office:value="102" calcext:value-type="float">
            <text:p>FR-102</text:p>
          </table:table-cell>
          <table:table-cell table:style-name="ce91" office:value-type="string" calcext:value-type="string">
            <text:p>.delete</text:p>
          </table:table-cell>
          <table:table-cell table:style-name="ce121" office:value-type="string" calcext:value-type="string">
            <text:p>BA shall be able to (soft) delete reqs.</text:p>
          </table:table-cell>
          <table:table-cell table:number-columns-repeated="2" table:style-name="ce170" office:value-type="date" office:date-value="2014-05-15" calcext:value-type="date">
            <text:p>15/05/14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4" calcext:value-type="float">
            <text:p>FR-104</text:p>
          </table:table-cell>
          <table:table-cell table:style-name="ce88" office:value-type="string" calcext:value-type="string">
            <text:p><text:s text:c="2"/>.hide</text:p>
          </table:table-cell>
          <table:table-cell table:style-name="ce115" office:value-type="string" calcext:value-type="string">
            <text:p>BA shall be able to hide deleted reqs from view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3" calcext:value-type="float">
            <text:p>FR-103</text:p>
          </table:table-cell>
          <table:table-cell table:style-name="ce88" office:value-type="string" calcext:value-type="string">
            <text:p><text:s text:c="2"/>.read</text:p>
          </table:table-cell>
          <table:table-cell table:style-name="ce115" office:value-type="string" calcext:value-type="string">
            <text:p>BA shall be able to read deleted reqs (usually in light grey and/or strikethrough)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6" calcext:value-type="float">
            <text:p>FR-106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5" office:value-type="string" calcext:value-type="string">
            <text:p>BA shall be able to restore deleted req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107" calcext:value-type="float">
            <text:p>FR-107</text:p>
          </table:table-cell>
          <table:table-cell table:style-name="ce88" office:value-type="string" calcext:value-type="string">
            <text:p><text:s text:c="5"/>.refs</text:p>
          </table:table-cell>
          <table:table-cell table:style-name="ce126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74"/>
          <table:table-cell table:style-name="ce91" office:value-type="string" calcext:value-type="string">
            <text:p>.reqtypes</text:p>
          </table:table-cell>
          <table:table-cell table:style-name="ce121" office:value-type="string" calcext:value-type="string">
            <text:p>Requirement Types</text:p>
          </table:table-cell>
          <table:table-cell table:number-columns-repeated="2" table:style-name="ce170" office:value-type="date" office:date-value="2014-05-16" calcext:value-type="date">
            <text:p>16/05/14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6" calcext:value-type="float">
            <text:p>FR-116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7" office:value-type="string" calcext:value-type="string">
            <text:p>BA shall be able to list all existing req types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7" calcext:value-type="float">
            <text:p>FR-117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7" office:value-type="string" calcext:value-type="string">
            <text:p>BA shall be able to add a new req type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8" calcext:value-type="float">
            <text:p>FR-118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modify a req type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9" calcext:value-type="float">
            <text:p>FR-119</text:p>
          </table:table-cell>
          <table:table-cell table:style-name="ce88" office:value-type="string" calcext:value-type="string">
            <text:p><text:s text:c="4"/>.refs</text:p>
          </table:table-cell>
          <table:table-cell table:style-name="ce117" office:value-type="string" calcext:value-type="string">
            <text:p>When a req type's mnemonic is changed, System shall appear to rename all refs that include the mnemonic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22" calcext:value-type="float">
            <text:p>FR-122</text:p>
          </table:table-cell>
          <table:table-cell table:style-name="ce88" office:value-type="string" calcext:value-type="string">
            <text:p><text:s text:c="4"/>.mnemonic</text:p>
          </table:table-cell>
          <table:table-cell table:style-name="ce117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20" calcext:value-type="float">
            <text:p>FR-120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(soft) delete a req type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21" calcext:value-type="float">
            <text:p>FR-121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7" office:value-type="string" calcext:value-type="string">
            <text:p>When listing req types, BA shall be able to see a summary of usage. (i.e. count of associated reqs)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09" calcext:value-type="float">
            <text:p>FR-309</text:p>
          </table:table-cell>
          <table:table-cell table:style-name="ce88" office:value-type="string" calcext:value-type="string">
            <text:p><text:s text:c="4"/>.reqs</text:p>
          </table:table-cell>
          <table:table-cell table:style-name="ce117" office:value-type="string" calcext:value-type="string">
            <text:p>When a req type is deleted, all associated reqs shall be considered deleted too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25" calcext:value-type="float">
            <text:p>FR-125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24" office:value-type="string" calcext:value-type="string">
            <text:p>BA shall be able to restore deleted req typ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0" calcext:value-type="float">
            <text:p>FR-310</text:p>
          </table:table-cell>
          <table:table-cell table:style-name="ce88" office:value-type="string" calcext:value-type="string">
            <text:p><text:s text:c="4"/>.reqs</text:p>
          </table:table-cell>
          <table:table-cell table:style-name="ce117" office:value-type="string" calcext:value-type="string">
            <text:p>When a req type is restored, all reqs that were considered deleted due to the req-type deletion, shall be considered restored too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view</text:p>
          </table:table-cell>
          <table:table-cell table:style-name="ce121" office:value-type="string" calcext:value-type="string">
            <text:p>Req Table</text:p>
          </table:table-cell>
          <table:table-cell table:style-name="ce121" table:number-columns-repeated="3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4" calcext:value-type="float">
            <text:p>FR-84</text:p>
          </table:table-cell>
          <table:table-cell table:style-name="ce88" office:value-type="string" calcext:value-type="string">
            <text:p><text:s text:c="2"/>.rows</text:p>
          </table:table-cell>
          <table:table-cell table:style-name="ce115" office:value-type="string" calcext:value-type="string">
            <text:p>BA shall be able to view all reqs with each req on its own row. (Excludes subreqs: UC Fields &amp; UC Steps)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3" calcext:value-type="float">
            <text:p>FR-83</text:p>
          </table:table-cell>
          <table:table-cell table:style-name="ce88" office:value-type="string" calcext:value-type="string">
            <text:p><text:s text:c="2"/>.table</text:p>
          </table:table-cell>
          <table:table-cell table:style-name="ce115" office:value-type="string" calcext:value-type="string">
            <text:p>BA shall be able to view all reqs as a table/grid. (Excludes subreqs: UC Fields &amp; UC Steps)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68" calcext:value-type="float">
            <text:p>FR-268</text:p>
          </table:table-cell>
          <table:table-cell table:style-name="ce88" office:value-type="string" calcext:value-type="string">
            <text:p><text:s text:c="2"/>.filters</text:p>
          </table:table-cell>
          <table:table-cell table:style-name="ce117" office:value-type="string" calcext:value-type="string">
            <text:p>BA shall be able to filter req table contents. (See <text:span text:style-name="T4">Filtering</text:span> section.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6" calcext:value-type="float">
            <text:p>FR-176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5" office:value-type="string" calcext:value-type="string">
            <text:p>BA shall be able to create new reqs. (Excludes subreqs: UC Fields &amp; UC Steps)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66" calcext:value-type="float">
            <text:p>FR-266</text:p>
          </table:table-cell>
          <table:table-cell table:style-name="ce90" office:value-type="string" calcext:value-type="string">
            <text:p><text:s text:c="4"/>.child</text:p>
          </table:table-cell>
          <table:table-cell table:style-name="ce115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7">Example: if a selected req has sem-IDs {a.b, x.y} and the user creates a new req with sem-ID {.f}, then its expanded sem-IDs should be {a.b.f, x.y.f}.</text:span>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3"/>
          <table:table-cell table:style-name="ce198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170" calcext:value-type="float">
            <text:p>FR-170</text:p>
          </table:table-cell>
          <table:table-cell table:style-name="ce90" office:value-type="string" calcext:value-type="string">
            <text:p><text:s text:c="2"/>.uc.semid</text:p>
          </table:table-cell>
          <table:table-cell table:style-name="ce115" office:value-type="string" calcext:value-type="string">
            <text:p>BA shall be able to perform on UCs, all semantic-ID related behaviour applicable to LL-reqs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2"/>.columns</text:p>
          </table:table-cell>
          <table:table-cell table:style-name="ce127" table:number-columns-repeated="4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0" calcext:value-type="float">
            <text:p>FR-140</text:p>
          </table:table-cell>
          <table:table-cell table:style-name="ce88" office:value-type="string" calcext:value-type="string">
            <text:p><text:s text:c="4"/>.desc</text:p>
          </table:table-cell>
          <table:table-cell table:style-name="ce115" office:value-type="string" calcext:value-type="string">
            <text:p>In the LL-req table, System shall always display a column of req desc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38" calcext:value-type="float">
            <text:p>FR-138</text:p>
          </table:table-cell>
          <table:table-cell table:style-name="ce88" office:value-type="string" calcext:value-type="string">
            <text:p><text:s text:c="4"/>.ids</text:p>
          </table:table-cell>
          <table:table-cell table:style-name="ce115" office:value-type="string" calcext:value-type="string">
            <text:p>In the LL-req table, System shall always display a column of req IDs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string" calcext:value-type="string">
            <text:p>MF-12</text:p>
            <text:p>MF-13</text:p>
          </table:table-cell>
          <table:table-cell table:style-name="ce39" office:value-type="float" office:value="5" calcext:value-type="float">
            <text:p>MF-05</text:p>
          </table:table-cell>
          <table:table-cell table:style-name="ce69" office:value-type="float" office:value="287" calcext:value-type="float">
            <text:p>FR-287</text:p>
          </table:table-cell>
          <table:table-cell table:style-name="ce88" office:value-type="string" calcext:value-type="string">
            <text:p><text:s text:c="4"/>.impcol-dup</text:p>
          </table:table-cell>
          <table:table-cell table:style-name="ce115" office:value-type="string" calcext:value-type="string">
            <text:p>When the req list view with is sorted by an implication field (FR-283) and a req has multiple matching implying reqs, System shall a row for each, just like FR-95.</text:p>
          </table:table-cell>
          <table:table-cell table:number-columns-repeated="2" table:style-name="ce168" office:value-type="date" office:date-value="2014-10-07" calcext:value-type="date">
            <text:p>07/10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2" calcext:value-type="float">
            <text:p>FR-312</text:p>
          </table:table-cell>
          <table:table-cell table:style-name="ce88" office:value-type="string" calcext:value-type="string">
            <text:p><text:s text:c="4"/>.deletion-reason</text:p>
          </table:table-cell>
          <table:table-cell table:style-name="ce115" office:value-type="string" calcext:value-type="string">
            <text:p>BA shall be able to view reasons for deletion in the ReqTable when showing deleted conten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39" calcext:value-type="float">
            <text:p>FR-139</text:p>
          </table:table-cell>
          <table:table-cell table:style-name="ce88" office:value-type="string" calcext:value-type="string">
            <text:p><text:s text:c="4"/>.semid</text:p>
          </table:table-cell>
          <table:table-cell table:style-name="ce115" office:value-type="string" calcext:value-type="string">
            <text:p>In the LL-req table, System shall always display a column of semantic IDs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6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5" calcext:value-type="float">
            <text:p>FR-95</text:p>
          </table:table-cell>
          <table:table-cell table:style-name="ce97" office:value-type="string" calcext:value-type="string">
            <text:p><text:s text:c="7"/>.dup</text:p>
          </table:table-cell>
          <table:table-cell table:style-name="ce115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4" calcext:value-type="float">
            <text:p>FR-94</text:p>
          </table:table-cell>
          <table:table-cell table:style-name="ce97" office:value-type="string" calcext:value-type="string">
            <text:p><text:s text:c="7"/>.indent</text:p>
          </table:table-cell>
          <table:table-cell table:style-name="ce115" office:value-type="string" calcext:value-type="string">
            <text:p>When rendering a tree of semantic IDs, System shall replace components also in the parent req, with indentation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6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3" calcext:value-type="float">
            <text:p>FR-93</text:p>
          </table:table-cell>
          <table:table-cell table:style-name="ce97" office:value-type="string" calcext:value-type="string">
            <text:p><text:s text:c="7"/>.tree</text:p>
          </table:table-cell>
          <table:table-cell table:style-name="ce115" office:value-type="string" calcext:value-type="string">
            <text:p>When sorting by semantic IDs, System shall display reqs as a tree using sem-ID components (separated by dots) as nodes.</text:p>
            <text:p><text:span text:style-name="T7">Example: A.B.C is a child of A.B</text:span>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37" calcext:value-type="float">
            <text:p>FR-137</text:p>
          </table:table-cell>
          <table:table-cell table:style-name="ce88" office:value-type="string" calcext:value-type="string">
            <text:p><text:s text:c="4"/>.sorted</text:p>
          </table:table-cell>
          <table:table-cell table:style-name="ce115" office:value-type="string" calcext:value-type="string">
            <text:p>In the LL-req table, System shall give each criterion in the sort criteria it's own column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2"/>.editor</text:p>
          </table:table-cell>
          <table:table-cell table:style-name="ce127" table:number-columns-repeated="4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2" calcext:value-type="float">
            <text:p>FR-172</text:p>
          </table:table-cell>
          <table:table-cell table:style-name="ce90" office:value-type="string" calcext:value-type="string">
            <text:p><text:s text:c="4"/>.copy</text:p>
          </table:table-cell>
          <table:table-cell table:style-name="ce115" office:value-type="string" calcext:value-type="string">
            <text:p>BA shall be able to create a copy of 1 or more (selected) LL-reqs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3" calcext:value-type="float">
            <text:p>FR-173</text:p>
          </table:table-cell>
          <table:table-cell table:style-name="ce90" office:value-type="string" calcext:value-type="string">
            <text:p><text:s text:c="7"/>.selection</text:p>
          </table:table-cell>
          <table:table-cell table:style-name="ce115" office:value-type="string" calcext:value-type="string">
            <text:p>After creating a copy of LL-reqs (FR-172), System shall change the selection so that only the newly created rows are selected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6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4" calcext:value-type="float">
            <text:p>FR-174</text:p>
          </table:table-cell>
          <table:table-cell table:style-name="ce90" office:value-type="string" calcext:value-type="string">
            <text:p><text:s text:c="7"/>.semid</text:p>
          </table:table-cell>
          <table:table-cell table:style-name="ce115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5" calcext:value-type="float">
            <text:p>FR-85</text:p>
          </table:table-cell>
          <table:table-cell table:style-name="ce88" office:value-type="string" calcext:value-type="string">
            <text:p><text:s text:c="4"/>.cursor</text:p>
          </table:table-cell>
          <table:table-cell table:style-name="ce115" office:value-type="string" calcext:value-type="string">
            <text:p>When editing LL reqs, BA shall be able to move the cursor to a different req in either direction with a single keystroke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6" calcext:value-type="float">
            <text:p>FR-156</text:p>
          </table:table-cell>
          <table:table-cell table:style-name="ce90" office:value-type="string" calcext:value-type="string">
            <text:p><text:s text:c="4"/>.dups</text:p>
          </table:table-cell>
          <table:table-cell table:style-name="ce115" office:value-type="string" calcext:value-type="string">
            <text:p>When row is displayed more than once (due to sem-ID or implication field), editing one instance should update the display of all other instances.</text:p>
          </table:table-cell>
          <table:table-cell table:number-columns-repeated="2" table:style-name="ce168" office:value-type="date" office:date-value="2014-10-07" calcext:value-type="date">
            <text:p>07/10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7" calcext:value-type="float">
            <text:p>FR-177</text:p>
          </table:table-cell>
          <table:table-cell table:style-name="ce95" office:value-type="string" calcext:value-type="string">
            <text:p><text:s text:c="2"/>.update</text:p>
          </table:table-cell>
          <table:table-cell table:style-name="ce128" office:value-type="string" calcext:value-type="string">
            <text:p>BA shall be able to update an existing LL-req.</text:p>
          </table:table-cell>
          <table:table-cell table:number-columns-repeated="2" table:style-name="ce169" office:value-type="date" office:date-value="2014-05-22" calcext:value-type="date">
            <text:p>22/05/14</text:p>
          </table:table-cell>
          <table:table-cell table:style-name="ce128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8" calcext:value-type="float">
            <text:p>FR-178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When an LL-req is updated, System shall appear to rename all references to it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0" calcext:value-type="float">
            <text:p>FR-90</text:p>
          </table:table-cell>
          <table:table-cell table:style-name="ce88" office:value-type="string" calcext:value-type="string">
            <text:p><text:s text:c="4"/>.reqtype</text:p>
          </table:table-cell>
          <table:table-cell table:style-name="ce115" office:value-type="string" calcext:value-type="string">
            <text:p>BA shall be able to change the requirement type of a requirement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1" calcext:value-type="float">
            <text:p>FR-91</text:p>
          </table:table-cell>
          <table:table-cell table:style-name="ce88" office:value-type="string" calcext:value-type="string">
            <text:p><text:s text:c="6"/>.restore</text:p>
          </table:table-cell>
          <table:table-cell table:style-name="ce115" office:value-type="string" calcext:value-type="string">
            <text:p>When a req's type is changed and later changed back to what it was previously, System restore it's original ID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94" calcext:value-type="float">
            <text:p>FR-194</text:p>
          </table:table-cell>
          <table:table-cell table:style-name="ce88" office:value-type="string" calcext:value-type="string">
            <text:p><text:s text:c="6"/>.bulk</text:p>
          </table:table-cell>
          <table:table-cell table:style-name="ce115" office:value-type="string" calcext:value-type="string">
            <text:p>BA shall be able to set the req-type for multiple reqs simultaneously.</text:p>
          </table:table-cell>
          <table:table-cell table:number-columns-repeated="2" table:style-name="ce168" office:value-type="date" office:date-value="2014-05-23" calcext:value-type="date">
            <text:p>23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7" calcext:value-type="float">
            <text:p>FR-97</text:p>
          </table:table-cell>
          <table:table-cell table:style-name="ce97" office:value-type="string" calcext:value-type="string">
            <text:p><text:s text:c="4"/>.semid</text:p>
          </table:table-cell>
          <table:table-cell table:style-name="ce115" office:value-type="string" calcext:value-type="string">
            <text:p>BA shall be able to modify the semantic IDs of existing req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3" calcext:value-type="float">
            <text:p>FR-143</text:p>
          </table:table-cell>
          <table:table-cell table:style-name="ce97" office:value-type="string" calcext:value-type="string">
            <text:p><text:s text:c="7"/>.0-n</text:p>
          </table:table-cell>
          <table:table-cell table:style-name="ce115" office:value-type="string" calcext:value-type="string">
            <text:p>BA shall be able to apply 0-n semantic IDs to LL-req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9" calcext:value-type="float">
            <text:p>FR-219</text:p>
          </table:table-cell>
          <table:table-cell table:style-name="ce97" office:value-type="string" calcext:value-type="string">
            <text:p><text:s text:c="7"/>.prevent.cyclic</text:p>
          </table:table-cell>
          <table:table-cell table:style-name="ce115" office:value-type="string" calcext:value-type="string">
            <text:p>System shall prevent a req's sem-ID transitively having itself as a child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6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6" calcext:value-type="float">
            <text:p>FR-96</text:p>
          </table:table-cell>
          <table:table-cell table:style-name="ce98" office:value-type="string" calcext:value-type="string">
            <text:p><text:s text:c="7"/>.show-all</text:p>
          </table:table-cell>
          <table:table-cell table:style-name="ce115" office:value-type="string" calcext:value-type="string">
            <text:p>BA shall be able to see all semantic IDs for a req with multiple, when editing a single row.</text:p>
            <text:p><text:span text:style-name="T8">Idea is that each duplicate row displays all semIDs but the first is the one that reflects its place in the tree, then the rest follow a-z in light grey.</text:span>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7" calcext:value-type="float">
            <text:p>FR-167</text:p>
          </table:table-cell>
          <table:table-cell table:style-name="ce90" office:value-type="string" calcext:value-type="string">
            <text:p><text:s text:c="6"/>.bulk</text:p>
          </table:table-cell>
          <table:table-cell table:style-name="ce115" office:value-type="string" calcext:value-type="string">
            <text:p>BA shall be able to modify the common leading semantic ID component(s) of a set of reqs.</text:p>
            <text:p><text:span text:style-name="T7">Example: a.b.c &amp; a.b.d allows modification of “a.b” which BA can turn into “”, “x.b”, “a.b.x”, etc.</text:span>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8" calcext:value-type="float">
            <text:p>FR-168</text:p>
          </table:table-cell>
          <table:table-cell table:style-name="ce90" office:value-type="string" calcext:value-type="string">
            <text:p><text:s text:c="8"/>.no-common</text:p>
          </table:table-cell>
          <table:table-cell table:style-name="ce115" office:value-type="string" calcext:value-type="string">
            <text:p>Further clarifying [FR-167], if when requesting to bulk-modify semantic IDs there is no common prefix, BA shall be able to specify one.</text:p>
            <text:p><text:span text:style-name="T7">Example: a.b &amp; f.g allows modification of common prefix “”, which BA can turn into “x” to result in x.a.b &amp; x.f.g.</text:span>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171" calcext:value-type="float">
            <text:p>FR-171</text:p>
          </table:table-cell>
          <table:table-cell table:style-name="ce90" office:value-type="string" calcext:value-type="string">
            <text:p><text:s text:c="4"/>.uc.title</text:p>
          </table:table-cell>
          <table:table-cell table:style-name="ce115" office:value-type="string" calcext:value-type="string">
            <text:p>BA shall be able to edit a UC title from the req view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9" calcext:value-type="float">
            <text:p>FR-179</text:p>
          </table:table-cell>
          <table:table-cell table:style-name="ce95" office:value-type="string" calcext:value-type="string">
            <text:p><text:s text:c="2"/>.delete</text:p>
          </table:table-cell>
          <table:table-cell table:style-name="ce129" office:value-type="string" calcext:value-type="string">
            <text:p>Able to (soft) delete LL-req.</text:p>
          </table:table-cell>
          <table:table-cell table:number-columns-repeated="2" table:style-name="ce169" office:value-type="date" office:date-value="2014-05-22" calcext:value-type="date">
            <text:p>22/05/14</text:p>
          </table:table-cell>
          <table:table-cell table:style-name="ce128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3" calcext:value-type="float">
            <text:p>FR-313</text:p>
          </table:table-cell>
          <table:table-cell table:style-name="ce90" office:value-type="string" calcext:value-type="string">
            <text:p><text:s text:c="4"/>.cascade</text:p>
          </table:table-cell>
          <table:table-cell table:style-name="ce115" office:value-type="string" calcext:value-type="string">
            <text:p>When deleting, BA shall be able to select a subset of solely implied reqs (transitively) to cascade the deletion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4" calcext:value-type="float">
            <text:p>FR-314</text:p>
          </table:table-cell>
          <table:table-cell table:style-name="ce90" office:value-type="string" calcext:value-type="string">
            <text:p><text:s text:c="4"/>.reason</text:p>
          </table:table-cell>
          <table:table-cell table:style-name="ce115" office:value-type="string" calcext:value-type="string">
            <text:p>When deleting, BA shall be able to enter a reason for deletion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7" calcext:value-type="float">
            <text:p>FR-317</text:p>
          </table:table-cell>
          <table:table-cell table:style-name="ce90" office:value-type="string" calcext:value-type="string">
            <text:p><text:s text:c="4"/>.rcgs</text:p>
          </table:table-cell>
          <table:table-cell table:style-name="ce130" office:value-type="string" calcext:value-type="string">
            <text:p>When deleting, System shall also delete RCGs that would no longer have live children after deletion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83" calcext:value-type="float">
            <text:p>FR-183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9" office:value-type="string" calcext:value-type="string">
            <text:p>BA shall be able to restore LL-reqs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84" calcext:value-type="float">
            <text:p>FR-184</text:p>
          </table:table-cell>
          <table:table-cell table:style-name="ce90" office:value-type="string" calcext:value-type="string">
            <text:p><text:s text:c="4"/>.data</text:p>
          </table:table-cell>
          <table:table-cell table:style-name="ce119" office:value-type="string" calcext:value-type="string">
            <text:p>Upon LL-req restoration, previous values and associations shall be restored also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5" calcext:value-type="float">
            <text:p>FR-315</text:p>
          </table:table-cell>
          <table:table-cell table:style-name="ce90" office:value-type="string" calcext:value-type="string">
            <text:p><text:s text:c="4"/>.cascade</text:p>
          </table:table-cell>
          <table:table-cell table:style-name="ce115" office:value-type="string" calcext:value-type="string">
            <text:p>When restoring, BA shall be able to select a subset of implied reqs (transitively, needn't be soley implied) to cascade the restoration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6" calcext:value-type="float">
            <text:p>FR-326</text:p>
          </table:table-cell>
          <table:table-cell table:style-name="ce90" office:value-type="string" calcext:value-type="string">
            <text:p><text:s text:c="6"/>.show-reason</text:p>
          </table:table-cell>
          <table:table-cell table:style-name="ce115" office:value-type="string" calcext:value-type="string">
            <text:p>When selecting implied reqs for restoring, BA shall be able to see the reason each was deleted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6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8" calcext:value-type="float">
            <text:p>FR-318</text:p>
          </table:table-cell>
          <table:table-cell table:style-name="ce90" office:value-type="string" calcext:value-type="string">
            <text:p><text:s text:c="4"/>.rcgs</text:p>
          </table:table-cell>
          <table:table-cell table:style-name="ce130" office:value-type="string" calcext:value-type="string">
            <text:p>When restoring, System shall also restore RCGs deleted as a result of req deletion [FR-317]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9" calcext:value-type="float">
            <text:p>FR-319</text:p>
          </table:table-cell>
          <table:table-cell table:style-name="ce90" office:value-type="string" calcext:value-type="string">
            <text:p><text:s text:c="4"/>.rc-conflict</text:p>
          </table:table-cell>
          <table:table-cell table:style-name="ce130" office:value-type="string" calcext:value-type="string">
            <text:p>If restoration would introduce a req code conflict, BA shall be able to have System do one of:</text:p>
            <text:p>* cancel</text:p>
            <text:p>* have System add an arbitrary prefix to req code trees</text:p>
            <text:p>* auto-rename conflicting nodes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0" calcext:value-type="float">
            <text:p>FR-320</text:p>
          </table:table-cell>
          <table:table-cell table:style-name="ce90" office:value-type="string" calcext:value-type="string">
            <text:p><text:s text:c="6"/>.rcg-merge</text:p>
          </table:table-cell>
          <table:table-cell table:style-name="ce130" office:value-type="string" calcext:value-type="string">
            <text:p>When determining req code conflict during restoration, System shall merge RCGs with matching tex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1" calcext:value-type="float">
            <text:p>FR-311</text:p>
          </table:table-cell>
          <table:table-cell table:style-name="ce90" office:value-type="string" calcext:value-type="string">
            <text:p><text:s text:c="4"/>.req-type</text:p>
          </table:table-cell>
          <table:table-cell table:style-name="ce119" office:value-type="string" calcext:value-type="string">
            <text:p>BA shall not be able to restore reqs associated with deleted req types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2"/>.sort</text:p>
          </table:table-cell>
          <table:table-cell table:style-name="ce127" table:number-columns-repeated="4"/>
          <table:table-cell table:number-columns-repeated="1016"/>
        </table:table-row>
        <table:table-row table:style-name="ro6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8" calcext:value-type="float">
            <text:p>FR-98</text:p>
          </table:table-cell>
          <table:table-cell table:style-name="ce88" office:value-type="string" calcext:value-type="string">
            <text:p><text:s text:c="4"/>.default</text:p>
          </table:table-cell>
          <table:table-cell table:style-name="ce115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9" calcext:value-type="float">
            <text:p>FR-109</text:p>
          </table:table-cell>
          <table:table-cell table:style-name="ce88" office:value-type="string" calcext:value-type="string">
            <text:p><text:s text:c="4"/>.on-change</text:p>
          </table:table-cell>
          <table:table-cell table:style-name="ce115" office:value-type="string" calcext:value-type="string">
            <text:p>When a req is modified, System shall automatically resort the view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6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0" calcext:value-type="float">
            <text:p>FR-110</text:p>
          </table:table-cell>
          <table:table-cell table:style-name="ce88" office:value-type="string" calcext:value-type="string">
            <text:p><text:s text:c="4"/>.post-change</text:p>
          </table:table-cell>
          <table:table-cell table:style-name="ce126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9" calcext:value-type="float">
            <text:p>FR-99</text:p>
          </table:table-cell>
          <table:table-cell table:style-name="ce88" office:value-type="string" calcext:value-type="string">
            <text:p><text:s text:c="4"/>.custom</text:p>
          </table:table-cell>
          <table:table-cell table:style-name="ce115" office:value-type="string" calcext:value-type="string">
            <text:p>BA shall be able to customise sort logic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5" calcext:value-type="float">
            <text:p>MF-05</text:p>
          </table:table-cell>
          <table:table-cell table:style-name="ce69" office:value-type="float" office:value="141" calcext:value-type="float">
            <text:p>FR-141</text:p>
          </table:table-cell>
          <table:table-cell table:style-name="ce88" office:value-type="string" calcext:value-type="string">
            <text:p><text:s text:c="7"/>.fields</text:p>
          </table:table-cell>
          <table:table-cell table:style-name="ce115" office:value-type="string" calcext:value-type="string">
            <text:p>BA shall be able to use custom fields in the sort criteria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MF-07</text:p>
            <text:p>MF-13</text:p>
          </table:table-cell>
          <table:table-cell table:style-name="ce69" office:value-type="float" office:value="203" calcext:value-type="float">
            <text:p>FR-203</text:p>
          </table:table-cell>
          <table:table-cell table:style-name="ce88" office:value-type="string" calcext:value-type="string">
            <text:p><text:s text:c="7"/>.grouping-order</text:p>
          </table:table-cell>
          <table:table-cell table:style-name="ce115" office:value-type="string" calcext:value-type="string">
            <text:p>When sorting by grouping, System shall order sibling groupings according to their index relative to their parent.</text:p>
            <text:p><text:span text:style-name="T6">Eg. If BA orders Pri=High before Pri=Med in the grouping tree, then reqs with Pri=High should be appear before reqs with Pri=Med.</text:span>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0" calcext:value-type="float">
            <text:p>FR-100</text:p>
          </table:table-cell>
          <table:table-cell table:style-name="ce88" office:value-type="string" calcext:value-type="string">
            <text:p><text:s text:c="7"/>.mult</text:p>
          </table:table-cell>
          <table:table-cell table:style-name="ce115" office:value-type="string" calcext:value-type="string">
            <text:p>BA shall be able to sort by multiple, ordered column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8" calcext:value-type="float">
            <text:p>FR-108</text:p>
          </table:table-cell>
          <table:table-cell table:style-name="ce88" office:value-type="string" calcext:value-type="string">
            <text:p><text:s text:c="7"/>.off</text:p>
          </table:table-cell>
          <table:table-cell table:style-name="ce115" office:value-type="string" calcext:value-type="string">
            <text:p>When reqs are sorted using a custom order, BA must be able to restore the default order with a single mouse-click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refs</text:p>
          </table:table-cell>
          <table:table-cell table:style-name="ce121" office:value-type="string" calcext:value-type="string">
            <text:p>Refs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5" calcext:value-type="float">
            <text:p>FR-155</text:p>
          </table:table-cell>
          <table:table-cell table:style-name="ce88" office:value-type="string" calcext:value-type="string">
            <text:p>.code.req.parse</text:p>
          </table:table-cell>
          <table:table-cell table:style-name="ce115" office:value-type="string" calcext:value-type="string">
            <text:p>Where BA can specify refs to reqs, BA can specify using a semantic ID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2" calcext:value-type="float">
            <text:p>FR-152</text:p>
          </table:table-cell>
          <table:table-cell table:style-name="ce88" office:value-type="string" calcext:value-type="string">
            <text:p>.code.req.disp</text:p>
          </table:table-cell>
          <table:table-cell table:style-name="ce115" office:value-type="string" calcext:value-type="string">
            <text:p>For refs to reqs made using semantic ID, System shall render the ref accordingly...</text:p>
            <text:p/>
            <text:p><text:span text:style-name="T2">If target req has no semIDs anymore, display the pubid.</text:span></text:p>
            <text:p>If target req has the semID entered on ref creation, display the semID.</text:p>
            <text:p><text:span text:style-name="T2">If target req doesn't have the semID entered on ref creation, display the closest semID.</text:span>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3" calcext:value-type="float">
            <text:p>FR-293</text:p>
          </table:table-cell>
          <table:table-cell table:style-name="ce88" office:value-type="string" calcext:value-type="string">
            <text:p>.code.shr.parse</text:p>
          </table:table-cell>
          <table:table-cell table:style-name="ce115" office:value-type="string" calcext:value-type="string">
            <text:p>BA shall be able to specify a ref to a SHR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Default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2" calcext:value-type="float">
            <text:p>FR-292</text:p>
          </table:table-cell>
          <table:table-cell table:style-name="ce88" office:value-type="string" calcext:value-type="string">
            <text:p>.code.shr.disp</text:p>
          </table:table-cell>
          <table:table-cell table:style-name="ce115" office:value-type="string" calcext:value-type="string">
            <text:p>For refs to SHRs, System shall render the ref accordingly...</text:p>
            <text:p/>
            <text:p><text:span text:style-name="T2">If target exists, </text:span>display the semID.</text:p>
            <text:p><text:span text:style-name="T2">If target doesn't exist, display the semID and mark it as an issue.</text:span>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4" calcext:value-type="float">
            <text:p>FR-154</text:p>
          </table:table-cell>
          <table:table-cell table:style-name="ce88" office:value-type="string" calcext:value-type="string">
            <text:p>.code.short.parse</text:p>
          </table:table-cell>
          <table:table-cell table:style-name="ce115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<text:span text:style-name="T7">Eg. In [A.B.C] a ref to [.X] should look for [A.B.C.**.X] → [A.B.**.X] → [A.**.X] → [**.X]</text:span>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6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3" calcext:value-type="float">
            <text:p>FR-153</text:p>
          </table:table-cell>
          <table:table-cell table:style-name="ce88" office:value-type="string" calcext:value-type="string">
            <text:p>.code.short.disp</text:p>
          </table:table-cell>
          <table:table-cell table:style-name="ce115" office:value-type="string" calcext:value-type="string">
            <text:p>When displaying a ref using a sem-ID, System shall omit leading sem-ID components that are the same in both the referer and referee.</text:p>
            <text:p><text:span text:style-name="T7">Example: A.B.C.F has ref [A.B.X.F] should just display [.X.F]</text:span>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4" calcext:value-type="float">
            <text:p>FR-294</text:p>
          </table:table-cell>
          <table:table-cell table:style-name="ce88" office:value-type="string" calcext:value-type="string">
            <text:p>.code.change.restore</text:p>
          </table:table-cell>
          <table:table-cell table:style-name="ce115" office:value-type="string" calcext:value-type="string">
            <text:p>When the semID(s) of a datum referenced by sem ID are removed then later restored, System shall display references to it using the semID entered on ref creation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5" calcext:value-type="float">
            <text:p>FR-295</text:p>
          </table:table-cell>
          <table:table-cell table:style-name="ce88" office:value-type="string" calcext:value-type="string">
            <text:p>.code.change.update</text:p>
          </table:table-cell>
          <table:table-cell table:style-name="ce115" office:value-type="string" calcext:value-type="string">
            <text:p>When a datum δ referenced by semID ρ is modified such that it contains only one semID β, System shall update semID references to it (ρ) to be the new, sole semID β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6" calcext:value-type="float">
            <text:p>FR-296</text:p>
          </table:table-cell>
          <table:table-cell table:style-name="ce88" office:value-type="string" calcext:value-type="string">
            <text:p>.code.change.warn</text:p>
          </table:table-cell>
          <table:table-cell table:style-name="ce115" office:value-type="string" calcext:value-type="string">
            <text:p>When a SHR referenced by sem ID is about to be deleted, System shall warn the user that there are references to it that will become issues if SHR is deleted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1" calcext:value-type="float">
            <text:p>FR-151</text:p>
          </table:table-cell>
          <table:table-cell table:style-name="ce88" office:value-type="string" calcext:value-type="string">
            <text:p>.pubid.disp</text:p>
          </table:table-cell>
          <table:table-cell table:style-name="ce115" office:value-type="string" calcext:value-type="string">
            <text:p>For req refs made using unique ID, System shall render the ref using unique ID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1" calcext:value-type="float">
            <text:p>FR-101</text:p>
          </table:table-cell>
          <table:table-cell table:style-name="ce88" office:value-type="string" calcext:value-type="string">
            <text:p>.pubid.parse</text:p>
          </table:table-cell>
          <table:table-cell table:style-name="ce115" office:value-type="string" calcext:value-type="string">
            <text:p>Where BA can specify refs to LL-reqs, BA can specify using a numeric/unique ID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.rcg</text:p>
          </table:table-cell>
          <table:table-cell table:style-name="ce121" office:value-type="string" calcext:value-type="string">
            <text:p>RCG (ReqCode Group) <text:span text:style-name="T10">(previously SHR: Semantic Header Row)</text:span></text:p>
          </table:table-cell>
          <table:table-cell table:style-name="ce173" table:number-columns-repeated="2"/>
          <table:table-cell table:style-name="ce121"/>
          <table:table-cell table:number-columns-repeated="1016"/>
        </table:table-row>
        <table:table-row table:style-name="ro16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4" calcext:value-type="float">
            <text:p>FR-144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5" office:value-type="string" calcext:value-type="string">
            <text:p>BA shall be able to create an RCG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1" calcext:value-type="float">
            <text:p>FR-321</text:p>
          </table:table-cell>
          <table:table-cell table:style-name="ce90" office:value-type="string" calcext:value-type="string">
            <text:p><text:s text:c="4"/>.suggest</text:p>
          </table:table-cell>
          <table:table-cell table:style-name="ce115" office:value-type="string" calcext:value-type="string">
            <text:p>When BA is creating a new RCG, System shall allow BA to use the last-used value associated with the req code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6" calcext:value-type="float">
            <text:p>FR-146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update only two attributes of an SHR: {sem-ID, title}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68" office:value-type="date" office:date-value="2015-06-11" calcext:value-type="date">
            <text:p>11/06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9" calcext:value-type="float">
            <text:p>FR-149</text:p>
          </table:table-cell>
          <table:table-cell table:style-name="ce88" office:value-type="string" calcext:value-type="string">
            <text:p><text:s text:c="4"/>.children</text:p>
          </table:table-cell>
          <table:table-cell table:style-name="ce117" office:value-type="string" calcext:value-type="string">
            <text:p>When the sem-ID of an SHR changes, System shall rename the matching portion of childrens' sem-ID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5" calcext:value-type="float">
            <text:p>FR-175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When an SHR's semID is modified, System shall appear to rename all references to it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6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7" calcext:value-type="float">
            <text:p>FR-147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5" office:value-type="string" calcext:value-type="string">
            <text:p>BA shall be able to delete an RCG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6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5" calcext:value-type="float">
            <text:p>FR-325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5" office:value-type="string" calcext:value-type="string">
            <text:p>BA shall be able to restore an RCG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2" calcext:value-type="float">
            <text:p>FR-322</text:p>
          </table:table-cell>
          <table:table-cell table:style-name="ce90" office:value-type="string" calcext:value-type="string">
            <text:p><text:s text:c="2"/>.display.title-blank</text:p>
          </table:table-cell>
          <table:table-cell table:style-name="ce115" office:value-type="string" calcext:value-type="string">
            <text:p>When viewing deleted content, System shall not display deleted RCGs with empty tex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3" calcext:value-type="float">
            <text:p>FR-323</text:p>
          </table:table-cell>
          <table:table-cell table:style-name="ce90" office:value-type="string" calcext:value-type="string">
            <text:p><text:s text:c="2"/>.display.title-has</text:p>
          </table:table-cell>
          <table:table-cell table:style-name="ce115" office:value-type="string" calcext:value-type="string">
            <text:p>When viewing deleted content, System shall display deleted RCGs with non-empty tex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4" calcext:value-type="float">
            <text:p>FR-324</text:p>
          </table:table-cell>
          <table:table-cell table:style-name="ce90" office:value-type="string" calcext:value-type="string">
            <text:p><text:s text:c="2"/>.display.used</text:p>
          </table:table-cell>
          <table:table-cell table:style-name="ce115" office:value-type="string" calcext:value-type="string">
            <text:p>When viewing deleted content, System shall not display deleted RCGs that have an RC in use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7" calcext:value-type="float">
            <text:p>FR-297</text:p>
          </table:table-cell>
          <table:table-cell table:style-name="ce90" office:value-type="string" calcext:value-type="string">
            <text:p><text:s text:c="2"/>.attr.implications</text:p>
          </table:table-cell>
          <table:table-cell table:style-name="ce115" office:value-type="string" calcext:value-type="string">
            <text:p>System shall not allow SHRs to have implications.</text:p>
            <text:p>(That's what reqs are for, and it works with transitivity too.)</text:p>
          </table:table-cell>
          <table:table-cell table:number-columns-repeated="2" table:style-name="ce168" office:value-type="date" office:date-value="2015-06-11" calcext:value-type="date">
            <text:p>11/06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2" office:value-type="float" office:value="12" calcext:value-type="float">
            <text:p>MF-12</text:p>
          </table:table-cell>
          <table:table-cell table:style-name="ce42" office:value-type="float" office:value="7" calcext:value-type="float">
            <text:p>MF-07</text:p>
          </table:table-cell>
          <table:table-cell table:style-name="ce79" office:value-type="float" office:value="298" calcext:value-type="float">
            <text:p>FR-298</text:p>
          </table:table-cell>
          <table:table-cell table:style-name="ce99" office:value-type="string" calcext:value-type="string">
            <text:p><text:s text:c="2"/>.attr.tags</text:p>
          </table:table-cell>
          <table:table-cell table:style-name="ce131" office:value-type="string" calcext:value-type="string">
            <text:p>BA shall not be able to input tags in the SHR desc.</text:p>
            <text:p>(We don't want the Tags &amp; custom-tag columns populated for RCGs)</text:p>
          </table:table-cell>
          <table:table-cell table:number-columns-repeated="2" table:style-name="ce172" office:value-type="date" office:date-value="2015-06-11" calcext:value-type="date">
            <text:p>11/06/15</text:p>
          </table:table-cell>
          <table:table-cell table:style-name="ce131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6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299" calcext:value-type="float">
            <text:p>FR-299</text:p>
          </table:table-cell>
          <table:table-cell table:style-name="ce90" office:value-type="string" calcext:value-type="string">
            <text:p><text:s text:c="2"/>.attr.issues</text:p>
          </table:table-cell>
          <table:table-cell table:style-name="ce115" office:value-type="string" calcext:value-type="string">
            <text:p>BA shall be able to input issues in the SHR desc.</text:p>
          </table:table-cell>
          <table:table-cell table:number-columns-repeated="2" table:style-name="ce168" office:value-type="date" office:date-value="2015-06-11" calcext:value-type="date">
            <text:p>11/06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.token</text:p>
          </table:table-cell>
          <table:table-cell table:style-name="ce121" office:value-type="string" calcext:value-type="string">
            <text:p>Text Tokens</text:p>
          </table:table-cell>
          <table:table-cell table:style-name="ce173" table:number-columns-repeated="2"/>
          <table:table-cell table:style-name="ce186" office:value-type="string" calcext:value-type="string">
            <text:p>Is this really the best idea? [POSTPONED]</text:p>
          </table:table-cell>
          <table:table-cell table:style-name="ce193"/>
          <table:table-cell table:number-columns-repeated="2"/>
          <table:table-cell table:style-name="ce193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7" calcext:value-type="float">
            <text:p>FR-157</text:p>
          </table:table-cell>
          <table:table-cell table:style-name="ce92" office:value-type="string" calcext:value-type="string">
            <text:p><text:s text:c="2"/>.create</text:p>
          </table:table-cell>
          <table:table-cell table:style-name="ce92" office:value-type="string" calcext:value-type="string">
            <text:p>BA shall be able to define text-token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3"/>
          <table:table-cell table:style-name="ce193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8" calcext:value-type="float">
            <text:p>FR-158</text:p>
          </table:table-cell>
          <table:table-cell table:style-name="ce92" office:value-type="string" calcext:value-type="string">
            <text:p><text:s text:c="2"/>.list</text:p>
          </table:table-cell>
          <table:table-cell table:style-name="ce117" office:value-type="string" calcext:value-type="string">
            <text:p>BA shall be able to list all existing text-token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style-name="ce193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9" calcext:value-type="float">
            <text:p>FR-159</text:p>
          </table:table-cell>
          <table:table-cell table:style-name="ce92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modify text-token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0" calcext:value-type="float">
            <text:p>FR-160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System shall appear to rename all references after a text-token key is renamed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1" calcext:value-type="float">
            <text:p>FR-16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9" office:value-type="string" calcext:value-type="string">
            <text:p>BA shall be able to (hard) delete text-token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2" calcext:value-type="float">
            <text:p>FR-162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9" office:value-type="string" calcext:value-type="string">
            <text:p>Before text-token deletion, BA shall be able to see a summary of usage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3" calcext:value-type="float">
            <text:p>FR-163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9" office:value-type="string" calcext:value-type="string">
            <text:p>Before text-token deletion, BA shall be able to see each datem using the text-token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4" calcext:value-type="float">
            <text:p>FR-164</text:p>
          </table:table-cell>
          <table:table-cell table:style-name="ce90" office:value-type="string" calcext:value-type="string">
            <text:p><text:s text:c="2"/>.use</text:p>
          </table:table-cell>
          <table:table-cell table:style-name="ce92" office:value-type="string" calcext:value-type="string">
            <text:p>BA shall be able to insert text-tokens in req text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5" calcext:value-type="float">
            <text:p>FR-165</text:p>
          </table:table-cell>
          <table:table-cell table:style-name="ce90" office:value-type="string" calcext:value-type="string">
            <text:p><text:s text:c="4"/>.render</text:p>
          </table:table-cell>
          <table:table-cell table:style-name="ce115" office:value-type="string" calcext:value-type="string">
            <text:p>When rendering a req value, System shall replace text-tokens with their token-value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6" calcext:value-type="float">
            <text:p>FR-166</text:p>
          </table:table-cell>
          <table:table-cell table:style-name="ce90" office:value-type="string" calcext:value-type="string">
            <text:p><text:s text:c="4"/>.edit</text:p>
          </table:table-cell>
          <table:table-cell table:style-name="ce115" office:value-type="string" calcext:value-type="string">
            <text:p>When editing a req value, System shall display text-tokens (i.e. not expanded with their token-values)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8" office:value-type="float" office:value="13" calcext:value-type="float">
            <text:p>MF-13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/>
          <table:table-cell table:style-name="ce114" office:value-type="string" calcext:value-type="string">
            <text:p>MF-13: Requirement Relationships</text:p>
          </table:table-cell>
          <table:table-cell table:style-name="ce114" table:number-columns-repeated="3"/>
          <table:table-cell table:number-columns-repeated="1016"/>
        </table:table-row>
        <table:table-row table:style-name="ro20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41" calcext:value-type="float">
            <text:p>FR-241</text:p>
          </table:table-cell>
          <table:table-cell table:style-name="ce88" office:value-type="string" calcext:value-type="string">
            <text:p>.browse-as-grouping</text:p>
          </table:table-cell>
          <table:table-cell table:style-name="ce115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5"/>
          <table:table-cell table:number-columns-repeated="1016"/>
        </table:table-row>
        <table:table-row table:style-name="ro6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206" calcext:value-type="float">
            <text:p>FR-206</text:p>
          </table:table-cell>
          <table:table-cell table:style-name="ce88" office:value-type="string" calcext:value-type="string">
            <text:p>.mandatory-bulkset</text:p>
          </table:table-cell>
          <table:table-cell table:style-name="ce115" office:value-type="string" calcext:value-type="string">
            <text:p>BA shall be able to specify all req-types requiring implication in a single action.</text:p>
            <text:p><text:span text:style-name="T6">eg. From some kind of incompletion config screen, System shall present a field “Req types requiring justification/implication” from which BA can {,de}select types.</text:span></text:p>
          </table:table-cell>
          <table:table-cell table:number-columns-repeated="2" table:style-name="ce168" office:value-type="date" office:date-value="2014-06-22" calcext:value-type="date">
            <text:p>2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3" calcext:value-type="float">
            <text:p>MF-13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data</text:p>
          </table:table-cell>
          <table:table-cell table:style-name="ce121" office:value-type="string" calcext:value-type="string">
            <text:p>Data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205" calcext:value-type="float">
            <text:p>FR-205</text:p>
          </table:table-cell>
          <table:table-cell table:style-name="ce88" office:value-type="string" calcext:value-type="string">
            <text:p><text:s text:c="2"/>.mandatoryness</text:p>
          </table:table-cell>
          <table:table-cell table:style-name="ce115" office:value-type="string" calcext:value-type="string">
            <text:p>BA shall be able to specify, for each req-type, whether an implication is required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6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99" calcext:value-type="float">
            <text:p>FR-199</text:p>
          </table:table-cell>
          <table:table-cell table:style-name="ce88" office:value-type="string" calcext:value-type="string">
            <text:p><text:s text:c="2"/>.sym</text:p>
          </table:table-cell>
          <table:table-cell table:style-name="ce131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ie. if A⇒B, then B⇐A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00" calcext:value-type="float">
            <text:p>FR-200</text:p>
          </table:table-cell>
          <table:table-cell table:style-name="ce88" office:value-type="string" calcext:value-type="string">
            <text:p><text:s text:c="2"/>.trans</text:p>
          </table:table-cell>
          <table:table-cell table:style-name="ce131" office:value-type="string" calcext:value-type="string">
            <text:p>System shall handle all implications transitively.</text:p>
            <text:p>i.e. if A⇒B ∧ B⇒C then A⇒C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72" calcext:value-type="float">
            <text:p>FR-272</text:p>
          </table:table-cell>
          <table:table-cell table:style-name="ce88" office:value-type="string" calcext:value-type="string">
            <text:p><text:s text:c="2"/>.subreq-trans</text:p>
          </table:table-cell>
          <table:table-cell table:style-name="ce117" office:value-type="string" calcext:value-type="string">
            <text:p>System shall consider subreqs as being implied by their parents.</text:p>
            <text:p>i.e. a⇒b ∧ b⊏c → a⇒c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0" calcext:value-type="float">
            <text:p>FR-210</text:p>
          </table:table-cell>
          <table:table-cell table:style-name="ce88" office:value-type="string" calcext:value-type="string">
            <text:p><text:s text:c="2"/>.prevent.refl</text:p>
          </table:table-cell>
          <table:table-cell table:style-name="ce115" office:value-type="string" calcext:value-type="string">
            <text:p>System shall prevent a req implying itself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1" calcext:value-type="float">
            <text:p>FR-211</text:p>
          </table:table-cell>
          <table:table-cell table:style-name="ce88" office:value-type="string" calcext:value-type="string">
            <text:p><text:s text:c="2"/>.prevent.cyclic</text:p>
          </table:table-cell>
          <table:table-cell table:style-name="ce115" office:value-type="string" calcext:value-type="string">
            <text:p>System shall prevent a req transitively implying itself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3" calcext:value-type="float">
            <text:p>MF-13</text:p>
          </table:table-cell>
          <table:table-cell table:style-name="ce41"/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req</text:p>
          </table:table-cell>
          <table:table-cell table:style-name="ce121" office:value-type="string" calcext:value-type="string">
            <text:p>Reqs</text:p>
          </table:table-cell>
          <table:table-cell table:style-name="ce121" table:number-columns-repeated="3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04" calcext:value-type="float">
            <text:p>FR-204</text:p>
          </table:table-cell>
          <table:table-cell table:style-name="ce88" office:value-type="string" calcext:value-type="string">
            <text:p><text:s text:c="2"/>.new-auto</text:p>
          </table:table-cell>
          <table:table-cell table:style-name="ce115" office:value-type="string" calcext:value-type="string">
            <text:p>BA shall be able to specify an implying req once, and have it apply to subsequently created reqs. [SI-1]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197" calcext:value-type="float">
            <text:p>FR-197</text:p>
          </table:table-cell>
          <table:table-cell table:style-name="ce88" office:value-type="string" calcext:value-type="string">
            <text:p><text:s text:c="2"/>.edit.src</text:p>
          </table:table-cell>
          <table:table-cell table:style-name="ce115" office:value-type="string" calcext:value-type="string">
            <text:p>BA shall be able to indicate that a req implies other req(s). (Includes subreqs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81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198" calcext:value-type="float">
            <text:p>FR-198</text:p>
          </table:table-cell>
          <table:table-cell table:style-name="ce88" office:value-type="string" calcext:value-type="string">
            <text:p><text:s text:c="2"/>.edit.tgt</text:p>
          </table:table-cell>
          <table:table-cell table:style-name="ce115" office:value-type="string" calcext:value-type="string">
            <text:p>BA shall be able to indicate that a req is implied by other req(s). (Includes subreqs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81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09" calcext:value-type="float">
            <text:p>FR-209</text:p>
          </table:table-cell>
          <table:table-cell table:style-name="ce88" office:value-type="string" calcext:value-type="string">
            <text:p><text:s text:c="2"/>.view.src</text:p>
          </table:table-cell>
          <table:table-cell table:style-name="ce115" office:value-type="string" calcext:value-type="string">
            <text:p>When viewing a req, BA shall be able to see reqs that imply it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08" calcext:value-type="float">
            <text:p>FR-208</text:p>
          </table:table-cell>
          <table:table-cell table:style-name="ce88" office:value-type="string" calcext:value-type="string">
            <text:p><text:s text:c="2"/>.view.tgt</text:p>
          </table:table-cell>
          <table:table-cell table:style-name="ce115" office:value-type="string" calcext:value-type="string">
            <text:p>When viewing a req, BA shall be able to see reqs that it implies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13" calcext:value-type="float">
            <text:p>FR-213</text:p>
          </table:table-cell>
          <table:table-cell table:style-name="ce88" office:value-type="string" calcext:value-type="string">
            <text:p><text:s text:c="2"/>.view.del</text:p>
          </table:table-cell>
          <table:table-cell table:style-name="ce115" office:value-type="string" calcext:value-type="string">
            <text:p>When showing a req's relationships, it shall also show deleted reqs, visually marking them to indicate their deleted status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12" calcext:value-type="float">
            <text:p>FR-212</text:p>
          </table:table-cell>
          <table:table-cell table:style-name="ce88" office:value-type="string" calcext:value-type="string">
            <text:p><text:s text:c="2"/>.deletion</text:p>
          </table:table-cell>
          <table:table-cell table:style-name="ce115" office:value-type="string" calcext:value-type="string">
            <text:p>When a req is deleted, System shall retain its implication relationships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4" calcext:value-type="float">
            <text:p>FR-214</text:p>
          </table:table-cell>
          <table:table-cell table:style-name="ce88" office:value-type="string" calcext:value-type="string">
            <text:p><text:s text:c="5"/>.prompt-implied</text:p>
          </table:table-cell>
          <table:table-cell table:style-name="ce115"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number-columns-repeated="2" table:style-name="ce168" office:value-type="date" office:date-value="2014-07-07" calcext:value-type="date">
            <text:p>07/07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5" calcext:value-type="float">
            <text:p>FR-215</text:p>
          </table:table-cell>
          <table:table-cell table:style-name="ce88" office:value-type="string" calcext:value-type="string">
            <text:p><text:s text:c="5"/>.prompt-intersect</text:p>
          </table:table-cell>
          <table:table-cell table:style-name="ce115"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number-columns-repeated="2" table:style-name="ce168" office:value-type="date" office:date-value="2014-07-07" calcext:value-type="date">
            <text:p>07/07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82" calcext:value-type="float">
            <text:p>FR-282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5"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number-columns-repeated="2" table:style-name="ce168" office:value-type="date" office:date-value="2014-07-07" calcext:value-type="date">
            <text:p>07/07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6" calcext:value-type="float">
            <text:p>FR-216</text:p>
          </table:table-cell>
          <table:table-cell table:style-name="ce88" office:value-type="string" calcext:value-type="string">
            <text:p><text:s text:c="5"/>.select-implied</text:p>
          </table:table-cell>
          <table:table-cell table:style-name="ce115" office:value-type="string" calcext:value-type="string">
            <text:p>When deleting a req, BA shall be able to delete a subset of implied reqs. [FR-214,215]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17" calcext:value-type="float">
            <text:p>FR-217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5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81" calcext:value-type="float">
            <text:p>FR-281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5"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number-columns-repeated="2" table:style-name="ce168" office:value-type="date" office:date-value="2014-07-07" calcext:value-type="date">
            <text:p>07/07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18" calcext:value-type="float">
            <text:p>FR-218</text:p>
          </table:table-cell>
          <table:table-cell table:style-name="ce88" office:value-type="string" calcext:value-type="string">
            <text:p><text:s text:c="5"/>.cascade</text:p>
          </table:table-cell>
          <table:table-cell table:style-name="ce115" office:value-type="string" calcext:value-type="string">
            <text:p>When restoring a req, BA shall be able to restore a subset of implied reqs. [FR-217]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3" calcext:value-type="float">
            <text:p>MF-13</text:p>
          </table:table-cell>
          <table:table-cell table:style-name="ce41" office:value-type="float" office:value="1" calcext:value-type="float">
            <text:p>MF-01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uc-steps</text:p>
          </table:table-cell>
          <table:table-cell table:style-name="ce121" office:value-type="string" calcext:value-type="string">
            <text:p>UC Steps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42" calcext:value-type="float">
            <text:p>FR-242</text:p>
          </table:table-cell>
          <table:table-cell table:style-name="ce88" office:value-type="string" calcext:value-type="string">
            <text:p><text:s text:c="2"/>.edit.src</text:p>
          </table:table-cell>
          <table:table-cell table:style-name="ce115" office:value-type="string" calcext:value-type="string">
            <text:p>BA shall be able to indicate that a UC-step implies other req(s)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81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43" calcext:value-type="float">
            <text:p>FR-243</text:p>
          </table:table-cell>
          <table:table-cell table:style-name="ce88" office:value-type="string" calcext:value-type="string">
            <text:p><text:s text:c="2"/>.edit.tgt</text:p>
          </table:table-cell>
          <table:table-cell table:style-name="ce115" office:value-type="string" calcext:value-type="string">
            <text:p>BA shall be able to indicate that a UC-step is implied by other req(s)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81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44" calcext:value-type="float">
            <text:p>FR-244</text:p>
          </table:table-cell>
          <table:table-cell table:style-name="ce88" office:value-type="string" calcext:value-type="string">
            <text:p><text:s text:c="2"/>.view.src</text:p>
          </table:table-cell>
          <table:table-cell table:style-name="ce115" office:value-type="string" calcext:value-type="string">
            <text:p>When viewing a UC-step, BA shall be able to see reqs that imply it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45" calcext:value-type="float">
            <text:p>FR-245</text:p>
          </table:table-cell>
          <table:table-cell table:style-name="ce88" office:value-type="string" calcext:value-type="string">
            <text:p><text:s text:c="2"/>.view.tgt</text:p>
          </table:table-cell>
          <table:table-cell table:style-name="ce115" office:value-type="string" calcext:value-type="string">
            <text:p>When viewing a UC-step, BA shall be able to see reqs that it implies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8" office:value-type="float" office:value="17" calcext:value-type="float">
            <text:p>MF-17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/>
          <table:table-cell table:style-name="ce114" office:value-type="string" calcext:value-type="string">
            <text:p>MF-17: Auto-Save &amp; Undo</text:p>
          </table:table-cell>
          <table:table-cell table:style-name="ce114" table:number-columns-repeated="2"/>
          <table:table-cell table:style-name="ce187" office:value-type="string" calcext:value-type="string">
            <text:p>analyse properly in phase 3</text:p>
          </table:table-cell>
          <table:table-cell table:number-columns-repeated="1016"/>
        </table:table-row>
        <table:table-row table:style-name="ro3">
          <table:table-cell table:style-name="ce39" office:value-type="float" office:value="17" calcext:value-type="float">
            <text:p>MF-17</text:p>
          </table:table-cell>
          <table:table-cell table:style-name="ce39"/>
          <table:table-cell table:style-name="ce69" office:value-type="float" office:value="278" calcext:value-type="float">
            <text:p>FR-278</text:p>
          </table:table-cell>
          <table:table-cell table:style-name="ce88" office:value-type="string" calcext:value-type="string">
            <text:p>.autosave</text:p>
          </table:table-cell>
          <table:table-cell table:style-name="ce115" office:value-type="string" calcext:value-type="string">
            <text:p>System should automatically (specifically, without requiring user interaction) save user's changes after they are made.</text:p>
          </table:table-cell>
          <table:table-cell table:number-columns-repeated="2" table:style-name="ce168" office:value-type="date" office:date-value="2014-07-03" calcext:value-type="date">
            <text:p>03/07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7" calcext:value-type="float">
            <text:p>MF-17</text:p>
          </table:table-cell>
          <table:table-cell table:style-name="ce39"/>
          <table:table-cell table:style-name="ce69" office:value-type="float" office:value="279" calcext:value-type="float">
            <text:p>FR-279</text:p>
          </table:table-cell>
          <table:table-cell table:style-name="ce88" office:value-type="string" calcext:value-type="string">
            <text:p>.undo-reqs</text:p>
          </table:table-cell>
          <table:table-cell table:style-name="ce115" office:value-type="string" calcext:value-type="string">
            <text:p>User shall be able to undo any req-content change they make.</text:p>
          </table:table-cell>
          <table:table-cell table:number-columns-repeated="2" table:style-name="ce168" office:value-type="date" office:date-value="2014-07-03" calcext:value-type="date">
            <text:p>03/07/14</text:p>
          </table:table-cell>
          <table:table-cell table:style-name="ce115" office:value-type="string" calcext:value-type="string">
            <text:p>Config too?</text:p>
          </table:table-cell>
          <table:table-cell table:number-columns-repeated="1016"/>
        </table:table-row>
        <table:table-row table:style-name="ro1">
          <table:table-cell table:style-name="ce39" office:value-type="float" office:value="17" calcext:value-type="float">
            <text:p>MF-17</text:p>
          </table:table-cell>
          <table:table-cell table:style-name="ce39"/>
          <table:table-cell table:style-name="ce69" office:value-type="float" office:value="280" calcext:value-type="float">
            <text:p>FR-280</text:p>
          </table:table-cell>
          <table:table-cell table:style-name="ce88" office:value-type="string" calcext:value-type="string">
            <text:p>.redo</text:p>
          </table:table-cell>
          <table:table-cell table:style-name="ce115" office:value-type="string" calcext:value-type="string">
            <text:p>User shall be able to redo any undo operation they perform, immediately after performing it.</text:p>
          </table:table-cell>
          <table:table-cell table:number-columns-repeated="2" table:style-name="ce168" office:value-type="date" office:date-value="2014-07-03" calcext:value-type="date">
            <text:p>03/07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4" table:number-columns-repeated="3"/>
          <table:table-cell table:style-name="ce100"/>
          <table:table-cell table:style-name="ce132" office:value-type="string" calcext:value-type="string">
            <text:p>Misc Requirements</text:p>
          </table:table-cell>
          <table:table-cell table:style-name="ce174" table:number-columns-repeated="3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/>
          <table:table-cell table:style-name="ce69" office:value-type="float" office:value="24" calcext:value-type="float">
            <text:p>FR-24</text:p>
          </table:table-cell>
          <table:table-cell table:style-name="ce88" office:value-type="string" calcext:value-type="string">
            <text:p>readuc.tag.all</text:p>
          </table:table-cell>
          <table:table-cell table:style-name="ce117" office:value-type="string" calcext:value-type="string">
            <text:p>When reading a UC, the reader shall be able to see all tags applied to the UC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2" calcext:value-type="float">
            <text:p>MF-02</text:p>
          </table:table-cell>
          <table:table-cell table:style-name="ce81" office:value-type="float" office:value="21" calcext:value-type="float">
            <text:p>FR-21</text:p>
          </table:table-cell>
          <table:table-cell table:style-name="ce88" office:value-type="string" calcext:value-type="string">
            <text:p>shares.read.filter</text:p>
          </table:table-cell>
          <table:table-cell table:style-name="ce133" office:value-type="string" calcext:value-type="string">
            <text:p>When reading shared UCs, AnonReader shall be able to filter UCs by groupings. [Pri=Nice]</text:p>
          </table:table-cell>
          <table:table-cell table:number-columns-repeated="2" table:style-name="ce175" office:value-type="date" office:date-value="2014-02-07" calcext:value-type="date">
            <text:p>07/02/14</text:p>
          </table:table-cell>
          <table:table-cell table:style-name="ce135"/>
          <table:table-cell table:number-columns-repeated="1016"/>
        </table:table-row>
        <table:table-row table:style-name="ro3">
          <table:table-cell table:number-columns-repeated="2" table:style-name="ce46" office:value-type="string" calcext:value-type="string">
            <text:p>-</text:p>
          </table:table-cell>
          <table:table-cell table:style-name="ce69" office:value-type="float" office:value="248" calcext:value-type="float">
            <text:p>FR-248</text:p>
          </table:table-cell>
          <table:table-cell table:style-name="ce88" office:value-type="string" calcext:value-type="string">
            <text:p>changelog</text:p>
          </table:table-cell>
          <table:table-cell table:style-name="ce117" office:value-type="string" calcext:value-type="string">
            <text:p>BA shall be able to see a change log, a list of changes ordered chronologically with most recent first.</text:p>
          </table:table-cell>
          <table:table-cell table:number-columns-repeated="2" table:style-name="ce168" office:value-type="date" office:date-value="2014-06-06" calcext:value-type="date">
            <text:p>06/06/14</text:p>
          </table:table-cell>
          <table:table-cell table:style-name="ce135"/>
          <table:table-cell table:number-columns-repeated="1016"/>
        </table:table-row>
        <table:table-row table:style-name="ro3">
          <table:table-cell table:number-columns-repeated="3" table:style-name="ce48" office:value-type="string" calcext:value-type="string">
            <text:p>-</text:p>
          </table:table-cell>
          <table:table-cell table:style-name="ce101" office:value-type="string" calcext:value-type="string">
            <text:p>.filter</text:p>
          </table:table-cell>
          <table:table-cell table:style-name="ce118" office:value-type="string" calcext:value-type="string">
            <text:p>Filtering</text:p>
            <text:p><text:span text:style-name="T5">Where filters are applicable...</text:span></text:p>
          </table:table-cell>
          <table:table-cell table:style-name="ce118" table:number-columns-repeated="3"/>
          <table:table-cell table:number-columns-repeated="1016"/>
        </table:table-row>
        <table:table-row table:style-name="ro16">
          <table:table-cell table:style-name="ce39" office:value-type="float" office:value="6" calcext:value-type="float">
            <text:p>MF-06</text:p>
          </table:table-cell>
          <table:table-cell table:style-name="ce39"/>
          <table:table-cell table:style-name="ce69" office:value-type="float" office:value="51" calcext:value-type="float">
            <text:p>FR-51</text:p>
          </table:table-cell>
          <table:table-cell table:style-name="ce88" office:value-type="string" calcext:value-type="string">
            <text:p><text:s text:c="2"/>.inc-type</text:p>
          </table:table-cell>
          <table:table-cell table:style-name="ce117" office:value-type="string" calcext:value-type="string">
            <text:p>BA shall be able to filter by issue type(s).</text:p>
          </table:table-cell>
          <table:table-cell table:style-name="ce168" office:value-type="date" office:date-value="2014-06-30" calcext:value-type="date">
            <text:p>3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50" office:value-type="string" calcext:value-type="string">
            <text:p>MF-06 MF-12</text:p>
          </table:table-cell>
          <table:table-cell table:style-name="ce39" office:value-type="string" calcext:value-type="string">
            <text:p>MF-12</text:p>
            <text:p>MF-22</text:p>
          </table:table-cell>
          <table:table-cell table:style-name="ce69" office:value-type="float" office:value="112" calcext:value-type="float">
            <text:p>FR-112</text:p>
          </table:table-cell>
          <table:table-cell table:style-name="ce88" office:value-type="string" calcext:value-type="string">
            <text:p><text:s text:c="2"/>.req-type</text:p>
          </table:table-cell>
          <table:table-cell table:style-name="ce117" office:value-type="string" calcext:value-type="string">
            <text:p>BA shall be able to filter by requirement type(s). (Excludes subreq-types.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50" office:value-type="string" calcext:value-type="string">
            <text:p>MF-06 MF-12</text:p>
          </table:table-cell>
          <table:table-cell table:style-name="ce39" office:value-type="string" calcext:value-type="string">
            <text:p>MF-12</text:p>
            <text:p>MF-22</text:p>
          </table:table-cell>
          <table:table-cell table:style-name="ce69" office:value-type="float" office:value="271" calcext:value-type="float">
            <text:p>FR-271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7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7"/>
          <table:table-cell table:number-columns-repeated="1016"/>
        </table:table-row>
        <table:table-row table:style-name="ro6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69" office:value-type="float" office:value="201" calcext:value-type="float">
            <text:p>FR-201</text:p>
          </table:table-cell>
          <table:table-cell table:style-name="ce88" office:value-type="string" calcext:value-type="string">
            <text:p><text:s text:c="2"/>.implied</text:p>
          </table:table-cell>
          <table:table-cell table:style-name="ce115" office:value-type="string" calcext:value-type="string">
            <text:p>BA shall be able to filter by implying req(s).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5"/>
          <table:table-cell table:number-columns-repeated="1016"/>
        </table:table-row>
        <table:table-row table:style-name="ro6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69" office:value-type="float" office:value="273" calcext:value-type="float">
            <text:p>FR-273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7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5"/>
          <table:table-cell table:number-columns-repeated="1016"/>
        </table:table-row>
        <table:table-row table:style-name="ro6"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50" calcext:value-type="float">
            <text:p>FR-50</text:p>
          </table:table-cell>
          <table:table-cell table:style-name="ce88" office:value-type="string" calcext:value-type="string">
            <text:p><text:s text:c="2"/>.tag</text:p>
          </table:table-cell>
          <table:table-cell table:style-name="ce117" office:value-type="string" calcext:value-type="string">
            <text:p>BA shall be able to filter by tag(s).</text:p>
          </table:table-cell>
          <table:table-cell table:style-name="ce168" office:value-type="date" office:date-value="2014-06-30" calcext:value-type="date">
            <text:p>3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270" calcext:value-type="float">
            <text:p>FR-270</text:p>
          </table:table-cell>
          <table:table-cell table:style-name="ce88" office:value-type="string" calcext:value-type="string">
            <text:p><text:s text:c="4"/>.trans</text:p>
          </table:table-cell>
          <table:table-cell table:style-name="ce117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8" calcext:value-type="float">
            <text:p>FR-28</text:p>
          </table:table-cell>
          <table:table-cell table:style-name="ce88" office:value-type="string" calcext:value-type="string">
            <text:p><text:s text:c="4"/>.not</text:p>
          </table:table-cell>
          <table:table-cell table:style-name="ce117" office:value-type="string" calcext:value-type="string">
            <text:p>When specifying a grouping filter, User shall be able to specify NOT.</text:p>
          </table:table-cell>
          <table:table-cell table:number-columns-repeated="2" table:style-name="ce168" office:value-type="date" office:date-value="2014-05-23" calcext:value-type="date">
            <text:p>23/05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9" calcext:value-type="float">
            <text:p>FR-29</text:p>
          </table:table-cell>
          <table:table-cell table:style-name="ce88" office:value-type="string" calcext:value-type="string">
            <text:p><text:s text:c="4"/>.and</text:p>
          </table:table-cell>
          <table:table-cell table:style-name="ce117" office:value-type="string" calcext:value-type="string">
            <text:p>When specifying a grouping filter, User shall be able to specify AND.</text:p>
          </table:table-cell>
          <table:table-cell table:number-columns-repeated="2" table:style-name="ce168" office:value-type="date" office:date-value="2014-05-23" calcext:value-type="date">
            <text:p>23/05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30" calcext:value-type="float">
            <text:p>FR-30</text:p>
          </table:table-cell>
          <table:table-cell table:style-name="ce88" office:value-type="string" calcext:value-type="string">
            <text:p><text:s text:c="4"/>.or</text:p>
          </table:table-cell>
          <table:table-cell table:style-name="ce117" office:value-type="string" calcext:value-type="string">
            <text:p>When specifying a grouping filter, User shall be able to specify OR.</text:p>
          </table:table-cell>
          <table:table-cell table:number-columns-repeated="2" table:style-name="ce168" office:value-type="date" office:date-value="2014-05-23" calcext:value-type="date">
            <text:p>23/05/14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8" calcext:value-type="float">
            <text:p>FR-88</text:p>
          </table:table-cell>
          <table:table-cell table:style-name="ce88" office:value-type="string" calcext:value-type="string">
            <text:p><text:s text:c="2"/>.txt</text:p>
          </table:table-cell>
          <table:table-cell table:style-name="ce115" office:value-type="string" calcext:value-type="string">
            <text:p>BA shall be able to filter by free-text, in which case only reqs (case-insensitively) containing the text are shown.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5"/>
          <table:table-cell table:number-columns-repeated="1016"/>
        </table:table-row>
        <table:table-row table:style-name="ro1">
          <table:table-cell table:number-columns-repeated="2"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revnum</text:p>
          </table:table-cell>
          <table:table-cell table:style-name="ce121" office:value-type="string" calcext:value-type="string">
            <text:p>Revision numbers</text:p>
          </table:table-cell>
          <table:table-cell table:style-name="ce121" table:number-columns-repeated="3"/>
          <table:table-cell table:number-columns-repeated="1016"/>
        </table:table-row>
        <table:table-row table:style-name="ro3">
          <table:table-cell table:style-name="ce46" office:value-type="string" calcext:value-type="string">
            <text:p>-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6" calcext:value-type="float">
            <text:p>FR-26</text:p>
          </table:table-cell>
          <table:table-cell table:style-name="ce88" office:value-type="string" calcext:value-type="string">
            <text:p><text:s text:c="2"/>.if</text:p>
          </table:table-cell>
          <table:table-cell table:style-name="ce117" office:value-type="string" calcext:value-type="string">
            <text:p>System shall increment the revision number of a requirement anytime <text:span text:style-name="T4">any</text:span><text:span text:style-name="T9"> user-observable change occurs, including field ordering changes, grouping renames, etc.</text:span></text:p>
          </table:table-cell>
          <table:table-cell table:number-columns-repeated="2" table:style-name="ce168" office:value-type="date" office:date-value="2014-02-12" calcext:value-type="date">
            <text:p>12/02/14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46" office:value-type="string" calcext:value-type="string">
            <text:p>-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7" calcext:value-type="float">
            <text:p>FR-27</text:p>
          </table:table-cell>
          <table:table-cell table:style-name="ce88" office:value-type="string" calcext:value-type="string">
            <text:p><text:s text:c="2"/>.onlyif</text:p>
          </table:table-cell>
          <table:table-cell table:style-name="ce117" office:value-type="string" calcext:value-type="string">
            <text:p>System should preserve the revision number of a requirement when there is no <text:span text:style-name="T9">user-observable change between revisions.</text:span></text:p>
          </table:table-cell>
          <table:table-cell table:number-columns-repeated="2" table:style-name="ce168" office:value-type="date" office:date-value="2014-02-12" calcext:value-type="date">
            <text:p>12/02/14</text:p>
          </table:table-cell>
          <table:table-cell table:style-name="ce117"/>
          <table:table-cell table:number-columns-repeated="1016"/>
        </table:table-row>
        <table:table-row table:style-name="ro3">
          <table:table-cell table:number-columns-repeated="2" table:style-name="ce46" office:value-type="string" calcext:value-type="string">
            <text:p>-</text:p>
          </table:table-cell>
          <table:table-cell table:style-name="ce69" office:value-type="float" office:value="75" calcext:value-type="float">
            <text:p>FR-75</text:p>
          </table:table-cell>
          <table:table-cell table:style-name="ce88" office:value-type="string" calcext:value-type="string">
            <text:p><text:s text:c="2"/>.major</text:p>
          </table:table-cell>
          <table:table-cell table:style-name="ce117" office:value-type="string" calcext:value-type="string">
            <text:p>System shall increment the major component of a revision number when the subject is modified directly by the user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7"/>
          <table:table-cell table:number-columns-repeated="1016"/>
        </table:table-row>
        <table:table-row table:style-name="ro3">
          <table:table-cell table:number-columns-repeated="2" table:style-name="ce46" office:value-type="string" calcext:value-type="string">
            <text:p>-</text:p>
          </table:table-cell>
          <table:table-cell table:style-name="ce69" office:value-type="float" office:value="76" calcext:value-type="float">
            <text:p>FR-76</text:p>
          </table:table-cell>
          <table:table-cell table:style-name="ce88" office:value-type="string" calcext:value-type="string">
            <text:p><text:s text:c="2"/>.minor</text:p>
          </table:table-cell>
          <table:table-cell table:style-name="ce117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3"/>
          <table:table-cell table:style-name="ce62" table:number-columns-repeated="2"/>
          <table:table-cell table:style-name="ce102"/>
          <table:table-cell table:style-name="ce134" office:value-type="string" calcext:value-type="string">
            <text:p>Deleted or Deferred Requirements</text:p>
          </table:table-cell>
          <table:table-cell table:style-name="ce176" table:number-columns-repeated="3"/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36" calcext:value-type="float">
            <text:p>FR-36</text:p>
          </table:table-cell>
          <table:table-cell table:style-name="ce103" office:value-type="string" calcext:value-type="string">
            <text:p><text:s text:c="2"/>.count</text:p>
          </table:table-cell>
          <table:table-cell table:style-name="ce135" office:value-type="string" calcext:value-type="string">
            <text:p>System shall display the number of reqs associated with each grouping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135"/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37" calcext:value-type="float">
            <text:p>FR-37</text:p>
          </table:table-cell>
          <table:table-cell table:style-name="ce103" office:value-type="string" calcext:value-type="string">
            <text:p><text:s text:c="2"/>.missing</text:p>
          </table:table-cell>
          <table:table-cell table:style-name="ce135" office:value-type="string" calcext:value-type="string">
            <text:p>System shall display the number of reqs to which the top-level grouping is not applied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135"/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3" calcext:value-type="float">
            <text:p>MF-03</text:p>
          </table:table-cell>
          <table:table-cell table:style-name="ce81" office:value-type="float" office:value="38" calcext:value-type="float">
            <text:p>FR-38</text:p>
          </table:table-cell>
          <table:table-cell table:style-name="ce103" office:value-type="string" calcext:value-type="string">
            <text:p><text:s text:c="2"/>.read-ucs</text:p>
          </table:table-cell>
          <table:table-cell table:style-name="ce135" office:value-type="string" calcext:value-type="string">
            <text:p>BA shall be able to read all UCs with a given grouping applied.</text:p>
          </table:table-cell>
          <table:table-cell table:number-columns-repeated="2" table:style-name="ce175" office:value-type="date" office:date-value="2014-02-13" calcext:value-type="date">
            <text:p>13/02/14</text:p>
          </table:table-cell>
          <table:table-cell table:style-name="ce135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3" calcext:value-type="float">
            <text:p>MF-03</text:p>
          </table:table-cell>
          <table:table-cell table:style-name="ce81" office:value-type="float" office:value="39" calcext:value-type="float">
            <text:p>FR-39</text:p>
          </table:table-cell>
          <table:table-cell table:style-name="ce103" office:value-type="string" calcext:value-type="string">
            <text:p><text:s text:c="2"/>.read-steps</text:p>
          </table:table-cell>
          <table:table-cell table:style-name="ce135" office:value-type="string" calcext:value-type="string">
            <text:p>BA shall be able to read all UC steps with a given grouping applied.</text:p>
          </table:table-cell>
          <table:table-cell table:number-columns-repeated="2" table:style-name="ce175" office:value-type="date" office:date-value="2014-02-13" calcext:value-type="date">
            <text:p>13/02/14</text:p>
          </table:table-cell>
          <table:table-cell table:style-name="ce135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2" calcext:value-type="float">
            <text:p>MF-02</text:p>
          </table:table-cell>
          <table:table-cell table:style-name="ce81" office:value-type="float" office:value="11" calcext:value-type="float">
            <text:p>FR-11</text:p>
          </table:table-cell>
          <table:table-cell table:style-name="ce103" office:value-type="string" calcext:value-type="string">
            <text:p><text:s text:c="4"/>.shares</text:p>
          </table:table-cell>
          <table:table-cell table:style-name="ce135" office:value-type="string" calcext:value-type="string">
            <text:p>BA shall be able to filter shares' UC selection criteria by groupings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135" office:value-type="string" calcext:value-type="string">
            <text:p>MF-02: Anon Shares is off the table for now.</text:p>
          </table:table-cell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/>
          <table:table-cell table:style-name="ce81" office:value-type="float" office:value="20" calcext:value-type="float">
            <text:p>FR-20</text:p>
          </table:table-cell>
          <table:table-cell table:style-name="ce103" office:value-type="string" calcext:value-type="string">
            <text:p><text:s text:c="4"/>.readown</text:p>
          </table:table-cell>
          <table:table-cell table:style-name="ce135" office:value-type="string" calcext:value-type="string">
            <text:p>When reading own UCs, BA shall be able to filter UCs by groupings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135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/>
          <table:table-cell table:style-name="ce81" office:value-type="float" office:value="12" calcext:value-type="float">
            <text:p>FR-12</text:p>
          </table:table-cell>
          <table:table-cell table:style-name="ce103" office:value-type="string" calcext:value-type="string">
            <text:p><text:s text:c="4"/>.uc-list</text:p>
          </table:table-cell>
          <table:table-cell table:style-name="ce135" office:value-type="string" calcext:value-type="string">
            <text:p>[Obsolete by FR-87]</text:p>
            <text:p>BA shall be able to filter their view of a project's UCs by groupings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135"/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12" calcext:value-type="float">
            <text:p>MF-12</text:p>
          </table:table-cell>
          <table:table-cell table:style-name="ce81" office:value-type="float" office:value="9" calcext:value-type="float">
            <text:p>FR-09</text:p>
          </table:table-cell>
          <table:table-cell table:style-name="ce103" office:value-type="string" calcext:value-type="string">
            <text:p><text:s text:c="4"/>.add</text:p>
          </table:table-cell>
          <table:table-cell table:style-name="ce136" office:value-type="string" calcext:value-type="string">
            <text:p>BA shall be able to apply groupings to multiple LL/UC reqs simultaneously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135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12" calcext:value-type="float">
            <text:p>MF-12</text:p>
          </table:table-cell>
          <table:table-cell table:style-name="ce81" office:value-type="float" office:value="10" calcext:value-type="float">
            <text:p>FR-10</text:p>
          </table:table-cell>
          <table:table-cell table:style-name="ce103" office:value-type="string" calcext:value-type="string">
            <text:p><text:s text:c="4"/>.remove</text:p>
          </table:table-cell>
          <table:table-cell table:style-name="ce136" office:value-type="string" calcext:value-type="string">
            <text:p>BA shall be able to remove groupings to multiple LL/UC reqs simultaneously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135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2" office:value-type="float" office:value="190" calcext:value-type="float">
            <text:p>FR-190</text:p>
          </table:table-cell>
          <table:table-cell table:style-name="ce104" office:value-type="string" calcext:value-type="string">
            <text:p><text:s text:c="4"/>.add</text:p>
          </table:table-cell>
          <table:table-cell table:style-name="ce137" office:value-type="string" calcext:value-type="string">
            <text:p>BA shall be able to apply groupings to UCs without using the UCE.</text:p>
          </table:table-cell>
          <table:table-cell table:number-columns-repeated="2" table:style-name="ce177" office:value-type="date" office:date-value="2014-05-23" calcext:value-type="date">
            <text:p>23/05/14</text:p>
          </table:table-cell>
          <table:table-cell table:style-name="ce188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2" office:value-type="float" office:value="191" calcext:value-type="float">
            <text:p>FR-191</text:p>
          </table:table-cell>
          <table:table-cell table:style-name="ce104" office:value-type="string" calcext:value-type="string">
            <text:p><text:s text:c="4"/>.remove</text:p>
          </table:table-cell>
          <table:table-cell table:style-name="ce137" office:value-type="string" calcext:value-type="string">
            <text:p>BA shall be able to remove groupings to UC without using the UCE.</text:p>
          </table:table-cell>
          <table:table-cell table:number-columns-repeated="2" table:style-name="ce177" office:value-type="date" office:date-value="2014-05-23" calcext:value-type="date">
            <text:p>23/05/14</text:p>
          </table:table-cell>
          <table:table-cell table:style-name="ce188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2" office:value-type="float" office:value="192" calcext:value-type="float">
            <text:p>FR-192</text:p>
          </table:table-cell>
          <table:table-cell table:style-name="ce104" office:value-type="string" calcext:value-type="string">
            <text:p><text:s text:c="4"/>.add</text:p>
          </table:table-cell>
          <table:table-cell table:style-name="ce137" office:value-type="string" calcext:value-type="string">
            <text:p>BA shall be able to apply groupings to LL-reqs.</text:p>
          </table:table-cell>
          <table:table-cell table:number-columns-repeated="2" table:style-name="ce177" office:value-type="date" office:date-value="2014-05-23" calcext:value-type="date">
            <text:p>23/05/14</text:p>
          </table:table-cell>
          <table:table-cell table:style-name="ce188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2" office:value-type="float" office:value="193" calcext:value-type="float">
            <text:p>FR-193</text:p>
          </table:table-cell>
          <table:table-cell table:style-name="ce104" office:value-type="string" calcext:value-type="string">
            <text:p><text:s text:c="4"/>.remove</text:p>
          </table:table-cell>
          <table:table-cell table:style-name="ce137" office:value-type="string" calcext:value-type="string">
            <text:p>BA shall be able to remove groupings to LL-reqs.</text:p>
          </table:table-cell>
          <table:table-cell table:number-columns-repeated="2" table:style-name="ce177" office:value-type="date" office:date-value="2014-05-23" calcext:value-type="date">
            <text:p>23/05/14</text:p>
          </table:table-cell>
          <table:table-cell table:style-name="ce188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45" office:value-type="float" office:value="4" calcext:value-type="float">
            <text:p>MF-04</text:p>
          </table:table-cell>
          <table:table-cell table:style-name="ce45" office:value-type="float" office:value="5" calcext:value-type="float">
            <text:p>MF-05</text:p>
          </table:table-cell>
          <table:table-cell table:style-name="ce81" office:value-type="float" office:value="142" calcext:value-type="float">
            <text:p>FR-142</text:p>
          </table:table-cell>
          <table:table-cell table:style-name="ce103" office:value-type="string" calcext:value-type="string">
            <text:p><text:s text:c="2"/>.copy</text:p>
          </table:table-cell>
          <table:table-cell table:style-name="ce136" office:value-type="string" calcext:value-type="string">
            <text:p>BA shall be able to copy a field set from another project.</text:p>
          </table:table-cell>
          <table:table-cell table:number-columns-repeated="2" table:style-name="ce175" office:value-type="date" office:date-value="2014-05-19" calcext:value-type="date">
            <text:p>19/05/14</text:p>
          </table:table-cell>
          <table:table-cell table:style-name="ce136"/>
          <table:table-cell table:number-columns-repeated="1016"/>
        </table:table-row>
        <table:table-row table:style-name="ro3">
          <table:table-cell table:style-name="ce45" office:value-type="float" office:value="4" calcext:value-type="float">
            <text:p>MF-04</text:p>
          </table:table-cell>
          <table:table-cell table:style-name="ce45" office:value-type="float" office:value="5" calcext:value-type="float">
            <text:p>MF-05</text:p>
          </table:table-cell>
          <table:table-cell table:style-name="ce81" office:value-type="float" office:value="42" calcext:value-type="float">
            <text:p>FR-42</text:p>
          </table:table-cell>
          <table:table-cell table:style-name="ce103" office:value-type="string" calcext:value-type="string">
            <text:p><text:s text:c="4"/>.discards</text:p>
          </table:table-cell>
          <table:table-cell table:style-name="ce136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number-columns-repeated="2" table:style-name="ce175" office:value-type="date" office:date-value="2014-02-25" calcext:value-type="date">
            <text:p>25/02/14</text:p>
          </table:table-cell>
          <table:table-cell table:style-name="ce136"/>
          <table:table-cell table:number-columns-repeated="1016"/>
        </table:table-row>
        <table:table-row table:style-name="ro1">
          <table:table-cell table:style-name="ce45" office:value-type="float" office:value="4" calcext:value-type="float">
            <text:p>MF-04</text:p>
          </table:table-cell>
          <table:table-cell table:style-name="ce45" office:value-type="float" office:value="7" calcext:value-type="float">
            <text:p>MF-07</text:p>
          </table:table-cell>
          <table:table-cell table:style-name="ce81" office:value-type="float" office:value="22" calcext:value-type="float">
            <text:p>FR-22</text:p>
          </table:table-cell>
          <table:table-cell table:style-name="ce103" office:value-type="string" calcext:value-type="string">
            <text:p><text:s text:c="2"/>.copy</text:p>
          </table:table-cell>
          <table:table-cell table:style-name="ce135" office:value-type="string" calcext:value-type="string">
            <text:p>BA shall be able to copy a subset of groupings (including child nodes) between projects.</text:p>
          </table:table-cell>
          <table:table-cell table:number-columns-repeated="2" table:style-name="ce175" office:value-type="date" office:date-value="2014-02-12" calcext:value-type="date">
            <text:p>12/02/14</text:p>
          </table:table-cell>
          <table:table-cell table:style-name="ce135"/>
          <table:table-cell table:number-columns-repeated="1016"/>
        </table:table-row>
        <table:table-row table:style-name="ro3">
          <table:table-cell table:style-name="ce45" office:value-type="float" office:value="6" calcext:value-type="float">
            <text:p>MF-06</text:p>
          </table:table-cell>
          <table:table-cell table:style-name="ce45" office:value-type="float" office:value="12" calcext:value-type="float">
            <text:p>MF-12</text:p>
          </table:table-cell>
          <table:table-cell table:style-name="ce81" office:value-type="float" office:value="105" calcext:value-type="float">
            <text:p>FR-105</text:p>
          </table:table-cell>
          <table:table-cell table:style-name="ce103" office:value-type="string" calcext:value-type="string">
            <text:p><text:s text:c="2"/>.refs</text:p>
          </table:table-cell>
          <table:table-cell table:style-name="ce135" office:value-type="string" calcext:value-type="string">
            <text:p>[Dup of FR-55]</text:p>
            <text:p>System shall track refs to deleted LL-reqs as incompletions.</text:p>
          </table:table-cell>
          <table:table-cell table:number-columns-repeated="2" table:style-name="ce175" office:value-type="date" office:date-value="2014-05-15" calcext:value-type="date">
            <text:p>15/05/14</text:p>
          </table:table-cell>
          <table:table-cell table:style-name="ce136"/>
          <table:table-cell table:number-columns-repeated="1016"/>
        </table:table-row>
        <table:table-row table:style-name="ro6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11" calcext:value-type="float">
            <text:p>FR-111</text:p>
          </table:table-cell>
          <table:table-cell table:style-name="ce103"/>
          <table:table-cell table:style-name="ce135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number-columns-repeated="2" table:style-name="ce175" office:value-type="date" office:date-value="2014-05-16" calcext:value-type="date">
            <text:p>16/05/14</text:p>
          </table:table-cell>
          <table:table-cell table:style-name="ce136"/>
          <table:table-cell table:number-columns-repeated="1016"/>
        </table:table-row>
        <table:table-row table:style-name="ro3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89" calcext:value-type="float">
            <text:p>FR-89</text:p>
          </table:table-cell>
          <table:table-cell table:style-name="ce103" office:value-type="string" calcext:value-type="string">
            <text:p><text:s text:c="4"/>.copy</text:p>
          </table:table-cell>
          <table:table-cell table:style-name="ce136" office:value-type="string" calcext:value-type="string">
            <text:p>[Replaced by FR-172]</text:p>
            <text:p>BA shall be able to create a new req by copying another.</text:p>
          </table:table-cell>
          <table:table-cell table:number-columns-repeated="2" table:style-name="ce175" office:value-type="date" office:date-value="2014-05-15" calcext:value-type="date">
            <text:p>15/05/14</text:p>
          </table:table-cell>
          <table:table-cell table:style-name="ce136"/>
          <table:table-cell table:number-columns-repeated="1016"/>
        </table:table-row>
        <table:table-row table:style-name="ro3">
          <table:table-cell table:style-name="ce55" office:value-type="float" office:value="13" calcext:value-type="float">
            <text:p>MF-13</text:p>
          </table:table-cell>
          <table:table-cell table:style-name="ce55" office:value-type="float" office:value="6" calcext:value-type="float">
            <text:p>MF-06</text:p>
          </table:table-cell>
          <table:table-cell table:style-name="ce83" office:value-type="float" office:value="202" calcext:value-type="float">
            <text:p>FR-202</text:p>
          </table:table-cell>
          <table:table-cell table:style-name="ce107"/>
          <table:table-cell table:style-name="ce139" office:value-type="string" calcext:value-type="string">
            <text:p>When viewing incompletion results, BA shall be able to filter by implying req(s).</text:p>
            <text:p><text:span text:style-name="T6">eg. filter reqs implied by MF-12 shows FR-4 if MF-12⇒UC-4⇒FR-4.</text:span></text:p>
          </table:table-cell>
          <table:table-cell table:number-columns-repeated="2" table:style-name="ce178" office:value-type="date" office:date-value="2014-06-02" calcext:value-type="date">
            <text:p>02/06/14</text:p>
          </table:table-cell>
          <table:table-cell table:style-name="ce139" office:value-type="string" calcext:value-type="string">
            <text:p>FR-201 is enough</text:p>
          </table:table-cell>
          <table:table-cell table:number-columns-repeated="1016"/>
        </table:table-row>
        <table:table-row table:style-name="ro3">
          <table:table-cell table:style-name="ce56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84" office:value-type="float" office:value="60" calcext:value-type="float">
            <text:p>FR-60</text:p>
          </table:table-cell>
          <table:table-cell table:style-name="ce108" office:value-type="string" calcext:value-type="string">
            <text:p><text:s text:c="4"/>.ref.steps</text:p>
          </table:table-cell>
          <table:table-cell table:style-name="ce140" office:value-type="string" calcext:value-type="string">
            <text:p>BA shall be able to specify step refs when providing additional info to an incompletion in a UC field. <text:span text:style-name="T4">[Pri=Nice]</text:span></text:p>
          </table:table-cell>
          <table:table-cell table:number-columns-repeated="2" table:style-name="ce179" office:value-type="date" office:date-value="2014-05-12" calcext:value-type="date">
            <text:p>12/05/14</text:p>
          </table:table-cell>
          <table:table-cell table:style-name="ce164" office:value-type="string" calcext:value-type="string">
            <text:p>FR-59 &amp; FR-262 make this redundant.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MF-12</text:p>
          </table:table-cell>
          <table:table-cell table:style-name="ce56" office:value-type="float" office:value="1" calcext:value-type="float">
            <text:p>MF-01</text:p>
          </table:table-cell>
          <table:table-cell table:style-name="ce84" office:value-type="float" office:value="169" calcext:value-type="float">
            <text:p>FR-169</text:p>
          </table:table-cell>
          <table:table-cell table:style-name="ce108" office:value-type="string" calcext:value-type="string">
            <text:p><text:s text:c="2"/>.ucs</text:p>
          </table:table-cell>
          <table:table-cell table:style-name="ce161" office:value-type="string" calcext:value-type="string">
            <text:p>System shall display UCs as rows in the req view.</text:p>
          </table:table-cell>
          <table:table-cell table:number-columns-repeated="2" table:style-name="ce179" office:value-type="date" office:date-value="2014-05-22" calcext:value-type="date">
            <text:p>22/05/14</text:p>
          </table:table-cell>
          <table:table-cell table:style-name="ce161" office:value-type="string" calcext:value-type="string">
            <text:p>FR-84 covers this now.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65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109" office:value-type="string" calcext:value-type="string">
            <text:p>.llreq.mod</text:p>
          </table:table-cell>
          <table:table-cell table:style-name="ce162" office:value-type="string" calcext:value-type="string">
            <text:p>Modifying an LL-req field set</text:p>
          </table:table-cell>
          <table:table-cell table:style-name="ce162" table:number-columns-repeated="2"/>
          <table:table-cell table:style-name="ce189" office:value-type="string" calcext:value-type="string" table:number-columns-spanned="1" table:number-rows-spanned="12">
            <text:p><text:span text:style-name="T11">analysis-intersections.ods:</text:span></text:p>
            <text:p><text:span text:style-name="T11">Why should custom fields be separated by (UC ∨ ¬UC)? How about just ordered list of fields, each has “Applies to req-types” attr.</text:span></text:p>
            <text:p><text:span text:style-name="T11">Field : Grouping ⇔ ReqType</text:span>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26" calcext:value-type="float">
            <text:p>FR-126</text:p>
          </table:table-cell>
          <table:table-cell table:style-name="ce107" office:value-type="string" calcext:value-type="string">
            <text:p><text:s text:c="2"/>.list</text:p>
          </table:table-cell>
          <table:table-cell table:style-name="ce139" office:value-type="string" calcext:value-type="string">
            <text:p>BA shall be able to see a list of all existing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139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27" calcext:value-type="float">
            <text:p>FR-127</text:p>
          </table:table-cell>
          <table:table-cell table:style-name="ce107" office:value-type="string" calcext:value-type="string">
            <text:p><text:s text:c="2"/>.create</text:p>
          </table:table-cell>
          <table:table-cell table:style-name="ce139" office:value-type="string" calcext:value-type="string">
            <text:p>BA shall be able to add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139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28" calcext:value-type="float">
            <text:p>FR-128</text:p>
          </table:table-cell>
          <table:table-cell table:style-name="ce107" office:value-type="string" calcext:value-type="string">
            <text:p><text:s text:c="2"/>.update</text:p>
          </table:table-cell>
          <table:table-cell table:style-name="ce139" office:value-type="string" calcext:value-type="string">
            <text:p>BA shall be able to modify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139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29" calcext:value-type="float">
            <text:p>FR-129</text:p>
          </table:table-cell>
          <table:table-cell table:style-name="ce110" office:value-type="string" calcext:value-type="string">
            <text:p><text:s text:c="4"/>.order</text:p>
          </table:table-cell>
          <table:table-cell table:style-name="ce139" office:value-type="string" calcext:value-type="string">
            <text:p>BA shall be able to reorder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139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0" calcext:value-type="float">
            <text:p>FR-130</text:p>
          </table:table-cell>
          <table:table-cell table:style-name="ce110" office:value-type="string" calcext:value-type="string">
            <text:p><text:s text:c="2"/>.delete</text:p>
          </table:table-cell>
          <table:table-cell table:style-name="ce139" office:value-type="string" calcext:value-type="string">
            <text:p>BA shall be able to (soft) delete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139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4" calcext:value-type="float">
            <text:p>FR-134</text:p>
          </table:table-cell>
          <table:table-cell table:style-name="ce107" office:value-type="string" calcext:value-type="string">
            <text:p><text:s text:c="4"/>.usage-summary</text:p>
          </table:table-cell>
          <table:table-cell table:style-name="ce163" office:value-type="string" calcext:value-type="string">
            <text:p>System shall indicate how many LL-reqs have content for each LL-req field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163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5" calcext:value-type="float">
            <text:p>FR-135</text:p>
          </table:table-cell>
          <table:table-cell table:style-name="ce107" office:value-type="string" calcext:value-type="string">
            <text:p><text:s text:c="4"/>.usage-inspect</text:p>
          </table:table-cell>
          <table:table-cell table:style-name="ce163" office:value-type="string" calcext:value-type="string">
            <text:p>BA shall be able to see each instance of content for an LL-req field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163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1" calcext:value-type="float">
            <text:p>FR-131</text:p>
          </table:table-cell>
          <table:table-cell table:style-name="ce110" office:value-type="string" calcext:value-type="string">
            <text:p><text:s text:c="4"/>.bin</text:p>
          </table:table-cell>
          <table:table-cell table:style-name="ce139" office:value-type="string" calcext:value-type="string">
            <text:p>When (soft) deleting an LL-req field, System shall move it to the bin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139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2" calcext:value-type="float">
            <text:p>FR-132</text:p>
          </table:table-cell>
          <table:table-cell table:style-name="ce110" office:value-type="string" calcext:value-type="string">
            <text:p><text:s text:c="2"/>.restore</text:p>
          </table:table-cell>
          <table:table-cell table:style-name="ce139" office:value-type="string" calcext:value-type="string">
            <text:p>BA shall be able to restore deleted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139"/>
          <table:table-cell table:number-columns-repeated="1016"/>
        </table:table-row>
        <table:table-row table:style-name="ro3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3" calcext:value-type="float">
            <text:p>FR-133</text:p>
          </table:table-cell>
          <table:table-cell table:style-name="ce110" office:value-type="string" calcext:value-type="string">
            <text:p><text:s text:c="4"/>.data</text:p>
          </table:table-cell>
          <table:table-cell table:style-name="ce139" office:value-type="string" calcext:value-type="string">
            <text:p>When an LL-req field is restored, System shall restore corresponding field values for each LL-req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139"/>
          <table:table-cell table:number-columns-repeated="1016"/>
        </table:table-row>
        <table:table-row table:style-name="ro3">
          <table:table-cell table:style-name="ce55" office:value-type="float" office:value="5" calcext:value-type="float">
            <text:p>MF-05</text:p>
          </table:table-cell>
          <table:table-cell table:style-name="ce55" office:value-type="string" calcext:value-type="string">
            <text:p>MF-06</text:p>
            <text:p>MF-12</text:p>
          </table:table-cell>
          <table:table-cell table:style-name="ce83" office:value-type="float" office:value="136" calcext:value-type="float">
            <text:p>FR-136</text:p>
          </table:table-cell>
          <table:table-cell table:style-name="ce110" office:value-type="string" calcext:value-type="string">
            <text:p><text:s text:c="2"/>.mandatory</text:p>
          </table:table-cell>
          <table:table-cell table:style-name="ce139" office:value-type="string" calcext:value-type="string">
            <text:p>BA shall be able to specify mandatory-ness of LL-req field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163"/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MF-12</text:p>
          </table:table-cell>
          <table:table-cell table:style-name="ce66" office:value-type="string" calcext:value-type="string">
            <text:p>-</text:p>
          </table:table-cell>
          <table:table-cell table:style-name="ce84" office:value-type="float" office:value="87" calcext:value-type="float">
            <text:p>FR-87</text:p>
          </table:table-cell>
          <table:table-cell table:style-name="ce108" office:value-type="string" calcext:value-type="string">
            <text:p><text:s text:c="4"/>.grouping</text:p>
          </table:table-cell>
          <table:table-cell table:style-name="ce161" office:value-type="string" calcext:value-type="string">
            <text:p>BA shall be able to filter view of reqs by grouping.</text:p>
          </table:table-cell>
          <table:table-cell table:number-columns-repeated="2" table:style-name="ce179" office:value-type="date" office:date-value="2014-05-15" calcext:value-type="date">
            <text:p>15/05/14</text:p>
          </table:table-cell>
          <table:table-cell table:style-name="ce161" office:value-type="string" calcext:value-type="string">
            <text:p>Made FR-50 generic.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MF-12</text:p>
          </table:table-cell>
          <table:table-cell table:style-name="ce56" office:value-type="float" office:value="22" calcext:value-type="float">
            <text:p>MF-22</text:p>
          </table:table-cell>
          <table:table-cell table:style-name="ce84" office:value-type="float" office:value="86" calcext:value-type="float">
            <text:p>FR-86</text:p>
          </table:table-cell>
          <table:table-cell table:style-name="ce108" office:value-type="string" calcext:value-type="string">
            <text:p><text:s text:c="4"/>.reqtype</text:p>
          </table:table-cell>
          <table:table-cell table:style-name="ce161" office:value-type="string" calcext:value-type="string">
            <text:p>BA shall be able to filter view of reqs by req-type.</text:p>
          </table:table-cell>
          <table:table-cell table:number-columns-repeated="2" table:style-name="ce179" office:value-type="date" office:date-value="2014-05-15" calcext:value-type="date">
            <text:p>15/05/14</text:p>
          </table:table-cell>
          <table:table-cell table:style-name="ce161" office:value-type="string" calcext:value-type="string">
            <text:p>Made FR-112 generic.</text:p>
          </table:table-cell>
          <table:table-cell table:number-columns-repeated="1016"/>
        </table:table-row>
        <table:table-row table:style-name="ro3">
          <table:table-cell table:style-name="ce56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84" office:value-type="float" office:value="196" calcext:value-type="float">
            <text:p>FR-196</text:p>
          </table:table-cell>
          <table:table-cell table:style-name="ce108" office:value-type="string" calcext:value-type="string">
            <text:p><text:s text:c="4"/>.warn</text:p>
          </table:table-cell>
          <table:table-cell table:style-name="ce164" office:value-type="string" calcext:value-type="string">
            <text:p>If there are associations, System shall warn the user that they will be <text:span text:style-name="T4">permanently</text:span> deleted.</text:p>
          </table:table-cell>
          <table:table-cell table:number-columns-repeated="2" table:style-name="ce179" office:value-type="date" office:date-value="2014-06-10" calcext:value-type="date">
            <text:p>10/06/14</text:p>
          </table:table-cell>
          <table:table-cell table:style-name="ce164" office:value-type="string" calcext:value-type="string">
            <text:p>Soft delete when in use like everything else.</text:p>
          </table:table-cell>
          <table:table-cell table:number-columns-repeated="1016"/>
        </table:table-row>
        <table:table-row table:style-name="ro3">
          <table:table-cell table:style-name="ce56" office:value-type="float" office:value="7" calcext:value-type="float">
            <text:p>MF-07</text:p>
          </table:table-cell>
          <table:table-cell table:style-name="ce65" office:value-type="string" calcext:value-type="string">
            <text:p>MF-01</text:p>
            <text:p>MF-12</text:p>
          </table:table-cell>
          <table:table-cell table:style-name="ce84" office:value-type="float" office:value="277" calcext:value-type="float">
            <text:p>FR-277</text:p>
          </table:table-cell>
          <table:table-cell table:style-name="ce108" office:value-type="string" calcext:value-type="string">
            <text:p><text:s text:c="2"/>.extract</text:p>
          </table:table-cell>
          <table:table-cell table:style-name="ce164" office:value-type="string" calcext:value-type="string">
            <text:p>When parsing text input for a req (that isn't a subreq), System shall extract tags applied via hashtag and move them into the req's tag storage. (So its tag columns.)</text:p>
          </table:table-cell>
          <table:table-cell table:style-name="ce179" office:value-type="date" office:date-value="2014-07-03" calcext:value-type="date">
            <text:p>03/07/14</text:p>
          </table:table-cell>
          <table:table-cell table:style-name="ce179" office:value-type="date" office:date-value="2015-04-23" calcext:value-type="date">
            <text:p>23/04/15</text:p>
          </table:table-cell>
          <table:table-cell table:style-name="ce164" office:value-type="string" calcext:value-type="string">
            <text:p>Rejected in analysis-20150423</text:p>
          </table:table-cell>
          <table:table-cell table:number-columns-repeated="1016"/>
        </table:table-row>
        <table:table-row table:style-name="ro21">
          <table:table-cell table:style-name="ce57" office:value-type="float" office:value="7" calcext:value-type="float">
            <text:p>MF-07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300" calcext:value-type="float">
            <text:p>FR-300</text:p>
          </table:table-cell>
          <table:table-cell table:style-name="ce111" office:value-type="string" calcext:value-type="string">
            <text:p>tags.trans.shr</text:p>
          </table:table-cell>
          <table:table-cell table:style-name="ce165" office:value-type="string" calcext:value-type="string">
            <text:p>When an SHR has a tag [FR-298], System shall consider all reqs that appear as children in the reqcode tree, as having the same tags applied.</text:p>
            <text:p>i.e. G⊗a ∧ a⊏b → G⊗b</text:p>
          </table:table-cell>
          <table:table-cell table:number-columns-repeated="2" table:style-name="ce180" office:value-type="date" office:date-value="2015-06-11" calcext:value-type="date">
            <text:p>11/06/15</text:p>
          </table:table-cell>
          <table:table-cell table:style-name="ce190" office:value-type="string" calcext:value-type="string">
            <text:p>Rejected due to FR-298</text:p>
            <text:p/>
            <text:p>MAYBE. Needs more analyis. SHR is for org only; shouldn't have semantic effect on reqs.</text:p>
            <text:p>What about tag overlap? group:pri=high, child:pri=low, 2 pri = issue, what then?</text:p>
          </table:table-cell>
          <table:table-cell table:number-columns-repeated="1016"/>
        </table:table-row>
        <table:table-row table:style-name="ro3">
          <table:table-cell table:style-name="ce45" office:value-type="float" office:value="6" calcext:value-type="float">
            <text:p>MF-06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265" calcext:value-type="float">
            <text:p>FR-265</text:p>
          </table:table-cell>
          <table:table-cell table:style-name="ce103" office:value-type="string" calcext:value-type="string">
            <text:p><text:s text:c="4"/>.remove</text:p>
          </table:table-cell>
          <table:table-cell table:style-name="ce135" office:value-type="string" calcext:value-type="string">
            <text:p>When a custom issue types has been soft-deleted but is still in-use, System shall render users as if the instance of usage didn't exist. (ie. appearance of hard-deletion)</text:p>
          </table:table-cell>
          <table:table-cell table:style-name="ce175" office:value-type="date" office:date-value="2014-08-02" calcext:value-type="date">
            <text:p>02/08/14</text:p>
          </table:table-cell>
          <table:table-cell table:style-name="ce175" office:value-type="date" office:date-value="2015-04-23" calcext:value-type="date">
            <text:p>23/04/15</text:p>
          </table:table-cell>
          <table:table-cell table:style-name="ce135" office:value-type="string" calcext:value-type="string" table:number-columns-spanned="1" table:number-rows-spanned="10">
            <text:p>Rejected after analysis-deletion</text:p>
          </table:table-cell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3">
          <table:table-cell table:style-name="ce45" office:value-type="float" office:value="6" calcext:value-type="float">
            <text:p>MF-06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288" calcext:value-type="float">
            <text:p>FR-288</text:p>
          </table:table-cell>
          <table:table-cell table:style-name="ce103" office:value-type="string" calcext:value-type="string">
            <text:p><text:s text:c="4"/>.hard</text:p>
          </table:table-cell>
          <table:table-cell table:style-name="ce166" office:value-type="string" calcext:value-type="string">
            <text:p>System shall hard-delete a custom issue type only when it has never been used and has no associations (including soft-deleted associations).</text:p>
          </table:table-cell>
          <table:table-cell table:style-name="ce175" office:value-type="date" office:date-value="2014-08-02" calcext:value-type="date">
            <text:p>02/08/14</text:p>
          </table:table-cell>
          <table:table-cell table:style-name="ce175" office:value-type="date" office:date-value="2015-04-23" calcext:value-type="date">
            <text:p>23/04/15</text:p>
          </table:table-cell>
          <table:covered-table-cell table:style-name="ce135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188" calcext:value-type="float">
            <text:p>FR-188</text:p>
          </table:table-cell>
          <table:table-cell table:style-name="ce103" office:value-type="string" calcext:value-type="string">
            <text:p><text:s text:c="4"/>.hard</text:p>
          </table:table-cell>
          <table:table-cell table:style-name="ce166" office:value-type="string" calcext:value-type="string">
            <text:p>System shall hard-delete a tag only when it has never been used and has no associations (including soft-deleted associations)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75" office:value-type="date" office:date-value="2015-04-23" calcext:value-type="date">
            <text:p>23/04/15</text:p>
          </table:table-cell>
          <table:covered-table-cell table:style-name="ce135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189" calcext:value-type="float">
            <text:p>FR-189</text:p>
          </table:table-cell>
          <table:table-cell table:style-name="ce103" office:value-type="string" calcext:value-type="string">
            <text:p><text:s text:c="4"/>.bin</text:p>
          </table:table-cell>
          <table:table-cell table:style-name="ce135" office:value-type="string" calcext:value-type="string">
            <text:p>Upon tag deletion, System shall move it to the bin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75" office:value-type="date" office:date-value="2015-04-23" calcext:value-type="date">
            <text:p>23/04/15</text:p>
          </table:table-cell>
          <table:covered-table-cell table:style-name="ce135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3">
          <table:table-cell table:style-name="ce45" office:value-type="float" office:value="6" calcext:value-type="float">
            <text:p>MF-06</text:p>
          </table:table-cell>
          <table:table-cell table:style-name="ce45" office:value-type="string" calcext:value-type="string">
            <text:p>MF-05</text:p>
            <text:p>MF-07</text:p>
          </table:table-cell>
          <table:table-cell table:style-name="ce81" office:value-type="float" office:value="33" calcext:value-type="float">
            <text:p>FR-33</text:p>
          </table:table-cell>
          <table:table-cell table:style-name="ce103" office:value-type="string" calcext:value-type="string">
            <text:p><text:s text:c="4"/>.field.no-tag</text:p>
          </table:table-cell>
          <table:table-cell table:style-name="ce135" office:value-type="string" calcext:value-type="string">
            <text:p>When a tag is deleted, a field based on it should be flagged as an issue.</text:p>
          </table:table-cell>
          <table:table-cell table:style-name="ce175" office:value-type="date" office:date-value="2014-06-09" calcext:value-type="date">
            <text:p>09/06/14</text:p>
          </table:table-cell>
          <table:table-cell table:style-name="ce175" office:value-type="date" office:date-value="2015-04-23" calcext:value-type="date">
            <text:p>23/04/15</text:p>
          </table:table-cell>
          <table:covered-table-cell table:style-name="ce135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23" calcext:value-type="float">
            <text:p>FR-123</text:p>
          </table:table-cell>
          <table:table-cell table:style-name="ce103" office:value-type="string" calcext:value-type="string">
            <text:p><text:s text:c="4"/>.hard</text:p>
          </table:table-cell>
          <table:table-cell table:style-name="ce135" office:value-type="string" calcext:value-type="string">
            <text:p>System shall hard-delete a req type only when it has never had any associations.</text:p>
          </table:table-cell>
          <table:table-cell table:number-columns-repeated="2" table:style-name="ce175" office:value-type="date" office:date-value="2014-05-16" calcext:value-type="date">
            <text:p>16/05/14</text:p>
          </table:table-cell>
          <table:covered-table-cell table:style-name="ce136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24" calcext:value-type="float">
            <text:p>FR-124</text:p>
          </table:table-cell>
          <table:table-cell table:style-name="ce112" office:value-type="string" calcext:value-type="string">
            <text:p><text:s text:c="4"/>.after</text:p>
          </table:table-cell>
          <table:table-cell table:style-name="ce135" office:value-type="string" calcext:value-type="string">
            <text:p>After soft-deletion, req types should move to the bin.</text:p>
          </table:table-cell>
          <table:table-cell table:number-columns-repeated="2" table:style-name="ce175" office:value-type="date" office:date-value="2014-05-16" calcext:value-type="date">
            <text:p>16/05/14</text:p>
          </table:table-cell>
          <table:covered-table-cell table:style-name="ce136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80" calcext:value-type="float">
            <text:p>FR-180</text:p>
          </table:table-cell>
          <table:table-cell table:style-name="ce103" office:value-type="string" calcext:value-type="string">
            <text:p><text:s text:c="4"/>.usage-summary</text:p>
          </table:table-cell>
          <table:table-cell table:style-name="ce166" office:value-type="string" calcext:value-type="string">
            <text:p>Before LL-req deletion, user shall be able to see a count of incoming references.</text:p>
          </table:table-cell>
          <table:table-cell table:number-columns-repeated="2" table:style-name="ce175" office:value-type="date" office:date-value="2014-05-22" calcext:value-type="date">
            <text:p>22/05/14</text:p>
          </table:table-cell>
          <table:covered-table-cell table:style-name="ce136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81" calcext:value-type="float">
            <text:p>FR-181</text:p>
          </table:table-cell>
          <table:table-cell table:style-name="ce103" office:value-type="string" calcext:value-type="string">
            <text:p><text:s text:c="4"/>.usage-inspect</text:p>
          </table:table-cell>
          <table:table-cell table:style-name="ce166" office:value-type="string" calcext:value-type="string">
            <text:p>Before LL-req deletion, user shall be able to see each instance of incoming references.</text:p>
          </table:table-cell>
          <table:table-cell table:number-columns-repeated="2" table:style-name="ce175" office:value-type="date" office:date-value="2014-05-22" calcext:value-type="date">
            <text:p>22/05/14</text:p>
          </table:table-cell>
          <table:covered-table-cell table:style-name="ce136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82" calcext:value-type="float">
            <text:p>FR-182</text:p>
          </table:table-cell>
          <table:table-cell table:style-name="ce103" office:value-type="string" calcext:value-type="string">
            <text:p><text:s text:c="4"/>.bin</text:p>
          </table:table-cell>
          <table:table-cell table:style-name="ce135" office:value-type="string" calcext:value-type="string">
            <text:p>After LL-req deletion, System shall move entity to the bin.</text:p>
          </table:table-cell>
          <table:table-cell table:number-columns-repeated="2" table:style-name="ce175" office:value-type="date" office:date-value="2014-05-22" calcext:value-type="date">
            <text:p>22/05/14</text:p>
          </table:table-cell>
          <table:covered-table-cell table:style-name="ce136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6">
          <table:table-cell table:style-name="ce45" office:value-type="float" office:value="6" calcext:value-type="float">
            <text:p>MF-06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301" calcext:value-type="float">
            <text:p>FR-301</text:p>
          </table:table-cell>
          <table:table-cell table:style-name="ce103" office:value-type="string" calcext:value-type="string">
            <text:p><text:s text:c="4"/>.prevent</text:p>
          </table:table-cell>
          <table:table-cell table:style-name="ce135" office:value-type="string" calcext:value-type="string">
            <text:p>BA shall be unable to delete a custom issue type that is in use.</text:p>
          </table:table-cell>
          <table:table-cell table:number-columns-repeated="2" table:style-name="ce175" office:value-type="date" office:date-value="2015-09-10" calcext:value-type="date">
            <text:p>10/09/15</text:p>
          </table:table-cell>
          <table:table-cell table:style-name="ce135" office:value-type="string" calcext:value-type="string">
            <text:p>Soft deletion required.</text:p>
          </table:table-cell>
          <table:table-cell table:style-name="ce113" table:number-columns-repeated="7"/>
          <table:table-cell table:number-columns-repeated="1009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105"/>
        <table:table-column table:style-name="co21" table:default-cell-style-name="ce20"/>
        <table:table-column table:style-name="co22" table:default-cell-style-name="ce71"/>
        <table:table-column table:style-name="co15" table:number-columns-repeated="1017" table:default-cell-style-name="ce71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42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38"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75" office:value-type="string" calcext:value-type="string">
            <text:p>All use cases in a project share the same field-set.</text:p>
          </table:table-cell>
          <table:table-cell table:style-name="ce106" office:value-type="date" office:date-value="2014-02-06" calcext:value-type="date">
            <text:p>06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75" office:value-type="string" calcext:value-type="string">
            <text:p>A field-set cannot contain more than 30 fields.</text:p>
          </table:table-cell>
          <table:table-cell table:style-name="ce106" office:value-type="date" office:date-value="2014-02-06" calcext:value-type="date">
            <text:p>06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75" office:value-type="string" calcext:value-type="string">
            <text:p>Each field name in a field-set must be unique.</text:p>
          </table:table-cell>
          <table:table-cell table:style-name="ce106" office:value-type="date" office:date-value="2014-02-06" calcext:value-type="date">
            <text:p>06/02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0" office:value-type="string" calcext:value-type="string">
            <text:p>-</text:p>
          </table:table-cell>
          <table:table-cell table:style-name="ce141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75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106" office:value-type="date" office:date-value="2014-02-12" calcext:value-type="date">
            <text:p>12/02/14</text:p>
          </table:table-cell>
          <table:table-cell table:style-name="ce47"/>
          <table:table-cell table:number-columns-repeated="1017"/>
        </table:table-row>
        <table:table-row table:style-name="ro12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75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106" office:value-type="date" office:date-value="2014-02-13" calcext:value-type="date">
            <text:p>13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75" office:value-type="string" calcext:value-type="string">
            <text:p>BA shall not be able to remove NC/AC/EC fields from a field-set.</text:p>
          </table:table-cell>
          <table:table-cell table:style-name="ce106" office:value-type="date" office:date-value="2014-02-25" calcext:value-type="date">
            <text:p>25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75" office:value-type="string" calcext:value-type="string">
            <text:p>Do not allow copy&amp;paste of UCs. (FR-172)</text:p>
          </table:table-cell>
          <table:table-cell table:style-name="ce106"/>
          <table:table-cell table:style-name="ce47"/>
          <table:table-cell table:number-columns-repeated="1017"/>
        </table:table-row>
        <table:table-row table:style-name="ro1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73" office:value-type="string" calcext:value-type="string">
            <text:p>Groupings may later be split into types: {key,value} instead of unityped with an unapplicability flag.</text:p>
          </table:table-cell>
          <table:table-cell table:style-name="ce106" office:value-type="date" office:date-value="2014-06-06" calcext:value-type="date">
            <text:p>06/06/14</text:p>
          </table:table-cell>
          <table:table-cell table:style-name="ce47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75" office:value-type="string" calcext:value-type="string">
            <text:p>A field-set cannot be empty.</text:p>
          </table:table-cell>
          <table:table-cell table:style-name="ce106" office:value-type="date" office:date-value="2014-02-06" calcext:value-type="date">
            <text:p>06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75" office:value-type="string" calcext:value-type="string">
            <text:p>Grouping names may be unique per project.</text:p>
          </table:table-cell>
          <table:table-cell table:style-name="ce106" office:value-type="date" office:date-value="2014-02-12" calcext:value-type="date">
            <text:p>12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73" office:value-type="string" calcext:value-type="string">
            <text:p>Grouping names must not exceed 60 characters.</text:p>
          </table:table-cell>
          <table:table-cell table:style-name="ce106" office:value-type="date" office:date-value="2014-02-12" calcext:value-type="date">
            <text:p>12/02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41" office:value-type="float" office:value="6" calcext:value-type="float">
            <text:p>MF-06</text:p>
          </table:table-cell>
          <table:table-cell table:style-name="ce141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73" office:value-type="string" calcext:value-type="string">
            <text:p>When viewing multiple incompletions, the user shall be able to comprehend each item without leaving the page.</text:p>
          </table:table-cell>
          <table:table-cell table:style-name="ce106" office:value-type="date" office:date-value="2014-05-12" calcext:value-type="date">
            <text:p>12/05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77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106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13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43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73" office:value-type="string" calcext:value-type="string">
            <text:p>Groupings have a name.</text:p>
          </table:table-cell>
          <table:table-cell table:style-name="ce106" office:value-type="date" office:date-value="2014-02-11" calcext:value-type="date">
            <text:p>11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73" office:value-type="string" calcext:value-type="string">
            <text:p>Groupings have a description.</text:p>
          </table:table-cell>
          <table:table-cell table:style-name="ce106" office:value-type="date" office:date-value="2014-02-11" calcext:value-type="date">
            <text:p>11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75" office:value-type="string" calcext:value-type="string">
            <text:p>Groupings can have 0:<text:span text:style-name="T9">n children.</text:span></text:p>
          </table:table-cell>
          <table:table-cell table:style-name="ce106" office:value-type="date" office:date-value="2014-02-12" calcext:value-type="date">
            <text:p>12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75" office:value-type="string" calcext:value-type="string">
            <text:p>Groupings can have 0:<text:span text:style-name="T9">n parents.</text:span></text:p>
          </table:table-cell>
          <table:table-cell table:style-name="ce106" office:value-type="date" office:date-value="2014-02-12" calcext:value-type="date">
            <text:p>12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75" office:value-type="string" calcext:value-type="string">
            <text:p>Requirement type has a unique name.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75" office:value-type="string" calcext:value-type="string">
            <text:p>Requirement type has a unique mnemonic matching /^[A-Z]{1,4}$/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75" office:value-type="string" calcext:value-type="string">
            <text:p>Semantic Header Rows shall have exactly one semantic ID.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75" office:value-type="string" calcext:value-type="string">
            <text:p>Semantic Header Rows shall not have a numeric ID.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75" office:value-type="string" calcext:value-type="string">
            <text:p>Semantic Header Rows shall not have a user-defined req-type.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75" office:value-type="string" calcext:value-type="string">
            <text:p>Semantic Header Rows shall not have values for custom fields.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75" office:value-type="string" calcext:value-type="string">
            <text:p>Semantic Header Rows shall not have groupings.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75" office:value-type="string" calcext:value-type="string">
            <text:p>Text token keys conform to /^[a-z]+(\.[a-z]+)*$/i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75" office:value-type="string" calcext:value-type="string">
            <text:p>Text token keys are unique per project.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75" office:value-type="string" calcext:value-type="string">
            <text:p>Text token values are text.</text:p>
          </table:table-cell>
          <table:table-cell table:style-name="ce106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75" office:value-type="string" calcext:value-type="string">
            <text:p>Semantic-IDs are unique per project.</text:p>
          </table:table-cell>
          <table:table-cell table:style-name="ce106" office:value-type="date" office:date-value="2014-05-22" calcext:value-type="date">
            <text:p>22/05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16" calcext:value-type="float">
            <text:p>16</text:p>
          </table:table-cell>
          <table:table-cell table:style-name="ce75" office:value-type="string" calcext:value-type="string">
            <text:p>Applicable groupings have a refkey, a string that can be used with a hashtag to apply the grouping in text.</text:p>
          </table:table-cell>
          <table:table-cell table:style-name="ce106" office:value-type="date" office:date-value="2014-07-03" calcext:value-type="date">
            <text:p>03/07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17" calcext:value-type="float">
            <text:p>17</text:p>
          </table:table-cell>
          <table:table-cell table:style-name="ce75" office:value-type="string" calcext:value-type="string">
            <text:p>Semantic-ID components must match this format: /[a-z0-9][a-z0-9_]*/</text:p>
            <text:p>Must not contain: []{}&lt;&gt;.-?:</text:p>
          </table:table-cell>
          <table:table-cell table:style-name="ce106" office:value-type="date" office:date-value="2014-07-10" calcext:value-type="date">
            <text:p>10/07/14</text:p>
          </table:table-cell>
          <table:table-cell table:style-name="ce47"/>
          <table:table-cell table:number-columns-repeated="1017"/>
        </table:table-row>
        <table:table-row table:style-name="ro12">
          <table:table-cell table:style-name="ce141" office:value-type="string" calcext:value-type="string">
            <text:p>MF-06</text:p>
            <text:p>MF-07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18" calcext:value-type="float">
            <text:p>18</text:p>
          </table:table-cell>
          <table:table-cell table:style-name="ce75" office:value-type="string" calcext:value-type="string">
            <text:p>Hashtag-like refkeys (groupings, incmp) must match this format: /[A-Za-z0-9][A-Za-z0-9_-=.]*/</text:p>
            <text:p>Must not contain: []{}&lt;&gt;</text:p>
          </table:table-cell>
          <table:table-cell table:style-name="ce106" office:value-type="date" office:date-value="2014-07-10" calcext:value-type="date">
            <text:p>10/07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41" office:value-type="string" calcext:value-type="string">
            <text:p>MF-06</text:p>
            <text:p>MF-07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19" calcext:value-type="float">
            <text:p>19</text:p>
          </table:table-cell>
          <table:table-cell table:style-name="ce75" office:value-type="string" calcext:value-type="string">
            <text:p>Hashtag-like refkeys (groupings, incmp) must be unique.</text:p>
            <text:p>e.g. can't have both a grouping and an incompletion with refkey #X.</text:p>
          </table:table-cell>
          <table:table-cell table:style-name="ce106" office:value-type="date" office:date-value="2014-07-10" calcext:value-type="date">
            <text:p>10/07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20" calcext:value-type="float">
            <text:p>20</text:p>
          </table:table-cell>
          <table:table-cell table:style-name="ce75" office:value-type="string" calcext:value-type="string">
            <text:p>Field refkeys must match this format: /[a-z][a-z0-9_]*/</text:p>
            <text:p>Must not contain: []{}&lt;&gt;.?</text:p>
          </table:table-cell>
          <table:table-cell table:style-name="ce106" office:value-type="date" office:date-value="2014-07-10" calcext:value-type="date">
            <text:p>10/07/14</text:p>
          </table:table-cell>
          <table:table-cell table:style-name="ce47"/>
          <table:table-cell table:number-columns-repeated="1017"/>
        </table:table-row>
        <table:table-row table:style-name="ro6">
          <table:table-cell table:style-name="ce141" office:value-type="string" calcext:value-type="string">
            <text:p>MF-05</text:p>
            <text:p>MF-06</text:p>
            <text:p>MF-07</text:p>
          </table:table-cell>
          <table:table-cell table:style-name="ce141"/>
          <table:table-cell table:style-name="ce10" office:value-type="string" calcext:value-type="string">
            <text:p>DD</text:p>
          </table:table-cell>
          <table:table-cell table:style-name="ce10" office:value-type="float" office:value="21" calcext:value-type="float">
            <text:p>21</text:p>
          </table:table-cell>
          <table:table-cell table:style-name="ce75" office:value-type="string" calcext:value-type="string">
            <text:p>Refkeys must be case-insensitive.</text:p>
            <text:p>eg. #HELLO should match #Hello</text:p>
          </table:table-cell>
          <table:table-cell table:style-name="ce106" office:value-type="date" office:date-value="2015-01-03" calcext:value-type="date">
            <text:p>03/01/15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73" office:value-type="string" calcext:value-type="string">
            <text:p>User must be able to organise 100 flat reqs of same type into 5 versions in under 5 minutes.</text:p>
          </table:table-cell>
          <table:table-cell table:style-name="ce106" office:value-type="date" office:date-value="2014-02-11" calcext:value-type="date">
            <text:p>11/02/14</text:p>
          </table:table-cell>
          <table:table-cell table:style-name="ce47"/>
          <table:table-cell table:number-columns-repeated="1017"/>
        </table:table-row>
        <table:table-row table:style-name="ro12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73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106" office:value-type="date" office:date-value="2014-02-11" calcext:value-type="date">
            <text:p>11/02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44" office:value-type="string" calcext:value-type="string">
            <text:p>BA shall be able to go from LL-req editor to a view of all LL-req incompletions in a single action.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44" office:value-type="string" calcext:value-type="string">
            <text:p>BA shall be able to go from a view of all LL-req incompletions to LL-req editor in a single action.</text:p>
          </table:table-cell>
          <table:table-cell table:style-name="ce106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12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44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106" office:value-type="date" office:date-value="2014-05-22" calcext:value-type="date">
            <text:p>22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17" calcext:value-type="float">
            <text:p>MF-17</text:p>
          </table:table-cell>
          <table:table-cell table:style-name="ce141"/>
          <table:table-cell table:style-name="ce10" office:value-type="string" calcext:value-type="string">
            <text:p>QR</text:p>
          </table:table-cell>
          <table:table-cell table:style-name="ce10" office:value-type="float" office:value="6" calcext:value-type="float">
            <text:p>6</text:p>
          </table:table-cell>
          <table:table-cell table:style-name="ce144" office:value-type="string" calcext:value-type="string">
            <text:p>In the event of server or client failure, a user shouldn't lose more than 2 minutes of work.</text:p>
          </table:table-cell>
          <table:table-cell table:style-name="ce106" office:value-type="date" office:date-value="2014-07-03" calcext:value-type="date">
            <text:p>03/07/14</text:p>
          </table:table-cell>
          <table:table-cell table:style-name="ce47" office:value-type="string" calcext:value-type="string">
            <text:p>2min = arbitrary.</text:p>
          </table:table-cell>
          <table:table-cell table:number-columns-repeated="1017"/>
        </table:table-row>
        <table:table-row table:style-name="ro11">
          <table:table-cell table:style-name="ce141" office:value-type="float" office:value="13" calcext:value-type="float">
            <text:p>MF-13</text:p>
          </table:table-cell>
          <table:table-cell table:style-name="ce141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75" office:value-type="string" calcext:value-type="string">
            <text:p>[FR-204] BA shall be able to specify a (transitive) template from which all newly created reqs inherit.</text:p>
          </table:table-cell>
          <table:table-cell table:style-name="ce106" office:value-type="date" office:date-value="2014-06-02" calcext:value-type="date">
            <text:p>02/06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75" office:value-type="string" calcext:value-type="string">
            <text:p>Modify a Project's Fields</text:p>
          </table:table-cell>
          <table:table-cell table:style-name="ce106" office:value-type="date" office:date-value="2014-02-06" calcext:value-type="date">
            <text:p>06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75" office:value-type="string" calcext:value-type="string">
            <text:p>Ensure Groupings are well distributed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47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ce146"/>
        <table:table-column table:style-name="co25" table:default-cell-style-name="ce146"/>
        <table:table-column table:style-name="co25" table:number-columns-repeated="17" table:default-cell-style-name="Default"/>
        <table:table-column table:style-name="co15" table:number-columns-repeated="1002" table:default-cell-style-name="Default"/>
        <table:table-row table:style-name="ro14">
          <table:table-cell table:number-columns-repeated="2"/>
          <table:table-cell table:style-name="ce148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49"/>
          <table:table-cell table:style-name="ce157" office:value-type="string" calcext:value-type="string">
            <text:p>Fields</text:p>
          </table:table-cell>
          <table:table-cell table:number-columns-repeated="1016"/>
        </table:table-row>
        <table:table-row table:style-name="ro15">
          <table:table-cell table:number-columns-repeated="2"/>
          <table:table-cell table:style-name="ce149" office:value-type="float" office:value="1" calcext:value-type="float">
            <text:p>MF-01</text:p>
          </table:table-cell>
          <table:table-cell table:number-columns-repeated="2" table:style-name="ce149" office:value-type="float" office:value="12" calcext:value-type="float">
            <text:p>MF-12</text:p>
          </table:table-cell>
          <table:table-cell table:style-name="ce149" office:value-type="float" office:value="5" calcext:value-type="float">
            <text:p>MF-05</text:p>
          </table:table-cell>
          <table:table-cell table:style-name="ce149" office:value-type="float" office:value="12" calcext:value-type="float">
            <text:p>MF-12</text:p>
          </table:table-cell>
          <table:table-cell table:style-name="ce149" office:value-type="float" office:value="7" calcext:value-type="float">
            <text:p>MF-07</text:p>
          </table:table-cell>
          <table:table-cell table:style-name="ce149" office:value-type="float" office:value="6" calcext:value-type="float">
            <text:p>MF-06</text:p>
          </table:table-cell>
          <table:table-cell table:style-name="ce149" office:value-type="float" office:value="12" calcext:value-type="float">
            <text:p>MF-12</text:p>
          </table:table-cell>
          <table:table-cell table:number-columns-repeated="1012"/>
        </table:table-row>
        <table:table-row table:style-name="ro3">
          <table:table-cell table:style-name="ce145" office:value-type="string" calcext:value-type="string">
            <text:p>CRUDL</text:p>
          </table:table-cell>
          <table:table-cell table:style-name="ce147"/>
          <table:table-cell table:style-name="ce150" office:value-type="string" calcext:value-type="string">
            <text:p>UC</text:p>
          </table:table-cell>
          <table:table-cell table:style-name="ce150" office:value-type="string" calcext:value-type="string">
            <text:p>LL Req</text:p>
          </table:table-cell>
          <table:table-cell table:style-name="ce150" office:value-type="string" calcext:value-type="string">
            <text:p>SHR</text:p>
          </table:table-cell>
          <table:table-cell table:style-name="ce153" office:value-type="string" calcext:value-type="string">
            <text:p>Field</text:p>
          </table:table-cell>
          <table:table-cell table:style-name="ce153" office:value-type="string" calcext:value-type="string">
            <text:p>Req Type</text:p>
          </table:table-cell>
          <table:table-cell table:style-name="ce153" office:value-type="string" calcext:value-type="string">
            <text:p>Grouping</text:p>
          </table:table-cell>
          <table:table-cell table:style-name="ce153" office:value-type="string" calcext:value-type="string">
            <text:p>Incompletion</text:p>
            <text:p>Type</text:p>
          </table:table-cell>
          <table:table-cell table:style-name="ce153" office:value-type="string" calcext:value-type="string">
            <text:p>Text</text:p>
            <text:p>tokens</text:p>
          </table:table-cell>
          <table:table-cell/>
          <table:table-cell table:style-name="ce160" table:number-columns-repeated="1011"/>
        </table:table-row>
        <table:table-row table:style-name="ro15">
          <table:table-cell table:style-name="ce51" office:value-type="string" calcext:value-type="string">
            <text:p><text:s text:c="2"/>.list</text:p>
          </table:table-cell>
          <table:table-cell table:style-name="ce75" office:value-type="string" calcext:value-type="string">
            <text:p>User shall be able to list entities.</text:p>
          </table:table-cell>
          <table:table-cell table:style-name="ce151"/>
          <table:table-cell table:style-name="ce32" office:value-type="float" office:value="83" calcext:value-type="float">
            <text:p>FR-83</text:p>
          </table:table-cell>
          <table:table-cell table:style-name="ce154" office:value-type="float" office:value="84" calcext:value-type="float">
            <text:p>FR-84</text:p>
          </table:table-cell>
          <table:table-cell table:style-name="ce32" office:value-type="float" office:value="114" calcext:value-type="float">
            <text:p>FR-114</text:p>
          </table:table-cell>
          <table:table-cell table:style-name="ce32" office:value-type="float" office:value="116" calcext:value-type="float">
            <text:p>FR-116</text:p>
          </table:table-cell>
          <table:table-cell table:style-name="ce32" office:value-type="float" office:value="19" calcext:value-type="float">
            <text:p>FR-19</text:p>
          </table:table-cell>
          <table:table-cell table:style-name="ce32" office:value-type="float" office:value="115" calcext:value-type="float">
            <text:p>FR-115</text:p>
          </table:table-cell>
          <table:table-cell table:style-name="ce32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5">
          <table:table-cell table:style-name="ce51" office:value-type="string" calcext:value-type="string">
            <text:p><text:s text:c="2"/>.create</text:p>
          </table:table-cell>
          <table:table-cell table:style-name="ce75" office:value-type="string" calcext:value-type="string">
            <text:p>User shall be able to create entities.</text:p>
          </table:table-cell>
          <table:table-cell table:style-name="ce151"/>
          <table:table-cell table:style-name="ce32" office:value-type="float" office:value="176" calcext:value-type="float">
            <text:p>FR-176</text:p>
          </table:table-cell>
          <table:table-cell table:style-name="ce32" office:value-type="float" office:value="144" calcext:value-type="float">
            <text:p>FR-144</text:p>
          </table:table-cell>
          <table:table-cell table:style-name="ce32" office:value-type="float" office:value="2" calcext:value-type="float">
            <text:p>FR-02</text:p>
          </table:table-cell>
          <table:table-cell table:style-name="ce32" office:value-type="float" office:value="117" calcext:value-type="float">
            <text:p>FR-117</text:p>
          </table:table-cell>
          <table:table-cell table:style-name="ce32" office:value-type="float" office:value="16" calcext:value-type="float">
            <text:p>FR-16</text:p>
          </table:table-cell>
          <table:table-cell table:style-name="ce32" office:value-type="float" office:value="68" calcext:value-type="float">
            <text:p>FR-68</text:p>
          </table:table-cell>
          <table:table-cell table:style-name="ce32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5">
          <table:table-cell table:style-name="ce51" office:value-type="string" calcext:value-type="string">
            <text:p><text:s text:c="2"/>.update</text:p>
          </table:table-cell>
          <table:table-cell table:style-name="ce75" office:value-type="string" calcext:value-type="string">
            <text:p>User shall be able to modify entities.</text:p>
          </table:table-cell>
          <table:table-cell table:style-name="ce151"/>
          <table:table-cell table:style-name="ce32" office:value-type="float" office:value="177" calcext:value-type="float">
            <text:p>FR-177</text:p>
          </table:table-cell>
          <table:table-cell table:style-name="ce32" office:value-type="float" office:value="146" calcext:value-type="float">
            <text:p>FR-146</text:p>
          </table:table-cell>
          <table:table-cell table:style-name="ce32" office:value-type="float" office:value="3" calcext:value-type="float">
            <text:p>FR-03</text:p>
          </table:table-cell>
          <table:table-cell table:style-name="ce32" office:value-type="float" office:value="118" calcext:value-type="float">
            <text:p>FR-118</text:p>
          </table:table-cell>
          <table:table-cell table:style-name="ce32" office:value-type="float" office:value="17" calcext:value-type="float">
            <text:p>FR-17</text:p>
          </table:table-cell>
          <table:table-cell table:style-name="ce32" office:value-type="float" office:value="69" calcext:value-type="float">
            <text:p>FR-69</text:p>
          </table:table-cell>
          <table:table-cell table:style-name="ce32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5">
          <table:table-cell table:style-name="ce51" office:value-type="string" calcext:value-type="string">
            <text:p><text:s text:c="4"/>.order</text:p>
          </table:table-cell>
          <table:table-cell table:style-name="ce75" office:value-type="string" calcext:value-type="string">
            <text:p>User shall be able to reorder entities.</text:p>
          </table:table-cell>
          <table:table-cell table:style-name="ce151"/>
          <table:table-cell table:number-columns-repeated="2" table:style-name="ce32" office:value-type="string" calcext:value-type="string">
            <text:p>via sem-ID</text:p>
          </table:table-cell>
          <table:table-cell table:style-name="ce32" office:value-type="float" office:value="4" calcext:value-type="float">
            <text:p>FR-04</text:p>
          </table:table-cell>
          <table:table-cell table:style-name="ce158" office:value-type="string" calcext:value-type="string">
            <text:p>N/A</text:p>
          </table:table-cell>
          <table:table-cell table:style-name="ce32" office:value-type="float" office:value="14" calcext:value-type="float">
            <text:p>FR-14</text:p>
          </table:table-cell>
          <table:table-cell table:number-columns-repeated="2" table:style-name="ce158" office:value-type="string" calcext:value-type="string">
            <text:p>N/A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<text:s text:c="4"/>.refs</text:p>
          </table:table-cell>
          <table:table-cell table:style-name="ce75" office:value-type="string" calcext:value-type="string">
            <text:p>System shall appear to rename all references of entity after it is renamed.</text:p>
          </table:table-cell>
          <table:table-cell table:style-name="ce151"/>
          <table:table-cell table:style-name="ce32" office:value-type="float" office:value="178" calcext:value-type="float">
            <text:p>FR-178</text:p>
          </table:table-cell>
          <table:table-cell table:style-name="ce32" office:value-type="float" office:value="175" calcext:value-type="float">
            <text:p>FR-175</text:p>
          </table:table-cell>
          <table:table-cell table:style-name="ce32" office:value-type="float" office:value="263" calcext:value-type="float">
            <text:p>FR-263</text:p>
          </table:table-cell>
          <table:table-cell table:style-name="ce32" office:value-type="float" office:value="119" calcext:value-type="float">
            <text:p>FR-119</text:p>
          </table:table-cell>
          <table:table-cell table:style-name="ce32" office:value-type="float" office:value="185" calcext:value-type="float">
            <text:p>FR-185</text:p>
          </table:table-cell>
          <table:table-cell table:style-name="ce32" office:value-type="float" office:value="70" calcext:value-type="float">
            <text:p>FR-70</text:p>
          </table:table-cell>
          <table:table-cell table:style-name="ce32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9" office:value-type="string" calcext:value-type="string">
            <text:p><text:s text:c="2"/>.delete</text:p>
          </table:table-cell>
          <table:table-cell table:style-name="ce77" office:value-type="string" calcext:value-type="string">
            <text:p>User shall be able to (soft) delete entity.</text:p>
          </table:table-cell>
          <table:table-cell table:style-name="ce151"/>
          <table:table-cell table:style-name="ce32" office:value-type="float" office:value="179" calcext:value-type="float">
            <text:p>FR-179</text:p>
          </table:table-cell>
          <table:table-cell table:style-name="ce155" office:value-type="string" calcext:value-type="string">
            <text:p>Hard only</text:p>
          </table:table-cell>
          <table:table-cell table:style-name="ce32" office:value-type="float" office:value="1" calcext:value-type="float">
            <text:p>FR-01</text:p>
          </table:table-cell>
          <table:table-cell table:style-name="ce32" office:value-type="float" office:value="120" calcext:value-type="float">
            <text:p>FR-120</text:p>
          </table:table-cell>
          <table:table-cell table:style-name="ce32" office:value-type="float" office:value="18" calcext:value-type="float">
            <text:p>FR-18</text:p>
          </table:table-cell>
          <table:table-cell table:number-columns-repeated="2" table:style-name="ce155" office:value-type="string" calcext:value-type="string">
            <text:p>Hard only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<text:s text:c="4"/>.usage-summary</text:p>
          </table:table-cell>
          <table:table-cell table:style-name="ce77" office:value-type="string" calcext:value-type="string">
            <text:p>Before entity deletion, user shall be able to see a summary of usage.</text:p>
          </table:table-cell>
          <table:table-cell table:style-name="ce151"/>
          <table:table-cell table:style-name="ce32" office:value-type="float" office:value="180" calcext:value-type="float">
            <text:p>FR-180</text:p>
          </table:table-cell>
          <table:table-cell table:style-name="ce151"/>
          <table:table-cell table:style-name="ce32" office:value-type="float" office:value="5" calcext:value-type="float">
            <text:p>FR-05</text:p>
          </table:table-cell>
          <table:table-cell table:style-name="ce32" office:value-type="float" office:value="121" calcext:value-type="float">
            <text:p>FR-121</text:p>
          </table:table-cell>
          <table:table-cell table:style-name="ce32" office:value-type="float" office:value="186" calcext:value-type="float">
            <text:p>FR-186</text:p>
          </table:table-cell>
          <table:table-cell table:style-name="ce32" office:value-type="float" office:value="72" calcext:value-type="float">
            <text:p>FR-72</text:p>
          </table:table-cell>
          <table:table-cell table:style-name="ce32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<text:s text:c="4"/>.usage-inspect</text:p>
          </table:table-cell>
          <table:table-cell table:style-name="ce77" office:value-type="string" calcext:value-type="string">
            <text:p>Before entity deletion, user shall be able to see each instance of entity's values and associations.</text:p>
          </table:table-cell>
          <table:table-cell table:style-name="ce151"/>
          <table:table-cell table:style-name="ce32" office:value-type="float" office:value="181" calcext:value-type="float">
            <text:p>FR-181</text:p>
          </table:table-cell>
          <table:table-cell table:style-name="ce151"/>
          <table:table-cell table:style-name="ce32" office:value-type="float" office:value="6" calcext:value-type="float">
            <text:p>FR-06</text:p>
          </table:table-cell>
          <table:table-cell table:style-name="ce152" office:value-type="string" calcext:value-type="string">
            <text:p>No.</text:p>
          </table:table-cell>
          <table:table-cell table:style-name="ce32" office:value-type="float" office:value="187" calcext:value-type="float">
            <text:p>FR-187</text:p>
          </table:table-cell>
          <table:table-cell table:style-name="ce32" office:value-type="float" office:value="73" calcext:value-type="float">
            <text:p>FR-73</text:p>
          </table:table-cell>
          <table:table-cell table:style-name="ce32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12">
          <table:table-cell table:style-name="ce47" office:value-type="string" calcext:value-type="string">
            <text:p><text:s text:c="4"/>.hard</text:p>
          </table:table-cell>
          <table:table-cell table:style-name="ce77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52" office:value-type="string" calcext:value-type="string">
            <text:p>No.</text:p>
          </table:table-cell>
          <table:table-cell table:style-name="ce32" office:value-type="float" office:value="147" calcext:value-type="float">
            <text:p>FR-147</text:p>
          </table:table-cell>
          <table:table-cell table:style-name="ce32" office:value-type="float" office:value="264" calcext:value-type="float">
            <text:p>FR-264</text:p>
          </table:table-cell>
          <table:table-cell table:style-name="ce32" office:value-type="float" office:value="123" calcext:value-type="float">
            <text:p>FR-123</text:p>
          </table:table-cell>
          <table:table-cell table:style-name="ce32" office:value-type="float" office:value="188" calcext:value-type="float">
            <text:p>FR-188</text:p>
          </table:table-cell>
          <table:table-cell table:style-name="ce32" office:value-type="float" office:value="71" calcext:value-type="float">
            <text:p>FR-71</text:p>
          </table:table-cell>
          <table:table-cell table:style-name="ce32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<text:s text:c="4"/>.bin</text:p>
          </table:table-cell>
          <table:table-cell table:style-name="ce75" office:value-type="string" calcext:value-type="string">
            <text:p>Upon entity deletion, System shall move it to the bin.</text:p>
          </table:table-cell>
          <table:table-cell table:style-name="ce151"/>
          <table:table-cell table:style-name="ce32" office:value-type="float" office:value="182" calcext:value-type="float">
            <text:p>FR-182</text:p>
          </table:table-cell>
          <table:table-cell table:style-name="ce156" office:value-type="string" calcext:value-type="string">
            <text:p>No.</text:p>
          </table:table-cell>
          <table:table-cell table:style-name="ce32" office:value-type="float" office:value="47" calcext:value-type="float">
            <text:p>FR-47</text:p>
          </table:table-cell>
          <table:table-cell table:style-name="ce32" office:value-type="float" office:value="124" calcext:value-type="float">
            <text:p>FR-124</text:p>
          </table:table-cell>
          <table:table-cell table:style-name="ce32" office:value-type="float" office:value="189" calcext:value-type="float">
            <text:p>FR-189</text:p>
          </table:table-cell>
          <table:table-cell table:number-columns-repeated="2" table:style-name="ce156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9" office:value-type="string" calcext:value-type="string">
            <text:p><text:s text:c="2"/>.restore</text:p>
          </table:table-cell>
          <table:table-cell table:style-name="ce77" office:value-type="string" calcext:value-type="string">
            <text:p>User shall be able to restore soft-deleted entities.</text:p>
          </table:table-cell>
          <table:table-cell table:style-name="ce151"/>
          <table:table-cell table:style-name="ce32" office:value-type="float" office:value="183" calcext:value-type="float">
            <text:p>FR-183</text:p>
          </table:table-cell>
          <table:table-cell table:style-name="ce156" office:value-type="string" calcext:value-type="string">
            <text:p>No.</text:p>
          </table:table-cell>
          <table:table-cell table:style-name="ce32" office:value-type="float" office:value="40" calcext:value-type="float">
            <text:p>FR-40</text:p>
          </table:table-cell>
          <table:table-cell table:style-name="ce32" office:value-type="float" office:value="125" calcext:value-type="float">
            <text:p>FR-125</text:p>
          </table:table-cell>
          <table:table-cell table:style-name="ce32" office:value-type="float" office:value="31" calcext:value-type="float">
            <text:p>FR-31</text:p>
          </table:table-cell>
          <table:table-cell table:number-columns-repeated="2" table:style-name="ce156" office:value-type="string" calcext:value-type="string">
            <text:p>No.</text:p>
          </table:table-cell>
          <table:table-cell table:number-columns-repeated="1012"/>
        </table:table-row>
        <table:table-row table:style-name="ro3">
          <table:table-cell table:style-name="ce49" office:value-type="string" calcext:value-type="string">
            <text:p><text:s text:c="4"/>.data</text:p>
          </table:table-cell>
          <table:table-cell table:style-name="ce77" office:value-type="string" calcext:value-type="string">
            <text:p>Upon entity restoration, previous values and associations shall be restored also.</text:p>
          </table:table-cell>
          <table:table-cell table:style-name="ce151"/>
          <table:table-cell table:style-name="ce32" office:value-type="float" office:value="184" calcext:value-type="float">
            <text:p>FR-184</text:p>
          </table:table-cell>
          <table:table-cell table:style-name="ce156" office:value-type="string" calcext:value-type="string">
            <text:p>No.</text:p>
          </table:table-cell>
          <table:table-cell table:style-name="ce32" office:value-type="float" office:value="41" calcext:value-type="float">
            <text:p>FR-41</text:p>
          </table:table-cell>
          <table:table-cell table:style-name="ce159" office:value-type="string" calcext:value-type="string">
            <text:p>N/A</text:p>
          </table:table-cell>
          <table:table-cell table:style-name="ce32" office:value-type="float" office:value="32" calcext:value-type="float">
            <text:p>FR-32</text:p>
          </table:table-cell>
          <table:table-cell table:number-columns-repeated="2" table:style-name="ce156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49" office:value-type="float" office:value="6" calcext:value-type="float">
            <text:p>MF-06</text:p>
          </table:table-cell>
          <table:table-cell table:style-name="ce149" office:value-type="float" office:value="7" calcext:value-type="float">
            <text:p>MF-07</text:p>
          </table:table-cell>
          <table:table-cell table:style-name="ce149" office:value-type="float" office:value="12" calcext:value-type="float">
            <text:p>MF-12</text:p>
          </table:table-cell>
          <table:table-cell table:number-columns-repeated="1017"/>
        </table:table-row>
        <table:table-row table:style-name="ro3">
          <table:table-cell table:style-name="ce145" office:value-type="string" calcext:value-type="string">
            <text:p>Filters</text:p>
          </table:table-cell>
          <table:table-cell/>
          <table:table-cell table:style-name="ce153" office:value-type="string" calcext:value-type="string">
            <text:p>Incompletion</text:p>
            <text:p>Results</text:p>
          </table:table-cell>
          <table:table-cell table:style-name="ce153" office:value-type="string" calcext:value-type="string">
            <text:p>Groupings</text:p>
          </table:table-cell>
          <table:table-cell table:style-name="ce153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5" table:default-cell-style-name="Default"/>
        <table:table-column table:style-name="co39" table:default-cell-style-name="ce224"/>
        <table:table-column table:style-name="co15" table:number-columns-repeated="4" table:default-cell-style-name="Default"/>
        <table:table-row table:style-name="ro1">
          <table:table-cell table:style-name="ce222" office:value-type="string" calcext:value-type="string">
            <text:p>ID</text:p>
          </table:table-cell>
          <table:table-cell table:style-name="ce222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3" table:formula="of:=1-COUNTIF([FRs.$C$2:.$C$993]; &quot;=&quot;&amp;[.A2])" office:value-type="float" office:value="0" calcext:value-type="float">
            <text:p>0</text:p>
          </table:table-cell>
          <table:table-cell/>
          <table:table-cell table:style-name="ce225" office:value-type="string" calcext:value-type="string">
            <text:p>FRs</text:p>
          </table:table-cell>
          <table:table-cell table:style-name="ce225" office:value-type="string" calcext:value-type="string">
            <text:p>Flat</text:p>
          </table:table-cell>
          <table:table-cell table:style-name="ce225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223" table:formula="of:=1-COUNTIF([FRs.$C$2:.$C$993]; &quot;=&quot;&amp;[.A3])" office:value-type="float" office:value="0" calcext:value-type="float">
            <text:p>0</text:p>
          </table:table-cell>
          <table:table-cell/>
          <table:table-cell table:style-name="ce92" table:formula="of:=COUNTIF([FRs.$C$2:.$C$1013];&quot;&gt;0&quot;)" office:value-type="float" office:value="327" calcext:value-type="float">
            <text:p>327</text:p>
          </table:table-cell>
          <table:table-cell table:style-name="ce92" table:formula="of:=COUNTIF([flat.$D$2:.$D$1004];&quot;&gt;0&quot;)" office:value-type="float" office:value="44" calcext:value-type="float">
            <text:p>44</text:p>
          </table:table-cell>
          <table:table-cell table:style-name="ce92" table:formula="of:=[.E3]+[.D3]" office:value-type="float" office:value="371" calcext:value-type="float">
            <text:p>37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223" table:formula="of:=1-COUNTIF([FRs.$C$2:.$C$993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223" table:formula="of:=1-COUNTIF([FRs.$C$2:.$C$993]; &quot;=&quot;&amp;[.A5])" office:value-type="float" office:value="0" calcext:value-type="float">
            <text:p>0</text:p>
          </table:table-cell>
          <table:table-cell/>
          <table:table-cell table:style-name="ce225" office:value-type="string" calcext:value-type="string">
            <text:p>Dups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223" table:formula="of:=1-COUNTIF([FRs.$C$2:.$C$993]; &quot;=&quot;&amp;[.A6])" office:value-type="float" office:value="0" calcext:value-type="float">
            <text:p>0</text:p>
          </table:table-cell>
          <table:table-cell/>
          <table:table-cell table:style-name="ce92" table:formula="of:=COUNTIF([.$B$1:.$B$999];&quot;&lt;0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223" table:formula="of:=1-COUNTIF([FRs.$C$2:.$C$993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223" table:formula="of:=1-COUNTIF([FRs.$C$2:.$C$993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223" table:formula="of:=1-COUNTIF([FRs.$C$2:.$C$993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223" table:formula="of:=1-COUNTIF([FRs.$C$2:.$C$993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223" table:formula="of:=1-COUNTIF([FRs.$C$2:.$C$993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223" table:formula="of:=1-COUNTIF([FRs.$C$2:.$C$993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223" table:formula="of:=1-COUNTIF([FRs.$C$2:.$C$993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223" table:formula="of:=1-COUNTIF([FRs.$C$2:.$C$993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223" table:formula="of:=1-COUNTIF([FRs.$C$2:.$C$993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223" table:formula="of:=1-COUNTIF([FRs.$C$2:.$C$993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223" table:formula="of:=1-COUNTIF([FRs.$C$2:.$C$993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223" table:formula="of:=1-COUNTIF([FRs.$C$2:.$C$993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223" table:formula="of:=1-COUNTIF([FRs.$C$2:.$C$993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223" table:formula="of:=1-COUNTIF([FRs.$C$2:.$C$993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223" table:formula="of:=1-COUNTIF([FRs.$C$2:.$C$993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223" table:formula="of:=1-COUNTIF([FRs.$C$2:.$C$993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223" table:formula="of:=1-COUNTIF([FRs.$C$2:.$C$993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223" table:formula="of:=1-COUNTIF([FRs.$C$2:.$C$993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223" table:formula="of:=1-COUNTIF([FRs.$C$2:.$C$993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223" table:formula="of:=1-COUNTIF([FRs.$C$2:.$C$993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223" table:formula="of:=1-COUNTIF([FRs.$C$2:.$C$993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223" table:formula="of:=1-COUNTIF([FRs.$C$2:.$C$993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223" table:formula="of:=1-COUNTIF([FRs.$C$2:.$C$993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223" table:formula="of:=1-COUNTIF([FRs.$C$2:.$C$993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223" table:formula="of:=1-COUNTIF([FRs.$C$2:.$C$993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223" table:formula="of:=1-COUNTIF([FRs.$C$2:.$C$993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223" table:formula="of:=1-COUNTIF([FRs.$C$2:.$C$993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223" table:formula="of:=1-COUNTIF([FRs.$C$2:.$C$993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223" table:formula="of:=1-COUNTIF([FRs.$C$2:.$C$993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223" table:formula="of:=1-COUNTIF([FRs.$C$2:.$C$993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223" table:formula="of:=1-COUNTIF([FRs.$C$2:.$C$993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223" table:formula="of:=1-COUNTIF([FRs.$C$2:.$C$993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223" table:formula="of:=1-COUNTIF([FRs.$C$2:.$C$993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223" table:formula="of:=1-COUNTIF([FRs.$C$2:.$C$993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223" table:formula="of:=1-COUNTIF([FRs.$C$2:.$C$993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223" table:formula="of:=1-COUNTIF([FRs.$C$2:.$C$993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223" table:formula="of:=1-COUNTIF([FRs.$C$2:.$C$993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223" table:formula="of:=1-COUNTIF([FRs.$C$2:.$C$993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223" table:formula="of:=1-COUNTIF([FRs.$C$2:.$C$993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223" table:formula="of:=1-COUNTIF([FRs.$C$2:.$C$993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223" table:formula="of:=1-COUNTIF([FRs.$C$2:.$C$993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223" table:formula="of:=1-COUNTIF([FRs.$C$2:.$C$993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223" table:formula="of:=1-COUNTIF([FRs.$C$2:.$C$993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223" table:formula="of:=1-COUNTIF([FRs.$C$2:.$C$993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223" table:formula="of:=1-COUNTIF([FRs.$C$2:.$C$993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223" table:formula="of:=1-COUNTIF([FRs.$C$2:.$C$993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223" table:formula="of:=1-COUNTIF([FRs.$C$2:.$C$993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223" table:formula="of:=1-COUNTIF([FRs.$C$2:.$C$993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223" table:formula="of:=1-COUNTIF([FRs.$C$2:.$C$993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223" table:formula="of:=1-COUNTIF([FRs.$C$2:.$C$993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223" table:formula="of:=1-COUNTIF([FRs.$C$2:.$C$993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223" table:formula="of:=1-COUNTIF([FRs.$C$2:.$C$993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223" table:formula="of:=1-COUNTIF([FRs.$C$2:.$C$993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223" table:formula="of:=1-COUNTIF([FRs.$C$2:.$C$993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223" table:formula="of:=1-COUNTIF([FRs.$C$2:.$C$993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223" table:formula="of:=1-COUNTIF([FRs.$C$2:.$C$993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223" table:formula="of:=1-COUNTIF([FRs.$C$2:.$C$993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223" table:formula="of:=1-COUNTIF([FRs.$C$2:.$C$993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223" table:formula="of:=1-COUNTIF([FRs.$C$2:.$C$993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223" table:formula="of:=1-COUNTIF([FRs.$C$2:.$C$993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223" table:formula="of:=1-COUNTIF([FRs.$C$2:.$C$993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223" table:formula="of:=1-COUNTIF([FRs.$C$2:.$C$993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223" table:formula="of:=1-COUNTIF([FRs.$C$2:.$C$993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223" table:formula="of:=1-COUNTIF([FRs.$C$2:.$C$993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223" table:formula="of:=1-COUNTIF([FRs.$C$2:.$C$993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223" table:formula="of:=1-COUNTIF([FRs.$C$2:.$C$993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223" table:formula="of:=1-COUNTIF([FRs.$C$2:.$C$993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223" table:formula="of:=1-COUNTIF([FRs.$C$2:.$C$993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223" table:formula="of:=1-COUNTIF([FRs.$C$2:.$C$993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223" table:formula="of:=1-COUNTIF([FRs.$C$2:.$C$993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223" table:formula="of:=1-COUNTIF([FRs.$C$2:.$C$993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223" table:formula="of:=1-COUNTIF([FRs.$C$2:.$C$993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223" table:formula="of:=1-COUNTIF([FRs.$C$2:.$C$993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223" table:formula="of:=1-COUNTIF([FRs.$C$2:.$C$993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223" table:formula="of:=1-COUNTIF([FRs.$C$2:.$C$993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223" table:formula="of:=1-COUNTIF([FRs.$C$2:.$C$993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223" table:formula="of:=1-COUNTIF([FRs.$C$2:.$C$993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223" table:formula="of:=1-COUNTIF([FRs.$C$2:.$C$993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223" table:formula="of:=1-COUNTIF([FRs.$C$2:.$C$993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223" table:formula="of:=1-COUNTIF([FRs.$C$2:.$C$993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223" table:formula="of:=1-COUNTIF([FRs.$C$2:.$C$993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223" table:formula="of:=1-COUNTIF([FRs.$C$2:.$C$993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223" table:formula="of:=1-COUNTIF([FRs.$C$2:.$C$993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223" table:formula="of:=1-COUNTIF([FRs.$C$2:.$C$993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223" table:formula="of:=1-COUNTIF([FRs.$C$2:.$C$993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223" table:formula="of:=1-COUNTIF([FRs.$C$2:.$C$993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223" table:formula="of:=1-COUNTIF([FRs.$C$2:.$C$993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223" table:formula="of:=1-COUNTIF([FRs.$C$2:.$C$993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223" table:formula="of:=1-COUNTIF([FRs.$C$2:.$C$993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223" table:formula="of:=1-COUNTIF([FRs.$C$2:.$C$993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223" table:formula="of:=1-COUNTIF([FRs.$C$2:.$C$993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223" table:formula="of:=1-COUNTIF([FRs.$C$2:.$C$993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223" table:formula="of:=1-COUNTIF([FRs.$C$2:.$C$993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223" table:formula="of:=1-COUNTIF([FRs.$C$2:.$C$993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223" table:formula="of:=1-COUNTIF([FRs.$C$2:.$C$993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223" table:formula="of:=1-COUNTIF([FRs.$C$2:.$C$993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223" table:formula="of:=1-COUNTIF([FRs.$C$2:.$C$993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223" table:formula="of:=1-COUNTIF([FRs.$C$2:.$C$993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223" table:formula="of:=1-COUNTIF([FRs.$C$2:.$C$993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223" table:formula="of:=1-COUNTIF([FRs.$C$2:.$C$993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223" table:formula="of:=1-COUNTIF([FRs.$C$2:.$C$993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223" table:formula="of:=1-COUNTIF([FRs.$C$2:.$C$993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223" table:formula="of:=1-COUNTIF([FRs.$C$2:.$C$993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223" table:formula="of:=1-COUNTIF([FRs.$C$2:.$C$993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223" table:formula="of:=1-COUNTIF([FRs.$C$2:.$C$993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223" table:formula="of:=1-COUNTIF([FRs.$C$2:.$C$993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223" table:formula="of:=1-COUNTIF([FRs.$C$2:.$C$993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223" table:formula="of:=1-COUNTIF([FRs.$C$2:.$C$993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223" table:formula="of:=1-COUNTIF([FRs.$C$2:.$C$993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223" table:formula="of:=1-COUNTIF([FRs.$C$2:.$C$993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223" table:formula="of:=1-COUNTIF([FRs.$C$2:.$C$993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223" table:formula="of:=1-COUNTIF([FRs.$C$2:.$C$993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223" table:formula="of:=1-COUNTIF([FRs.$C$2:.$C$993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223" table:formula="of:=1-COUNTIF([FRs.$C$2:.$C$993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223" table:formula="of:=1-COUNTIF([FRs.$C$2:.$C$993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223" table:formula="of:=1-COUNTIF([FRs.$C$2:.$C$993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223" table:formula="of:=1-COUNTIF([FRs.$C$2:.$C$993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223" table:formula="of:=1-COUNTIF([FRs.$C$2:.$C$993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223" table:formula="of:=1-COUNTIF([FRs.$C$2:.$C$993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223" table:formula="of:=1-COUNTIF([FRs.$C$2:.$C$993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223" table:formula="of:=1-COUNTIF([FRs.$C$2:.$C$993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223" table:formula="of:=1-COUNTIF([FRs.$C$2:.$C$993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223" table:formula="of:=1-COUNTIF([FRs.$C$2:.$C$993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223" table:formula="of:=1-COUNTIF([FRs.$C$2:.$C$993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223" table:formula="of:=1-COUNTIF([FRs.$C$2:.$C$993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223" table:formula="of:=1-COUNTIF([FRs.$C$2:.$C$993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223" table:formula="of:=1-COUNTIF([FRs.$C$2:.$C$993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223" table:formula="of:=1-COUNTIF([FRs.$C$2:.$C$993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223" table:formula="of:=1-COUNTIF([FRs.$C$2:.$C$993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223" table:formula="of:=1-COUNTIF([FRs.$C$2:.$C$993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223" table:formula="of:=1-COUNTIF([FRs.$C$2:.$C$993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223" table:formula="of:=1-COUNTIF([FRs.$C$2:.$C$993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223" table:formula="of:=1-COUNTIF([FRs.$C$2:.$C$993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223" table:formula="of:=1-COUNTIF([FRs.$C$2:.$C$993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223" table:formula="of:=1-COUNTIF([FRs.$C$2:.$C$993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223" table:formula="of:=1-COUNTIF([FRs.$C$2:.$C$993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223" table:formula="of:=1-COUNTIF([FRs.$C$2:.$C$993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223" table:formula="of:=1-COUNTIF([FRs.$C$2:.$C$993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223" table:formula="of:=1-COUNTIF([FRs.$C$2:.$C$993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223" table:formula="of:=1-COUNTIF([FRs.$C$2:.$C$993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223" table:formula="of:=1-COUNTIF([FRs.$C$2:.$C$993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223" table:formula="of:=1-COUNTIF([FRs.$C$2:.$C$993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223" table:formula="of:=1-COUNTIF([FRs.$C$2:.$C$993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223" table:formula="of:=1-COUNTIF([FRs.$C$2:.$C$993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223" table:formula="of:=1-COUNTIF([FRs.$C$2:.$C$993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223" table:formula="of:=1-COUNTIF([FRs.$C$2:.$C$993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223" table:formula="of:=1-COUNTIF([FRs.$C$2:.$C$993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223" table:formula="of:=1-COUNTIF([FRs.$C$2:.$C$993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223" table:formula="of:=1-COUNTIF([FRs.$C$2:.$C$993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223" table:formula="of:=1-COUNTIF([FRs.$C$2:.$C$993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223" table:formula="of:=1-COUNTIF([FRs.$C$2:.$C$993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223" table:formula="of:=1-COUNTIF([FRs.$C$2:.$C$993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223" table:formula="of:=1-COUNTIF([FRs.$C$2:.$C$993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223" table:formula="of:=1-COUNTIF([FRs.$C$2:.$C$993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223" table:formula="of:=1-COUNTIF([FRs.$C$2:.$C$993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223" table:formula="of:=1-COUNTIF([FRs.$C$2:.$C$993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223" table:formula="of:=1-COUNTIF([FRs.$C$2:.$C$993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223" table:formula="of:=1-COUNTIF([FRs.$C$2:.$C$993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223" table:formula="of:=1-COUNTIF([FRs.$C$2:.$C$993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223" table:formula="of:=1-COUNTIF([FRs.$C$2:.$C$993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223" table:formula="of:=1-COUNTIF([FRs.$C$2:.$C$993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223" table:formula="of:=1-COUNTIF([FRs.$C$2:.$C$993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223" table:formula="of:=1-COUNTIF([FRs.$C$2:.$C$993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223" table:formula="of:=1-COUNTIF([FRs.$C$2:.$C$993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223" table:formula="of:=1-COUNTIF([FRs.$C$2:.$C$993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223" table:formula="of:=1-COUNTIF([FRs.$C$2:.$C$993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223" table:formula="of:=1-COUNTIF([FRs.$C$2:.$C$993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223" table:formula="of:=1-COUNTIF([FRs.$C$2:.$C$993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223" table:formula="of:=1-COUNTIF([FRs.$C$2:.$C$993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223" table:formula="of:=1-COUNTIF([FRs.$C$2:.$C$993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223" table:formula="of:=1-COUNTIF([FRs.$C$2:.$C$993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223" table:formula="of:=1-COUNTIF([FRs.$C$2:.$C$993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223" table:formula="of:=1-COUNTIF([FRs.$C$2:.$C$993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223" table:formula="of:=1-COUNTIF([FRs.$C$2:.$C$993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223" table:formula="of:=1-COUNTIF([FRs.$C$2:.$C$993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223" table:formula="of:=1-COUNTIF([FRs.$C$2:.$C$993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223" table:formula="of:=1-COUNTIF([FRs.$C$2:.$C$993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223" table:formula="of:=1-COUNTIF([FRs.$C$2:.$C$993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223" table:formula="of:=1-COUNTIF([FRs.$C$2:.$C$993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223" table:formula="of:=1-COUNTIF([FRs.$C$2:.$C$993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223" table:formula="of:=1-COUNTIF([FRs.$C$2:.$C$993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223" table:formula="of:=1-COUNTIF([FRs.$C$2:.$C$993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223" table:formula="of:=1-COUNTIF([FRs.$C$2:.$C$993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223" table:formula="of:=1-COUNTIF([FRs.$C$2:.$C$993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223" table:formula="of:=1-COUNTIF([FRs.$C$2:.$C$993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223" table:formula="of:=1-COUNTIF([FRs.$C$2:.$C$993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223" table:formula="of:=1-COUNTIF([FRs.$C$2:.$C$993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223" table:formula="of:=1-COUNTIF([FRs.$C$2:.$C$993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223" table:formula="of:=1-COUNTIF([FRs.$C$2:.$C$993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223" table:formula="of:=1-COUNTIF([FRs.$C$2:.$C$993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223" table:formula="of:=1-COUNTIF([FRs.$C$2:.$C$993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223" table:formula="of:=1-COUNTIF([FRs.$C$2:.$C$993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223" table:formula="of:=1-COUNTIF([FRs.$C$2:.$C$993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223" table:formula="of:=1-COUNTIF([FRs.$C$2:.$C$993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223" table:formula="of:=1-COUNTIF([FRs.$C$2:.$C$993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223" table:formula="of:=1-COUNTIF([FRs.$C$2:.$C$993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223" table:formula="of:=1-COUNTIF([FRs.$C$2:.$C$993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223" table:formula="of:=1-COUNTIF([FRs.$C$2:.$C$993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223" table:formula="of:=1-COUNTIF([FRs.$C$2:.$C$993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223" table:formula="of:=1-COUNTIF([FRs.$C$2:.$C$993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223" table:formula="of:=1-COUNTIF([FRs.$C$2:.$C$993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223" table:formula="of:=1-COUNTIF([FRs.$C$2:.$C$993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223" table:formula="of:=1-COUNTIF([FRs.$C$2:.$C$993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223" table:formula="of:=1-COUNTIF([FRs.$C$2:.$C$993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223" table:formula="of:=1-COUNTIF([FRs.$C$2:.$C$993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223" table:formula="of:=1-COUNTIF([FRs.$C$2:.$C$993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223" table:formula="of:=1-COUNTIF([FRs.$C$2:.$C$993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223" table:formula="of:=1-COUNTIF([FRs.$C$2:.$C$993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223" table:formula="of:=1-COUNTIF([FRs.$C$2:.$C$993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223" table:formula="of:=1-COUNTIF([FRs.$C$2:.$C$993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223" table:formula="of:=1-COUNTIF([FRs.$C$2:.$C$993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223" table:formula="of:=1-COUNTIF([FRs.$C$2:.$C$993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223" table:formula="of:=1-COUNTIF([FRs.$C$2:.$C$993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223" table:formula="of:=1-COUNTIF([FRs.$C$2:.$C$993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223" table:formula="of:=1-COUNTIF([FRs.$C$2:.$C$993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223" table:formula="of:=1-COUNTIF([FRs.$C$2:.$C$993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223" table:formula="of:=1-COUNTIF([FRs.$C$2:.$C$993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223" table:formula="of:=1-COUNTIF([FRs.$C$2:.$C$993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223" table:formula="of:=1-COUNTIF([FRs.$C$2:.$C$993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223" table:formula="of:=1-COUNTIF([FRs.$C$2:.$C$993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223" table:formula="of:=1-COUNTIF([FRs.$C$2:.$C$993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223" table:formula="of:=1-COUNTIF([FRs.$C$2:.$C$993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223" table:formula="of:=1-COUNTIF([FRs.$C$2:.$C$993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223" table:formula="of:=1-COUNTIF([FRs.$C$2:.$C$993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223" table:formula="of:=1-COUNTIF([FRs.$C$2:.$C$993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223" table:formula="of:=1-COUNTIF([FRs.$C$2:.$C$993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223" table:formula="of:=1-COUNTIF([FRs.$C$2:.$C$993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223" table:formula="of:=1-COUNTIF([FRs.$C$2:.$C$993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223" table:formula="of:=1-COUNTIF([FRs.$C$2:.$C$993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223" table:formula="of:=1-COUNTIF([FRs.$C$2:.$C$993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223" table:formula="of:=1-COUNTIF([FRs.$C$2:.$C$993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223" table:formula="of:=1-COUNTIF([FRs.$C$2:.$C$993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223" table:formula="of:=1-COUNTIF([FRs.$C$2:.$C$993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223" table:formula="of:=1-COUNTIF([FRs.$C$2:.$C$993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223" table:formula="of:=1-COUNTIF([FRs.$C$2:.$C$993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223" table:formula="of:=1-COUNTIF([FRs.$C$2:.$C$993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223" table:formula="of:=1-COUNTIF([FRs.$C$2:.$C$993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223" table:formula="of:=1-COUNTIF([FRs.$C$2:.$C$993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223" table:formula="of:=1-COUNTIF([FRs.$C$2:.$C$993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223" table:formula="of:=1-COUNTIF([FRs.$C$2:.$C$993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223" table:formula="of:=1-COUNTIF([FRs.$C$2:.$C$993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223" table:formula="of:=1-COUNTIF([FRs.$C$2:.$C$993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223" table:formula="of:=1-COUNTIF([FRs.$C$2:.$C$993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223" table:formula="of:=1-COUNTIF([FRs.$C$2:.$C$993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223" table:formula="of:=1-COUNTIF([FRs.$C$2:.$C$993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223" table:formula="of:=1-COUNTIF([FRs.$C$2:.$C$993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223" table:formula="of:=1-COUNTIF([FRs.$C$2:.$C$993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223" table:formula="of:=1-COUNTIF([FRs.$C$2:.$C$993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223" table:formula="of:=1-COUNTIF([FRs.$C$2:.$C$993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223" table:formula="of:=1-COUNTIF([FRs.$C$2:.$C$993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223" table:formula="of:=1-COUNTIF([FRs.$C$2:.$C$993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223" table:formula="of:=1-COUNTIF([FRs.$C$2:.$C$993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223" table:formula="of:=1-COUNTIF([FRs.$C$2:.$C$993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223" table:formula="of:=1-COUNTIF([FRs.$C$2:.$C$993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223" table:formula="of:=1-COUNTIF([FRs.$C$2:.$C$993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223" table:formula="of:=1-COUNTIF([FRs.$C$2:.$C$993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223" table:formula="of:=1-COUNTIF([FRs.$C$2:.$C$993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223" table:formula="of:=1-COUNTIF([FRs.$C$2:.$C$993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223" table:formula="of:=1-COUNTIF([FRs.$C$2:.$C$993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223" table:formula="of:=1-COUNTIF([FRs.$C$2:.$C$993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223" table:formula="of:=1-COUNTIF([FRs.$C$2:.$C$993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223" table:formula="of:=1-COUNTIF([FRs.$C$2:.$C$993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223" table:formula="of:=1-COUNTIF([FRs.$C$2:.$C$993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223" table:formula="of:=1-COUNTIF([FRs.$C$2:.$C$993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223" table:formula="of:=1-COUNTIF([FRs.$C$2:.$C$993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223" table:formula="of:=1-COUNTIF([FRs.$C$2:.$C$993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223" table:formula="of:=1-COUNTIF([FRs.$C$2:.$C$993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223" table:formula="of:=1-COUNTIF([FRs.$C$2:.$C$993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223" table:formula="of:=1-COUNTIF([FRs.$C$2:.$C$993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223" table:formula="of:=1-COUNTIF([FRs.$C$2:.$C$993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223" table:formula="of:=1-COUNTIF([FRs.$C$2:.$C$993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223" table:formula="of:=1-COUNTIF([FRs.$C$2:.$C$993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223" table:formula="of:=1-COUNTIF([FRs.$C$2:.$C$993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223" table:formula="of:=1-COUNTIF([FRs.$C$2:.$C$993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223" table:formula="of:=1-COUNTIF([FRs.$C$2:.$C$993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223" table:formula="of:=1-COUNTIF([FRs.$C$2:.$C$993]; &quot;=&quot;&amp;[.A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223" table:formula="of:=1-COUNTIF([FRs.$C$2:.$C$993]; &quot;=&quot;&amp;[.A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223" table:formula="of:=1-COUNTIF([FRs.$C$2:.$C$993]; &quot;=&quot;&amp;[.A2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223" table:formula="of:=1-COUNTIF([FRs.$C$2:.$C$993]; &quot;=&quot;&amp;[.A2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223" table:formula="of:=1-COUNTIF([FRs.$C$2:.$C$993]; &quot;=&quot;&amp;[.A2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223" table:formula="of:=1-COUNTIF([FRs.$C$2:.$C$993]; &quot;=&quot;&amp;[.A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223" table:formula="of:=1-COUNTIF([FRs.$C$2:.$C$993]; &quot;=&quot;&amp;[.A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223" table:formula="of:=1-COUNTIF([FRs.$C$2:.$C$993]; &quot;=&quot;&amp;[.A2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223" table:formula="of:=1-COUNTIF([FRs.$C$2:.$C$993]; &quot;=&quot;&amp;[.A2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223" table:formula="of:=1-COUNTIF([FRs.$C$2:.$C$993]; &quot;=&quot;&amp;[.A2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223" table:formula="of:=1-COUNTIF([FRs.$C$2:.$C$993]; &quot;=&quot;&amp;[.A2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223" table:formula="of:=1-COUNTIF([FRs.$C$2:.$C$993]; &quot;=&quot;&amp;[.A2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223" table:formula="of:=1-COUNTIF([FRs.$C$2:.$C$993]; &quot;=&quot;&amp;[.A2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223" table:formula="of:=1-COUNTIF([FRs.$C$2:.$C$993]; &quot;=&quot;&amp;[.A2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223" table:formula="of:=1-COUNTIF([FRs.$C$2:.$C$993]; &quot;=&quot;&amp;[.A2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223" table:formula="of:=1-COUNTIF([FRs.$C$2:.$C$993]; &quot;=&quot;&amp;[.A2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223" table:formula="of:=1-COUNTIF([FRs.$C$2:.$C$993]; &quot;=&quot;&amp;[.A2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223" table:formula="of:=1-COUNTIF([FRs.$C$2:.$C$993]; &quot;=&quot;&amp;[.A2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223" table:formula="of:=1-COUNTIF([FRs.$C$2:.$C$993]; &quot;=&quot;&amp;[.A3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223" table:formula="of:=1-COUNTIF([FRs.$C$2:.$C$993]; &quot;=&quot;&amp;[.A3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table:style-name="ce223" table:formula="of:=1-COUNTIF([FRs.$C$2:.$C$993]; &quot;=&quot;&amp;[.A3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table:style-name="ce223" table:formula="of:=1-COUNTIF([FRs.$C$2:.$C$993]; &quot;=&quot;&amp;[.A3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table:style-name="ce223" table:formula="of:=1-COUNTIF([FRs.$C$2:.$C$993]; &quot;=&quot;&amp;[.A3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table:style-name="ce223" table:formula="of:=1-COUNTIF([FRs.$C$2:.$C$993]; &quot;=&quot;&amp;[.A3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table:style-name="ce223" table:formula="of:=1-COUNTIF([FRs.$C$2:.$C$993]; &quot;=&quot;&amp;[.A3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table:style-name="ce223" table:formula="of:=1-COUNTIF([FRs.$C$2:.$C$993]; &quot;=&quot;&amp;[.A3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table:style-name="ce223" table:formula="of:=1-COUNTIF([FRs.$C$2:.$C$993]; &quot;=&quot;&amp;[.A3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table:style-name="ce223" table:formula="of:=1-COUNTIF([FRs.$C$2:.$C$993]; &quot;=&quot;&amp;[.A3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table:style-name="ce223" table:formula="of:=1-COUNTIF([FRs.$C$2:.$C$993]; &quot;=&quot;&amp;[.A3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table:style-name="ce223" table:formula="of:=1-COUNTIF([FRs.$C$2:.$C$993]; &quot;=&quot;&amp;[.A3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table:style-name="ce223" table:formula="of:=1-COUNTIF([FRs.$C$2:.$C$993]; &quot;=&quot;&amp;[.A3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table:style-name="ce223" table:formula="of:=1-COUNTIF([FRs.$C$2:.$C$993]; &quot;=&quot;&amp;[.A3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table:style-name="ce223" table:formula="of:=1-COUNTIF([FRs.$C$2:.$C$993]; &quot;=&quot;&amp;[.A3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table:style-name="ce223" table:formula="of:=1-COUNTIF([FRs.$C$2:.$C$993]; &quot;=&quot;&amp;[.A3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table:style-name="ce223" table:formula="of:=1-COUNTIF([FRs.$C$2:.$C$993]; &quot;=&quot;&amp;[.A3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table:style-name="ce223" table:formula="of:=1-COUNTIF([FRs.$C$2:.$C$993]; &quot;=&quot;&amp;[.A3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table:style-name="ce223" table:formula="of:=1-COUNTIF([FRs.$C$2:.$C$993]; &quot;=&quot;&amp;[.A3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table:style-name="ce223" table:formula="of:=1-COUNTIF([FRs.$C$2:.$C$993]; &quot;=&quot;&amp;[.A3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table:style-name="ce223" table:formula="of:=1-COUNTIF([FRs.$C$2:.$C$993]; &quot;=&quot;&amp;[.A3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table:style-name="ce223" table:formula="of:=1-COUNTIF([FRs.$C$2:.$C$993]; &quot;=&quot;&amp;[.A3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table:style-name="ce223" table:formula="of:=1-COUNTIF([FRs.$C$2:.$C$993]; &quot;=&quot;&amp;[.A3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table:style-name="ce223" table:formula="of:=1-COUNTIF([FRs.$C$2:.$C$993]; &quot;=&quot;&amp;[.A3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table:style-name="ce223" table:formula="of:=1-COUNTIF([FRs.$C$2:.$C$993]; &quot;=&quot;&amp;[.A3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table:style-name="ce223" table:formula="of:=1-COUNTIF([FRs.$C$2:.$C$993]; &quot;=&quot;&amp;[.A3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table:style-name="ce223" table:formula="of:=1-COUNTIF([FRs.$C$2:.$C$993]; &quot;=&quot;&amp;[.A3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table:style-name="ce223" table:formula="of:=1-COUNTIF([FRs.$C$2:.$C$993]; &quot;=&quot;&amp;[.A3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table:style-name="ce223" table:formula="of:=1-COUNTIF([FRs.$C$2:.$C$993]; &quot;=&quot;&amp;[.A3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table:style-name="ce223" table:formula="of:=1-COUNTIF([FRs.$C$2:.$C$993]; &quot;=&quot;&amp;[.A32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table:style-name="ce223" table:formula="of:=1-COUNTIF([FRs.$C$2:.$C$993]; &quot;=&quot;&amp;[.A33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table:style-name="ce223" table:formula="of:=1-COUNTIF([FRs.$C$2:.$C$993]; &quot;=&quot;&amp;[.A3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table:style-name="ce223" table:formula="of:=1-COUNTIF([FRs.$C$2:.$C$993]; &quot;=&quot;&amp;[.A33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table:style-name="ce223" table:formula="of:=1-COUNTIF([FRs.$C$2:.$C$993]; &quot;=&quot;&amp;[.A3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table:style-name="ce223" table:formula="of:=1-COUNTIF([FRs.$C$2:.$C$993]; &quot;=&quot;&amp;[.A33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table:style-name="ce223" table:formula="of:=1-COUNTIF([FRs.$C$2:.$C$993]; &quot;=&quot;&amp;[.A33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table:style-name="ce223" table:formula="of:=1-COUNTIF([FRs.$C$2:.$C$993]; &quot;=&quot;&amp;[.A3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table:style-name="ce223" table:formula="of:=1-COUNTIF([FRs.$C$2:.$C$993]; &quot;=&quot;&amp;[.A33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table:style-name="ce223" table:formula="of:=1-COUNTIF([FRs.$C$2:.$C$993]; &quot;=&quot;&amp;[.A3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table:style-name="ce223" table:formula="of:=1-COUNTIF([FRs.$C$2:.$C$993]; &quot;=&quot;&amp;[.A33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table:style-name="ce223" table:formula="of:=1-COUNTIF([FRs.$C$2:.$C$993]; &quot;=&quot;&amp;[.A34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table:style-name="ce223" table:formula="of:=1-COUNTIF([FRs.$C$2:.$C$993]; &quot;=&quot;&amp;[.A34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table:style-name="ce223" table:formula="of:=1-COUNTIF([FRs.$C$2:.$C$993]; &quot;=&quot;&amp;[.A34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table:style-name="ce223" table:formula="of:=1-COUNTIF([FRs.$C$2:.$C$993]; &quot;=&quot;&amp;[.A34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table:style-name="ce223" table:formula="of:=1-COUNTIF([FRs.$C$2:.$C$993]; &quot;=&quot;&amp;[.A34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table:style-name="ce223" table:formula="of:=1-COUNTIF([FRs.$C$2:.$C$993]; &quot;=&quot;&amp;[.A34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table:style-name="ce223" table:formula="of:=1-COUNTIF([FRs.$C$2:.$C$993]; &quot;=&quot;&amp;[.A34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table:style-name="ce223" table:formula="of:=1-COUNTIF([FRs.$C$2:.$C$993]; &quot;=&quot;&amp;[.A34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table:style-name="ce223" table:formula="of:=1-COUNTIF([FRs.$C$2:.$C$993]; &quot;=&quot;&amp;[.A34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table:style-name="ce223" table:formula="of:=1-COUNTIF([FRs.$C$2:.$C$993]; &quot;=&quot;&amp;[.A34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table:style-name="ce223" table:formula="of:=1-COUNTIF([FRs.$C$2:.$C$993]; &quot;=&quot;&amp;[.A35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table:style-name="ce223" table:formula="of:=1-COUNTIF([FRs.$C$2:.$C$993]; &quot;=&quot;&amp;[.A35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table:style-name="ce223" table:formula="of:=1-COUNTIF([FRs.$C$2:.$C$993]; &quot;=&quot;&amp;[.A35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table:style-name="ce223" table:formula="of:=1-COUNTIF([FRs.$C$2:.$C$993]; &quot;=&quot;&amp;[.A35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table:style-name="ce223" table:formula="of:=1-COUNTIF([FRs.$C$2:.$C$993]; &quot;=&quot;&amp;[.A35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table:style-name="ce223" table:formula="of:=1-COUNTIF([FRs.$C$2:.$C$993]; &quot;=&quot;&amp;[.A35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table:style-name="ce223" table:formula="of:=1-COUNTIF([FRs.$C$2:.$C$993]; &quot;=&quot;&amp;[.A35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table:style-name="ce223" table:formula="of:=1-COUNTIF([FRs.$C$2:.$C$993]; &quot;=&quot;&amp;[.A35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table:style-name="ce223" table:formula="of:=1-COUNTIF([FRs.$C$2:.$C$993]; &quot;=&quot;&amp;[.A35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table:style-name="ce223" table:formula="of:=1-COUNTIF([FRs.$C$2:.$C$993]; &quot;=&quot;&amp;[.A35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table:style-name="ce223" table:formula="of:=1-COUNTIF([FRs.$C$2:.$C$993]; &quot;=&quot;&amp;[.A36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table:style-name="ce223" table:formula="of:=1-COUNTIF([FRs.$C$2:.$C$993]; &quot;=&quot;&amp;[.A36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table:style-name="ce223" table:formula="of:=1-COUNTIF([FRs.$C$2:.$C$993]; &quot;=&quot;&amp;[.A36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table:style-name="ce223" table:formula="of:=1-COUNTIF([FRs.$C$2:.$C$993]; &quot;=&quot;&amp;[.A36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table:style-name="ce223" table:formula="of:=1-COUNTIF([FRs.$C$2:.$C$993]; &quot;=&quot;&amp;[.A36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table:style-name="ce223" table:formula="of:=1-COUNTIF([FRs.$C$2:.$C$993]; &quot;=&quot;&amp;[.A36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table:style-name="ce223" table:formula="of:=1-COUNTIF([FRs.$C$2:.$C$993]; &quot;=&quot;&amp;[.A36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table:style-name="ce223" table:formula="of:=1-COUNTIF([FRs.$C$2:.$C$993]; &quot;=&quot;&amp;[.A36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table:style-name="ce223" table:formula="of:=1-COUNTIF([FRs.$C$2:.$C$993]; &quot;=&quot;&amp;[.A3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table:style-name="ce223" table:formula="of:=1-COUNTIF([FRs.$C$2:.$C$993]; &quot;=&quot;&amp;[.A36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table:style-name="ce223" table:formula="of:=1-COUNTIF([FRs.$C$2:.$C$993]; &quot;=&quot;&amp;[.A3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table:style-name="ce223" table:formula="of:=1-COUNTIF([FRs.$C$2:.$C$993]; &quot;=&quot;&amp;[.A3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table:style-name="ce223" table:formula="of:=1-COUNTIF([FRs.$C$2:.$C$993]; &quot;=&quot;&amp;[.A3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table:style-name="ce223" table:formula="of:=1-COUNTIF([FRs.$C$2:.$C$993]; &quot;=&quot;&amp;[.A3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table:style-name="ce223" table:formula="of:=1-COUNTIF([FRs.$C$2:.$C$993]; &quot;=&quot;&amp;[.A3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table:style-name="ce223" table:formula="of:=1-COUNTIF([FRs.$C$2:.$C$993]; &quot;=&quot;&amp;[.A3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table:style-name="ce223" table:formula="of:=1-COUNTIF([FRs.$C$2:.$C$993]; &quot;=&quot;&amp;[.A3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table:style-name="ce223" table:formula="of:=1-COUNTIF([FRs.$C$2:.$C$993]; &quot;=&quot;&amp;[.A3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table:style-name="ce223" table:formula="of:=1-COUNTIF([FRs.$C$2:.$C$993]; &quot;=&quot;&amp;[.A3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table:style-name="ce223" table:formula="of:=1-COUNTIF([FRs.$C$2:.$C$993]; &quot;=&quot;&amp;[.A3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table:style-name="ce223" table:formula="of:=1-COUNTIF([FRs.$C$2:.$C$993]; &quot;=&quot;&amp;[.A3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table:style-name="ce223" table:formula="of:=1-COUNTIF([FRs.$C$2:.$C$993]; &quot;=&quot;&amp;[.A3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table:style-name="ce223" table:formula="of:=1-COUNTIF([FRs.$C$2:.$C$993]; &quot;=&quot;&amp;[.A3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table:style-name="ce223" table:formula="of:=1-COUNTIF([FRs.$C$2:.$C$993]; &quot;=&quot;&amp;[.A3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table:style-name="ce223" table:formula="of:=1-COUNTIF([FRs.$C$2:.$C$993]; &quot;=&quot;&amp;[.A3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table:style-name="ce223" table:formula="of:=1-COUNTIF([FRs.$C$2:.$C$993]; &quot;=&quot;&amp;[.A3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table:style-name="ce223" table:formula="of:=1-COUNTIF([FRs.$C$2:.$C$993]; &quot;=&quot;&amp;[.A3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table:style-name="ce223" table:formula="of:=1-COUNTIF([FRs.$C$2:.$C$993]; &quot;=&quot;&amp;[.A3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table:style-name="ce223" table:formula="of:=1-COUNTIF([FRs.$C$2:.$C$993]; &quot;=&quot;&amp;[.A3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table:style-name="ce223" table:formula="of:=1-COUNTIF([FRs.$C$2:.$C$993]; &quot;=&quot;&amp;[.A3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table:style-name="ce223" table:formula="of:=1-COUNTIF([FRs.$C$2:.$C$993]; &quot;=&quot;&amp;[.A3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table:style-name="ce223" table:formula="of:=1-COUNTIF([FRs.$C$2:.$C$993]; &quot;=&quot;&amp;[.A3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table:style-name="ce223" table:formula="of:=1-COUNTIF([FRs.$C$2:.$C$993]; &quot;=&quot;&amp;[.A3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table:style-name="ce223" table:formula="of:=1-COUNTIF([FRs.$C$2:.$C$993]; &quot;=&quot;&amp;[.A3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table:style-name="ce223" table:formula="of:=1-COUNTIF([FRs.$C$2:.$C$993]; &quot;=&quot;&amp;[.A3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table:style-name="ce223" table:formula="of:=1-COUNTIF([FRs.$C$2:.$C$993]; &quot;=&quot;&amp;[.A3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table:style-name="ce223" table:formula="of:=1-COUNTIF([FRs.$C$2:.$C$993]; &quot;=&quot;&amp;[.A3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table:style-name="ce223" table:formula="of:=1-COUNTIF([FRs.$C$2:.$C$993]; &quot;=&quot;&amp;[.A3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table:style-name="ce223" table:formula="of:=1-COUNTIF([FRs.$C$2:.$C$993]; &quot;=&quot;&amp;[.A3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table:style-name="ce223" table:formula="of:=1-COUNTIF([FRs.$C$2:.$C$993]; &quot;=&quot;&amp;[.A3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table:style-name="ce223" table:formula="of:=1-COUNTIF([FRs.$C$2:.$C$993]; &quot;=&quot;&amp;[.A4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table:style-name="ce223" table:formula="of:=1-COUNTIF([FRs.$C$2:.$C$993]; &quot;=&quot;&amp;[.A40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table:style-name="ce223" table:formula="of:=1-COUNTIF([FRs.$C$2:.$C$993]; &quot;=&quot;&amp;[.A40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table:style-name="ce223" table:formula="of:=1-COUNTIF([FRs.$C$2:.$C$993]; &quot;=&quot;&amp;[.A40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table:style-name="ce223" table:formula="of:=1-COUNTIF([FRs.$C$2:.$C$993]; &quot;=&quot;&amp;[.A40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table:style-name="ce223" table:formula="of:=1-COUNTIF([FRs.$C$2:.$C$993]; &quot;=&quot;&amp;[.A4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table:style-name="ce223" table:formula="of:=1-COUNTIF([FRs.$C$2:.$C$993]; &quot;=&quot;&amp;[.A40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table:style-name="ce223" table:formula="of:=1-COUNTIF([FRs.$C$2:.$C$993]; &quot;=&quot;&amp;[.A4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table:style-name="ce223" table:formula="of:=1-COUNTIF([FRs.$C$2:.$C$993]; &quot;=&quot;&amp;[.A40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table:style-name="ce223" table:formula="of:=1-COUNTIF([FRs.$C$2:.$C$993]; &quot;=&quot;&amp;[.A40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table:style-name="ce223" table:formula="of:=1-COUNTIF([FRs.$C$2:.$C$993]; &quot;=&quot;&amp;[.A41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table:style-name="ce223" table:formula="of:=1-COUNTIF([FRs.$C$2:.$C$993]; &quot;=&quot;&amp;[.A41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table:style-name="ce223" table:formula="of:=1-COUNTIF([FRs.$C$2:.$C$993]; &quot;=&quot;&amp;[.A41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table:style-name="ce223" table:formula="of:=1-COUNTIF([FRs.$C$2:.$C$993]; &quot;=&quot;&amp;[.A41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table:style-name="ce223" table:formula="of:=1-COUNTIF([FRs.$C$2:.$C$993]; &quot;=&quot;&amp;[.A41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table:style-name="ce223" table:formula="of:=1-COUNTIF([FRs.$C$2:.$C$993]; &quot;=&quot;&amp;[.A4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table:style-name="ce223" table:formula="of:=1-COUNTIF([FRs.$C$2:.$C$993]; &quot;=&quot;&amp;[.A41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table:style-name="ce223" table:formula="of:=1-COUNTIF([FRs.$C$2:.$C$993]; &quot;=&quot;&amp;[.A41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table:style-name="ce223" table:formula="of:=1-COUNTIF([FRs.$C$2:.$C$993]; &quot;=&quot;&amp;[.A41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table:style-name="ce223" table:formula="of:=1-COUNTIF([FRs.$C$2:.$C$993]; &quot;=&quot;&amp;[.A41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table:style-name="ce223" table:formula="of:=1-COUNTIF([FRs.$C$2:.$C$993]; &quot;=&quot;&amp;[.A42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table:style-name="ce223" table:formula="of:=1-COUNTIF([FRs.$C$2:.$C$993]; &quot;=&quot;&amp;[.A42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table:style-name="ce223" table:formula="of:=1-COUNTIF([FRs.$C$2:.$C$993]; &quot;=&quot;&amp;[.A42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table:style-name="ce223" table:formula="of:=1-COUNTIF([FRs.$C$2:.$C$993]; &quot;=&quot;&amp;[.A42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table:style-name="ce223" table:formula="of:=1-COUNTIF([FRs.$C$2:.$C$993]; &quot;=&quot;&amp;[.A42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table:style-name="ce223" table:formula="of:=1-COUNTIF([FRs.$C$2:.$C$993]; &quot;=&quot;&amp;[.A42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table:style-name="ce223" table:formula="of:=1-COUNTIF([FRs.$C$2:.$C$993]; &quot;=&quot;&amp;[.A42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table:style-name="ce223" table:formula="of:=1-COUNTIF([FRs.$C$2:.$C$993]; &quot;=&quot;&amp;[.A42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table:style-name="ce223" table:formula="of:=1-COUNTIF([FRs.$C$2:.$C$993]; &quot;=&quot;&amp;[.A42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table:style-name="ce223" table:formula="of:=1-COUNTIF([FRs.$C$2:.$C$993]; &quot;=&quot;&amp;[.A42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table:style-name="ce223" table:formula="of:=1-COUNTIF([FRs.$C$2:.$C$993]; &quot;=&quot;&amp;[.A43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table:style-name="ce223" table:formula="of:=1-COUNTIF([FRs.$C$2:.$C$993]; &quot;=&quot;&amp;[.A4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table:style-name="ce223" table:formula="of:=1-COUNTIF([FRs.$C$2:.$C$993]; &quot;=&quot;&amp;[.A43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table:style-name="ce223" table:formula="of:=1-COUNTIF([FRs.$C$2:.$C$993]; &quot;=&quot;&amp;[.A4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table:style-name="ce223" table:formula="of:=1-COUNTIF([FRs.$C$2:.$C$993]; &quot;=&quot;&amp;[.A43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table:style-name="ce223" table:formula="of:=1-COUNTIF([FRs.$C$2:.$C$993]; &quot;=&quot;&amp;[.A43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table:style-name="ce223" table:formula="of:=1-COUNTIF([FRs.$C$2:.$C$993]; &quot;=&quot;&amp;[.A4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table:style-name="ce223" table:formula="of:=1-COUNTIF([FRs.$C$2:.$C$993]; &quot;=&quot;&amp;[.A43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table:style-name="ce223" table:formula="of:=1-COUNTIF([FRs.$C$2:.$C$993]; &quot;=&quot;&amp;[.A4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table:style-name="ce223" table:formula="of:=1-COUNTIF([FRs.$C$2:.$C$993]; &quot;=&quot;&amp;[.A43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table:style-name="ce223" table:formula="of:=1-COUNTIF([FRs.$C$2:.$C$993]; &quot;=&quot;&amp;[.A44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table:style-name="ce223" table:formula="of:=1-COUNTIF([FRs.$C$2:.$C$993]; &quot;=&quot;&amp;[.A44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table:style-name="ce223" table:formula="of:=1-COUNTIF([FRs.$C$2:.$C$993]; &quot;=&quot;&amp;[.A44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table:style-name="ce223" table:formula="of:=1-COUNTIF([FRs.$C$2:.$C$993]; &quot;=&quot;&amp;[.A44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table:style-name="ce223" table:formula="of:=1-COUNTIF([FRs.$C$2:.$C$993]; &quot;=&quot;&amp;[.A44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table:style-name="ce223" table:formula="of:=1-COUNTIF([FRs.$C$2:.$C$993]; &quot;=&quot;&amp;[.A44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table:style-name="ce223" table:formula="of:=1-COUNTIF([FRs.$C$2:.$C$993]; &quot;=&quot;&amp;[.A44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table:style-name="ce223" table:formula="of:=1-COUNTIF([FRs.$C$2:.$C$993]; &quot;=&quot;&amp;[.A44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table:style-name="ce223" table:formula="of:=1-COUNTIF([FRs.$C$2:.$C$993]; &quot;=&quot;&amp;[.A44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table:style-name="ce223" table:formula="of:=1-COUNTIF([FRs.$C$2:.$C$993]; &quot;=&quot;&amp;[.A44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table:style-name="ce223" table:formula="of:=1-COUNTIF([FRs.$C$2:.$C$993]; &quot;=&quot;&amp;[.A45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table:style-name="ce223" table:formula="of:=1-COUNTIF([FRs.$C$2:.$C$993]; &quot;=&quot;&amp;[.A45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table:style-name="ce223" table:formula="of:=1-COUNTIF([FRs.$C$2:.$C$993]; &quot;=&quot;&amp;[.A45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table:style-name="ce223" table:formula="of:=1-COUNTIF([FRs.$C$2:.$C$993]; &quot;=&quot;&amp;[.A45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table:style-name="ce223" table:formula="of:=1-COUNTIF([FRs.$C$2:.$C$993]; &quot;=&quot;&amp;[.A45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table:style-name="ce223" table:formula="of:=1-COUNTIF([FRs.$C$2:.$C$993]; &quot;=&quot;&amp;[.A45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table:style-name="ce223" table:formula="of:=1-COUNTIF([FRs.$C$2:.$C$993]; &quot;=&quot;&amp;[.A45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table:style-name="ce223" table:formula="of:=1-COUNTIF([FRs.$C$2:.$C$993]; &quot;=&quot;&amp;[.A45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table:style-name="ce223" table:formula="of:=1-COUNTIF([FRs.$C$2:.$C$993]; &quot;=&quot;&amp;[.A45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table:style-name="ce223" table:formula="of:=1-COUNTIF([FRs.$C$2:.$C$993]; &quot;=&quot;&amp;[.A45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table:style-name="ce223" table:formula="of:=1-COUNTIF([FRs.$C$2:.$C$993]; &quot;=&quot;&amp;[.A46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table:style-name="ce223" table:formula="of:=1-COUNTIF([FRs.$C$2:.$C$993]; &quot;=&quot;&amp;[.A46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table:style-name="ce223" table:formula="of:=1-COUNTIF([FRs.$C$2:.$C$993]; &quot;=&quot;&amp;[.A46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table:style-name="ce223" table:formula="of:=1-COUNTIF([FRs.$C$2:.$C$993]; &quot;=&quot;&amp;[.A46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table:style-name="ce223" table:formula="of:=1-COUNTIF([FRs.$C$2:.$C$993]; &quot;=&quot;&amp;[.A46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table:style-name="ce223" table:formula="of:=1-COUNTIF([FRs.$C$2:.$C$993]; &quot;=&quot;&amp;[.A46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table:style-name="ce223" table:formula="of:=1-COUNTIF([FRs.$C$2:.$C$993]; &quot;=&quot;&amp;[.A46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table:style-name="ce223" table:formula="of:=1-COUNTIF([FRs.$C$2:.$C$993]; &quot;=&quot;&amp;[.A46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table:style-name="ce223" table:formula="of:=1-COUNTIF([FRs.$C$2:.$C$993]; &quot;=&quot;&amp;[.A4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table:style-name="ce223" table:formula="of:=1-COUNTIF([FRs.$C$2:.$C$993]; &quot;=&quot;&amp;[.A46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table:style-name="ce223" table:formula="of:=1-COUNTIF([FRs.$C$2:.$C$993]; &quot;=&quot;&amp;[.A4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table:style-name="ce223" table:formula="of:=1-COUNTIF([FRs.$C$2:.$C$993]; &quot;=&quot;&amp;[.A4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table:style-name="ce223" table:formula="of:=1-COUNTIF([FRs.$C$2:.$C$993]; &quot;=&quot;&amp;[.A4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table:style-name="ce223" table:formula="of:=1-COUNTIF([FRs.$C$2:.$C$993]; &quot;=&quot;&amp;[.A4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table:style-name="ce223" table:formula="of:=1-COUNTIF([FRs.$C$2:.$C$993]; &quot;=&quot;&amp;[.A4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table:style-name="ce223" table:formula="of:=1-COUNTIF([FRs.$C$2:.$C$993]; &quot;=&quot;&amp;[.A4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table:style-name="ce223" table:formula="of:=1-COUNTIF([FRs.$C$2:.$C$993]; &quot;=&quot;&amp;[.A4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table:style-name="ce223" table:formula="of:=1-COUNTIF([FRs.$C$2:.$C$993]; &quot;=&quot;&amp;[.A4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table:style-name="ce223" table:formula="of:=1-COUNTIF([FRs.$C$2:.$C$993]; &quot;=&quot;&amp;[.A4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table:style-name="ce223" table:formula="of:=1-COUNTIF([FRs.$C$2:.$C$993]; &quot;=&quot;&amp;[.A4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table:style-name="ce223" table:formula="of:=1-COUNTIF([FRs.$C$2:.$C$993]; &quot;=&quot;&amp;[.A4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table:style-name="ce223" table:formula="of:=1-COUNTIF([FRs.$C$2:.$C$993]; &quot;=&quot;&amp;[.A4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table:style-name="ce223" table:formula="of:=1-COUNTIF([FRs.$C$2:.$C$993]; &quot;=&quot;&amp;[.A4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table:style-name="ce223" table:formula="of:=1-COUNTIF([FRs.$C$2:.$C$993]; &quot;=&quot;&amp;[.A4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table:style-name="ce223" table:formula="of:=1-COUNTIF([FRs.$C$2:.$C$993]; &quot;=&quot;&amp;[.A4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table:style-name="ce223" table:formula="of:=1-COUNTIF([FRs.$C$2:.$C$993]; &quot;=&quot;&amp;[.A4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table:style-name="ce223" table:formula="of:=1-COUNTIF([FRs.$C$2:.$C$993]; &quot;=&quot;&amp;[.A4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table:style-name="ce223" table:formula="of:=1-COUNTIF([FRs.$C$2:.$C$993]; &quot;=&quot;&amp;[.A4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table:style-name="ce223" table:formula="of:=1-COUNTIF([FRs.$C$2:.$C$993]; &quot;=&quot;&amp;[.A4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table:style-name="ce223" table:formula="of:=1-COUNTIF([FRs.$C$2:.$C$993]; &quot;=&quot;&amp;[.A4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table:style-name="ce223" table:formula="of:=1-COUNTIF([FRs.$C$2:.$C$993]; &quot;=&quot;&amp;[.A4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table:style-name="ce223" table:formula="of:=1-COUNTIF([FRs.$C$2:.$C$993]; &quot;=&quot;&amp;[.A4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table:style-name="ce223" table:formula="of:=1-COUNTIF([FRs.$C$2:.$C$993]; &quot;=&quot;&amp;[.A4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table:style-name="ce223" table:formula="of:=1-COUNTIF([FRs.$C$2:.$C$993]; &quot;=&quot;&amp;[.A4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table:style-name="ce223" table:formula="of:=1-COUNTIF([FRs.$C$2:.$C$993]; &quot;=&quot;&amp;[.A4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table:style-name="ce223" table:formula="of:=1-COUNTIF([FRs.$C$2:.$C$993]; &quot;=&quot;&amp;[.A4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table:style-name="ce223" table:formula="of:=1-COUNTIF([FRs.$C$2:.$C$993]; &quot;=&quot;&amp;[.A4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table:style-name="ce223" table:formula="of:=1-COUNTIF([FRs.$C$2:.$C$993]; &quot;=&quot;&amp;[.A4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table:style-name="ce223" table:formula="of:=1-COUNTIF([FRs.$C$2:.$C$993]; &quot;=&quot;&amp;[.A4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table:style-name="ce223" table:formula="of:=1-COUNTIF([FRs.$C$2:.$C$993]; &quot;=&quot;&amp;[.A4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table:style-name="ce223" table:formula="of:=1-COUNTIF([FRs.$C$2:.$C$993]; &quot;=&quot;&amp;[.A5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table:style-name="ce223" table:formula="of:=1-COUNTIF([FRs.$C$2:.$C$993]; &quot;=&quot;&amp;[.A5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0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lossary" table:style-name="ta1">
        <office:forms form:automatic-focus="false" form:apply-design-mode="false"/>
        <table:table-column table:style-name="co15" table:default-cell-style-name="Default"/>
        <table:table-column table:style-name="co27" table:default-cell-style-name="Default"/>
        <table:table-row table:style-name="ro3">
          <table:table-cell office:value-type="string" calcext:value-type="string">
            <text:p>Subreq</text:p>
          </table:table-cell>
          <table:table-cell office:value-type="string" calcext:value-type="string">
            <text:p>UC step or UC text field.</text:p>
            <text:p>Req text fields are not subreqs. (see analysis-20150423)</text:p>
          </table:table-cell>
        </table:table-row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Pubid</text:p>
          </table:table-cell>
        </table:table-row>
      </table:table>
      <table:named-expressions/>
      <table:database-ranges>
        <table:database-range table:name="__Anonymous_Sheet_DB__0" table:target-range-address="FRs.A1:FRs.O348" table:orientation="column"/>
        <table:database-range table:name="__Anonymous_Sheet_DB__1" table:target-range-address="flat.A1:flat.G4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10:38:39.255315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5-09-14T10:41:01.982593776</dc:date>
    <meta:editing-duration>P2DT9H39M45S</meta:editing-duration>
    <meta:editing-cycles>194</meta:editing-cycles>
    <meta:generator>LibreOffice/4.4.5.2$Linux_X86_64 LibreOffice_project/40m0$Build-2</meta:generator>
    <meta:document-statistic meta:table-count="5" meta:cell-count="3859" meta:object-count="0"/>
  </office:meta>
</office:document-meta>
</file>
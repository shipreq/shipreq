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2.422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14.915cm"/>
    </style:style>
    <style:style style:name="co27" style:family="table-column">
      <style:table-column-properties fo:break-before="auto" style:column-width="1.896cm"/>
    </style:style>
    <style:style style:name="co28" style:family="table-column">
      <style:table-column-properties fo:break-before="auto" style:column-width="4.29cm"/>
    </style:style>
    <style:style style:name="co29" style:family="table-column">
      <style:table-column-properties fo:break-before="auto" style:column-width="1.891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2.591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249cm" fo:break-before="auto" style:use-optimal-row-height="true"/>
    </style:style>
    <style:style style:name="ro15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2.57cm" fo:break-before="auto" style:use-optimal-row-height="true"/>
    </style:style>
    <style:style style:name="ro21" style:family="table-row">
      <style:table-row-properties style:row-height="1.228cm" fo:break-before="auto" style:use-optimal-row-height="true"/>
    </style:style>
    <style:style style:name="ro22" style:family="table-row">
      <style:table-row-properties style:row-height="4.244cm" fo:break-before="auto" style:use-optimal-row-height="true"/>
    </style:style>
    <style:style style:name="ro23" style:family="table-row">
      <style:table-row-properties style:row-height="2.152cm" fo:break-before="auto" style:use-optimal-row-height="true"/>
    </style:style>
    <style:style style:name="ro24" style:family="table-row">
      <style:table-row-properties style:row-height="2.9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24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2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127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29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/>
    </style:style>
    <style:style style:name="ce66" style:family="table-cell" style:parent-style-name="Default">
      <style:table-cell-properties style:vertical-align="top"/>
      <style:text-properties style:text-position=""/>
    </style:style>
    <style:style style:name="ce68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7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2" style:family="table-cell" style:parent-style-name="Default">
      <style:table-cell-properties fo:wrap-option="wrap" fo:border="0.06pt solid #000000"/>
      <style:text-properties style:text-position=""/>
    </style:style>
    <style:style style:name="ce95" style:family="table-cell" style:parent-style-name="Default">
      <style:table-cell-properties fo:wrap-option="wrap" style:vertical-align="top"/>
      <style:text-properties style:text-position=""/>
    </style:style>
    <style:style style:name="ce9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fo:wrap-option="wrap"/>
      <style:text-properties style:text-position="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3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4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0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3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0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1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4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5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5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7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6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6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9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7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8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87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="0.06pt solid #000000" style:vertical-align="top"/>
    </style:style>
    <style:style style:name="ce89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/>
    </style:style>
    <style:style style:name="ce93" style:family="table-cell" style:parent-style-name="Default">
      <style:table-cell-properties fo:background-color="#ffffcc" fo:border="0.06pt solid #000000" style:vertical-align="top"/>
    </style:style>
    <style:style style:name="ce94" style:family="table-cell" style:parent-style-name="Default">
      <style:table-cell-properties fo:border="0.06pt solid #000000" style:vertical-align="top"/>
      <style:text-properties style:use-window-font-color="true"/>
    </style:style>
    <style:style style:name="ce97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transparent" fo:border="0.06pt solid #000000" style:vertical-align="top"/>
    </style:style>
    <style:style style:name="ce100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101" style:family="table-cell" style:parent-style-name="Default">
      <style:table-cell-properties fo:background-color="#008000" style:vertical-align="top"/>
      <style:text-properties fo:color="#ffffff"/>
    </style:style>
    <style:style style:name="ce102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cccccc" style:vertical-align="top"/>
      <style:text-properties style:use-window-font-color="true"/>
    </style:style>
    <style:style style:name="ce104" style:family="table-cell" style:parent-style-name="Default">
      <style:table-cell-properties fo:border="0.06pt solid #000000" style:vertical-align="top"/>
      <style:text-properties fo:color="#b3b3b3"/>
    </style:style>
    <style:style style:name="ce105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6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7" style:family="table-cell" style:parent-style-name="Default">
      <style:table-cell-properties fo:border="0.06pt solid #000000" style:vertical-align="top"/>
      <style:text-properties fo:color="#999999"/>
    </style:style>
    <style:style style:name="ce108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0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11" style:family="table-cell" style:parent-style-name="Default">
      <style:table-cell-properties style:vertical-align="top"/>
    </style:style>
    <style:style style:name="ce112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5" style:family="table-cell" style:parent-style-name="Default">
      <style:table-cell-properties fo:wrap-option="wrap" fo:border="0.06pt solid #000000" style:vertical-align="top"/>
    </style:style>
    <style:style style:name="ce116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7" style:family="table-cell" style:parent-style-name="Default">
      <style:table-cell-properties fo:wrap-option="wrap" fo:border="0.06pt solid #000000"/>
    </style:style>
    <style:style style:name="ce118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9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0" style:family="table-cell" style:parent-style-name="Default">
      <style:table-cell-properties fo:background-color="transparent" fo:wrap-option="wrap" fo:border="0.06pt solid #000000" style:vertical-align="top"/>
    </style:style>
    <style:style style:name="ce12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2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48" style:family="table-cell" style:parent-style-name="Default">
      <style:table-cell-properties fo:background-color="#ffffcc" fo:wrap-option="wrap" fo:border="0.06pt solid #000000"/>
    </style:style>
    <style:style style:name="ce149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50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51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53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54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55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56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57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0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61" style:family="table-cell" style:parent-style-name="Default">
      <style:table-cell-properties fo:wrap-option="wrap" style:vertical-align="top"/>
    </style:style>
    <style:style style:name="ce16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63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64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65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70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7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74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75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76" style:family="table-cell" style:parent-style-name="Default">
      <style:table-cell-properties fo:background-color="#ffffcc" fo:wrap-option="wrap" fo:border="0.06pt solid #000000" style:vertical-align="top"/>
    </style:style>
    <style:style style:name="ce177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79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0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1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83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8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8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8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91" style:family="table-cell" style:parent-style-name="Default">
      <style:table-cell-properties style:vertical-align="top"/>
      <style:text-properties style:use-window-font-color="true"/>
    </style:style>
    <style:style style:name="ce19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93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94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95" style:family="table-cell" style:parent-style-name="Default">
      <style:table-cell-properties fo:background-color="transparent" fo:wrap-option="wrap" fo:border="0.06pt solid #000000"/>
    </style:style>
    <style:style style:name="ce196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9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2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20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0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7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08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21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999999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2" table:number-columns-repeated="2" table:default-cell-style-name="ce58"/>
        <table:table-column table:style-name="co13" table:default-cell-style-name="ce58"/>
        <table:table-column table:style-name="co25" table:default-cell-style-name="ce111"/>
        <table:table-column table:style-name="co26" table:default-cell-style-name="ce161"/>
        <table:table-column table:style-name="co27" table:default-cell-style-name="ce161"/>
        <table:table-column table:style-name="co28" table:default-cell-style-name="ce161"/>
        <table:table-column table:style-name="co29" table:default-cell-style-name="ce58"/>
        <table:table-column table:style-name="co30" table:default-cell-style-name="ce58"/>
        <table:table-column table:style-name="co31" table:default-cell-style-name="ce187"/>
        <table:table-column table:style-name="co32" table:default-cell-style-name="ce58"/>
        <table:table-column table:style-name="co33" table:default-cell-style-name="ce58"/>
        <table:table-column table:style-name="co34" table:default-cell-style-name="ce58"/>
        <table:table-column table:style-name="co35" table:default-cell-style-name="ce58"/>
        <table:table-column table:style-name="co14" table:number-columns-repeated="1010" table:default-cell-style-name="ce111"/>
        <table:table-row table:style-name="ro1">
          <table:table-cell table:style-name="ce37" office:value-type="string" calcext:value-type="string">
            <text:p>MF</text:p>
          </table:table-cell>
          <table:table-cell table:style-name="ce37" office:value-type="string" calcext:value-type="string">
            <text:p>MF-β</text:p>
          </table:table-cell>
          <table:table-cell table:style-name="ce71" table:formula="of:=MAX([.C$2:.C$551])+1" office:value-type="float" office:value="275" calcext:value-type="float">
            <text:p>NEXT: 275</text:p>
          </table:table-cell>
          <table:table-cell table:style-name="ce37" office:value-type="string" calcext:value-type="string">
            <text:p>SEMANTIC ID</text:p>
          </table:table-cell>
          <table:table-cell table:style-name="ce37" office:value-type="string" calcext:value-type="string">
            <text:p>REQUIREMENT</text:p>
          </table:table-cell>
          <table:table-cell table:style-name="ce37" office:value-type="string" calcext:value-type="string">
            <text:p>UPDATED</text:p>
          </table:table-cell>
          <table:table-cell table:style-name="ce37" office:value-type="string" calcext:value-type="string">
            <text:p>TODO</text:p>
          </table:table-cell>
          <table:table-cell table:style-name="ce184" office:value-type="string" calcext:value-type="string">
            <text:p>Complete</text:p>
          </table:table-cell>
          <table:table-cell table:style-name="ce184" office:value-type="string" calcext:value-type="string">
            <text:p>Correct</text:p>
          </table:table-cell>
          <table:table-cell table:style-name="ce184" office:value-type="string" calcext:value-type="string">
            <text:p>Feasible</text:p>
          </table:table-cell>
          <table:table-cell table:style-name="ce184" office:value-type="string" calcext:value-type="string">
            <text:p>Necessary</text:p>
          </table:table-cell>
          <table:table-cell table:style-name="ce184" office:value-type="string" calcext:value-type="string">
            <text:p>Prioritised</text:p>
          </table:table-cell>
          <table:table-cell table:style-name="ce184" office:value-type="string" calcext:value-type="string">
            <text:p>Unambiguous</text:p>
          </table:table-cell>
          <table:table-cell table:style-name="ce184" office:value-type="string" calcext:value-type="string">
            <text:p>Verifiable</text:p>
          </table:table-cell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8" office:value-type="float" office:value="1" calcext:value-type="float">
            <text:p>MF-01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uce</text:p>
          </table:table-cell>
          <table:table-cell table:style-name="ce112" office:value-type="string" calcext:value-type="string">
            <text:p>MF-01: Use Case Editor</text:p>
          </table:table-cell>
          <table:table-cell table:style-name="ce112" table:number-columns-repeated="2"/>
          <table:table-cell table:style-name="ce184" table:number-columns-repeated="7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82" calcext:value-type="float">
            <text:p>FR-82</text:p>
          </table:table-cell>
          <table:table-cell table:style-name="ce88" office:value-type="string" calcext:value-type="string">
            <text:p>.ref.reqs</text:p>
          </table:table-cell>
          <table:table-cell table:style-name="ce113" office:value-type="string" calcext:value-type="string">
            <text:p>BA shall be able to reference reqs from UC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150" calcext:value-type="float">
            <text:p>FR-150</text:p>
          </table:table-cell>
          <table:table-cell table:style-name="ce88" office:value-type="string" calcext:value-type="string">
            <text:p>.ref.shr</text:p>
          </table:table-cell>
          <table:table-cell table:style-name="ce113" office:value-type="string" calcext:value-type="string">
            <text:p>BA shall be able to reference SHRs from UC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8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74" office:value-type="float" office:value="261" calcext:value-type="float">
            <text:p>FR-261</text:p>
          </table:table-cell>
          <table:table-cell table:style-name="ce88" office:value-type="string" calcext:value-type="string">
            <text:p>.subreq.fields</text:p>
          </table:table-cell>
          <table:table-cell table:style-name="ce113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number-columns-repeated="1017"/>
        </table:table-row>
        <table:table-row table:style-name="ro18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74" office:value-type="float" office:value="262" calcext:value-type="float">
            <text:p>FR-262</text:p>
          </table:table-cell>
          <table:table-cell table:style-name="ce88" office:value-type="string" calcext:value-type="string">
            <text:p>.subreq.steps</text:p>
          </table:table-cell>
          <table:table-cell table:style-name="ce113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.org-ap</text:p>
          </table:table-cell>
          <table:table-cell table:style-name="ce114" office:value-type="string" calcext:value-type="string">
            <text:p>Groupings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7" calcext:value-type="float">
            <text:p>FR-07</text:p>
          </table:table-cell>
          <table:table-cell table:style-name="ce88" office:value-type="string" calcext:value-type="string">
            <text:p><text:s text:c="2"/>.add</text:p>
          </table:table-cell>
          <table:table-cell table:style-name="ce113" office:value-type="string" calcext:value-type="string">
            <text:p>BA shall be able to apply groupings to UC using the UCE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8" calcext:value-type="float">
            <text:p>FR-08</text:p>
          </table:table-cell>
          <table:table-cell table:style-name="ce88" office:value-type="string" calcext:value-type="string">
            <text:p><text:s text:c="2"/>.remove</text:p>
          </table:table-cell>
          <table:table-cell table:style-name="ce113" office:value-type="string" calcext:value-type="string">
            <text:p>BA shall be able to remove groupings to UC using the UCE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3" calcext:value-type="float">
            <text:p>FR-23</text:p>
          </table:table-cell>
          <table:table-cell table:style-name="ce88" office:value-type="string" calcext:value-type="string">
            <text:p><text:s text:c="2"/>.fields</text:p>
          </table:table-cell>
          <table:table-cell table:style-name="ce115" office:value-type="string" calcext:value-type="string">
            <text:p>BA shall be able to apply groupings to fields within a UC.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8" office:value-type="float" office:value="5" calcext:value-type="float">
            <text:p>MF-05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fieldset</text:p>
          </table:table-cell>
          <table:table-cell table:style-name="ce112" office:value-type="string" calcext:value-type="string">
            <text:p>MF-05: Field Customisation</text:p>
          </table:table-cell>
          <table:table-cell table:style-name="ce112" table:number-columns-repeated="2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4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1</text:p>
          </table:table-cell>
          <table:table-cell table:style-name="ce74" office:value-type="float" office:value="65" calcext:value-type="float">
            <text:p>FR-65</text:p>
          </table:table-cell>
          <table:table-cell table:style-name="ce90" office:value-type="string" calcext:value-type="string">
            <text:p><text:s text:c="2"/>.mandatory</text:p>
          </table:table-cell>
          <table:table-cell table:style-name="ce115" office:value-type="string" calcext:value-type="string">
            <text:p>BA shall be able to specify mandatory-ness of field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55" calcext:value-type="float">
            <text:p>FR-255</text:p>
          </table:table-cell>
          <table:table-cell table:style-name="ce88" office:value-type="string" calcext:value-type="string">
            <text:p><text:s text:c="2"/>.reqtype</text:p>
          </table:table-cell>
          <table:table-cell table:style-name="ce115" office:value-type="string" calcext:value-type="string">
            <text:p>BA shall be able to specify which req-types each custom field applies to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56" calcext:value-type="float">
            <text:p>FR-256</text:p>
          </table:table-cell>
          <table:table-cell table:style-name="ce88" office:value-type="string" calcext:value-type="string">
            <text:p><text:s text:c="4"/>.all</text:p>
          </table:table-cell>
          <table:table-cell table:style-name="ce115" office:value-type="string" calcext:value-type="string">
            <text:p>BA shall be able to specify that a field applies to all req-type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57" calcext:value-type="float">
            <text:p>FR-257</text:p>
          </table:table-cell>
          <table:table-cell table:style-name="ce88" office:value-type="string" calcext:value-type="string">
            <text:p><text:s text:c="4"/>.whitelist</text:p>
          </table:table-cell>
          <table:table-cell table:style-name="ce115" office:value-type="string" calcext:value-type="string">
            <text:p>BA shall be able to specify applicable field req-types using a whitelist. (i.e. “Only A, B, C”)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58" calcext:value-type="float">
            <text:p>FR-258</text:p>
          </table:table-cell>
          <table:table-cell table:style-name="ce88" office:value-type="string" calcext:value-type="string">
            <text:p><text:s text:c="4"/>.blacklist</text:p>
          </table:table-cell>
          <table:table-cell table:style-name="ce115" office:value-type="string" calcext:value-type="string">
            <text:p>BA shall be able to specify applicable field req-types using a blacklist. (i.e. “Not A, B, C”)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6" calcext:value-type="float">
            <text:p>MF-06</text:p>
          </table:table-cell>
          <table:table-cell table:style-name="ce74" office:value-type="float" office:value="66" calcext:value-type="float">
            <text:p>FR-66</text:p>
          </table:table-cell>
          <table:table-cell table:style-name="ce90" office:value-type="string" calcext:value-type="string">
            <text:p><text:s text:c="2"/>.zero</text:p>
          </table:table-cell>
          <table:table-cell table:style-name="ce115" office:value-type="string" calcext:value-type="string">
            <text:p>All field types that have a concept of mandatory-ness must also provide an emptiness test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74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mod</text:p>
          </table:table-cell>
          <table:table-cell table:style-name="ce116" office:value-type="string" calcext:value-type="string">
            <text:p>Modifying a field set</text:p>
          </table:table-cell>
          <table:table-cell table:style-name="ce116" table:number-columns-repeated="2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114" calcext:value-type="float">
            <text:p>FR-114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5" office:value-type="string" calcext:value-type="string">
            <text:p>BA shall be able to see a list of all existing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2" calcext:value-type="float">
            <text:p>FR-02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add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3" calcext:value-type="float">
            <text:p>FR-03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modify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263" calcext:value-type="float">
            <text:p>FR-263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System shall appear to rename all references to a field after it is renamed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4" calcext:value-type="float">
            <text:p>FR-0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5" office:value-type="string" calcext:value-type="string">
            <text:p>BA shall be able to reorder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1" calcext:value-type="float">
            <text:p>FR-0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delete fields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5" calcext:value-type="float">
            <text:p>FR-05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3" office:value-type="string" calcext:value-type="string">
            <text:p>System shall indicate how many reqs have content for each field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6" calcext:value-type="float">
            <text:p>FR-06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3" office:value-type="string" calcext:value-type="string">
            <text:p>BA shall be able to see each instance of content for a field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264" calcext:value-type="float">
            <text:p>FR-264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7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47" calcext:value-type="float">
            <text:p>FR-47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5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40" calcext:value-type="float">
            <text:p>FR-40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deleted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41" calcext:value-type="float">
            <text:p>FR-41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5" office:value-type="string" calcext:value-type="string">
            <text:p>When a field is restored, System shall restore corresponding field values for each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9">
          <table:table-cell table:style-name="ce41" office:value-type="float" office:value="5" calcext:value-type="float">
            <text:p>MF-05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6" office:value-type="string" calcext:value-type="string">
            <text:p>Field types</text:p>
          </table:table-cell>
          <table:table-cell table:style-name="ce116" table:number-columns-repeated="2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4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43" calcext:value-type="float">
            <text:p>FR-43</text:p>
          </table:table-cell>
          <table:table-cell table:style-name="ce90" office:value-type="string" calcext:value-type="string">
            <text:p><text:s text:c="2"/>.text</text:p>
          </table:table-cell>
          <table:table-cell table:style-name="ce115" office:value-type="string" calcext:value-type="string">
            <text:p>System shall provide a field type: Text field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4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44" calcext:value-type="float">
            <text:p>FR-44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5" office:value-type="string" calcext:value-type="string">
            <text:p>BA shall be able to configure text fields' name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46" calcext:value-type="float">
            <text:p>FR-46</text:p>
          </table:table-cell>
          <table:table-cell table:style-name="ce90" office:value-type="string" calcext:value-type="string">
            <text:p><text:s text:c="2"/>.grouping</text:p>
          </table:table-cell>
          <table:table-cell table:style-name="ce115" office:value-type="string" calcext:value-type="string">
            <text:p>BA shall be able to define a field type based on a grouping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52" calcext:value-type="float">
            <text:p>FR-252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15" office:value-type="string" calcext:value-type="string">
            <text:p>System shall prevent the existence of more than one field based on the same grouping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7</text:p>
          </table:table-cell>
          <table:table-cell table:style-name="ce74" office:value-type="float" office:value="251" calcext:value-type="float">
            <text:p>FR-251</text:p>
          </table:table-cell>
          <table:table-cell table:style-name="ce90" office:value-type="string" calcext:value-type="string">
            <text:p><text:s text:c="4"/>.mandatory</text:p>
          </table:table-cell>
          <table:table-cell table:style-name="ce115" office:value-type="string" calcext:value-type="string">
            <text:p>BA shall be able to specify whether a grouping field is mandatory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50" calcext:value-type="float">
            <text:p>FR-250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5" office:value-type="string" calcext:value-type="string">
            <text:p>System shall automatically name grouping fields according to the names of underlying grouping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6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49" calcext:value-type="float">
            <text:p>FR-249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15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59" calcext:value-type="float">
            <text:p>FR-259</text:p>
          </table:table-cell>
          <table:table-cell table:style-name="ce90" office:value-type="string" calcext:value-type="string">
            <text:p><text:s text:c="2"/>.uc.courses</text:p>
          </table:table-cell>
          <table:table-cell table:style-name="ce115" office:value-type="string" calcext:value-type="string">
            <text:p>System shall provide a field type '”Courses” which is applicable to UCs only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60" calcext:value-type="float">
            <text:p>FR-260</text:p>
          </table:table-cell>
          <table:table-cell table:style-name="ce90" office:value-type="string" calcext:value-type="string">
            <text:p><text:s text:c="4"/>.forced</text:p>
          </table:table-cell>
          <table:table-cell table:style-name="ce115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45" calcext:value-type="float">
            <text:p>FR-45</text:p>
          </table:table-cell>
          <table:table-cell table:style-name="ce90" office:value-type="string" calcext:value-type="string">
            <text:p><text:s text:c="2"/>.uc.flowgraph</text:p>
          </table:table-cell>
          <table:table-cell table:style-name="ce115" office:value-type="string" calcext:value-type="string">
            <text:p>System shall provide a field type '”Flow graph” which is applicable to UCs only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8" office:value-type="float" office:value="6" calcext:value-type="float">
            <text:p>MF-06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incompletions</text:p>
          </table:table-cell>
          <table:table-cell table:style-name="ce112" office:value-type="string" calcext:value-type="string">
            <text:p>MF-06: Incompletions</text:p>
          </table:table-cell>
          <table:table-cell table:style-name="ce112" table:number-columns-repeated="2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52" calcext:value-type="float">
            <text:p>FR-52</text:p>
          </table:table-cell>
          <table:table-cell table:style-name="ce88" office:value-type="string" calcext:value-type="string">
            <text:p><text:s text:c="2"/>.render.txt</text:p>
          </table:table-cell>
          <table:table-cell table:style-name="ce115" office:value-type="string" calcext:value-type="string">
            <text:p>System shall render incompletions in reqs, red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92" calcext:value-type="float">
            <text:p>FR-92</text:p>
          </table:table-cell>
          <table:table-cell table:style-name="ce88" office:value-type="string" calcext:value-type="string">
            <text:p><text:s text:c="2"/>.render.empty</text:p>
          </table:table-cell>
          <table:table-cell table:style-name="ce115" office:value-type="string" calcext:value-type="string">
            <text:p>System shall render blank, mandatory fields with a red background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9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<text:s text:c="2"/>.inspect</text:p>
          </table:table-cell>
          <table:table-cell table:style-name="ce118" office:value-type="string" calcext:value-type="string">
            <text:p>Inspection</text:p>
          </table:table-cell>
          <table:table-cell table:style-name="ce118" table:number-columns-repeated="2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48" calcext:value-type="float">
            <text:p>FR-48</text:p>
          </table:table-cell>
          <table:table-cell table:style-name="ce88" office:value-type="string" calcext:value-type="string">
            <text:p><text:s text:c="4"/>.total</text:p>
          </table:table-cell>
          <table:table-cell table:style-name="ce115" office:value-type="string" calcext:value-type="string">
            <text:p>BA shall be able to see the sum total of incompletion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84"/>
          <table:table-cell table:number-columns-repeated="1016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49" calcext:value-type="float">
            <text:p>FR-49</text:p>
          </table:table-cell>
          <table:table-cell table:style-name="ce88" office:value-type="string" calcext:value-type="string">
            <text:p><text:s text:c="4"/>.breakdown.uc</text:p>
          </table:table-cell>
          <table:table-cell table:style-name="ce115" office:value-type="string" calcext:value-type="string">
            <text:p>BA shall be able to see a list of UCs and the number of incompletions in each. [Pri=?]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22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195" calcext:value-type="float">
            <text:p>FR-195</text:p>
          </table:table-cell>
          <table:table-cell table:style-name="ce88" office:value-type="string" calcext:value-type="string">
            <text:p><text:s text:c="4"/>.breakdown.llreq</text:p>
          </table:table-cell>
          <table:table-cell table:style-name="ce115" office:value-type="string" calcext:value-type="string">
            <text:p>BA shall be able to see a list of reqs and the number of incompletions in each. [Pri=?]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7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67" calcext:value-type="float">
            <text:p>FR-267</text:p>
          </table:table-cell>
          <table:table-cell table:style-name="ce88" office:value-type="string" calcext:value-type="string">
            <text:p><text:s text:c="4"/>.filter</text:p>
          </table:table-cell>
          <table:table-cell table:style-name="ce115" office:value-type="string" calcext:value-type="string">
            <text:p>BA shall be able to filter incompletion inspection view. (See <text:span text:style-name="T2">Filtering</text:span> section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style-name="ce184"/>
          <table:table-cell table:number-columns-repeated="1016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float" office:value="67" calcext:value-type="float">
            <text:p>FR-67</text:p>
          </table:table-cell>
          <table:table-cell table:style-name="ce89" office:value-type="string" calcext:value-type="string">
            <text:p><text:s text:c="4"/>.list</text:p>
          </table:table-cell>
          <table:table-cell table:style-name="ce114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14" table:number-columns-repeated="2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13" calcext:value-type="float">
            <text:p>FR-113</text:p>
          </table:table-cell>
          <table:table-cell table:style-name="ce88" office:value-type="string" calcext:value-type="string">
            <text:p><text:s text:c="6"/>.req-id</text:p>
          </table:table-cell>
          <table:table-cell table:style-name="ce115" office:value-type="string" calcext:value-type="string">
            <text:p>System shall display the ID of the requirement in which the incompletion exist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1" calcext:value-type="float">
            <text:p>FR-61</text:p>
          </table:table-cell>
          <table:table-cell table:style-name="ce88" office:value-type="string" calcext:value-type="string">
            <text:p><text:s text:c="6"/>.req-name</text:p>
          </table:table-cell>
          <table:table-cell table:style-name="ce115" office:value-type="string" calcext:value-type="string">
            <text:p>System shall display the name of the requirement in which the incompletion exist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2" calcext:value-type="float">
            <text:p>FR-62</text:p>
          </table:table-cell>
          <table:table-cell table:style-name="ce88" office:value-type="string" calcext:value-type="string">
            <text:p><text:s text:c="6"/>.ucf</text:p>
          </table:table-cell>
          <table:table-cell table:style-name="ce115" office:value-type="string" calcext:value-type="string">
            <text:p>System shall display the name of the UC field in which the incompletion exist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3" calcext:value-type="float">
            <text:p>FR-63</text:p>
          </table:table-cell>
          <table:table-cell table:style-name="ce88" office:value-type="string" calcext:value-type="string">
            <text:p><text:s text:c="6"/>.supp</text:p>
          </table:table-cell>
          <table:table-cell table:style-name="ce115" office:value-type="string" calcext:value-type="string">
            <text:p>System shall display the incompletion tag's additional info (if specified)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number-columns-repeated="1017"/>
        </table:table-row>
        <table:table-row table:style-name="ro20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4" calcext:value-type="float">
            <text:p>FR-64</text:p>
          </table:table-cell>
          <table:table-cell table:style-name="ce88" office:value-type="string" calcext:value-type="string">
            <text:p><text:s text:c="6"/>.surrounds</text:p>
          </table:table-cell>
          <table:table-cell table:style-name="ce115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75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19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<text:s text:c="2"/>.track</text:p>
          </table:table-cell>
          <table:table-cell table:style-name="ce118" office:value-type="string" calcext:value-type="string">
            <text:p>Tracking</text:p>
          </table:table-cell>
          <table:table-cell table:style-name="ce118" table:number-columns-repeated="2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3" calcext:value-type="float">
            <text:p>FR-53</text:p>
          </table:table-cell>
          <table:table-cell table:style-name="ce88" office:value-type="string" calcext:value-type="string">
            <text:p><text:s text:c="4"/>.field.empty</text:p>
          </table:table-cell>
          <table:table-cell table:style-name="ce115" office:value-type="string" calcext:value-type="string">
            <text:p>System shall track emptiness of mandatory fields as incompletion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5</text:p>
            <text:p>MF-07</text:p>
          </table:table-cell>
          <table:table-cell table:style-name="ce74" office:value-type="float" office:value="33" calcext:value-type="float">
            <text:p>FR-33</text:p>
          </table:table-cell>
          <table:table-cell table:style-name="ce88" office:value-type="string" calcext:value-type="string">
            <text:p><text:s text:c="4"/>.field.no-grouping</text:p>
          </table:table-cell>
          <table:table-cell table:style-name="ce115" office:value-type="string" calcext:value-type="string">
            <text:p>When a grouping is deleted, a field based on it should be flagged as an incompletion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4" calcext:value-type="float">
            <text:p>FR-54</text:p>
          </table:table-cell>
          <table:table-cell table:style-name="ce88" office:value-type="string" calcext:value-type="string">
            <text:p><text:s text:c="4"/>.ref.invalid</text:p>
          </table:table-cell>
          <table:table-cell table:style-name="ce115" office:value-type="string" calcext:value-type="string">
            <text:p>System shall track invalid refs as incompletion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5" calcext:value-type="float">
            <text:p>FR-55</text:p>
          </table:table-cell>
          <table:table-cell table:style-name="ce88" office:value-type="string" calcext:value-type="string">
            <text:p><text:s text:c="4"/>.ref.deleted</text:p>
          </table:table-cell>
          <table:table-cell table:style-name="ce115" office:value-type="string" calcext:value-type="string">
            <text:p>System shall track [DELETED] refs as incompletion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2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74" office:value-type="float" office:value="207" calcext:value-type="float">
            <text:p>FR-207</text:p>
          </table:table-cell>
          <table:table-cell table:style-name="ce88" office:value-type="string" calcext:value-type="string">
            <text:p><text:s text:c="4"/>.rel.missing</text:p>
          </table:table-cell>
          <table:table-cell table:style-name="ce115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162" office:value-type="date" office:date-value="2014-06-18" calcext:value-type="date">
            <text:p>18/06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74" calcext:value-type="float">
            <text:p>FR-74</text:p>
          </table:table-cell>
          <table:table-cell table:style-name="ce88" office:value-type="string" calcext:value-type="string">
            <text:p><text:s text:c="4"/>.org.missing</text:p>
          </table:table-cell>
          <table:table-cell table:style-name="ce115" office:value-type="string" calcext:value-type="string">
            <text:p>BA shall be able to track missing orgs (MF-07) by making an org field (FR-46) mandatory.</text:p>
            <text:p><text:span text:style-name="T4">Example: UC missing priority should be an incompletion.</text:span>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54" calcext:value-type="float">
            <text:p>FR-254</text:p>
          </table:table-cell>
          <table:table-cell table:style-name="ce88" office:value-type="string" calcext:value-type="string">
            <text:p><text:s text:c="4"/>.org.enum</text:p>
          </table:table-cell>
          <table:table-cell table:style-name="ce115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145" calcext:value-type="float">
            <text:p>FR-145</text:p>
          </table:table-cell>
          <table:table-cell table:style-name="ce88" office:value-type="string" calcext:value-type="string">
            <text:p><text:s text:c="4"/>.smr</text:p>
          </table:table-cell>
          <table:table-cell table:style-name="ce115" office:value-type="string" calcext:value-type="string">
            <text:p>System shall track Semantic Header Rows without children as incompletio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74" calcext:value-type="float">
            <text:p>FR-274</text:p>
          </table:table-cell>
          <table:table-cell table:style-name="ce88" office:value-type="string" calcext:value-type="string">
            <text:p><text:s text:c="4"/>.steps.empty</text:p>
          </table:table-cell>
          <table:table-cell table:style-name="ce115" office:value-type="string" calcext:value-type="string">
            <text:p>System shall track emptiness of UC steps as incompletions.</text:p>
          </table:table-cell>
          <table:table-cell table:style-name="ce162" office:value-type="date" office:date-value="2014-07-02" calcext:value-type="date">
            <text:p>02/07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<text:s text:c="2"/>.tag</text:p>
          </table:table-cell>
          <table:table-cell table:style-name="ce118" office:value-type="string" calcext:value-type="string">
            <text:p>Incompletion tags</text:p>
          </table:table-cell>
          <table:table-cell table:style-name="ce118" table:number-columns-repeated="2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6" calcext:value-type="float">
            <text:p>FR-56</text:p>
          </table:table-cell>
          <table:table-cell table:style-name="ce88" office:value-type="string" calcext:value-type="string">
            <text:p><text:s text:c="4"/>.ap</text:p>
          </table:table-cell>
          <table:table-cell table:style-name="ce115" office:value-type="string" calcext:value-type="string">
            <text:p>BA shall be able to specify incompletion tags in reqs.</text:p>
            <text:p>Example: “#TODO”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7" calcext:value-type="float">
            <text:p>FR-57</text:p>
          </table:table-cell>
          <table:table-cell table:style-name="ce88" office:value-type="string" calcext:value-type="string">
            <text:p><text:s text:c="4"/>.supp</text:p>
          </table:table-cell>
          <table:table-cell table:style-name="ce115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8" calcext:value-type="float">
            <text:p>FR-58</text:p>
          </table:table-cell>
          <table:table-cell table:style-name="ce88" office:value-type="string" calcext:value-type="string">
            <text:p><text:s text:c="4"/>.loose</text:p>
          </table:table-cell>
          <table:table-cell table:style-name="ce115" office:value-type="string" calcext:value-type="string">
            <text:p>BA shall be able to specify incompletion tags as loose notes, i.e. bound to a project but not a specific req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9" calcext:value-type="float">
            <text:p>FR-5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19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93" office:value-type="string" calcext:value-type="string">
            <text:p><text:s text:c="4"/>.type</text:p>
          </table:table-cell>
          <table:table-cell table:style-name="ce114" office:value-type="string" calcext:value-type="string">
            <text:p>Tag types</text:p>
          </table:table-cell>
          <table:table-cell table:style-name="ce163"/>
          <table:table-cell table:style-name="ce176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15" calcext:value-type="float">
            <text:p>FR-115</text:p>
          </table:table-cell>
          <table:table-cell table:style-name="ce88" office:value-type="string" calcext:value-type="string">
            <text:p><text:s text:c="6"/>.list</text:p>
          </table:table-cell>
          <table:table-cell table:style-name="ce115" office:value-type="string" calcext:value-type="string">
            <text:p>BA shall be able to see a list of all incompletion tag type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8" calcext:value-type="float">
            <text:p>FR-68</text:p>
          </table:table-cell>
          <table:table-cell table:style-name="ce88" office:value-type="string" calcext:value-type="string">
            <text:p><text:s text:c="6"/>.create</text:p>
          </table:table-cell>
          <table:table-cell table:style-name="ce115" office:value-type="string" calcext:value-type="string">
            <text:p>BA shall be able to create new types of incompletion tag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9" calcext:value-type="float">
            <text:p>FR-69</text:p>
          </table:table-cell>
          <table:table-cell table:style-name="ce88" office:value-type="string" calcext:value-type="string">
            <text:p><text:s text:c="6"/>.update</text:p>
          </table:table-cell>
          <table:table-cell table:style-name="ce115" office:value-type="string" calcext:value-type="string">
            <text:p>BA shall be able to rename incompletion tag type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70" calcext:value-type="float">
            <text:p>FR-70</text:p>
          </table:table-cell>
          <table:table-cell table:style-name="ce88" office:value-type="string" calcext:value-type="string">
            <text:p><text:s text:c="8"/>.refs</text:p>
          </table:table-cell>
          <table:table-cell table:style-name="ce115" office:value-type="string" calcext:value-type="string">
            <text:p>System shall appear to rename all instances of a tag when its type is renamed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71" calcext:value-type="float">
            <text:p>FR-7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delete incompletion tag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72" calcext:value-type="float">
            <text:p>FR-7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5" office:value-type="string" calcext:value-type="string">
            <text:p>Before incompletion tag deletion, user shall be able to see a summary of usage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73" calcext:value-type="float">
            <text:p>FR-7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5" office:value-type="string" calcext:value-type="string">
            <text:p>Before incompletion tag deletion, user shall be able to see each instance of entity's values and association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96" calcext:value-type="float">
            <text:p>FR-196</text:p>
          </table:table-cell>
          <table:table-cell table:style-name="ce88" office:value-type="string" calcext:value-type="string">
            <text:p><text:s text:c="4"/>.warn</text:p>
          </table:table-cell>
          <table:table-cell table:style-name="ce115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75" office:value-type="string" calcext:value-type="string">
            <text:p>This will have to change once history is implemented.</text:p>
          </table:table-cell>
          <table:table-cell table:style-name="ce111" table:number-columns-repeated="7"/>
          <table:table-cell table:number-columns-repeated="1010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65" calcext:value-type="float">
            <text:p>FR-265</text:p>
          </table:table-cell>
          <table:table-cell table:style-name="ce88" office:value-type="string" calcext:value-type="string">
            <text:p><text:s text:c="4"/>.remove</text:p>
          </table:table-cell>
          <table:table-cell table:style-name="ce115" office:value-type="string" calcext:value-type="string">
            <text:p>When deleting an incompletion with associations, System remove all instances of it from requirements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7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8" office:value-type="float" office:value="7" calcext:value-type="float">
            <text:p>MF-07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groupings</text:p>
          </table:table-cell>
          <table:table-cell table:style-name="ce112" office:value-type="string" calcext:value-type="string">
            <text:p>MF-07: Organisation</text:p>
          </table:table-cell>
          <table:table-cell table:style-name="ce112" table:number-columns-repeated="2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5" calcext:value-type="float">
            <text:p>FR-25</text:p>
          </table:table-cell>
          <table:table-cell table:style-name="ce88" office:value-type="string" calcext:value-type="string">
            <text:p>.contra</text:p>
          </table:table-cell>
          <table:table-cell table:style-name="ce115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62" office:value-type="date" office:date-value="2014-06-06" calcext:value-type="date">
            <text:p>06/06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69" calcext:value-type="float">
            <text:p>FR-269</text:p>
          </table:table-cell>
          <table:table-cell table:style-name="ce88" office:value-type="string" calcext:value-type="string">
            <text:p>.subreq-trans</text:p>
          </table:table-cell>
          <table:table-cell table:style-name="ce115" office:value-type="string" calcext:value-type="string">
            <text:p>When a req has a grouping, System shall consider all subreqs as  having the same groupings applied.</text:p>
            <text:p>i.e. G⊗a ∧ a⊏b → G⊗b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1" office:value-type="float" office:value="7" calcext:value-type="float">
            <text:p>MF-0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6" office:value-type="string" calcext:value-type="string">
            <text:p>Grouping types</text:p>
          </table:table-cell>
          <table:table-cell table:style-name="ce116" table:number-columns-repeated="2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46" calcext:value-type="float">
            <text:p>FR-246</text:p>
          </table:table-cell>
          <table:table-cell table:style-name="ce88" office:value-type="string" calcext:value-type="string">
            <text:p><text:s text:c="2"/>.unapplicable</text:p>
          </table:table-cell>
          <table:table-cell table:style-name="ce120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62" office:value-type="date" office:date-value="2014-06-06" calcext:value-type="date">
            <text:p>06/06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53" calcext:value-type="float">
            <text:p>FR-253</text:p>
          </table:table-cell>
          <table:table-cell table:style-name="ce88" office:value-type="string" calcext:value-type="string">
            <text:p><text:s text:c="2"/>.enum</text:p>
          </table:table-cell>
          <table:table-cell table:style-name="ce120" office:value-type="string" calcext:value-type="string">
            <text:p>BA shall be able to specify that a grouping's children are mutually-exclusive (like an enum or sum-type)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3" calcext:value-type="float">
            <text:p>FR-13</text:p>
          </table:table-cell>
          <table:table-cell table:style-name="ce88" office:value-type="string" calcext:value-type="string">
            <text:p><text:s text:c="2"/>.tree</text:p>
          </table:table-cell>
          <table:table-cell table:style-name="ce115" office:value-type="string" calcext:value-type="string">
            <text:p>BA shall be able to create a tree of groupings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4" calcext:value-type="float">
            <text:p>FR-14</text:p>
          </table:table-cell>
          <table:table-cell table:style-name="ce88" office:value-type="string" calcext:value-type="string">
            <text:p><text:s text:c="4"/>.order</text:p>
          </table:table-cell>
          <table:table-cell table:style-name="ce115" office:value-type="string" calcext:value-type="string">
            <text:p>When modifying groupings in a tree, BA shall be able to specify the order of children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5" calcext:value-type="float">
            <text:p>FR-15</text:p>
          </table:table-cell>
          <table:table-cell table:style-name="ce94" office:value-type="string" calcext:value-type="string">
            <text:p><text:s text:c="4"/>.many2many</text:p>
          </table:table-cell>
          <table:table-cell table:style-name="ce115" office:value-type="string" calcext:value-type="string">
            <text:p>When modifying groupings in a tree, BA shall be able to specify multiple parents of a child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9" calcext:value-type="float">
            <text:p>FR-19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5" office:value-type="string" calcext:value-type="string">
            <text:p>BA shall be able to list all groupings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6" calcext:value-type="float">
            <text:p>FR-1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groupings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7" calcext:value-type="float">
            <text:p>FR-17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modify groupings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47" calcext:value-type="float">
            <text:p>FR-247</text:p>
          </table:table-cell>
          <table:table-cell table:style-name="ce88" office:value-type="string" calcext:value-type="string">
            <text:p><text:s text:c="4"/>.unapplicable</text:p>
          </table:table-cell>
          <table:table-cell table:style-name="ce115" office:value-type="string" calcext:value-type="string">
            <text:p>BA shall not be able to change the unapplicability (FR-246) of a grouping once it's been created.</text:p>
          </table:table-cell>
          <table:table-cell table:style-name="ce162" office:value-type="date" office:date-value="2014-06-06" calcext:value-type="date">
            <text:p>06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5" calcext:value-type="float">
            <text:p>FR-18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System shall appear to rename all references of a grouping after it is renamed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" calcext:value-type="float">
            <text:p>FR-18</text:p>
          </table:table-cell>
          <table:table-cell table:style-name="ce88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(soft) delete groupings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6" calcext:value-type="float">
            <text:p>FR-186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grouping deletion, user shall be able to see a summary of usage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7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7" calcext:value-type="float">
            <text:p>FR-187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grouping deletion, user shall be able to see each instance of grouping's values and associations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75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8" calcext:value-type="float">
            <text:p>FR-188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7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7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9" calcext:value-type="float">
            <text:p>FR-189</text:p>
          </table:table-cell>
          <table:table-cell table:style-name="ce88" office:value-type="string" calcext:value-type="string">
            <text:p><text:s text:c="4"/>.bin</text:p>
          </table:table-cell>
          <table:table-cell table:style-name="ce115" office:value-type="string" calcext:value-type="string">
            <text:p>Upon grouping deletion, System shall move it to the bin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7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31" calcext:value-type="float">
            <text:p>FR-31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deleted groupings.</text:p>
          </table:table-cell>
          <table:table-cell table:style-name="ce162" office:value-type="date" office:date-value="2014-02-13" calcext:value-type="date">
            <text:p>13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32" calcext:value-type="float">
            <text:p>FR-32</text:p>
          </table:table-cell>
          <table:table-cell table:style-name="ce88" office:value-type="string" calcext:value-type="string">
            <text:p><text:s text:c="4"/>.aps</text:p>
          </table:table-cell>
          <table:table-cell table:style-name="ce115" office:value-type="string" calcext:value-type="string">
            <text:p>When a grouping is restored, its requirement applications should be restored too.</text:p>
          </table:table-cell>
          <table:table-cell table:style-name="ce162" office:value-type="date" office:date-value="2014-02-13" calcext:value-type="date">
            <text:p>13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1" office:value-type="float" office:value="7" calcext:value-type="float">
            <text:p>MF-07</text:p>
          </table:table-cell>
          <table:table-cell table:style-name="ce41"/>
          <table:table-cell table:style-name="ce77" office:value-type="float" office:value="34" calcext:value-type="float">
            <text:p>FR-34</text:p>
          </table:table-cell>
          <table:table-cell table:style-name="ce91" office:value-type="string" calcext:value-type="string">
            <text:p>.browse</text:p>
          </table:table-cell>
          <table:table-cell table:style-name="ce116" office:value-type="string" calcext:value-type="string">
            <text:p>BA shall be able to browse groupings.</text:p>
          </table:table-cell>
          <table:table-cell table:style-name="ce164" office:value-type="date" office:date-value="2014-02-13" calcext:value-type="date">
            <text:p>13/02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5" calcext:value-type="float">
            <text:p>FR-225</text:p>
          </table:table-cell>
          <table:table-cell table:style-name="ce88" office:value-type="string" calcext:value-type="string">
            <text:p><text:s text:c="2"/>.req-filter</text:p>
          </table:table-cell>
          <table:table-cell table:style-name="ce120" office:value-type="string" calcext:value-type="string">
            <text:p>When browsing groupings, BA shall be able to apply a filter to the requirement scope.</text:p>
            <text:p>(This affects allocations graphs and req lists. See <text:span text:style-name="T2">Filtering</text:span> section.)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2"/>.bars</text:p>
          </table:table-cell>
          <table:table-cell table:style-name="ce121" office:value-type="string" calcext:value-type="string">
            <text:p>Grouping allocation graph</text:p>
          </table:table-cell>
          <table:table-cell table:style-name="ce146" table:number-columns-repeated="2"/>
          <table:table-cell table:number-columns-repeated="1017"/>
        </table:table-row>
        <table:table-row table:style-name="ro6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2" calcext:value-type="float">
            <text:p>FR-222</text:p>
          </table:table-cell>
          <table:table-cell table:style-name="ce88" office:value-type="string" calcext:value-type="string">
            <text:p><text:s text:c="4"/>.seg-not</text:p>
          </table:table-cell>
          <table:table-cell table:style-name="ce115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3" calcext:value-type="float">
            <text:p>FR-223</text:p>
          </table:table-cell>
          <table:table-cell table:style-name="ce88" office:value-type="string" calcext:value-type="string">
            <text:p><text:s text:c="4"/>.seg-parent</text:p>
          </table:table-cell>
          <table:table-cell table:style-name="ce115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4" calcext:value-type="float">
            <text:p>FR-224</text:p>
          </table:table-cell>
          <table:table-cell table:style-name="ce88" office:value-type="string" calcext:value-type="string">
            <text:p><text:s text:c="4"/>.seq-child</text:p>
          </table:table-cell>
          <table:table-cell table:style-name="ce115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8" calcext:value-type="float">
            <text:p>FR-238</text:p>
          </table:table-cell>
          <table:table-cell table:style-name="ce88" office:value-type="string" calcext:value-type="string">
            <text:p><text:s text:c="4"/>.seq-inspect</text:p>
          </table:table-cell>
          <table:table-cell table:style-name="ce115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0" calcext:value-type="float">
            <text:p>FR-220</text:p>
          </table:table-cell>
          <table:table-cell table:style-name="ce88" office:value-type="string" calcext:value-type="string">
            <text:p><text:s text:c="2"/>.top</text:p>
          </table:table-cell>
          <table:table-cell table:style-name="ce115" office:value-type="string" calcext:value-type="string">
            <text:p>When first browsing groupings, System presents top-level grouping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1" calcext:value-type="float">
            <text:p>FR-221</text:p>
          </table:table-cell>
          <table:table-cell table:style-name="ce88" office:value-type="string" calcext:value-type="string">
            <text:p><text:s text:c="2"/>.top-bars</text:p>
          </table:table-cell>
          <table:table-cell table:style-name="ce115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9" office:value-type="float" office:value="226" calcext:value-type="float">
            <text:p>FR-226</text:p>
          </table:table-cell>
          <table:table-cell table:style-name="ce97" office:value-type="string" calcext:value-type="string">
            <text:p><text:s text:c="2"/>.detail</text:p>
          </table:table-cell>
          <table:table-cell table:style-name="ce121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5">When browsing a grouping in detail...</text:span></text:p>
          </table:table-cell>
          <table:table-cell table:style-name="ce165" office:value-type="date" office:date-value="2014-06-03" calcext:value-type="date">
            <text:p>03/06/14</text:p>
          </table:table-cell>
          <table:table-cell table:style-name="ce146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7" calcext:value-type="float">
            <text:p>FR-227</text:p>
          </table:table-cell>
          <table:table-cell table:style-name="ce88" office:value-type="string" calcext:value-type="string">
            <text:p><text:s text:c="4"/>.bar</text:p>
          </table:table-cell>
          <table:table-cell table:style-name="ce115" office:value-type="string" calcext:value-type="string">
            <text:p>System shall present a (stacked-bar) grouping allocation graph for the subject grouping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float" office:value="35" calcext:value-type="float">
            <text:p>FR-35</text:p>
          </table:table-cell>
          <table:table-cell table:style-name="ce94" office:value-type="string" calcext:value-type="string">
            <text:p><text:s text:c="4"/>.rescope-down</text:p>
          </table:table-cell>
          <table:table-cell table:style-name="ce122" office:value-type="string" calcext:value-type="string">
            <text:p>BA shall be able to change the grouping scope to a child of the subject grouping.</text:p>
          </table:table-cell>
          <table:table-cell table:style-name="ce166" office:value-type="date" office:date-value="2014-06-03" calcext:value-type="date">
            <text:p>03/06/14</text:p>
          </table:table-cell>
          <table:table-cell table:style-name="ce122"/>
          <table:table-cell table:style-name="ce185" table:number-columns-repeated="2"/>
          <table:table-cell table:style-name="ce188"/>
          <table:table-cell table:style-name="ce185" table:number-columns-repeated="4"/>
          <table:table-cell table:style-name="ce191" table:number-columns-repeated="1010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float" office:value="239" calcext:value-type="float">
            <text:p>FR-239</text:p>
          </table:table-cell>
          <table:table-cell table:style-name="ce94" office:value-type="string" calcext:value-type="string">
            <text:p><text:s text:c="4"/>.rescope-up</text:p>
          </table:table-cell>
          <table:table-cell table:style-name="ce122" office:value-type="string" calcext:value-type="string">
            <text:p>BA shall be able to change the grouping scope to the subject grouping's parent.</text:p>
          </table:table-cell>
          <table:table-cell table:style-name="ce166" office:value-type="date" office:date-value="2014-06-03" calcext:value-type="date">
            <text:p>03/06/14</text:p>
          </table:table-cell>
          <table:table-cell table:style-name="ce122"/>
          <table:table-cell table:style-name="ce185" table:number-columns-repeated="2"/>
          <table:table-cell table:style-name="ce188"/>
          <table:table-cell table:style-name="ce185" table:number-columns-repeated="4"/>
          <table:table-cell table:style-name="ce191" table:number-columns-repeated="1010"/>
        </table:table-row>
        <table:table-row table:style-name="ro19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float" office:value="240" calcext:value-type="float">
            <text:p>FR-240</text:p>
          </table:table-cell>
          <table:table-cell table:style-name="ce94" office:value-type="string" calcext:value-type="string">
            <text:p><text:s text:c="4"/>.rescope-root</text:p>
          </table:table-cell>
          <table:table-cell table:style-name="ce122" office:value-type="string" calcext:value-type="string">
            <text:p>BA shall be able to change the grouping scope to the top-level. [FR-220]</text:p>
          </table:table-cell>
          <table:table-cell table:style-name="ce166" office:value-type="date" office:date-value="2014-06-03" calcext:value-type="date">
            <text:p>03/06/14</text:p>
          </table:table-cell>
          <table:table-cell table:style-name="ce122"/>
          <table:table-cell table:style-name="ce185" table:number-columns-repeated="2"/>
          <table:table-cell table:style-name="ce188"/>
          <table:table-cell table:style-name="ce185" table:number-columns-repeated="4"/>
          <table:table-cell table:style-name="ce191" table:number-columns-repeated="1010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8" calcext:value-type="float">
            <text:p>FR-228</text:p>
          </table:table-cell>
          <table:table-cell table:style-name="ce98" office:value-type="string" calcext:value-type="string">
            <text:p><text:s text:c="4"/>.reqs</text:p>
          </table:table-cell>
          <table:table-cell table:style-name="ce115" office:value-type="string" calcext:value-type="string">
            <text:p>System shall present a list of all requirements (in scope [FR-225])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77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9" calcext:value-type="float">
            <text:p>FR-229</text:p>
          </table:table-cell>
          <table:table-cell table:style-name="ce88" office:value-type="string" calcext:value-type="string">
            <text:p><text:s text:c="6"/>.ord-seg</text:p>
          </table:table-cell>
          <table:table-cell table:style-name="ce115" office:value-type="string" calcext:value-type="string">
            <text:p>System order requirements so that they are grouped the same way that segments are in the allocation graph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0" calcext:value-type="float">
            <text:p>FR-230</text:p>
          </table:table-cell>
          <table:table-cell table:style-name="ce88" office:value-type="string" calcext:value-type="string">
            <text:p><text:s text:c="6"/>.select</text:p>
          </table:table-cell>
          <table:table-cell table:style-name="ce115" office:value-type="string" calcext:value-type="string">
            <text:p>BA shall be able to select and deselect requirement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1" calcext:value-type="float">
            <text:p>FR-231</text:p>
          </table:table-cell>
          <table:table-cell table:style-name="ce88" office:value-type="string" calcext:value-type="string">
            <text:p><text:s text:c="8"/>.apply</text:p>
          </table:table-cell>
          <table:table-cell table:style-name="ce115" office:value-type="string" calcext:value-type="string">
            <text:p>BA shall be able to apply the subject grouping or one of its children, to selected requirement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2" calcext:value-type="float">
            <text:p>FR-232</text:p>
          </table:table-cell>
          <table:table-cell table:style-name="ce88" office:value-type="string" calcext:value-type="string">
            <text:p><text:s text:c="8"/>.remove</text:p>
          </table:table-cell>
          <table:table-cell table:style-name="ce115" office:value-type="string" calcext:value-type="string">
            <text:p>BA shall be able to remove the subject grouping or one of its children, from selected requirement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3" calcext:value-type="float">
            <text:p>FR-233</text:p>
          </table:table-cell>
          <table:table-cell table:style-name="ce88" office:value-type="string" calcext:value-type="string">
            <text:p><text:s text:c="8"/>.replace</text:p>
          </table:table-cell>
          <table:table-cell table:style-name="ce115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4"/>.groupings</text:p>
          </table:table-cell>
          <table:table-cell table:style-name="ce123" office:value-type="string" calcext:value-type="string">
            <text:p>Edit groupings</text:p>
          </table:table-cell>
          <table:table-cell table:style-name="ce146" table:number-columns-repeated="2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4" calcext:value-type="float">
            <text:p>FR-234</text:p>
          </table:table-cell>
          <table:table-cell table:style-name="ce88" office:value-type="string" calcext:value-type="string">
            <text:p><text:s text:c="6"/>.add</text:p>
          </table:table-cell>
          <table:table-cell table:style-name="ce115" office:value-type="string" calcext:value-type="string">
            <text:p>BA shall be able to add a new grouping as a child of the subject grouping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5" calcext:value-type="float">
            <text:p>FR-235</text:p>
          </table:table-cell>
          <table:table-cell table:style-name="ce88" office:value-type="string" calcext:value-type="string">
            <text:p><text:s text:c="6"/>.edit</text:p>
          </table:table-cell>
          <table:table-cell table:style-name="ce115" office:value-type="string" calcext:value-type="string">
            <text:p>BA shall be able to edit the subject grouping or one of its children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6" calcext:value-type="float">
            <text:p>FR-236</text:p>
          </table:table-cell>
          <table:table-cell table:style-name="ce88" office:value-type="string" calcext:value-type="string">
            <text:p><text:s text:c="6"/>.delete</text:p>
          </table:table-cell>
          <table:table-cell table:style-name="ce115" office:value-type="string" calcext:value-type="string">
            <text:p>BA shall be able to delete the subject grouping or one of its children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7" calcext:value-type="float">
            <text:p>FR-237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5" office:value-type="string" calcext:value-type="string">
            <text:p>BA shall be able to restore a deleted child grouping of <text:s/>the subject grouping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8" office:value-type="float" office:value="12" calcext:value-type="float">
            <text:p>MF-12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llreq</text:p>
          </table:table-cell>
          <table:table-cell table:style-name="ce112" office:value-type="string" calcext:value-type="string">
            <text:p>MF-12: Low-level Requirements</text:p>
          </table:table-cell>
          <table:table-cell table:style-name="ce112" table:number-columns-repeated="2"/>
          <table:table-cell table:number-columns-repeated="1017"/>
        </table:table-row>
        <table:table-row table:style-name="ro19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18" office:value-type="string" calcext:value-type="string">
            <text:p>Req Data</text:p>
          </table:table-cell>
          <table:table-cell table:style-name="ce118" table:number-columns-repeated="2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78" calcext:value-type="float">
            <text:p>FR-78</text:p>
          </table:table-cell>
          <table:table-cell table:style-name="ce88" office:value-type="string" calcext:value-type="string">
            <text:p><text:s text:c="2"/>.id.auto</text:p>
          </table:table-cell>
          <table:table-cell table:style-name="ce113" office:value-type="string" calcext:value-type="string">
            <text:p>System shall allocate reqs a unique ID automatically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79" calcext:value-type="float">
            <text:p>FR-79</text:p>
          </table:table-cell>
          <table:table-cell table:style-name="ce88" office:value-type="string" calcext:value-type="string">
            <text:p><text:s text:c="2"/>.id.fmt</text:p>
          </table:table-cell>
          <table:table-cell table:style-name="ce113" office:value-type="string" calcext:value-type="string">
            <text:p>System shall create unique ID reqs by combining a req-type's mnemonic &amp; a number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77" calcext:value-type="float">
            <text:p>FR-77</text:p>
          </table:table-cell>
          <table:table-cell table:style-name="ce88" office:value-type="string" calcext:value-type="string">
            <text:p><text:s text:c="2"/>.last-updated</text:p>
          </table:table-cell>
          <table:table-cell table:style-name="ce113" office:value-type="string" calcext:value-type="string">
            <text:p>System shall maintain the last-updated timestamp of reqs automatically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0" calcext:value-type="float">
            <text:p>FR-80</text:p>
          </table:table-cell>
          <table:table-cell table:style-name="ce88" office:value-type="string" calcext:value-type="string">
            <text:p><text:s text:c="2"/>.ref.reqs</text:p>
          </table:table-cell>
          <table:table-cell table:style-name="ce113" office:value-type="string" calcext:value-type="string">
            <text:p>BA shall be able to reference reqs from req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8" calcext:value-type="float">
            <text:p>FR-148</text:p>
          </table:table-cell>
          <table:table-cell table:style-name="ce88" office:value-type="string" calcext:value-type="string">
            <text:p><text:s text:c="2"/>.ref.shr</text:p>
          </table:table-cell>
          <table:table-cell table:style-name="ce113" office:value-type="string" calcext:value-type="string">
            <text:p>BA shall be able to reference SHRs from req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1" calcext:value-type="float">
            <text:p>FR-81</text:p>
          </table:table-cell>
          <table:table-cell table:style-name="ce88" office:value-type="string" calcext:value-type="string">
            <text:p><text:s text:c="2"/>.ref.ucs</text:p>
          </table:table-cell>
          <table:table-cell table:style-name="ce113" office:value-type="string" calcext:value-type="string">
            <text:p>BA shall be able to reference UCs from req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81" office:value-type="float" office:value="102" calcext:value-type="float">
            <text:p>FR-102</text:p>
          </table:table-cell>
          <table:table-cell table:style-name="ce91" office:value-type="string" calcext:value-type="string">
            <text:p>.delete</text:p>
          </table:table-cell>
          <table:table-cell table:style-name="ce118" office:value-type="string" calcext:value-type="string">
            <text:p>BA shall be able to (soft) delete reqs.</text:p>
          </table:table-cell>
          <table:table-cell table:style-name="ce164" office:value-type="date" office:date-value="2014-05-15" calcext:value-type="date">
            <text:p>15/05/14</text:p>
          </table:table-cell>
          <table:table-cell table:style-name="ce178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4" calcext:value-type="float">
            <text:p>FR-104</text:p>
          </table:table-cell>
          <table:table-cell table:style-name="ce88" office:value-type="string" calcext:value-type="string">
            <text:p><text:s text:c="2"/>.hide</text:p>
          </table:table-cell>
          <table:table-cell table:style-name="ce113" office:value-type="string" calcext:value-type="string">
            <text:p>BA shall be able to hide deleted reqs from view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3" calcext:value-type="float">
            <text:p>FR-103</text:p>
          </table:table-cell>
          <table:table-cell table:style-name="ce88" office:value-type="string" calcext:value-type="string">
            <text:p><text:s text:c="2"/>.read</text:p>
          </table:table-cell>
          <table:table-cell table:style-name="ce113" office:value-type="string" calcext:value-type="string">
            <text:p>BA shall be able to read deleted reqs (usually in light grey and/or strikethrough)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6" calcext:value-type="float">
            <text:p>FR-106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3" office:value-type="string" calcext:value-type="string">
            <text:p>BA shall be able to restore deleted req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74" office:value-type="float" office:value="107" calcext:value-type="float">
            <text:p>FR-107</text:p>
          </table:table-cell>
          <table:table-cell table:style-name="ce88" office:value-type="string" calcext:value-type="string">
            <text:p><text:s text:c="5"/>.refs</text:p>
          </table:table-cell>
          <table:table-cell table:style-name="ce125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77"/>
          <table:table-cell table:style-name="ce91" office:value-type="string" calcext:value-type="string">
            <text:p>.reqtypes</text:p>
          </table:table-cell>
          <table:table-cell table:style-name="ce118" office:value-type="string" calcext:value-type="string">
            <text:p>Requirement Types</text:p>
          </table:table-cell>
          <table:table-cell table:style-name="ce164" office:value-type="date" office:date-value="2014-05-16" calcext:value-type="date">
            <text:p>16/05/14</text:p>
          </table:table-cell>
          <table:table-cell table:style-name="ce178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6" calcext:value-type="float">
            <text:p>FR-116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5" office:value-type="string" calcext:value-type="string">
            <text:p>BA shall be able to list all existing req type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7" calcext:value-type="float">
            <text:p>FR-117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add a new req type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8" calcext:value-type="float">
            <text:p>FR-118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modify a req type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9" calcext:value-type="float">
            <text:p>FR-11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15" office:value-type="string" calcext:value-type="string">
            <text:p>When a req type's mnemonic is changed, System shall appear to rename all refs that include the mnemonic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2" calcext:value-type="float">
            <text:p>FR-122</text:p>
          </table:table-cell>
          <table:table-cell table:style-name="ce88" office:value-type="string" calcext:value-type="string">
            <text:p><text:s text:c="4"/>.mnemonic</text:p>
          </table:table-cell>
          <table:table-cell table:style-name="ce115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0" calcext:value-type="float">
            <text:p>FR-120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1" calcext:value-type="float">
            <text:p>FR-121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5" office:value-type="string" calcext:value-type="string">
            <text:p>When listing req types, BA shall be able to see a summary of usage. (i.e. count of associated reqs)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3" calcext:value-type="float">
            <text:p>FR-123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5" office:value-type="string" calcext:value-type="string">
            <text:p>System shall hard-delete a req type only when it has never had any association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4" calcext:value-type="float">
            <text:p>FR-124</text:p>
          </table:table-cell>
          <table:table-cell table:style-name="ce90" office:value-type="string" calcext:value-type="string">
            <text:p><text:s text:c="4"/>.after</text:p>
          </table:table-cell>
          <table:table-cell table:style-name="ce122" office:value-type="string" calcext:value-type="string">
            <text:p>After soft-deletion, req types should move to the bin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5" calcext:value-type="float">
            <text:p>FR-1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22" office:value-type="string" calcext:value-type="string">
            <text:p>BA shall be able to restore req types from the bin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view</text:p>
          </table:table-cell>
          <table:table-cell table:style-name="ce118" office:value-type="string" calcext:value-type="string">
            <text:p>Req Table</text:p>
          </table:table-cell>
          <table:table-cell table:style-name="ce118" table:number-columns-repeated="2"/>
          <table:table-cell table:number-columns-repeated="1017"/>
        </table:table-row>
        <table:table-row table:style-name="ro5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4" calcext:value-type="float">
            <text:p>FR-84</text:p>
          </table:table-cell>
          <table:table-cell table:style-name="ce88" office:value-type="string" calcext:value-type="string">
            <text:p><text:s text:c="2"/>.rows</text:p>
          </table:table-cell>
          <table:table-cell table:style-name="ce113" office:value-type="string" calcext:value-type="string">
            <text:p>BA shall be able to view all reqs with each req on its own row. (Excludes subreqs: UC Fields &amp; UC Steps)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3" calcext:value-type="float">
            <text:p>FR-83</text:p>
          </table:table-cell>
          <table:table-cell table:style-name="ce88" office:value-type="string" calcext:value-type="string">
            <text:p><text:s text:c="2"/>.table</text:p>
          </table:table-cell>
          <table:table-cell table:style-name="ce113" office:value-type="string" calcext:value-type="string">
            <text:p>BA shall be able to view all reqs as a table/grid. (Excludes subreqs: UC Fields &amp; UC Steps)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68" calcext:value-type="float">
            <text:p>FR-268</text:p>
          </table:table-cell>
          <table:table-cell table:style-name="ce88" office:value-type="string" calcext:value-type="string">
            <text:p><text:s text:c="2"/>.filters</text:p>
          </table:table-cell>
          <table:table-cell table:style-name="ce115" office:value-type="string" calcext:value-type="string">
            <text:p>BA shall be able to filter req table contents. (See <text:span text:style-name="T2">Filtering</text:span> section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6" calcext:value-type="float">
            <text:p>FR-17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3" office:value-type="string" calcext:value-type="string">
            <text:p>BA shall be able to create new reqs. (Excludes subreqs: UC Fields &amp; UC Steps)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66" calcext:value-type="float">
            <text:p>FR-266</text:p>
          </table:table-cell>
          <table:table-cell table:style-name="ce90" office:value-type="string" calcext:value-type="string">
            <text:p><text:s text:c="4"/>.child</text:p>
          </table:table-cell>
          <table:table-cell table:style-name="ce113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3"/>
          <table:table-cell table:style-name="ce189" table:number-columns-repeated="2"/>
          <table:table-cell table:number-columns-repeated="1012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170" calcext:value-type="float">
            <text:p>FR-170</text:p>
          </table:table-cell>
          <table:table-cell table:style-name="ce90" office:value-type="string" calcext:value-type="string">
            <text:p><text:s text:c="2"/>.uc.semid</text:p>
          </table:table-cell>
          <table:table-cell table:style-name="ce113" office:value-type="string" calcext:value-type="string">
            <text:p>BA shall be able to perform on UCs, all semantic-ID related behaviour applicable to LL-req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2"/>.columns</text:p>
          </table:table-cell>
          <table:table-cell table:style-name="ce146" table:number-columns-repeated="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0" calcext:value-type="float">
            <text:p>FR-140</text:p>
          </table:table-cell>
          <table:table-cell table:style-name="ce88" office:value-type="string" calcext:value-type="string">
            <text:p><text:s text:c="4"/>.desc</text:p>
          </table:table-cell>
          <table:table-cell table:style-name="ce113" office:value-type="string" calcext:value-type="string">
            <text:p>In the LL-req table, System shall always display a column of req desc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38" calcext:value-type="float">
            <text:p>FR-138</text:p>
          </table:table-cell>
          <table:table-cell table:style-name="ce88" office:value-type="string" calcext:value-type="string">
            <text:p><text:s text:c="4"/>.ids</text:p>
          </table:table-cell>
          <table:table-cell table:style-name="ce113" office:value-type="string" calcext:value-type="string">
            <text:p>In the LL-req table, System shall always display a column of req ID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39" calcext:value-type="float">
            <text:p>FR-139</text:p>
          </table:table-cell>
          <table:table-cell table:style-name="ce88" office:value-type="string" calcext:value-type="string">
            <text:p><text:s text:c="4"/>.semid</text:p>
          </table:table-cell>
          <table:table-cell table:style-name="ce113" office:value-type="string" calcext:value-type="string">
            <text:p>In the LL-req table, System shall always display a column of semantic ID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5" calcext:value-type="float">
            <text:p>FR-95</text:p>
          </table:table-cell>
          <table:table-cell table:style-name="ce99" office:value-type="string" calcext:value-type="string">
            <text:p><text:s text:c="7"/>.dup</text:p>
          </table:table-cell>
          <table:table-cell table:style-name="ce113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4" calcext:value-type="float">
            <text:p>FR-94</text:p>
          </table:table-cell>
          <table:table-cell table:style-name="ce99" office:value-type="string" calcext:value-type="string">
            <text:p><text:s text:c="7"/>.indent</text:p>
          </table:table-cell>
          <table:table-cell table:style-name="ce113" office:value-type="string" calcext:value-type="string">
            <text:p>When rendering a tree of semantic IDs, System shall replace components also in the parent req, with indentation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3" calcext:value-type="float">
            <text:p>FR-93</text:p>
          </table:table-cell>
          <table:table-cell table:style-name="ce99" office:value-type="string" calcext:value-type="string">
            <text:p><text:s text:c="7"/>.tree</text:p>
          </table:table-cell>
          <table:table-cell table:style-name="ce113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37" calcext:value-type="float">
            <text:p>FR-137</text:p>
          </table:table-cell>
          <table:table-cell table:style-name="ce88" office:value-type="string" calcext:value-type="string">
            <text:p><text:s text:c="4"/>.sorted</text:p>
          </table:table-cell>
          <table:table-cell table:style-name="ce113" office:value-type="string" calcext:value-type="string">
            <text:p>In the LL-req table, System shall give each criterion in the sort criteria it's own column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2"/>.editor</text:p>
          </table:table-cell>
          <table:table-cell table:style-name="ce146" table:number-columns-repeated="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2" calcext:value-type="float">
            <text:p>FR-172</text:p>
          </table:table-cell>
          <table:table-cell table:style-name="ce90" office:value-type="string" calcext:value-type="string">
            <text:p><text:s text:c="4"/>.copy</text:p>
          </table:table-cell>
          <table:table-cell table:style-name="ce113" office:value-type="string" calcext:value-type="string">
            <text:p>BA shall be able to create a copy of 1 or more (selected) LL-req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3" calcext:value-type="float">
            <text:p>FR-173</text:p>
          </table:table-cell>
          <table:table-cell table:style-name="ce90" office:value-type="string" calcext:value-type="string">
            <text:p><text:s text:c="7"/>.selection</text:p>
          </table:table-cell>
          <table:table-cell table:style-name="ce113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4" calcext:value-type="float">
            <text:p>FR-174</text:p>
          </table:table-cell>
          <table:table-cell table:style-name="ce90" office:value-type="string" calcext:value-type="string">
            <text:p><text:s text:c="7"/>.semid</text:p>
          </table:table-cell>
          <table:table-cell table:style-name="ce113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5" calcext:value-type="float">
            <text:p>FR-85</text:p>
          </table:table-cell>
          <table:table-cell table:style-name="ce88" office:value-type="string" calcext:value-type="string">
            <text:p><text:s text:c="4"/>.cursor</text:p>
          </table:table-cell>
          <table:table-cell table:style-name="ce113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6" calcext:value-type="float">
            <text:p>FR-156</text:p>
          </table:table-cell>
          <table:table-cell table:style-name="ce90" office:value-type="string" calcext:value-type="string">
            <text:p><text:s text:c="4"/>.dups</text:p>
          </table:table-cell>
          <table:table-cell table:style-name="ce113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7" calcext:value-type="float">
            <text:p>FR-177</text:p>
          </table:table-cell>
          <table:table-cell table:style-name="ce97" office:value-type="string" calcext:value-type="string">
            <text:p><text:s text:c="2"/>.update</text:p>
          </table:table-cell>
          <table:table-cell table:style-name="ce147" office:value-type="string" calcext:value-type="string">
            <text:p>BA shall be able to update an existing LL-req.</text:p>
          </table:table-cell>
          <table:table-cell table:style-name="ce163" office:value-type="date" office:date-value="2014-05-22" calcext:value-type="date">
            <text:p>22/05/14</text:p>
          </table:table-cell>
          <table:table-cell table:style-name="ce147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8" calcext:value-type="float">
            <text:p>FR-178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When an LL-req is updated, System shall appear to rename all references to it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0" calcext:value-type="float">
            <text:p>FR-90</text:p>
          </table:table-cell>
          <table:table-cell table:style-name="ce88" office:value-type="string" calcext:value-type="string">
            <text:p><text:s text:c="4"/>.reqtype</text:p>
          </table:table-cell>
          <table:table-cell table:style-name="ce113" office:value-type="string" calcext:value-type="string">
            <text:p>BA shall be able to change the requirement type of a requirement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1" calcext:value-type="float">
            <text:p>FR-91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3" office:value-type="string" calcext:value-type="string">
            <text:p>When a req's type is changed and later changed back to what it was previously, System restore it's original ID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94" calcext:value-type="float">
            <text:p>FR-194</text:p>
          </table:table-cell>
          <table:table-cell table:style-name="ce88" office:value-type="string" calcext:value-type="string">
            <text:p><text:s text:c="6"/>.bulk</text:p>
          </table:table-cell>
          <table:table-cell table:style-name="ce113" office:value-type="string" calcext:value-type="string">
            <text:p>BA shall be able to set the req-type for multiple reqs simultaneously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7" calcext:value-type="float">
            <text:p>FR-97</text:p>
          </table:table-cell>
          <table:table-cell table:style-name="ce99" office:value-type="string" calcext:value-type="string">
            <text:p><text:s text:c="4"/>.semid</text:p>
          </table:table-cell>
          <table:table-cell table:style-name="ce113" office:value-type="string" calcext:value-type="string">
            <text:p>BA shall be able to modify the semantic IDs of existing req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3" calcext:value-type="float">
            <text:p>FR-143</text:p>
          </table:table-cell>
          <table:table-cell table:style-name="ce99" office:value-type="string" calcext:value-type="string">
            <text:p><text:s text:c="7"/>.0-n</text:p>
          </table:table-cell>
          <table:table-cell table:style-name="ce113" office:value-type="string" calcext:value-type="string">
            <text:p>BA shall be able to apply 0-n semantic IDs to LL-req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9" calcext:value-type="float">
            <text:p>FR-219</text:p>
          </table:table-cell>
          <table:table-cell table:style-name="ce99" office:value-type="string" calcext:value-type="string">
            <text:p><text:s text:c="7"/>.prevent.cyclic</text:p>
          </table:table-cell>
          <table:table-cell table:style-name="ce113" office:value-type="string" calcext:value-type="string">
            <text:p>System shall prevent a req's sem-ID transitively having itself as a child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20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6" calcext:value-type="float">
            <text:p>FR-96</text:p>
          </table:table-cell>
          <table:table-cell table:style-name="ce100" office:value-type="string" calcext:value-type="string">
            <text:p><text:s text:c="7"/>.show-all</text:p>
          </table:table-cell>
          <table:table-cell table:style-name="ce113" office:value-type="string" calcext:value-type="string">
            <text:p>BA shall be able to see all semantic IDs for a req with multiple, when editing a single row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7" calcext:value-type="float">
            <text:p>FR-167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3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8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8" calcext:value-type="float">
            <text:p>FR-168</text:p>
          </table:table-cell>
          <table:table-cell table:style-name="ce90" office:value-type="string" calcext:value-type="string">
            <text:p><text:s text:c="8"/>.no-common</text:p>
          </table:table-cell>
          <table:table-cell table:style-name="ce113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171" calcext:value-type="float">
            <text:p>FR-171</text:p>
          </table:table-cell>
          <table:table-cell table:style-name="ce90" office:value-type="string" calcext:value-type="string">
            <text:p><text:s text:c="4"/>.uc.title</text:p>
          </table:table-cell>
          <table:table-cell table:style-name="ce113" office:value-type="string" calcext:value-type="string">
            <text:p>BA shall be able to edit a UC title from the req view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9" calcext:value-type="float">
            <text:p>FR-179</text:p>
          </table:table-cell>
          <table:table-cell table:style-name="ce97" office:value-type="string" calcext:value-type="string">
            <text:p><text:s text:c="2"/>.delete</text:p>
          </table:table-cell>
          <table:table-cell table:style-name="ce148" office:value-type="string" calcext:value-type="string">
            <text:p>Able to (soft) delete LL-req.</text:p>
          </table:table-cell>
          <table:table-cell table:style-name="ce163" office:value-type="date" office:date-value="2014-05-22" calcext:value-type="date">
            <text:p>22/05/14</text:p>
          </table:table-cell>
          <table:table-cell table:style-name="ce147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0" calcext:value-type="float">
            <text:p>FR-180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LL-req deletion, user shall be able to see a count of incoming reference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1" calcext:value-type="float">
            <text:p>FR-181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LL-req deletion, user shall be able to see each instance of incoming reference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2" calcext:value-type="float">
            <text:p>FR-182</text:p>
          </table:table-cell>
          <table:table-cell table:style-name="ce88" office:value-type="string" calcext:value-type="string">
            <text:p><text:s text:c="4"/>.bin</text:p>
          </table:table-cell>
          <table:table-cell table:style-name="ce115" office:value-type="string" calcext:value-type="string">
            <text:p>After LL-req deletion, System shall move entity to the bin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3" calcext:value-type="float">
            <text:p>FR-183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LL-req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4" calcext:value-type="float">
            <text:p>FR-184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7" office:value-type="string" calcext:value-type="string">
            <text:p>Upon LL-req restoration, previous values and associations shall be restored also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2"/>.sort</text:p>
          </table:table-cell>
          <table:table-cell table:style-name="ce146" table:number-columns-repeated="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8" calcext:value-type="float">
            <text:p>FR-98</text:p>
          </table:table-cell>
          <table:table-cell table:style-name="ce88" office:value-type="string" calcext:value-type="string">
            <text:p><text:s text:c="4"/>.default</text:p>
          </table:table-cell>
          <table:table-cell table:style-name="ce113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9" calcext:value-type="float">
            <text:p>FR-109</text:p>
          </table:table-cell>
          <table:table-cell table:style-name="ce88" office:value-type="string" calcext:value-type="string">
            <text:p><text:s text:c="4"/>.on-change</text:p>
          </table:table-cell>
          <table:table-cell table:style-name="ce113" office:value-type="string" calcext:value-type="string">
            <text:p>When a req is modified, System shall automatically resort the view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0" calcext:value-type="float">
            <text:p>FR-110</text:p>
          </table:table-cell>
          <table:table-cell table:style-name="ce88" office:value-type="string" calcext:value-type="string">
            <text:p><text:s text:c="4"/>.post-change</text:p>
          </table:table-cell>
          <table:table-cell table:style-name="ce125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9" calcext:value-type="float">
            <text:p>FR-99</text:p>
          </table:table-cell>
          <table:table-cell table:style-name="ce88" office:value-type="string" calcext:value-type="string">
            <text:p><text:s text:c="4"/>.custom</text:p>
          </table:table-cell>
          <table:table-cell table:style-name="ce113" office:value-type="string" calcext:value-type="string">
            <text:p>BA shall be able to customise sort logic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5" calcext:value-type="float">
            <text:p>MF-05</text:p>
          </table:table-cell>
          <table:table-cell table:style-name="ce74" office:value-type="float" office:value="141" calcext:value-type="float">
            <text:p>FR-141</text:p>
          </table:table-cell>
          <table:table-cell table:style-name="ce88" office:value-type="string" calcext:value-type="string">
            <text:p><text:s text:c="7"/>.fields</text:p>
          </table:table-cell>
          <table:table-cell table:style-name="ce113" office:value-type="string" calcext:value-type="string">
            <text:p>BA shall be able to use custom fields in the sort criteria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1017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MF-07</text:p>
            <text:p>MF-13</text:p>
          </table:table-cell>
          <table:table-cell table:style-name="ce74" office:value-type="float" office:value="203" calcext:value-type="float">
            <text:p>FR-203</text:p>
          </table:table-cell>
          <table:table-cell table:style-name="ce88" office:value-type="string" calcext:value-type="string">
            <text:p><text:s text:c="7"/>.grouping-order</text:p>
          </table:table-cell>
          <table:table-cell table:style-name="ce113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0" calcext:value-type="float">
            <text:p>FR-100</text:p>
          </table:table-cell>
          <table:table-cell table:style-name="ce88" office:value-type="string" calcext:value-type="string">
            <text:p><text:s text:c="7"/>.mult</text:p>
          </table:table-cell>
          <table:table-cell table:style-name="ce113" office:value-type="string" calcext:value-type="string">
            <text:p>BA shall be able to sort by multiple, ordered column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8" calcext:value-type="float">
            <text:p>FR-108</text:p>
          </table:table-cell>
          <table:table-cell table:style-name="ce88" office:value-type="string" calcext:value-type="string">
            <text:p><text:s text:c="7"/>.off</text:p>
          </table:table-cell>
          <table:table-cell table:style-name="ce113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refs</text:p>
          </table:table-cell>
          <table:table-cell table:style-name="ce118" office:value-type="string" calcext:value-type="string">
            <text:p>Refs</text:p>
          </table:table-cell>
          <table:table-cell table:style-name="ce118" table:number-columns-repeated="2"/>
          <table:table-cell table:number-columns-repeated="1017"/>
        </table:table-row>
        <table:table-row table:style-name="ro22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2" calcext:value-type="float">
            <text:p>FR-152</text:p>
          </table:table-cell>
          <table:table-cell table:style-name="ce88" office:value-type="string" calcext:value-type="string">
            <text:p><text:s text:c="2"/>.disp.sem</text:p>
          </table:table-cell>
          <table:table-cell table:style-name="ce113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3" calcext:value-type="float">
            <text:p>FR-153</text:p>
          </table:table-cell>
          <table:table-cell table:style-name="ce88" office:value-type="string" calcext:value-type="string">
            <text:p><text:s text:c="2"/>.disp.sem.short</text:p>
          </table:table-cell>
          <table:table-cell table:style-name="ce113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1" calcext:value-type="float">
            <text:p>FR-151</text:p>
          </table:table-cell>
          <table:table-cell table:style-name="ce88" office:value-type="string" calcext:value-type="string">
            <text:p><text:s text:c="2"/>.disp.uniq</text:p>
          </table:table-cell>
          <table:table-cell table:style-name="ce113" office:value-type="string" calcext:value-type="string">
            <text:p>For LL-req refs made using unique ID, System shall render the ref using unique ID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5" calcext:value-type="float">
            <text:p>FR-155</text:p>
          </table:table-cell>
          <table:table-cell table:style-name="ce88" office:value-type="string" calcext:value-type="string">
            <text:p><text:s text:c="2"/>.parse.sem</text:p>
          </table:table-cell>
          <table:table-cell table:style-name="ce113" office:value-type="string" calcext:value-type="string">
            <text:p>Where BA can specify refs to LL-reqs, BA can specify using a semantic ID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23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4" calcext:value-type="float">
            <text:p>FR-154</text:p>
          </table:table-cell>
          <table:table-cell table:style-name="ce88" office:value-type="string" calcext:value-type="string">
            <text:p><text:s text:c="2"/>.parse.sem.short</text:p>
          </table:table-cell>
          <table:table-cell table:style-name="ce113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1" calcext:value-type="float">
            <text:p>FR-101</text:p>
          </table:table-cell>
          <table:table-cell table:style-name="ce88" office:value-type="string" calcext:value-type="string">
            <text:p><text:s text:c="2"/>.parse.uniq</text:p>
          </table:table-cell>
          <table:table-cell table:style-name="ce113" office:value-type="string" calcext:value-type="string">
            <text:p>Where BA can specify refs to LL-reqs, BA can specify using a numeric/unique ID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3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.shr</text:p>
          </table:table-cell>
          <table:table-cell table:style-name="ce118" office:value-type="string" calcext:value-type="string">
            <text:p>SHR (Semantic Header Row)</text:p>
          </table:table-cell>
          <table:table-cell table:style-name="ce167"/>
          <table:table-cell table:style-name="ce118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4" calcext:value-type="float">
            <text:p>FR-144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3" office:value-type="string" calcext:value-type="string">
            <text:p>BA shall be able to create an SHR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6" calcext:value-type="float">
            <text:p>FR-146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update only two attributes of an SHR: {sem-ID, desc}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9" calcext:value-type="float">
            <text:p>FR-149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5" office:value-type="string" calcext:value-type="string">
            <text:p>When the sem-ID of an SHR changes, System shall rename the matching portion of childrens' sem-ID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5" calcext:value-type="float">
            <text:p>FR-17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When an SHR's semID is modified, System shall appear to rename all references to it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7" calcext:value-type="float">
            <text:p>FR-147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3" office:value-type="string" calcext:value-type="string">
            <text:p>BA shall be able to (hard) delete an SHR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43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.token</text:p>
          </table:table-cell>
          <table:table-cell table:style-name="ce118" office:value-type="string" calcext:value-type="string">
            <text:p>Text Tokens</text:p>
          </table:table-cell>
          <table:table-cell table:style-name="ce167"/>
          <table:table-cell table:style-name="ce179" office:value-type="string" calcext:value-type="string">
            <text:p>Is this really the best idea?</text:p>
          </table:table-cell>
          <table:table-cell table:style-name="ce186"/>
          <table:table-cell table:number-columns-repeated="2"/>
          <table:table-cell table:style-name="ce186" table:number-columns-repeated="2"/>
          <table:table-cell table:number-columns-repeated="1012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7" calcext:value-type="float">
            <text:p>FR-157</text:p>
          </table:table-cell>
          <table:table-cell table:style-name="ce92" office:value-type="string" calcext:value-type="string">
            <text:p><text:s text:c="2"/>.create</text:p>
          </table:table-cell>
          <table:table-cell table:style-name="ce92" office:value-type="string" calcext:value-type="string">
            <text:p>BA shall be able to define text-toke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3"/>
          <table:table-cell table:style-name="ce186" table:number-columns-repeated="2"/>
          <table:table-cell table:number-columns-repeated="1012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8" calcext:value-type="float">
            <text:p>FR-158</text:p>
          </table:table-cell>
          <table:table-cell table:style-name="ce92" office:value-type="string" calcext:value-type="string">
            <text:p><text:s text:c="2"/>.list</text:p>
          </table:table-cell>
          <table:table-cell table:style-name="ce115" office:value-type="string" calcext:value-type="string">
            <text:p>BA shall be able to list all existing text-toke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style-name="ce186" table:number-columns-repeated="2"/>
          <table:table-cell table:number-columns-repeated="1012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9" calcext:value-type="float">
            <text:p>FR-159</text:p>
          </table:table-cell>
          <table:table-cell table:style-name="ce92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modify text-toke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0" calcext:value-type="float">
            <text:p>FR-160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System shall appear to rename all references after a text-token key is renamed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1" calcext:value-type="float">
            <text:p>FR-16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hard) delete text-toke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2" calcext:value-type="float">
            <text:p>FR-16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text-token deletion, BA shall be able to see a summary of usage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3" calcext:value-type="float">
            <text:p>FR-16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text-token deletion, BA shall be able to see each datem using the text-token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4" calcext:value-type="float">
            <text:p>FR-164</text:p>
          </table:table-cell>
          <table:table-cell table:style-name="ce90" office:value-type="string" calcext:value-type="string">
            <text:p><text:s text:c="2"/>.use</text:p>
          </table:table-cell>
          <table:table-cell table:style-name="ce92" office:value-type="string" calcext:value-type="string">
            <text:p>BA shall be able to insert text-tokens in req text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5" calcext:value-type="float">
            <text:p>FR-165</text:p>
          </table:table-cell>
          <table:table-cell table:style-name="ce90" office:value-type="string" calcext:value-type="string">
            <text:p><text:s text:c="4"/>.render</text:p>
          </table:table-cell>
          <table:table-cell table:style-name="ce113" office:value-type="string" calcext:value-type="string">
            <text:p>When rendering a req value, System shall replace text-tokens with their token-value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6" calcext:value-type="float">
            <text:p>FR-166</text:p>
          </table:table-cell>
          <table:table-cell table:style-name="ce90" office:value-type="string" calcext:value-type="string">
            <text:p><text:s text:c="4"/>.edit</text:p>
          </table:table-cell>
          <table:table-cell table:style-name="ce113" office:value-type="string" calcext:value-type="string">
            <text:p>When editing a req value, System shall display text-tokens (i.e. not expanded with their token-values)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8" office:value-type="float" office:value="13" calcext:value-type="float">
            <text:p>MF-13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/>
          <table:table-cell table:style-name="ce112" office:value-type="string" calcext:value-type="string">
            <text:p>MF-13: Requirement Relationships</text:p>
          </table:table-cell>
          <table:table-cell table:style-name="ce112" table:number-columns-repeated="2"/>
          <table:table-cell table:number-columns-repeated="1017"/>
        </table:table-row>
        <table:table-row table:style-name="ro24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41" calcext:value-type="float">
            <text:p>FR-241</text:p>
          </table:table-cell>
          <table:table-cell table:style-name="ce88" office:value-type="string" calcext:value-type="string">
            <text:p>.browse-as-grouping</text:p>
          </table:table-cell>
          <table:table-cell table:style-name="ce113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74" office:value-type="float" office:value="206" calcext:value-type="float">
            <text:p>FR-206</text:p>
          </table:table-cell>
          <table:table-cell table:style-name="ce88" office:value-type="string" calcext:value-type="string">
            <text:p>.mandatory-bulkset</text:p>
          </table:table-cell>
          <table:table-cell table:style-name="ce113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style-name="ce162" office:value-type="date" office:date-value="2014-06-22" calcext:value-type="date">
            <text:p>2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3" calcext:value-type="float">
            <text:p>MF-1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18" office:value-type="string" calcext:value-type="string">
            <text:p>Data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74" office:value-type="float" office:value="205" calcext:value-type="float">
            <text:p>FR-205</text:p>
          </table:table-cell>
          <table:table-cell table:style-name="ce88" office:value-type="string" calcext:value-type="string">
            <text:p><text:s text:c="2"/>.mandatoryness</text:p>
          </table:table-cell>
          <table:table-cell table:style-name="ce113" office:value-type="string" calcext:value-type="string">
            <text:p>BA shall be able to specify, for each req-type, whether an implication is required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99" calcext:value-type="float">
            <text:p>FR-199</text:p>
          </table:table-cell>
          <table:table-cell table:style-name="ce88" office:value-type="string" calcext:value-type="string">
            <text:p><text:s text:c="2"/>.sym</text:p>
          </table:table-cell>
          <table:table-cell table:style-name="ce113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4">ie. if A⇒B, then B⇐A.</text:span>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00" calcext:value-type="float">
            <text:p>FR-200</text:p>
          </table:table-cell>
          <table:table-cell table:style-name="ce88" office:value-type="string" calcext:value-type="string">
            <text:p><text:s text:c="2"/>.trans</text:p>
          </table:table-cell>
          <table:table-cell table:style-name="ce113" office:value-type="string" calcext:value-type="string">
            <text:p>System shall handle all implications transitively.</text:p>
            <text:p><text:span text:style-name="T4">i.e. if A⇒B ∧ B⇒C then A⇒C.</text:span>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72" calcext:value-type="float">
            <text:p>FR-272</text:p>
          </table:table-cell>
          <table:table-cell table:style-name="ce88" office:value-type="string" calcext:value-type="string">
            <text:p><text:s text:c="2"/>.subreq-trans</text:p>
          </table:table-cell>
          <table:table-cell table:style-name="ce115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0" calcext:value-type="float">
            <text:p>FR-210</text:p>
          </table:table-cell>
          <table:table-cell table:style-name="ce88" office:value-type="string" calcext:value-type="string">
            <text:p><text:s text:c="2"/>.prevent.refl</text:p>
          </table:table-cell>
          <table:table-cell table:style-name="ce113" office:value-type="string" calcext:value-type="string">
            <text:p>System shall prevent a req implying itself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1" calcext:value-type="float">
            <text:p>FR-211</text:p>
          </table:table-cell>
          <table:table-cell table:style-name="ce88" office:value-type="string" calcext:value-type="string">
            <text:p><text:s text:c="2"/>.prevent.cyclic</text:p>
          </table:table-cell>
          <table:table-cell table:style-name="ce113" office:value-type="string" calcext:value-type="string">
            <text:p>System shall prevent a req transitively implying itself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3" calcext:value-type="float">
            <text:p>MF-13</text:p>
          </table:table-cell>
          <table:table-cell table:style-name="ce41"/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req</text:p>
          </table:table-cell>
          <table:table-cell table:style-name="ce118" office:value-type="string" calcext:value-type="string">
            <text:p>Reqs</text:p>
          </table:table-cell>
          <table:table-cell table:style-name="ce118" table:number-columns-repeated="2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04" calcext:value-type="float">
            <text:p>FR-204</text:p>
          </table:table-cell>
          <table:table-cell table:style-name="ce88" office:value-type="string" calcext:value-type="string">
            <text:p><text:s text:c="2"/>.new-auto</text:p>
          </table:table-cell>
          <table:table-cell table:style-name="ce113" office:value-type="string" calcext:value-type="string">
            <text:p>BA shall be able to specify an implying req once, and have it apply to subsequently created reqs. [SI-1]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197" calcext:value-type="float">
            <text:p>FR-197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3" office:value-type="string" calcext:value-type="string">
            <text:p>BA shall be able to indicate that a req implies other req(s). (Includes subreqs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74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198" calcext:value-type="float">
            <text:p>FR-198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3" office:value-type="string" calcext:value-type="string">
            <text:p>BA shall be able to indicate that a req is implied by other req(s). (Includes subreqs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74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09" calcext:value-type="float">
            <text:p>FR-209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3" office:value-type="string" calcext:value-type="string">
            <text:p>When viewing a req, BA shall be able to see reqs that imply it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08" calcext:value-type="float">
            <text:p>FR-208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3" office:value-type="string" calcext:value-type="string">
            <text:p>When viewing a req, BA shall be able to see reqs that it implies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13" calcext:value-type="float">
            <text:p>FR-213</text:p>
          </table:table-cell>
          <table:table-cell table:style-name="ce88" office:value-type="string" calcext:value-type="string">
            <text:p><text:s text:c="2"/>.view.del</text:p>
          </table:table-cell>
          <table:table-cell table:style-name="ce113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12" calcext:value-type="float">
            <text:p>FR-212</text:p>
          </table:table-cell>
          <table:table-cell table:style-name="ce88" office:value-type="string" calcext:value-type="string">
            <text:p><text:s text:c="2"/>.deletion</text:p>
          </table:table-cell>
          <table:table-cell table:style-name="ce113" office:value-type="string" calcext:value-type="string">
            <text:p>When a req is deleted, System shall retain its implication relationships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4" calcext:value-type="float">
            <text:p>FR-214</text:p>
          </table:table-cell>
          <table:table-cell table:style-name="ce88" office:value-type="string" calcext:value-type="string">
            <text:p><text:s text:c="5"/>.prompt-implied</text:p>
          </table:table-cell>
          <table:table-cell table:style-name="ce113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5" calcext:value-type="float">
            <text:p>FR-215</text:p>
          </table:table-cell>
          <table:table-cell table:style-name="ce88" office:value-type="string" calcext:value-type="string">
            <text:p><text:s text:c="5"/>.prompt-intersect</text:p>
          </table:table-cell>
          <table:table-cell table:style-name="ce113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6" calcext:value-type="float">
            <text:p>FR-216</text:p>
          </table:table-cell>
          <table:table-cell table:style-name="ce88" office:value-type="string" calcext:value-type="string">
            <text:p><text:s text:c="5"/>.select-implied</text:p>
          </table:table-cell>
          <table:table-cell table:style-name="ce113" office:value-type="string" calcext:value-type="string">
            <text:p>When deleting a req, BA shall be able to delete a subset of implied reqs. [FR-214,215]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17" calcext:value-type="float">
            <text:p>FR-217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3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18" calcext:value-type="float">
            <text:p>FR-218</text:p>
          </table:table-cell>
          <table:table-cell table:style-name="ce88" office:value-type="string" calcext:value-type="string">
            <text:p><text:s text:c="5"/>.cascade</text:p>
          </table:table-cell>
          <table:table-cell table:style-name="ce113" office:value-type="string" calcext:value-type="string">
            <text:p>When restoring a req, BA shall be able to restore a subset of implied reqs. [FR-217]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 office:value-type="float" office:value="1" calcext:value-type="float">
            <text:p>MF-01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uc-steps</text:p>
          </table:table-cell>
          <table:table-cell table:style-name="ce118" office:value-type="string" calcext:value-type="string">
            <text:p>UC Steps</text:p>
          </table:table-cell>
          <table:table-cell table:style-name="ce118" table:number-columns-repeated="2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42" calcext:value-type="float">
            <text:p>FR-242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3" office:value-type="string" calcext:value-type="string">
            <text:p>BA shall be able to indicate that a UC-step implies other req(s)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74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43" calcext:value-type="float">
            <text:p>FR-243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3" office:value-type="string" calcext:value-type="string">
            <text:p>BA shall be able to indicate that a UC-step is implied by other req(s)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74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44" calcext:value-type="float">
            <text:p>FR-244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3" office:value-type="string" calcext:value-type="string">
            <text:p>When viewing a UC-step, BA shall be able to see reqs that imply it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45" calcext:value-type="float">
            <text:p>FR-245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3" office:value-type="string" calcext:value-type="string">
            <text:p>When viewing a UC-step, BA shall be able to see reqs that it implie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4" table:number-columns-repeated="3"/>
          <table:table-cell table:style-name="ce101"/>
          <table:table-cell table:style-name="ce149" office:value-type="string" calcext:value-type="string">
            <text:p>Misc Requirements</text:p>
          </table:table-cell>
          <table:table-cell table:style-name="ce168" table:number-columns-repeated="2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39"/>
          <table:table-cell table:style-name="ce74" office:value-type="float" office:value="24" calcext:value-type="float">
            <text:p>FR-24</text:p>
          </table:table-cell>
          <table:table-cell table:style-name="ce88" office:value-type="string" calcext:value-type="string">
            <text:p>readuc.grouping.all</text:p>
          </table:table-cell>
          <table:table-cell table:style-name="ce115" office:value-type="string" calcext:value-type="string">
            <text:p>When reading a UC, the reader shall be able to see all groupings applied to the UC.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2" calcext:value-type="float">
            <text:p>MF-02</text:p>
          </table:table-cell>
          <table:table-cell table:style-name="ce82" office:value-type="float" office:value="21" calcext:value-type="float">
            <text:p>FR-21</text:p>
          </table:table-cell>
          <table:table-cell table:style-name="ce88" office:value-type="string" calcext:value-type="string">
            <text:p>shares.read.filter</text:p>
          </table:table-cell>
          <table:table-cell table:style-name="ce150" office:value-type="string" calcext:value-type="string">
            <text:p>When reading shared UCs, AnonReader shall be able to filter UCs by groupings. [Pri=Nice]</text:p>
          </table:table-cell>
          <table:table-cell table:style-name="ce169" office:value-type="date" office:date-value="2014-02-07" calcext:value-type="date">
            <text:p>07/02/14</text:p>
          </table:table-cell>
          <table:table-cell table:style-name="ce152"/>
          <table:table-cell table:number-columns-repeated="1017"/>
        </table:table-row>
        <table:table-row table:style-name="ro5">
          <table:table-cell table:number-columns-repeated="2" table:style-name="ce48" office:value-type="string" calcext:value-type="string">
            <text:p>-</text:p>
          </table:table-cell>
          <table:table-cell table:style-name="ce74" office:value-type="float" office:value="248" calcext:value-type="float">
            <text:p>FR-248</text:p>
          </table:table-cell>
          <table:table-cell table:style-name="ce88" office:value-type="string" calcext:value-type="string">
            <text:p>changelog</text:p>
          </table:table-cell>
          <table:table-cell table:style-name="ce115" office:value-type="string" calcext:value-type="string">
            <text:p>BA shall be able to see a change log, a list of changes ordered chronologically with most recent first.</text:p>
          </table:table-cell>
          <table:table-cell table:style-name="ce162" office:value-type="date" office:date-value="2014-06-06" calcext:value-type="date">
            <text:p>06/06/14</text:p>
          </table:table-cell>
          <table:table-cell table:style-name="ce152"/>
          <table:table-cell table:number-columns-repeated="1017"/>
        </table:table-row>
        <table:table-row table:style-name="ro4">
          <table:table-cell table:number-columns-repeated="3" table:style-name="ce50" office:value-type="string" calcext:value-type="string">
            <text:p>-</text:p>
          </table:table-cell>
          <table:table-cell table:style-name="ce102" office:value-type="string" calcext:value-type="string">
            <text:p>.filter</text:p>
          </table:table-cell>
          <table:table-cell table:style-name="ce116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116" table:number-columns-repeated="2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39"/>
          <table:table-cell table:style-name="ce74" office:value-type="float" office:value="51" calcext:value-type="float">
            <text:p>FR-51</text:p>
          </table:table-cell>
          <table:table-cell table:style-name="ce88" office:value-type="string" calcext:value-type="string">
            <text:p><text:s text:c="2"/>.inc-type</text:p>
          </table:table-cell>
          <table:table-cell table:style-name="ce115" office:value-type="string" calcext:value-type="string">
            <text:p>BA shall be able to filter by incompletion type(s).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51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74" office:value-type="float" office:value="112" calcext:value-type="float">
            <text:p>FR-112</text:p>
          </table:table-cell>
          <table:table-cell table:style-name="ce88" office:value-type="string" calcext:value-type="string">
            <text:p><text:s text:c="2"/>.req-type</text:p>
          </table:table-cell>
          <table:table-cell table:style-name="ce115" office:value-type="string" calcext:value-type="string">
            <text:p>BA shall be able to filter by requirement type(s). (Excludes subreq-types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51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74" office:value-type="float" office:value="271" calcext:value-type="float">
            <text:p>FR-27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74" office:value-type="float" office:value="201" calcext:value-type="float">
            <text:p>FR-201</text:p>
          </table:table-cell>
          <table:table-cell table:style-name="ce88" office:value-type="string" calcext:value-type="string">
            <text:p><text:s text:c="2"/>.implied</text:p>
          </table:table-cell>
          <table:table-cell table:style-name="ce113" office:value-type="string" calcext:value-type="string">
            <text:p>BA shall be able to filter by implying req(s).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74" office:value-type="float" office:value="273" calcext:value-type="float">
            <text:p>FR-273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50" calcext:value-type="float">
            <text:p>FR-50</text:p>
          </table:table-cell>
          <table:table-cell table:style-name="ce88" office:value-type="string" calcext:value-type="string">
            <text:p><text:s text:c="2"/>.grouping</text:p>
          </table:table-cell>
          <table:table-cell table:style-name="ce115" office:value-type="string" calcext:value-type="string">
            <text:p>BA shall be able to filter by grouping(s).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270" calcext:value-type="float">
            <text:p>FR-270</text:p>
          </table:table-cell>
          <table:table-cell table:style-name="ce88" office:value-type="string" calcext:value-type="string">
            <text:p><text:s text:c="4"/>.trans</text:p>
          </table:table-cell>
          <table:table-cell table:style-name="ce115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8" calcext:value-type="float">
            <text:p>FR-28</text:p>
          </table:table-cell>
          <table:table-cell table:style-name="ce88" office:value-type="string" calcext:value-type="string">
            <text:p><text:s text:c="4"/>.not</text:p>
          </table:table-cell>
          <table:table-cell table:style-name="ce115" office:value-type="string" calcext:value-type="string">
            <text:p>When specifying a grouping filter, User shall be able to specify NOT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9" calcext:value-type="float">
            <text:p>FR-29</text:p>
          </table:table-cell>
          <table:table-cell table:style-name="ce88" office:value-type="string" calcext:value-type="string">
            <text:p><text:s text:c="4"/>.and</text:p>
          </table:table-cell>
          <table:table-cell table:style-name="ce115" office:value-type="string" calcext:value-type="string">
            <text:p>When specifying a grouping filter, User shall be able to specify AND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30" calcext:value-type="float">
            <text:p>FR-30</text:p>
          </table:table-cell>
          <table:table-cell table:style-name="ce88" office:value-type="string" calcext:value-type="string">
            <text:p><text:s text:c="4"/>.or</text:p>
          </table:table-cell>
          <table:table-cell table:style-name="ce115" office:value-type="string" calcext:value-type="string">
            <text:p>When specifying a grouping filter, User shall be able to specify OR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8" calcext:value-type="float">
            <text:p>FR-88</text:p>
          </table:table-cell>
          <table:table-cell table:style-name="ce88" office:value-type="string" calcext:value-type="string">
            <text:p><text:s text:c="2"/>.txt</text:p>
          </table:table-cell>
          <table:table-cell table:style-name="ce113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3"/>
          <table:table-cell table:number-columns-repeated="1017"/>
        </table:table-row>
        <table:table-row table:style-name="ro19">
          <table:table-cell table:number-columns-repeated="2"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revnum</text:p>
          </table:table-cell>
          <table:table-cell table:style-name="ce118" office:value-type="string" calcext:value-type="string">
            <text:p>Revision numbers</text:p>
          </table:table-cell>
          <table:table-cell table:style-name="ce118" table:number-columns-repeated="2"/>
          <table:table-cell table:number-columns-repeated="1017"/>
        </table:table-row>
        <table:table-row table:style-name="ro4">
          <table:table-cell table:style-name="ce48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6" calcext:value-type="float">
            <text:p>FR-26</text:p>
          </table:table-cell>
          <table:table-cell table:style-name="ce88" office:value-type="string" calcext:value-type="string">
            <text:p><text:s text:c="2"/>.if</text:p>
          </table:table-cell>
          <table:table-cell table:style-name="ce115" office:value-type="string" calcext:value-type="string">
            <text:p>System shall increment the revision number of a requirement anytime <text:span text:style-name="T2">any</text:span><text:span text:style-name="T7"> user-observable change occurs, including field ordering changes, grouping renames, etc.</text:span>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48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7" calcext:value-type="float">
            <text:p>FR-27</text:p>
          </table:table-cell>
          <table:table-cell table:style-name="ce88" office:value-type="string" calcext:value-type="string">
            <text:p><text:s text:c="2"/>.onlyif</text:p>
          </table:table-cell>
          <table:table-cell table:style-name="ce115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4">
          <table:table-cell table:number-columns-repeated="2" table:style-name="ce48" office:value-type="string" calcext:value-type="string">
            <text:p>-</text:p>
          </table:table-cell>
          <table:table-cell table:style-name="ce74" office:value-type="float" office:value="75" calcext:value-type="float">
            <text:p>FR-75</text:p>
          </table:table-cell>
          <table:table-cell table:style-name="ce88" office:value-type="string" calcext:value-type="string">
            <text:p><text:s text:c="2"/>.major</text:p>
          </table:table-cell>
          <table:table-cell table:style-name="ce115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5"/>
          <table:table-cell table:number-columns-repeated="1017"/>
        </table:table-row>
        <table:table-row table:style-name="ro4">
          <table:table-cell table:number-columns-repeated="2" table:style-name="ce48" office:value-type="string" calcext:value-type="string">
            <text:p>-</text:p>
          </table:table-cell>
          <table:table-cell table:style-name="ce74" office:value-type="float" office:value="76" calcext:value-type="float">
            <text:p>FR-76</text:p>
          </table:table-cell>
          <table:table-cell table:style-name="ce88" office:value-type="string" calcext:value-type="string">
            <text:p><text:s text:c="2"/>.minor</text:p>
          </table:table-cell>
          <table:table-cell table:style-name="ce115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53"/>
          <table:table-cell table:style-name="ce62" table:number-columns-repeated="2"/>
          <table:table-cell table:style-name="ce103"/>
          <table:table-cell table:style-name="ce151" office:value-type="string" calcext:value-type="string">
            <text:p>Deleted or Deferred Requirements</text:p>
          </table:table-cell>
          <table:table-cell table:style-name="ce170" table:number-columns-repeated="2"/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2" office:value-type="float" office:value="36" calcext:value-type="float">
            <text:p>FR-36</text:p>
          </table:table-cell>
          <table:table-cell table:style-name="ce104" office:value-type="string" calcext:value-type="string">
            <text:p><text:s text:c="2"/>.count</text:p>
          </table:table-cell>
          <table:table-cell table:style-name="ce152" office:value-type="string" calcext:value-type="string">
            <text:p>System shall display the number of reqs associated with each grouping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/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2" office:value-type="float" office:value="37" calcext:value-type="float">
            <text:p>FR-37</text:p>
          </table:table-cell>
          <table:table-cell table:style-name="ce104" office:value-type="string" calcext:value-type="string">
            <text:p><text:s text:c="2"/>.missing</text:p>
          </table:table-cell>
          <table:table-cell table:style-name="ce152" office:value-type="string" calcext:value-type="string">
            <text:p>System shall display the number of reqs to which the top-level grouping is not applied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/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3" calcext:value-type="float">
            <text:p>MF-03</text:p>
          </table:table-cell>
          <table:table-cell table:style-name="ce82" office:value-type="float" office:value="38" calcext:value-type="float">
            <text:p>FR-38</text:p>
          </table:table-cell>
          <table:table-cell table:style-name="ce104" office:value-type="string" calcext:value-type="string">
            <text:p><text:s text:c="2"/>.read-ucs</text:p>
          </table:table-cell>
          <table:table-cell table:style-name="ce152" office:value-type="string" calcext:value-type="string">
            <text:p>BA shall be able to read all UCs with a given grouping applied.</text:p>
          </table:table-cell>
          <table:table-cell table:style-name="ce169" office:value-type="date" office:date-value="2014-02-13" calcext:value-type="date">
            <text:p>13/02/14</text:p>
          </table:table-cell>
          <table:table-cell table:style-name="ce152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3" calcext:value-type="float">
            <text:p>MF-03</text:p>
          </table:table-cell>
          <table:table-cell table:style-name="ce82" office:value-type="float" office:value="39" calcext:value-type="float">
            <text:p>FR-39</text:p>
          </table:table-cell>
          <table:table-cell table:style-name="ce104" office:value-type="string" calcext:value-type="string">
            <text:p><text:s text:c="2"/>.read-steps</text:p>
          </table:table-cell>
          <table:table-cell table:style-name="ce152" office:value-type="string" calcext:value-type="string">
            <text:p>BA shall be able to read all UC steps with a given grouping applied.</text:p>
          </table:table-cell>
          <table:table-cell table:style-name="ce169" office:value-type="date" office:date-value="2014-02-13" calcext:value-type="date">
            <text:p>13/02/14</text:p>
          </table:table-cell>
          <table:table-cell table:style-name="ce152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2" calcext:value-type="float">
            <text:p>MF-02</text:p>
          </table:table-cell>
          <table:table-cell table:style-name="ce82" office:value-type="float" office:value="11" calcext:value-type="float">
            <text:p>FR-11</text:p>
          </table:table-cell>
          <table:table-cell table:style-name="ce104" office:value-type="string" calcext:value-type="string">
            <text:p><text:s text:c="4"/>.shares</text:p>
          </table:table-cell>
          <table:table-cell table:style-name="ce152" office:value-type="string" calcext:value-type="string">
            <text:p>BA shall be able to filter shares' UC selection criteria by groupings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/>
          <table:table-cell table:style-name="ce82" office:value-type="float" office:value="20" calcext:value-type="float">
            <text:p>FR-20</text:p>
          </table:table-cell>
          <table:table-cell table:style-name="ce104" office:value-type="string" calcext:value-type="string">
            <text:p><text:s text:c="4"/>.readown</text:p>
          </table:table-cell>
          <table:table-cell table:style-name="ce152" office:value-type="string" calcext:value-type="string">
            <text:p>When reading own UCs, BA shall be able to filter UCs by groupings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/>
          <table:table-cell table:style-name="ce82" office:value-type="float" office:value="12" calcext:value-type="float">
            <text:p>FR-12</text:p>
          </table:table-cell>
          <table:table-cell table:style-name="ce104" office:value-type="string" calcext:value-type="string">
            <text:p><text:s text:c="4"/>.uc-list</text:p>
          </table:table-cell>
          <table:table-cell table:style-name="ce152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/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12" calcext:value-type="float">
            <text:p>MF-12</text:p>
          </table:table-cell>
          <table:table-cell table:style-name="ce82" office:value-type="float" office:value="9" calcext:value-type="float">
            <text:p>FR-09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53" office:value-type="string" calcext:value-type="string">
            <text:p>BA shall be able to apply groupings to multiple LL/UC reqs simultaneously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12" calcext:value-type="float">
            <text:p>MF-12</text:p>
          </table:table-cell>
          <table:table-cell table:style-name="ce82" office:value-type="float" office:value="10" calcext:value-type="float">
            <text:p>FR-10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53" office:value-type="string" calcext:value-type="string">
            <text:p>BA shall be able to remove groupings to multiple LL/UC reqs simultaneously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3" office:value-type="float" office:value="190" calcext:value-type="float">
            <text:p>FR-190</text:p>
          </table:table-cell>
          <table:table-cell table:style-name="ce105" office:value-type="string" calcext:value-type="string">
            <text:p><text:s text:c="4"/>.add</text:p>
          </table:table-cell>
          <table:table-cell table:style-name="ce154" office:value-type="string" calcext:value-type="string">
            <text:p>BA shall be able to apply groupings to UCs without using the UCE.</text:p>
          </table:table-cell>
          <table:table-cell table:style-name="ce171" office:value-type="date" office:date-value="2014-05-23" calcext:value-type="date">
            <text:p>23/05/14</text:p>
          </table:table-cell>
          <table:table-cell table:style-name="ce180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3" office:value-type="float" office:value="191" calcext:value-type="float">
            <text:p>FR-191</text:p>
          </table:table-cell>
          <table:table-cell table:style-name="ce105" office:value-type="string" calcext:value-type="string">
            <text:p><text:s text:c="4"/>.remove</text:p>
          </table:table-cell>
          <table:table-cell table:style-name="ce154" office:value-type="string" calcext:value-type="string">
            <text:p>BA shall be able to remove groupings to UC without using the UCE.</text:p>
          </table:table-cell>
          <table:table-cell table:style-name="ce171" office:value-type="date" office:date-value="2014-05-23" calcext:value-type="date">
            <text:p>23/05/14</text:p>
          </table:table-cell>
          <table:table-cell table:style-name="ce180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3" office:value-type="float" office:value="192" calcext:value-type="float">
            <text:p>FR-192</text:p>
          </table:table-cell>
          <table:table-cell table:style-name="ce105" office:value-type="string" calcext:value-type="string">
            <text:p><text:s text:c="4"/>.add</text:p>
          </table:table-cell>
          <table:table-cell table:style-name="ce154" office:value-type="string" calcext:value-type="string">
            <text:p>BA shall be able to apply groupings to LL-reqs.</text:p>
          </table:table-cell>
          <table:table-cell table:style-name="ce171" office:value-type="date" office:date-value="2014-05-23" calcext:value-type="date">
            <text:p>23/05/14</text:p>
          </table:table-cell>
          <table:table-cell table:style-name="ce180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3" office:value-type="float" office:value="193" calcext:value-type="float">
            <text:p>FR-193</text:p>
          </table:table-cell>
          <table:table-cell table:style-name="ce105" office:value-type="string" calcext:value-type="string">
            <text:p><text:s text:c="4"/>.remove</text:p>
          </table:table-cell>
          <table:table-cell table:style-name="ce154" office:value-type="string" calcext:value-type="string">
            <text:p>BA shall be able to remove groupings to LL-reqs.</text:p>
          </table:table-cell>
          <table:table-cell table:style-name="ce171" office:value-type="date" office:date-value="2014-05-23" calcext:value-type="date">
            <text:p>23/05/14</text:p>
          </table:table-cell>
          <table:table-cell table:style-name="ce180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46" office:value-type="float" office:value="4" calcext:value-type="float">
            <text:p>MF-04</text:p>
          </table:table-cell>
          <table:table-cell table:style-name="ce46" office:value-type="float" office:value="5" calcext:value-type="float">
            <text:p>MF-05</text:p>
          </table:table-cell>
          <table:table-cell table:style-name="ce82" office:value-type="float" office:value="142" calcext:value-type="float">
            <text:p>FR-142</text:p>
          </table:table-cell>
          <table:table-cell table:style-name="ce104" office:value-type="string" calcext:value-type="string">
            <text:p><text:s text:c="2"/>.copy</text:p>
          </table:table-cell>
          <table:table-cell table:style-name="ce153" office:value-type="string" calcext:value-type="string">
            <text:p>BA shall be able to copy a field set from another project.</text:p>
          </table:table-cell>
          <table:table-cell table:style-name="ce169" office:value-type="date" office:date-value="2014-05-19" calcext:value-type="date">
            <text:p>19/05/14</text:p>
          </table:table-cell>
          <table:table-cell table:style-name="ce153"/>
          <table:table-cell table:number-columns-repeated="1017"/>
        </table:table-row>
        <table:table-row table:style-name="ro4">
          <table:table-cell table:style-name="ce46" office:value-type="float" office:value="4" calcext:value-type="float">
            <text:p>MF-04</text:p>
          </table:table-cell>
          <table:table-cell table:style-name="ce46" office:value-type="float" office:value="5" calcext:value-type="float">
            <text:p>MF-05</text:p>
          </table:table-cell>
          <table:table-cell table:style-name="ce82" office:value-type="float" office:value="42" calcext:value-type="float">
            <text:p>FR-42</text:p>
          </table:table-cell>
          <table:table-cell table:style-name="ce104" office:value-type="string" calcext:value-type="string">
            <text:p><text:s text:c="4"/>.discards</text:p>
          </table:table-cell>
          <table:table-cell table:style-name="ce153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69" office:value-type="date" office:date-value="2014-02-25" calcext:value-type="date">
            <text:p>25/02/14</text:p>
          </table:table-cell>
          <table:table-cell table:style-name="ce153"/>
          <table:table-cell table:number-columns-repeated="1017"/>
        </table:table-row>
        <table:table-row table:style-name="ro19">
          <table:table-cell table:style-name="ce46" office:value-type="float" office:value="4" calcext:value-type="float">
            <text:p>MF-04</text:p>
          </table:table-cell>
          <table:table-cell table:style-name="ce46" office:value-type="float" office:value="7" calcext:value-type="float">
            <text:p>MF-07</text:p>
          </table:table-cell>
          <table:table-cell table:style-name="ce82" office:value-type="float" office:value="22" calcext:value-type="float">
            <text:p>FR-22</text:p>
          </table:table-cell>
          <table:table-cell table:style-name="ce104" office:value-type="string" calcext:value-type="string">
            <text:p><text:s text:c="2"/>.copy</text:p>
          </table:table-cell>
          <table:table-cell table:style-name="ce152" office:value-type="string" calcext:value-type="string">
            <text:p>BA shall be able to copy a subset of groupings (including child nodes) between projects.</text:p>
          </table:table-cell>
          <table:table-cell table:style-name="ce169" office:value-type="date" office:date-value="2014-02-12" calcext:value-type="date">
            <text:p>12/02/14</text:p>
          </table:table-cell>
          <table:table-cell table:style-name="ce152"/>
          <table:table-cell table:number-columns-repeated="1017"/>
        </table:table-row>
        <table:table-row table:style-name="ro4">
          <table:table-cell table:style-name="ce46" office:value-type="float" office:value="6" calcext:value-type="float">
            <text:p>MF-06</text:p>
          </table:table-cell>
          <table:table-cell table:style-name="ce46" office:value-type="float" office:value="12" calcext:value-type="float">
            <text:p>MF-12</text:p>
          </table:table-cell>
          <table:table-cell table:style-name="ce82" office:value-type="float" office:value="105" calcext:value-type="float">
            <text:p>FR-105</text:p>
          </table:table-cell>
          <table:table-cell table:style-name="ce104" office:value-type="string" calcext:value-type="string">
            <text:p><text:s text:c="2"/>.refs</text:p>
          </table:table-cell>
          <table:table-cell table:style-name="ce152" office:value-type="string" calcext:value-type="string">
            <text:p>[Dup of FR-55]</text:p>
            <text:p>System shall track refs to deleted LL-reqs as incompletions.</text:p>
          </table:table-cell>
          <table:table-cell table:style-name="ce169" office:value-type="date" office:date-value="2014-05-15" calcext:value-type="date">
            <text:p>15/05/14</text:p>
          </table:table-cell>
          <table:table-cell table:style-name="ce153"/>
          <table:table-cell table:number-columns-repeated="1017"/>
        </table:table-row>
        <table:table-row table:style-name="ro9">
          <table:table-cell table:style-name="ce46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111" calcext:value-type="float">
            <text:p>FR-111</text:p>
          </table:table-cell>
          <table:table-cell table:style-name="ce104"/>
          <table:table-cell table:style-name="ce152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69" office:value-type="date" office:date-value="2014-05-16" calcext:value-type="date">
            <text:p>16/05/14</text:p>
          </table:table-cell>
          <table:table-cell table:style-name="ce153"/>
          <table:table-cell table:number-columns-repeated="1017"/>
        </table:table-row>
        <table:table-row table:style-name="ro4">
          <table:table-cell table:style-name="ce46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89" calcext:value-type="float">
            <text:p>FR-89</text:p>
          </table:table-cell>
          <table:table-cell table:style-name="ce104" office:value-type="string" calcext:value-type="string">
            <text:p><text:s text:c="4"/>.copy</text:p>
          </table:table-cell>
          <table:table-cell table:style-name="ce153" office:value-type="string" calcext:value-type="string">
            <text:p>[Replaced by FR-172]</text:p>
            <text:p>BA shall be able to create a new req by copying another.</text:p>
          </table:table-cell>
          <table:table-cell table:style-name="ce169" office:value-type="date" office:date-value="2014-05-15" calcext:value-type="date">
            <text:p>15/05/14</text:p>
          </table:table-cell>
          <table:table-cell table:style-name="ce153"/>
          <table:table-cell table:number-columns-repeated="1017"/>
        </table:table-row>
        <table:table-row table:style-name="ro4">
          <table:table-cell table:style-name="ce55" office:value-type="float" office:value="13" calcext:value-type="float">
            <text:p>MF-13</text:p>
          </table:table-cell>
          <table:table-cell table:style-name="ce55" office:value-type="float" office:value="6" calcext:value-type="float">
            <text:p>MF-06</text:p>
          </table:table-cell>
          <table:table-cell table:style-name="ce84" office:value-type="float" office:value="202" calcext:value-type="float">
            <text:p>FR-202</text:p>
          </table:table-cell>
          <table:table-cell table:style-name="ce106"/>
          <table:table-cell table:style-name="ce155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style-name="ce172" office:value-type="date" office:date-value="2014-06-02" calcext:value-type="date">
            <text:p>02/06/14</text:p>
          </table:table-cell>
          <table:table-cell table:style-name="ce155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5" office:value-type="float" office:value="60" calcext:value-type="float">
            <text:p>FR-60</text:p>
          </table:table-cell>
          <table:table-cell table:style-name="ce107" office:value-type="string" calcext:value-type="string">
            <text:p><text:s text:c="4"/>.ref.steps</text:p>
          </table:table-cell>
          <table:table-cell table:style-name="ce156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style-name="ce173" office:value-type="date" office:date-value="2014-05-12" calcext:value-type="date">
            <text:p>12/05/14</text:p>
          </table:table-cell>
          <table:table-cell table:style-name="ce181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19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1" calcext:value-type="float">
            <text:p>MF-01</text:p>
          </table:table-cell>
          <table:table-cell table:style-name="ce85" office:value-type="float" office:value="169" calcext:value-type="float">
            <text:p>FR-169</text:p>
          </table:table-cell>
          <table:table-cell table:style-name="ce107" office:value-type="string" calcext:value-type="string">
            <text:p><text:s text:c="2"/>.ucs</text:p>
          </table:table-cell>
          <table:table-cell table:style-name="ce157" office:value-type="string" calcext:value-type="string">
            <text:p>System shall display UCs as rows in the req view.</text:p>
          </table:table-cell>
          <table:table-cell table:style-name="ce173" office:value-type="date" office:date-value="2014-05-22" calcext:value-type="date">
            <text:p>22/05/14</text:p>
          </table:table-cell>
          <table:table-cell table:style-name="ce157" office:value-type="string" calcext:value-type="string">
            <text:p>FR-84 covers this now.</text:p>
          </table:table-cell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65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108" office:value-type="string" calcext:value-type="string">
            <text:p>.llreq.mod</text:p>
          </table:table-cell>
          <table:table-cell table:style-name="ce158" office:value-type="string" calcext:value-type="string">
            <text:p>Modifying an LL-req field set</text:p>
          </table:table-cell>
          <table:table-cell table:style-name="ce158"/>
          <table:table-cell table:style-name="ce182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26" calcext:value-type="float">
            <text:p>FR-126</text:p>
          </table:table-cell>
          <table:table-cell table:style-name="ce106" office:value-type="string" calcext:value-type="string">
            <text:p><text:s text:c="2"/>.list</text:p>
          </table:table-cell>
          <table:table-cell table:style-name="ce155" office:value-type="string" calcext:value-type="string">
            <text:p>BA shall be able to see a list of all existing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27" calcext:value-type="float">
            <text:p>FR-127</text:p>
          </table:table-cell>
          <table:table-cell table:style-name="ce106" office:value-type="string" calcext:value-type="string">
            <text:p><text:s text:c="2"/>.create</text:p>
          </table:table-cell>
          <table:table-cell table:style-name="ce155" office:value-type="string" calcext:value-type="string">
            <text:p>BA shall be able to add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28" calcext:value-type="float">
            <text:p>FR-128</text:p>
          </table:table-cell>
          <table:table-cell table:style-name="ce106" office:value-type="string" calcext:value-type="string">
            <text:p><text:s text:c="2"/>.update</text:p>
          </table:table-cell>
          <table:table-cell table:style-name="ce155" office:value-type="string" calcext:value-type="string">
            <text:p>BA shall be able to modify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29" calcext:value-type="float">
            <text:p>FR-129</text:p>
          </table:table-cell>
          <table:table-cell table:style-name="ce109" office:value-type="string" calcext:value-type="string">
            <text:p><text:s text:c="4"/>.order</text:p>
          </table:table-cell>
          <table:table-cell table:style-name="ce155" office:value-type="string" calcext:value-type="string">
            <text:p>BA shall be able to reorder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0" calcext:value-type="float">
            <text:p>FR-130</text:p>
          </table:table-cell>
          <table:table-cell table:style-name="ce109" office:value-type="string" calcext:value-type="string">
            <text:p><text:s text:c="2"/>.delete</text:p>
          </table:table-cell>
          <table:table-cell table:style-name="ce155" office:value-type="string" calcext:value-type="string">
            <text:p>BA shall be able to (soft) delete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4" calcext:value-type="float">
            <text:p>FR-134</text:p>
          </table:table-cell>
          <table:table-cell table:style-name="ce106" office:value-type="string" calcext:value-type="string">
            <text:p><text:s text:c="4"/>.usage-summary</text:p>
          </table:table-cell>
          <table:table-cell table:style-name="ce159" office:value-type="string" calcext:value-type="string">
            <text:p>System shall indicate how many LL-reqs have content for each LL-req field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9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5" calcext:value-type="float">
            <text:p>FR-135</text:p>
          </table:table-cell>
          <table:table-cell table:style-name="ce106" office:value-type="string" calcext:value-type="string">
            <text:p><text:s text:c="4"/>.usage-inspect</text:p>
          </table:table-cell>
          <table:table-cell table:style-name="ce159" office:value-type="string" calcext:value-type="string">
            <text:p>BA shall be able to see each instance of content for an LL-req field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9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1" calcext:value-type="float">
            <text:p>FR-131</text:p>
          </table:table-cell>
          <table:table-cell table:style-name="ce109" office:value-type="string" calcext:value-type="string">
            <text:p><text:s text:c="4"/>.bin</text:p>
          </table:table-cell>
          <table:table-cell table:style-name="ce155" office:value-type="string" calcext:value-type="string">
            <text:p>When (soft) deleting an LL-req field, System shall move it to the bin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2" calcext:value-type="float">
            <text:p>FR-132</text:p>
          </table:table-cell>
          <table:table-cell table:style-name="ce109" office:value-type="string" calcext:value-type="string">
            <text:p><text:s text:c="2"/>.restore</text:p>
          </table:table-cell>
          <table:table-cell table:style-name="ce155" office:value-type="string" calcext:value-type="string">
            <text:p>BA shall be able to restore deleted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4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3" calcext:value-type="float">
            <text:p>FR-133</text:p>
          </table:table-cell>
          <table:table-cell table:style-name="ce109" office:value-type="string" calcext:value-type="string">
            <text:p><text:s text:c="4"/>.data</text:p>
          </table:table-cell>
          <table:table-cell table:style-name="ce155" office:value-type="string" calcext:value-type="string">
            <text:p>When an LL-req field is restored, System shall restore corresponding field values for each LL-req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4">
          <table:table-cell table:style-name="ce55" office:value-type="float" office:value="5" calcext:value-type="float">
            <text:p>MF-05</text:p>
          </table:table-cell>
          <table:table-cell table:style-name="ce55" office:value-type="string" calcext:value-type="string">
            <text:p>MF-06</text:p>
            <text:p>MF-12</text:p>
          </table:table-cell>
          <table:table-cell table:style-name="ce84" office:value-type="float" office:value="136" calcext:value-type="float">
            <text:p>FR-136</text:p>
          </table:table-cell>
          <table:table-cell table:style-name="ce109" office:value-type="string" calcext:value-type="string">
            <text:p><text:s text:c="2"/>.mandatory</text:p>
          </table:table-cell>
          <table:table-cell table:style-name="ce155" office:value-type="string" calcext:value-type="string">
            <text:p>BA shall be able to specify mandatory-ness of LL-req field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9"/>
          <table:table-cell table:number-columns-repeated="1017"/>
        </table:table-row>
        <table:table-row table:style-name="ro19">
          <table:table-cell table:style-name="ce56" office:value-type="float" office:value="12" calcext:value-type="float">
            <text:p>MF-12</text:p>
          </table:table-cell>
          <table:table-cell table:style-name="ce67" office:value-type="string" calcext:value-type="string">
            <text:p>-</text:p>
          </table:table-cell>
          <table:table-cell table:style-name="ce85" office:value-type="float" office:value="87" calcext:value-type="float">
            <text:p>FR-87</text:p>
          </table:table-cell>
          <table:table-cell table:style-name="ce107" office:value-type="string" calcext:value-type="string">
            <text:p><text:s text:c="4"/>.grouping</text:p>
          </table:table-cell>
          <table:table-cell table:style-name="ce157" office:value-type="string" calcext:value-type="string">
            <text:p>BA shall be able to filter view of reqs by grouping.</text:p>
          </table:table-cell>
          <table:table-cell table:style-name="ce173" office:value-type="date" office:date-value="2014-05-15" calcext:value-type="date">
            <text:p>15/05/14</text:p>
          </table:table-cell>
          <table:table-cell table:style-name="ce157" office:value-type="string" calcext:value-type="string">
            <text:p>Made FR-50 generic.</text:p>
          </table:table-cell>
          <table:table-cell table:number-columns-repeated="1017"/>
        </table:table-row>
        <table:table-row table:style-name="ro19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22" calcext:value-type="float">
            <text:p>MF-22</text:p>
          </table:table-cell>
          <table:table-cell table:style-name="ce85" office:value-type="float" office:value="86" calcext:value-type="float">
            <text:p>FR-86</text:p>
          </table:table-cell>
          <table:table-cell table:style-name="ce107" office:value-type="string" calcext:value-type="string">
            <text:p><text:s text:c="4"/>.reqtype</text:p>
          </table:table-cell>
          <table:table-cell table:style-name="ce157" office:value-type="string" calcext:value-type="string">
            <text:p>BA shall be able to filter view of reqs by req-type.</text:p>
          </table:table-cell>
          <table:table-cell table:style-name="ce173" office:value-type="date" office:date-value="2014-05-15" calcext:value-type="date">
            <text:p>15/05/14</text:p>
          </table:table-cell>
          <table:table-cell table:style-name="ce157" office:value-type="string" calcext:value-type="string">
            <text:p>Made FR-112 generic.</text:p>
          </table:table-cell>
          <table:table-cell table:number-columns-repeated="1017"/>
        </table:table-row>
        <table:table-row table:style-name="ro1">
          <table:table-cell table:style-name="ce57"/>
          <table:table-cell table:style-name="ce69" table:number-columns-repeated="2"/>
          <table:table-cell table:style-name="ce110"/>
          <table:table-cell table:style-name="ce160" table:number-columns-repeated="2"/>
          <table:table-cell table:style-name="ce183"/>
          <table:table-cell table:number-columns-repeated="1017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95"/>
        <table:table-column table:style-name="co20" table:default-cell-style-name="ce19"/>
        <table:table-column table:style-name="co21" table:default-cell-style-name="ce66"/>
        <table:table-column table:style-name="co14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4"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6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6"/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6" calcext:value-type="float">
            <text:p>MF-06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28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7">n children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7">n parents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3" calcext:value-type="float">
            <text:p>MF-13</text:p>
          </table:table-cell>
          <table:table-cell table:style-name="ce126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9" office:value-type="string" calcext:value-type="string">
            <text:p>BA shall be able to go from LL-req editor to a view of all LL-req incompletions in a single act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9" office:value-type="string" calcext:value-type="string">
            <text:p>BA shall be able to go from a view of all LL-req incompletions to LL-req editor in a single act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9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1"/>
        <table:table-column table:style-name="co24" table:default-cell-style-name="ce131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6">
          <table:table-cell table:number-columns-repeated="2"/>
          <table:table-cell table:style-name="ce133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4"/>
          <table:table-cell table:style-name="ce142" office:value-type="string" calcext:value-type="string">
            <text:p>Fields</text:p>
          </table:table-cell>
          <table:table-cell table:number-columns-repeated="1016"/>
        </table:table-row>
        <table:table-row table:style-name="ro17">
          <table:table-cell table:number-columns-repeated="2"/>
          <table:table-cell table:style-name="ce134" office:value-type="float" office:value="1" calcext:value-type="float">
            <text:p>MF-01</text:p>
          </table:table-cell>
          <table:table-cell table:number-columns-repeated="2" table:style-name="ce134" office:value-type="float" office:value="12" calcext:value-type="float">
            <text:p>MF-12</text:p>
          </table:table-cell>
          <table:table-cell table:style-name="ce134" office:value-type="float" office:value="5" calcext:value-type="float">
            <text:p>MF-05</text:p>
          </table:table-cell>
          <table:table-cell table:style-name="ce134" office:value-type="float" office:value="12" calcext:value-type="float">
            <text:p>MF-12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2"/>
        </table:table-row>
        <table:table-row table:style-name="ro5">
          <table:table-cell table:style-name="ce130" office:value-type="string" calcext:value-type="string">
            <text:p>CRUDL</text:p>
          </table:table-cell>
          <table:table-cell table:style-name="ce132"/>
          <table:table-cell table:style-name="ce135" office:value-type="string" calcext:value-type="string">
            <text:p>UC</text:p>
          </table:table-cell>
          <table:table-cell table:style-name="ce135" office:value-type="string" calcext:value-type="string">
            <text:p>LL Req</text:p>
          </table:table-cell>
          <table:table-cell table:style-name="ce135" office:value-type="string" calcext:value-type="string">
            <text:p>SHR</text:p>
          </table:table-cell>
          <table:table-cell table:style-name="ce138" office:value-type="string" calcext:value-type="string">
            <text:p>Field</text:p>
          </table:table-cell>
          <table:table-cell table:style-name="ce138" office:value-type="string" calcext:value-type="string">
            <text:p>Req Type</text:p>
          </table:table-cell>
          <table:table-cell table:style-name="ce138" office:value-type="string" calcext:value-type="string">
            <text:p>Grouping</text:p>
          </table:table-cell>
          <table:table-cell table:style-name="ce138" office:value-type="string" calcext:value-type="string">
            <text:p>Incompletion</text:p>
            <text:p>Type</text:p>
          </table:table-cell>
          <table:table-cell table:style-name="ce138" office:value-type="string" calcext:value-type="string">
            <text:p>Text</text:p>
            <text:p>tokens</text:p>
          </table:table-cell>
          <table:table-cell/>
          <table:table-cell table:style-name="ce145" table:number-columns-repeated="1011"/>
        </table:table-row>
        <table:table-row table:style-name="ro17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6"/>
          <table:table-cell table:style-name="ce31" office:value-type="float" office:value="83" calcext:value-type="float">
            <text:p>FR-83</text:p>
          </table:table-cell>
          <table:table-cell table:style-name="ce139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6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6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6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3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3" office:value-type="string" calcext:value-type="string">
            <text:p>N/A</text:p>
          </table:table-cell>
          <table:table-cell table:number-columns-repeated="1012"/>
        </table:table-row>
        <table:table-row table:style-name="ro5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6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6"/>
          <table:table-cell table:style-name="ce31" office:value-type="float" office:value="179" calcext:value-type="float">
            <text:p>FR-179</text:p>
          </table:table-cell>
          <table:table-cell table:style-name="ce140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0" office:value-type="string" calcext:value-type="string">
            <text:p>Hard only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6"/>
          <table:table-cell table:style-name="ce31" office:value-type="float" office:value="180" calcext:value-type="float">
            <text:p>FR-180</text:p>
          </table:table-cell>
          <table:table-cell table:style-name="ce136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6"/>
          <table:table-cell table:style-name="ce31" office:value-type="float" office:value="181" calcext:value-type="float">
            <text:p>FR-181</text:p>
          </table:table-cell>
          <table:table-cell table:style-name="ce136"/>
          <table:table-cell table:style-name="ce31" office:value-type="float" office:value="6" calcext:value-type="float">
            <text:p>FR-06</text:p>
          </table:table-cell>
          <table:table-cell table:style-name="ce137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7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6"/>
          <table:table-cell table:style-name="ce31" office:value-type="float" office:value="182" calcext:value-type="float">
            <text:p>FR-182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6"/>
          <table:table-cell table:style-name="ce31" office:value-type="float" office:value="183" calcext:value-type="float">
            <text:p>FR-183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6"/>
          <table:table-cell table:style-name="ce31" office:value-type="float" office:value="184" calcext:value-type="float">
            <text:p>FR-184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0" office:value-type="string" calcext:value-type="string">
            <text:p>Filters</text:p>
          </table:table-cell>
          <table:table-cell/>
          <table:table-cell table:style-name="ce138" office:value-type="string" calcext:value-type="string">
            <text:p>Incompletion</text:p>
            <text:p>Results</text:p>
          </table:table-cell>
          <table:table-cell table:style-name="ce138" office:value-type="string" calcext:value-type="string">
            <text:p>Groupings</text:p>
          </table:table-cell>
          <table:table-cell table:style-name="ce138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36" table:default-cell-style-name="ce214"/>
        <table:table-column table:style-name="co14" table:number-columns-repeated="4" table:default-cell-style-name="Default"/>
        <table:table-row table:style-name="ro1">
          <table:table-cell table:style-name="ce212" office:value-type="string" calcext:value-type="string">
            <text:p>ID</text:p>
          </table:table-cell>
          <table:table-cell table:style-name="ce212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3" table:formula="of:=1-COUNTIF([FRs.$C$2:.$C$950]; &quot;=&quot;&amp;[.A2])" office:value-type="float" office:value="0" calcext:value-type="float">
            <text:p>0</text:p>
          </table:table-cell>
          <table:table-cell/>
          <table:table-cell table:style-name="ce215" office:value-type="string" calcext:value-type="string">
            <text:p>FRs</text:p>
          </table:table-cell>
          <table:table-cell table:style-name="ce215" office:value-type="string" calcext:value-type="string">
            <text:p>Flat</text:p>
          </table:table-cell>
          <table:table-cell table:style-name="ce215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13" table:formula="of:=1-COUNTIF([FRs.$C$2:.$C$950]; &quot;=&quot;&amp;[.A3])" office:value-type="float" office:value="0" calcext:value-type="float">
            <text:p>0</text:p>
          </table:table-cell>
          <table:table-cell/>
          <table:table-cell table:style-name="ce92" table:formula="of:=COUNTIF([FRs.$C$2:.$C$970];&quot;&gt;0&quot;)" office:value-type="float" office:value="274" calcext:value-type="float">
            <text:p>274</text:p>
          </table:table-cell>
          <table:table-cell table:style-name="ce92" table:formula="of:=COUNTIF([flat.$D$2:.$D$1000];&quot;&gt;0&quot;)" office:value-type="float" office:value="37" calcext:value-type="float">
            <text:p>37</text:p>
          </table:table-cell>
          <table:table-cell table:style-name="ce92" table:formula="of:=[.E3]+[.D3]" office:value-type="float" office:value="311" calcext:value-type="float">
            <text:p>31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13" table:formula="of:=1-COUNTIF([FRs.$C$2:.$C$950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13" table:formula="of:=1-COUNTIF([FRs.$C$2:.$C$950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13" table:formula="of:=1-COUNTIF([FRs.$C$2:.$C$950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13" table:formula="of:=1-COUNTIF([FRs.$C$2:.$C$950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13" table:formula="of:=1-COUNTIF([FRs.$C$2:.$C$950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13" table:formula="of:=1-COUNTIF([FRs.$C$2:.$C$950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13" table:formula="of:=1-COUNTIF([FRs.$C$2:.$C$950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13" table:formula="of:=1-COUNTIF([FRs.$C$2:.$C$950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13" table:formula="of:=1-COUNTIF([FRs.$C$2:.$C$950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13" table:formula="of:=1-COUNTIF([FRs.$C$2:.$C$950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13" table:formula="of:=1-COUNTIF([FRs.$C$2:.$C$950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13" table:formula="of:=1-COUNTIF([FRs.$C$2:.$C$950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13" table:formula="of:=1-COUNTIF([FRs.$C$2:.$C$950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13" table:formula="of:=1-COUNTIF([FRs.$C$2:.$C$950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13" table:formula="of:=1-COUNTIF([FRs.$C$2:.$C$950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13" table:formula="of:=1-COUNTIF([FRs.$C$2:.$C$950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13" table:formula="of:=1-COUNTIF([FRs.$C$2:.$C$950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13" table:formula="of:=1-COUNTIF([FRs.$C$2:.$C$950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13" table:formula="of:=1-COUNTIF([FRs.$C$2:.$C$950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13" table:formula="of:=1-COUNTIF([FRs.$C$2:.$C$950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13" table:formula="of:=1-COUNTIF([FRs.$C$2:.$C$950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13" table:formula="of:=1-COUNTIF([FRs.$C$2:.$C$950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13" table:formula="of:=1-COUNTIF([FRs.$C$2:.$C$950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13" table:formula="of:=1-COUNTIF([FRs.$C$2:.$C$950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13" table:formula="of:=1-COUNTIF([FRs.$C$2:.$C$950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13" table:formula="of:=1-COUNTIF([FRs.$C$2:.$C$950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13" table:formula="of:=1-COUNTIF([FRs.$C$2:.$C$950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13" table:formula="of:=1-COUNTIF([FRs.$C$2:.$C$950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13" table:formula="of:=1-COUNTIF([FRs.$C$2:.$C$950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13" table:formula="of:=1-COUNTIF([FRs.$C$2:.$C$950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13" table:formula="of:=1-COUNTIF([FRs.$C$2:.$C$950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13" table:formula="of:=1-COUNTIF([FRs.$C$2:.$C$950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13" table:formula="of:=1-COUNTIF([FRs.$C$2:.$C$950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13" table:formula="of:=1-COUNTIF([FRs.$C$2:.$C$950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13" table:formula="of:=1-COUNTIF([FRs.$C$2:.$C$950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13" table:formula="of:=1-COUNTIF([FRs.$C$2:.$C$950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13" table:formula="of:=1-COUNTIF([FRs.$C$2:.$C$950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13" table:formula="of:=1-COUNTIF([FRs.$C$2:.$C$950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13" table:formula="of:=1-COUNTIF([FRs.$C$2:.$C$950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13" table:formula="of:=1-COUNTIF([FRs.$C$2:.$C$950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13" table:formula="of:=1-COUNTIF([FRs.$C$2:.$C$950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13" table:formula="of:=1-COUNTIF([FRs.$C$2:.$C$950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13" table:formula="of:=1-COUNTIF([FRs.$C$2:.$C$950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13" table:formula="of:=1-COUNTIF([FRs.$C$2:.$C$950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13" table:formula="of:=1-COUNTIF([FRs.$C$2:.$C$950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13" table:formula="of:=1-COUNTIF([FRs.$C$2:.$C$950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13" table:formula="of:=1-COUNTIF([FRs.$C$2:.$C$950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13" table:formula="of:=1-COUNTIF([FRs.$C$2:.$C$950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13" table:formula="of:=1-COUNTIF([FRs.$C$2:.$C$950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13" table:formula="of:=1-COUNTIF([FRs.$C$2:.$C$950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13" table:formula="of:=1-COUNTIF([FRs.$C$2:.$C$950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13" table:formula="of:=1-COUNTIF([FRs.$C$2:.$C$950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13" table:formula="of:=1-COUNTIF([FRs.$C$2:.$C$950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13" table:formula="of:=1-COUNTIF([FRs.$C$2:.$C$950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13" table:formula="of:=1-COUNTIF([FRs.$C$2:.$C$950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13" table:formula="of:=1-COUNTIF([FRs.$C$2:.$C$950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13" table:formula="of:=1-COUNTIF([FRs.$C$2:.$C$950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13" table:formula="of:=1-COUNTIF([FRs.$C$2:.$C$950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13" table:formula="of:=1-COUNTIF([FRs.$C$2:.$C$950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13" table:formula="of:=1-COUNTIF([FRs.$C$2:.$C$950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13" table:formula="of:=1-COUNTIF([FRs.$C$2:.$C$950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13" table:formula="of:=1-COUNTIF([FRs.$C$2:.$C$950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13" table:formula="of:=1-COUNTIF([FRs.$C$2:.$C$950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13" table:formula="of:=1-COUNTIF([FRs.$C$2:.$C$950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13" table:formula="of:=1-COUNTIF([FRs.$C$2:.$C$950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13" table:formula="of:=1-COUNTIF([FRs.$C$2:.$C$950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13" table:formula="of:=1-COUNTIF([FRs.$C$2:.$C$950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13" table:formula="of:=1-COUNTIF([FRs.$C$2:.$C$950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13" table:formula="of:=1-COUNTIF([FRs.$C$2:.$C$950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13" table:formula="of:=1-COUNTIF([FRs.$C$2:.$C$950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13" table:formula="of:=1-COUNTIF([FRs.$C$2:.$C$950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13" table:formula="of:=1-COUNTIF([FRs.$C$2:.$C$950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13" table:formula="of:=1-COUNTIF([FRs.$C$2:.$C$950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13" table:formula="of:=1-COUNTIF([FRs.$C$2:.$C$950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13" table:formula="of:=1-COUNTIF([FRs.$C$2:.$C$950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13" table:formula="of:=1-COUNTIF([FRs.$C$2:.$C$950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13" table:formula="of:=1-COUNTIF([FRs.$C$2:.$C$950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13" table:formula="of:=1-COUNTIF([FRs.$C$2:.$C$950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13" table:formula="of:=1-COUNTIF([FRs.$C$2:.$C$950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13" table:formula="of:=1-COUNTIF([FRs.$C$2:.$C$950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13" table:formula="of:=1-COUNTIF([FRs.$C$2:.$C$950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13" table:formula="of:=1-COUNTIF([FRs.$C$2:.$C$950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13" table:formula="of:=1-COUNTIF([FRs.$C$2:.$C$950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13" table:formula="of:=1-COUNTIF([FRs.$C$2:.$C$950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13" table:formula="of:=1-COUNTIF([FRs.$C$2:.$C$950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13" table:formula="of:=1-COUNTIF([FRs.$C$2:.$C$950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13" table:formula="of:=1-COUNTIF([FRs.$C$2:.$C$950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13" table:formula="of:=1-COUNTIF([FRs.$C$2:.$C$950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13" table:formula="of:=1-COUNTIF([FRs.$C$2:.$C$950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13" table:formula="of:=1-COUNTIF([FRs.$C$2:.$C$950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13" table:formula="of:=1-COUNTIF([FRs.$C$2:.$C$950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13" table:formula="of:=1-COUNTIF([FRs.$C$2:.$C$950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13" table:formula="of:=1-COUNTIF([FRs.$C$2:.$C$950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213" table:formula="of:=1-COUNTIF([FRs.$C$2:.$C$950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213" table:formula="of:=1-COUNTIF([FRs.$C$2:.$C$950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213" table:formula="of:=1-COUNTIF([FRs.$C$2:.$C$950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213" table:formula="of:=1-COUNTIF([FRs.$C$2:.$C$950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213" table:formula="of:=1-COUNTIF([FRs.$C$2:.$C$950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213" table:formula="of:=1-COUNTIF([FRs.$C$2:.$C$950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213" table:formula="of:=1-COUNTIF([FRs.$C$2:.$C$950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213" table:formula="of:=1-COUNTIF([FRs.$C$2:.$C$950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213" table:formula="of:=1-COUNTIF([FRs.$C$2:.$C$950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213" table:formula="of:=1-COUNTIF([FRs.$C$2:.$C$950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213" table:formula="of:=1-COUNTIF([FRs.$C$2:.$C$950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213" table:formula="of:=1-COUNTIF([FRs.$C$2:.$C$950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213" table:formula="of:=1-COUNTIF([FRs.$C$2:.$C$950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213" table:formula="of:=1-COUNTIF([FRs.$C$2:.$C$950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213" table:formula="of:=1-COUNTIF([FRs.$C$2:.$C$950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213" table:formula="of:=1-COUNTIF([FRs.$C$2:.$C$950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213" table:formula="of:=1-COUNTIF([FRs.$C$2:.$C$950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213" table:formula="of:=1-COUNTIF([FRs.$C$2:.$C$950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213" table:formula="of:=1-COUNTIF([FRs.$C$2:.$C$950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213" table:formula="of:=1-COUNTIF([FRs.$C$2:.$C$950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213" table:formula="of:=1-COUNTIF([FRs.$C$2:.$C$950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213" table:formula="of:=1-COUNTIF([FRs.$C$2:.$C$950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213" table:formula="of:=1-COUNTIF([FRs.$C$2:.$C$950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213" table:formula="of:=1-COUNTIF([FRs.$C$2:.$C$950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213" table:formula="of:=1-COUNTIF([FRs.$C$2:.$C$950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213" table:formula="of:=1-COUNTIF([FRs.$C$2:.$C$950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213" table:formula="of:=1-COUNTIF([FRs.$C$2:.$C$950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213" table:formula="of:=1-COUNTIF([FRs.$C$2:.$C$950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213" table:formula="of:=1-COUNTIF([FRs.$C$2:.$C$950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213" table:formula="of:=1-COUNTIF([FRs.$C$2:.$C$950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213" table:formula="of:=1-COUNTIF([FRs.$C$2:.$C$950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213" table:formula="of:=1-COUNTIF([FRs.$C$2:.$C$950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213" table:formula="of:=1-COUNTIF([FRs.$C$2:.$C$950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213" table:formula="of:=1-COUNTIF([FRs.$C$2:.$C$950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213" table:formula="of:=1-COUNTIF([FRs.$C$2:.$C$950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213" table:formula="of:=1-COUNTIF([FRs.$C$2:.$C$950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213" table:formula="of:=1-COUNTIF([FRs.$C$2:.$C$950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213" table:formula="of:=1-COUNTIF([FRs.$C$2:.$C$950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213" table:formula="of:=1-COUNTIF([FRs.$C$2:.$C$950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213" table:formula="of:=1-COUNTIF([FRs.$C$2:.$C$950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213" table:formula="of:=1-COUNTIF([FRs.$C$2:.$C$950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213" table:formula="of:=1-COUNTIF([FRs.$C$2:.$C$950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213" table:formula="of:=1-COUNTIF([FRs.$C$2:.$C$950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213" table:formula="of:=1-COUNTIF([FRs.$C$2:.$C$950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213" table:formula="of:=1-COUNTIF([FRs.$C$2:.$C$950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213" table:formula="of:=1-COUNTIF([FRs.$C$2:.$C$950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213" table:formula="of:=1-COUNTIF([FRs.$C$2:.$C$950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213" table:formula="of:=1-COUNTIF([FRs.$C$2:.$C$950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213" table:formula="of:=1-COUNTIF([FRs.$C$2:.$C$950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213" table:formula="of:=1-COUNTIF([FRs.$C$2:.$C$950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213" table:formula="of:=1-COUNTIF([FRs.$C$2:.$C$950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213" table:formula="of:=1-COUNTIF([FRs.$C$2:.$C$950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213" table:formula="of:=1-COUNTIF([FRs.$C$2:.$C$950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213" table:formula="of:=1-COUNTIF([FRs.$C$2:.$C$950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213" table:formula="of:=1-COUNTIF([FRs.$C$2:.$C$950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213" table:formula="of:=1-COUNTIF([FRs.$C$2:.$C$950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213" table:formula="of:=1-COUNTIF([FRs.$C$2:.$C$950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213" table:formula="of:=1-COUNTIF([FRs.$C$2:.$C$950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213" table:formula="of:=1-COUNTIF([FRs.$C$2:.$C$950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213" table:formula="of:=1-COUNTIF([FRs.$C$2:.$C$950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213" table:formula="of:=1-COUNTIF([FRs.$C$2:.$C$950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213" table:formula="of:=1-COUNTIF([FRs.$C$2:.$C$950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213" table:formula="of:=1-COUNTIF([FRs.$C$2:.$C$950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213" table:formula="of:=1-COUNTIF([FRs.$C$2:.$C$950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213" table:formula="of:=1-COUNTIF([FRs.$C$2:.$C$950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213" table:formula="of:=1-COUNTIF([FRs.$C$2:.$C$950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213" table:formula="of:=1-COUNTIF([FRs.$C$2:.$C$950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213" table:formula="of:=1-COUNTIF([FRs.$C$2:.$C$950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213" table:formula="of:=1-COUNTIF([FRs.$C$2:.$C$950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213" table:formula="of:=1-COUNTIF([FRs.$C$2:.$C$950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213" table:formula="of:=1-COUNTIF([FRs.$C$2:.$C$950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213" table:formula="of:=1-COUNTIF([FRs.$C$2:.$C$950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213" table:formula="of:=1-COUNTIF([FRs.$C$2:.$C$950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213" table:formula="of:=1-COUNTIF([FRs.$C$2:.$C$950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213" table:formula="of:=1-COUNTIF([FRs.$C$2:.$C$950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213" table:formula="of:=1-COUNTIF([FRs.$C$2:.$C$950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213" table:formula="of:=1-COUNTIF([FRs.$C$2:.$C$950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213" table:formula="of:=1-COUNTIF([FRs.$C$2:.$C$950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213" table:formula="of:=1-COUNTIF([FRs.$C$2:.$C$950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213" table:formula="of:=1-COUNTIF([FRs.$C$2:.$C$950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213" table:formula="of:=1-COUNTIF([FRs.$C$2:.$C$950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213" table:formula="of:=1-COUNTIF([FRs.$C$2:.$C$950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213" table:formula="of:=1-COUNTIF([FRs.$C$2:.$C$950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213" table:formula="of:=1-COUNTIF([FRs.$C$2:.$C$950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213" table:formula="of:=1-COUNTIF([FRs.$C$2:.$C$950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213" table:formula="of:=1-COUNTIF([FRs.$C$2:.$C$950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213" table:formula="of:=1-COUNTIF([FRs.$C$2:.$C$950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213" table:formula="of:=1-COUNTIF([FRs.$C$2:.$C$950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213" table:formula="of:=1-COUNTIF([FRs.$C$2:.$C$950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213" table:formula="of:=1-COUNTIF([FRs.$C$2:.$C$950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213" table:formula="of:=1-COUNTIF([FRs.$C$2:.$C$950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213" table:formula="of:=1-COUNTIF([FRs.$C$2:.$C$950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213" table:formula="of:=1-COUNTIF([FRs.$C$2:.$C$950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213" table:formula="of:=1-COUNTIF([FRs.$C$2:.$C$950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213" table:formula="of:=1-COUNTIF([FRs.$C$2:.$C$950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213" table:formula="of:=1-COUNTIF([FRs.$C$2:.$C$950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213" table:formula="of:=1-COUNTIF([FRs.$C$2:.$C$950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213" table:formula="of:=1-COUNTIF([FRs.$C$2:.$C$950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213" table:formula="of:=1-COUNTIF([FRs.$C$2:.$C$950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213" table:formula="of:=1-COUNTIF([FRs.$C$2:.$C$950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213" table:formula="of:=1-COUNTIF([FRs.$C$2:.$C$950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213" table:formula="of:=1-COUNTIF([FRs.$C$2:.$C$950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213" table:formula="of:=1-COUNTIF([FRs.$C$2:.$C$950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213" table:formula="of:=1-COUNTIF([FRs.$C$2:.$C$950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213" table:formula="of:=1-COUNTIF([FRs.$C$2:.$C$950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213" table:formula="of:=1-COUNTIF([FRs.$C$2:.$C$950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213" table:formula="of:=1-COUNTIF([FRs.$C$2:.$C$950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213" table:formula="of:=1-COUNTIF([FRs.$C$2:.$C$950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213" table:formula="of:=1-COUNTIF([FRs.$C$2:.$C$950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213" table:formula="of:=1-COUNTIF([FRs.$C$2:.$C$950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213" table:formula="of:=1-COUNTIF([FRs.$C$2:.$C$950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213" table:formula="of:=1-COUNTIF([FRs.$C$2:.$C$950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213" table:formula="of:=1-COUNTIF([FRs.$C$2:.$C$950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213" table:formula="of:=1-COUNTIF([FRs.$C$2:.$C$950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213" table:formula="of:=1-COUNTIF([FRs.$C$2:.$C$950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213" table:formula="of:=1-COUNTIF([FRs.$C$2:.$C$950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213" table:formula="of:=1-COUNTIF([FRs.$C$2:.$C$950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213" table:formula="of:=1-COUNTIF([FRs.$C$2:.$C$950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213" table:formula="of:=1-COUNTIF([FRs.$C$2:.$C$950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213" table:formula="of:=1-COUNTIF([FRs.$C$2:.$C$950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213" table:formula="of:=1-COUNTIF([FRs.$C$2:.$C$950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213" table:formula="of:=1-COUNTIF([FRs.$C$2:.$C$950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213" table:formula="of:=1-COUNTIF([FRs.$C$2:.$C$950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213" table:formula="of:=1-COUNTIF([FRs.$C$2:.$C$950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213" table:formula="of:=1-COUNTIF([FRs.$C$2:.$C$950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213" table:formula="of:=1-COUNTIF([FRs.$C$2:.$C$950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213" table:formula="of:=1-COUNTIF([FRs.$C$2:.$C$950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213" table:formula="of:=1-COUNTIF([FRs.$C$2:.$C$950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213" table:formula="of:=1-COUNTIF([FRs.$C$2:.$C$950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213" table:formula="of:=1-COUNTIF([FRs.$C$2:.$C$950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213" table:formula="of:=1-COUNTIF([FRs.$C$2:.$C$950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213" table:formula="of:=1-COUNTIF([FRs.$C$2:.$C$950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213" table:formula="of:=1-COUNTIF([FRs.$C$2:.$C$950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213" table:formula="of:=1-COUNTIF([FRs.$C$2:.$C$950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213" table:formula="of:=1-COUNTIF([FRs.$C$2:.$C$950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213" table:formula="of:=1-COUNTIF([FRs.$C$2:.$C$950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213" table:formula="of:=1-COUNTIF([FRs.$C$2:.$C$950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213" table:formula="of:=1-COUNTIF([FRs.$C$2:.$C$950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213" table:formula="of:=1-COUNTIF([FRs.$C$2:.$C$950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213" table:formula="of:=1-COUNTIF([FRs.$C$2:.$C$950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213" table:formula="of:=1-COUNTIF([FRs.$C$2:.$C$950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213" table:formula="of:=1-COUNTIF([FRs.$C$2:.$C$950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213" table:formula="of:=1-COUNTIF([FRs.$C$2:.$C$950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213" table:formula="of:=1-COUNTIF([FRs.$C$2:.$C$950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213" table:formula="of:=1-COUNTIF([FRs.$C$2:.$C$950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213" table:formula="of:=1-COUNTIF([FRs.$C$2:.$C$950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213" table:formula="of:=1-COUNTIF([FRs.$C$2:.$C$950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213" table:formula="of:=1-COUNTIF([FRs.$C$2:.$C$950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213" table:formula="of:=1-COUNTIF([FRs.$C$2:.$C$950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213" table:formula="of:=1-COUNTIF([FRs.$C$2:.$C$950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213" table:formula="of:=1-COUNTIF([FRs.$C$2:.$C$950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213" table:formula="of:=1-COUNTIF([FRs.$C$2:.$C$950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213" table:formula="of:=1-COUNTIF([FRs.$C$2:.$C$950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213" table:formula="of:=1-COUNTIF([FRs.$C$2:.$C$950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213" table:formula="of:=1-COUNTIF([FRs.$C$2:.$C$950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213" table:formula="of:=1-COUNTIF([FRs.$C$2:.$C$950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213" table:formula="of:=1-COUNTIF([FRs.$C$2:.$C$950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213" table:formula="of:=1-COUNTIF([FRs.$C$2:.$C$950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213" table:formula="of:=1-COUNTIF([FRs.$C$2:.$C$950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213" table:formula="of:=1-COUNTIF([FRs.$C$2:.$C$950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213" table:formula="of:=1-COUNTIF([FRs.$C$2:.$C$950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213" table:formula="of:=1-COUNTIF([FRs.$C$2:.$C$950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213" table:formula="of:=1-COUNTIF([FRs.$C$2:.$C$950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213" table:formula="of:=1-COUNTIF([FRs.$C$2:.$C$950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213" table:formula="of:=1-COUNTIF([FRs.$C$2:.$C$950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213" table:formula="of:=1-COUNTIF([FRs.$C$2:.$C$950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213" table:formula="of:=1-COUNTIF([FRs.$C$2:.$C$950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213" table:formula="of:=1-COUNTIF([FRs.$C$2:.$C$950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213" table:formula="of:=1-COUNTIF([FRs.$C$2:.$C$950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213" table:formula="of:=1-COUNTIF([FRs.$C$2:.$C$950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213" table:formula="of:=1-COUNTIF([FRs.$C$2:.$C$950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213" table:formula="of:=1-COUNTIF([FRs.$C$2:.$C$950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213" table:formula="of:=1-COUNTIF([FRs.$C$2:.$C$950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213" table:formula="of:=1-COUNTIF([FRs.$C$2:.$C$950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213" table:formula="of:=1-COUNTIF([FRs.$C$2:.$C$950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213" table:formula="of:=1-COUNTIF([FRs.$C$2:.$C$950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213" table:formula="of:=1-COUNTIF([FRs.$C$2:.$C$950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213" table:formula="of:=1-COUNTIF([FRs.$C$2:.$C$950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213" table:formula="of:=1-COUNTIF([FRs.$C$2:.$C$950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213" table:formula="of:=1-COUNTIF([FRs.$C$2:.$C$950]; &quot;=&quot;&amp;[.A2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213" table:formula="of:=1-COUNTIF([FRs.$C$2:.$C$950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213" table:formula="of:=1-COUNTIF([FRs.$C$2:.$C$950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213" table:formula="of:=1-COUNTIF([FRs.$C$2:.$C$950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213" table:formula="of:=1-COUNTIF([FRs.$C$2:.$C$950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213" table:formula="of:=1-COUNTIF([FRs.$C$2:.$C$950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213" table:formula="of:=1-COUNTIF([FRs.$C$2:.$C$950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213" table:formula="of:=1-COUNTIF([FRs.$C$2:.$C$950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213" table:formula="of:=1-COUNTIF([FRs.$C$2:.$C$950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213" table:formula="of:=1-COUNTIF([FRs.$C$2:.$C$950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213" table:formula="of:=1-COUNTIF([FRs.$C$2:.$C$950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213" table:formula="of:=1-COUNTIF([FRs.$C$2:.$C$950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213" table:formula="of:=1-COUNTIF([FRs.$C$2:.$C$950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213" table:formula="of:=1-COUNTIF([FRs.$C$2:.$C$950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213" table:formula="of:=1-COUNTIF([FRs.$C$2:.$C$950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213" table:formula="of:=1-COUNTIF([FRs.$C$2:.$C$950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213" table:formula="of:=1-COUNTIF([FRs.$C$2:.$C$950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213" table:formula="of:=1-COUNTIF([FRs.$C$2:.$C$950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213" table:formula="of:=1-COUNTIF([FRs.$C$2:.$C$950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213" table:formula="of:=1-COUNTIF([FRs.$C$2:.$C$950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213" table:formula="of:=1-COUNTIF([FRs.$C$2:.$C$950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213" table:formula="of:=1-COUNTIF([FRs.$C$2:.$C$950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213" table:formula="of:=1-COUNTIF([FRs.$C$2:.$C$950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213" table:formula="of:=1-COUNTIF([FRs.$C$2:.$C$950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213" table:formula="of:=1-COUNTIF([FRs.$C$2:.$C$950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213" table:formula="of:=1-COUNTIF([FRs.$C$2:.$C$950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213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08" table:orientation="column"/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0:51:39.800213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7-02T11:10:51.242192872</dc:date>
    <meta:editing-duration>P2DT6H36M55S</meta:editing-duration>
    <meta:editing-cycles>156</meta:editing-cycles>
    <meta:generator>LibreOffice/4.2.5.2$Linux_X86_64 LibreOffice_project/420m0$Build-2</meta:generator>
    <meta:document-statistic meta:table-count="4" meta:cell-count="2762" meta:object-count="0"/>
  </office:meta>
</office:document-meta>
</file>
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26" style:family="table-column">
      <style:table-column-properties fo:break-before="auto" style:column-width="5.994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ro16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3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0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 style:vertical-align="top"/>
      <style:text-properties style:use-window-font-color="true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transparent" fo:border="0.06pt solid #000000" style:vertical-align="top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2" style:family="table-cell" style:parent-style-name="Default">
      <style:table-cell-properties fo:background-color="#008000" style:vertical-align="top"/>
      <style:text-properties fo:color="#ffffff"/>
    </style:style>
    <style:style style:name="ce43" style:family="table-cell" style:parent-style-name="Default">
      <style:table-cell-properties fo:background-color="#cccccc" style:vertical-align="top"/>
      <style:text-properties style:use-window-font-color="true"/>
    </style:style>
    <style:style style:name="ce44" style:family="table-cell" style:parent-style-name="Default">
      <style:table-cell-properties fo:border="0.06pt solid #000000" style:vertical-align="top"/>
      <style:text-properties fo:color="#999999"/>
    </style:style>
    <style:style style:name="ce4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9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61" style:family="table-cell" style:parent-style-name="Default">
      <style:table-cell-properties fo:background-color="#ffffcc" fo:wrap-option="wrap" fo:border="0.06pt solid #000000"/>
    </style:style>
    <style:style style:name="ce6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6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6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7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7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8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9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8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1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transparent" fo:wrap-option="wrap" fo:border="0.06pt solid #000000"/>
    </style:style>
    <style:style style:name="ce8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2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8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0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46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14"/>
        <table:table-column table:style-name="co8" table:default-cell-style-name="ce14"/>
        <table:table-column table:style-name="co9" table:default-cell-style-name="ce83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010" table:default-cell-style-name="ce4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91])+1" office:value-type="float" office:value="195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82" office:value-type="string" calcext:value-type="string">
            <text:p>Complete</text:p>
          </table:table-cell>
          <table:table-cell table:style-name="ce82" office:value-type="string" calcext:value-type="string">
            <text:p>Correct</text:p>
          </table:table-cell>
          <table:table-cell table:style-name="ce82" office:value-type="string" calcext:value-type="string">
            <text:p>Feasible</text:p>
          </table:table-cell>
          <table:table-cell table:style-name="ce82" office:value-type="string" calcext:value-type="string">
            <text:p>Necessary</text:p>
          </table:table-cell>
          <table:table-cell table:style-name="ce82" office:value-type="string" calcext:value-type="string">
            <text:p>Prioritised</text:p>
          </table:table-cell>
          <table:table-cell table:style-name="ce82" office:value-type="string" calcext:value-type="string">
            <text:p>Unambiguous</text:p>
          </table:table-cell>
          <table:table-cell table:style-name="ce82" office:value-type="string" calcext:value-type="string">
            <text:p>Verifiable</text:p>
          </table:table-cell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7" office:value-type="string" calcext:value-type="string">
            <text:p>MF-01: Use Case Editor</text:p>
          </table:table-cell>
          <table:table-cell table:style-name="ce47" table:number-columns-repeated="2"/>
          <table:table-cell table:style-name="ce82" table:number-columns-repeated="7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82" calcext:value-type="float">
            <text:p>82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reqs from UC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SHRs from UC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7" office:value-type="string" calcext:value-type="string">
            <text:p>MF-05: Field Customisation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9" office:value-type="string" calcext:value-type="string">
            <text:p>Modifying a UC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14" calcext:value-type="float">
            <text:p>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UCs have content for each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7" calcext:value-type="float">
            <text:p>47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 UC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0" calcext:value-type="float">
            <text:p>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 UC field is restored, System shall restore corresponding field values for each U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9" office:value-type="string" calcext:value-type="string">
            <text:p>Modifying an LL-req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6" calcext:value-type="float">
            <text:p>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7" calcext:value-type="float">
            <text:p>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8" calcext:value-type="float">
            <text:p>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9" calcext:value-type="float">
            <text:p>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0" calcext:value-type="float">
            <text:p>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4" calcext:value-type="float">
            <text:p>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LL-reqs have content for each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5" calcext:value-type="float">
            <text:p>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n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1" calcext:value-type="float">
            <text:p>131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n LL-req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2" calcext:value-type="float">
            <text:p>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3" calcext:value-type="float">
            <text:p>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n LL-req field is restored, System shall restore corresponding field values for each LL-req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Field types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3" calcext:value-type="float">
            <text:p>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50" office:value-type="string" calcext:value-type="string">
            <text:p>System shall provide a field type: Text field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4" calcext:value-type="float">
            <text:p>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50" office:value-type="string" calcext:value-type="string">
            <text:p>BA shall be able to configure text fields' nam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50" office:value-type="string" calcext:value-type="string">
            <text:p>System shall provide a field type derived from a grouping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 office:value-type="string" calcext:value-type="string">
            <text:p>Work out config details</text:p>
          </table:table-cell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66" calcext:value-type="float">
            <text:p>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50" office:value-type="string" calcext:value-type="string">
            <text:p>All field types that have a concept of mandatory-ness must also provide an emptyness test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5" calcext:value-type="float">
            <text:p>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50" office:value-type="string" calcext:value-type="string">
            <text:p>System shall provide a UC field type: Flow graph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7" office:value-type="string" calcext:value-type="string">
            <text:p>MF-06: Incompletions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50" office:value-type="string" calcext:value-type="string">
            <text:p>System shall render incompletions in reqs, r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50" office:value-type="string" calcext:value-type="string">
            <text:p>System shall render blank, mandatory fields with a red backgroun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1" office:value-type="string" calcext:value-type="string">
            <text:p>Inspection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48" calcext:value-type="float">
            <text:p>48</text:p>
          </table:table-cell>
          <table:table-cell table:style-name="ce32" office:value-type="string" calcext:value-type="string">
            <text:p><text:s text:c="4"/>.count.all</text:p>
          </table:table-cell>
          <table:table-cell table:style-name="ce50" office:value-type="string" calcext:value-type="string">
            <text:p>BA shall be able to see the sum total of incomple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49" calcext:value-type="float">
            <text:p>49</text:p>
          </table:table-cell>
          <table:table-cell table:style-name="ce32" office:value-type="string" calcext:value-type="string">
            <text:p><text:s text:c="4"/>.count.each</text:p>
          </table:table-cell>
          <table:table-cell table:style-name="ce50" office:value-type="string" calcext:value-type="string">
            <text:p>BA shall be able to see a list of UCs and the number of incompletions in each. [Pri=?]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2"/>
          <table:table-cell table:style-name="ce70"/>
          <table:table-cell table:style-name="ce52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50" office:value-type="string" calcext:value-type="string">
            <text:p>When viewing incompletion results, BA shall be able to filter by grouping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1" calcext:value-type="float">
            <text:p>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50" office:value-type="string" calcext:value-type="string">
            <text:p>When viewing incompletion results, BA shall be able to filter by incompletion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12" calcext:value-type="float">
            <text:p>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50" office:value-type="string" calcext:value-type="string">
            <text:p>When viewing incompletion results, BA shall be able to filter by requirement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3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53" table:number-columns-repeated="2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/>
          <table:table-cell table:style-name="ce23" office:value-type="float" office:value="113" calcext:value-type="float">
            <text:p>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50" office:value-type="string" calcext:value-type="string">
            <text:p>System shall display the ID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1" calcext:value-type="float">
            <text:p>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50" office:value-type="string" calcext:value-type="string">
            <text:p>System shall display the name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2" calcext:value-type="float">
            <text:p>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50" office:value-type="string" calcext:value-type="string">
            <text:p>System shall display the name of the UC field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3" calcext:value-type="float">
            <text:p>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50" office:value-type="string" calcext:value-type="string">
            <text:p>System shall display the incompletion tag's additional info (if specified)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4" calcext:value-type="float">
            <text:p>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5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78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1" office:value-type="string" calcext:value-type="string">
            <text:p>Tracking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3" calcext:value-type="float">
            <text:p>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50" office:value-type="string" calcext:value-type="string">
            <text:p>System shall track emptiness of mandatory field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4" calcext:value-type="float">
            <text:p>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50" office:value-type="string" calcext:value-type="string">
            <text:p>System shall track invalid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5" calcext:value-type="float">
            <text:p>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50" office:value-type="string" calcext:value-type="string">
            <text:p>System shall track [DELETED]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74" calcext:value-type="float">
            <text:p>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50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45" calcext:value-type="float">
            <text:p>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50" office:value-type="string" calcext:value-type="string">
            <text:p>System shall track Semantic Header Rows without children as incompletio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1" office:value-type="string" calcext:value-type="string">
            <text:p>Incompletion tags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6" calcext:value-type="float">
            <text:p>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50" office:value-type="string" calcext:value-type="string">
            <text:p>BA shall be able to specify incompletion tags in reqs.</text:p>
            <text:p>Example: “#TODO”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7" calcext:value-type="float">
            <text:p>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5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8" calcext:value-type="float">
            <text:p>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50" office:value-type="string" calcext:value-type="string">
            <text:p>BA shall be able to specify incompletion tags as loose notes, i.e. bound to a project but not a specific req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9" calcext:value-type="float">
            <text:p>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4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0" calcext:value-type="float">
            <text:p>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4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3" office:value-type="string" calcext:value-type="string">
            <text:p>Incompletion tag types</text:p>
          </table:table-cell>
          <table:table-cell table:style-name="ce70"/>
          <table:table-cell table:style-name="ce52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115" calcext:value-type="float">
            <text:p>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50" office:value-type="string" calcext:value-type="string">
            <text:p>BA shall be able to see a list of all incompletion tag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8" calcext:value-type="float">
            <text:p>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50" office:value-type="string" calcext:value-type="string">
            <text:p>BA shall be able to create new types of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69" calcext:value-type="float">
            <text:p>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50" office:value-type="string" calcext:value-type="string">
            <text:p>BA shall be able to rename incompletion tag type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70" calcext:value-type="float">
            <text:p>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50" office:value-type="string" calcext:value-type="string">
            <text:p>System shall appear to rename all instances of a tag when its type is renam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71" calcext:value-type="float">
            <text:p>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delete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72" calcext:value-type="float">
            <text:p>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Before incompletion tag deletion, user shall be able to see a summary of us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73" calcext:value-type="float">
            <text:p>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0" office:value-type="string" calcext:value-type="string">
            <text:p>Before incompletion tag deletion, user shall be able to see each instance of entity's values and associa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7" office:value-type="string" calcext:value-type="string">
            <text:p>MF-07: Organisation</text:p>
          </table:table-cell>
          <table:table-cell table:style-name="ce47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25" calcext:value-type="float">
            <text:p>25</text:p>
          </table:table-cell>
          <table:table-cell table:style-name="ce32" office:value-type="string" calcext:value-type="string">
            <text:p>.transitive</text:p>
          </table:table-cell>
          <table:table-cell table:style-name="ce50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ap</text:p>
          </table:table-cell>
          <table:table-cell table:style-name="ce51" office:value-type="string" calcext:value-type="string">
            <text:p>Application</text:p>
          </table:table-cell>
          <table:table-cell table:style-name="ce51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uc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32" office:value-type="string" calcext:value-type="string">
            <text:p><text:s text:c="4"/>.uce-add</text:p>
          </table:table-cell>
          <table:table-cell table:style-name="ce48" office:value-type="string" calcext:value-type="string">
            <text:p>BA shall be able to apply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<text:s text:c="4"/>.uce-remove</text:p>
          </table:table-cell>
          <table:table-cell table:style-name="ce48" office:value-type="string" calcext:value-type="string">
            <text:p>BA shall be able to remove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string" calcext:value-type="string">
            <text:p><text:s text:c="4"/>.ucfields</text:p>
          </table:table-cell>
          <table:table-cell table:style-name="ce50" office:value-type="string" calcext:value-type="string">
            <text:p>BA shall be able to apply groupings to fields within a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0" calcext:value-type="float">
            <text:p>190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UCs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1" calcext:value-type="float">
            <text:p>191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UC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llreq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2" calcext:value-type="float">
            <text:p>192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3" calcext:value-type="float">
            <text:p>193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bulk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Grouping types</text:p>
          </table:table-cell>
          <table:table-cell table:style-name="ce49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50" office:value-type="string" calcext:value-type="string">
            <text:p>BA shall be able to create a tree of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4" calcext:value-type="float">
            <text:p>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50" office:value-type="string" calcext:value-type="string">
            <text:p>When modifying groupings in a tree, BA shall be able to specify the order of children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5" calcext:value-type="float">
            <text:p>15</text:p>
          </table:table-cell>
          <table:table-cell table:style-name="ce38" office:value-type="string" calcext:value-type="string">
            <text:p><text:s text:c="4"/>.many2many</text:p>
          </table:table-cell>
          <table:table-cell table:style-name="ce50" office:value-type="string" calcext:value-type="string">
            <text:p>When modifying groupings in a tree, BA shall be able to specify multiple parents of a child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create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5" calcext:value-type="float">
            <text:p>18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a grouping after it is renam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" calcext:value-type="float">
            <text:p>18</text:p>
          </table:table-cell>
          <table:table-cell table:style-name="ce32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grouping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50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6" calcext:value-type="float">
            <text:p>186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grouping deletion, user shall be able to see a summary of usag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7" calcext:value-type="float">
            <text:p>187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grouping deletion, user shall be able to see each instance of grouping's values and association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8" calcext:value-type="float">
            <text:p>188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9" calcext:value-type="float">
            <text:p>189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grouping deletion, System shall move it to the bin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1" calcext:value-type="float">
            <text:p>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groupings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2" calcext:value-type="float">
            <text:p>32</text:p>
          </table:table-cell>
          <table:table-cell table:style-name="ce32" office:value-type="string" calcext:value-type="string">
            <text:p><text:s text:c="4"/>.aps</text:p>
          </table:table-cell>
          <table:table-cell table:style-name="ce50" office:value-type="string" calcext:value-type="string">
            <text:p>When a grouping is restored, its requirement applications should be restored too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filter</text:p>
          </table:table-cell>
          <table:table-cell table:style-name="ce49" office:value-type="string" calcext:value-type="string">
            <text:p>Filter workings</text:p>
          </table:table-cell>
          <table:table-cell table:style-name="ce49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string" calcext:value-type="string">
            <text:p><text:s text:c="2"/>.not</text:p>
          </table:table-cell>
          <table:table-cell table:style-name="ce50" office:value-type="string" calcext:value-type="string">
            <text:p>When specifying a grouping filter, User shall be able to specify NOT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32" office:value-type="string" calcext:value-type="string">
            <text:p><text:s text:c="2"/>.and</text:p>
          </table:table-cell>
          <table:table-cell table:style-name="ce50" office:value-type="string" calcext:value-type="string">
            <text:p>When specifying a grouping filter, User shall be able to specify AN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30" calcext:value-type="float">
            <text:p>30</text:p>
          </table:table-cell>
          <table:table-cell table:style-name="ce32" office:value-type="string" calcext:value-type="string">
            <text:p><text:s text:c="2"/>.or</text:p>
          </table:table-cell>
          <table:table-cell table:style-name="ce50" office:value-type="string" calcext:value-type="string">
            <text:p>When specifying a grouping filter, User shall be able to specify OR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6" office:value-type="float" office:value="34" calcext:value-type="float">
            <text:p>34</text:p>
          </table:table-cell>
          <table:table-cell table:style-name="ce33" office:value-type="string" calcext:value-type="string">
            <text:p>.browse</text:p>
          </table:table-cell>
          <table:table-cell table:style-name="ce49" office:value-type="string" calcext:value-type="string">
            <text:p>BA shall be able to browse groupings.</text:p>
          </table:table-cell>
          <table:table-cell table:style-name="ce71" office:value-type="date" office:date-value="2014-02-13" calcext:value-type="date">
            <text:p>41683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5" calcext:value-type="float">
            <text:p>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50" office:value-type="string" calcext:value-type="string">
            <text:p>BA shall be able to narrow the scope of browsing data, to a grouping with children.</text:p>
          </table:table-cell>
          <table:table-cell table:style-name="ce69" office:value-type="date" office:date-value="2014-09-05" calcext:value-type="date">
            <text:p>41887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6" calcext:value-type="float">
            <text:p>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50" office:value-type="string" calcext:value-type="string">
            <text:p>System shall display the number of reqs associated with each grouping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7" calcext:value-type="float">
            <text:p>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50" office:value-type="string" calcext:value-type="string">
            <text:p>System shall display the number of reqs to which the top-level grouping is not appli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8" calcext:value-type="float">
            <text:p>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50" office:value-type="string" calcext:value-type="string">
            <text:p>BA shall be able to read all UC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9" calcext:value-type="float">
            <text:p>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50" office:value-type="string" calcext:value-type="string">
            <text:p>BA shall be able to read all UC step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7" office:value-type="string" calcext:value-type="string">
            <text:p>MF-12: Low-level Requirements</text:p>
          </table:table-cell>
          <table:table-cell table:style-name="ce47" table:number-columns-repeated="2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1" office:value-type="string" calcext:value-type="string">
            <text:p>Req Data</text:p>
          </table:table-cell>
          <table:table-cell table:style-name="ce51" table:number-columns-repeated="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8" calcext:value-type="float">
            <text:p>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8" office:value-type="string" calcext:value-type="string">
            <text:p>System shall allocate reqs a unique ID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8" office:value-type="string" calcext:value-type="string">
            <text:p>System shall create unique ID reqs by combining a req-type's mnemonic &amp; a numb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8" office:value-type="string" calcext:value-type="string">
            <text:p>System shall maintain the last-updated timestamp of reqs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0" calcext:value-type="float">
            <text:p>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8" office:value-type="string" calcext:value-type="string">
            <text:p>BA shall be able to reference req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8" calcext:value-type="float">
            <text:p>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8" office:value-type="string" calcext:value-type="string">
            <text:p>BA shall be able to reference SHRs from 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1" calcext:value-type="float">
            <text:p>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8" office:value-type="string" calcext:value-type="string">
            <text:p>BA shall be able to reference UC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33" office:value-type="string" calcext:value-type="string">
            <text:p>.delete</text:p>
          </table:table-cell>
          <table:table-cell table:style-name="ce51" office:value-type="string" calcext:value-type="string">
            <text:p>BA shall be able to (soft) delete reqs.</text:p>
          </table:table-cell>
          <table:table-cell table:style-name="ce71" office:value-type="date" office:date-value="2014-05-15" calcext:value-type="date">
            <text:p>41774</text:p>
          </table:table-cell>
          <table:table-cell table:style-name="ce79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4" calcext:value-type="float">
            <text:p>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8" office:value-type="string" calcext:value-type="string">
            <text:p>BA shall be able to hide deleted reqs from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3" calcext:value-type="float">
            <text:p>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8" office:value-type="string" calcext:value-type="string">
            <text:p>BA shall be able to read deleted reqs (usually in light grey and/or strikethrough)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6" calcext:value-type="float">
            <text:p>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8" office:value-type="string" calcext:value-type="string">
            <text:p>BA shall be able to restore deleted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107" calcext:value-type="float">
            <text:p>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5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6"/>
          <table:table-cell table:style-name="ce33" office:value-type="string" calcext:value-type="string">
            <text:p>.reqtypes</text:p>
          </table:table-cell>
          <table:table-cell table:style-name="ce51" office:value-type="string" calcext:value-type="string">
            <text:p>Requirement Types</text:p>
          </table:table-cell>
          <table:table-cell table:style-name="ce71" office:value-type="date" office:date-value="2014-05-16" calcext:value-type="date">
            <text:p>41775</text:p>
          </table:table-cell>
          <table:table-cell table:style-name="ce79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6" calcext:value-type="float">
            <text:p>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req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7" calcext:value-type="float">
            <text:p>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a new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8" calcext:value-type="float">
            <text:p>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a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9" calcext:value-type="float">
            <text:p>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50" office:value-type="string" calcext:value-type="string">
            <text:p>When a req type's mnemonic is changed, System shall appear to rename all refs that include the mnemoni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2" calcext:value-type="float">
            <text:p>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5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0" calcext:value-type="float">
            <text:p>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1" calcext:value-type="float">
            <text:p>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When listing req types, BA shall be able to see a summary of usage. (i.e. count of associated reqs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3" calcext:value-type="float">
            <text:p>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0" office:value-type="string" calcext:value-type="string">
            <text:p>System shall hard-delete a req type only when it has never had any associa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4" calcext:value-type="float">
            <text:p>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58" office:value-type="string" calcext:value-type="string">
            <text:p>After soft-deletion, req types should move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8" office:value-type="string" calcext:value-type="string">
            <text:p>BA shall be able to restore req types from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1" office:value-type="string" calcext:value-type="string">
            <text:p>Req View</text:p>
          </table:table-cell>
          <table:table-cell table:style-name="ce51" table:number-columns-repeated="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4" calcext:value-type="float">
            <text:p>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8" office:value-type="string" calcext:value-type="string">
            <text:p>BA shall be able to view all LL reqs with each req on its own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3" calcext:value-type="float">
            <text:p>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8" office:value-type="string" calcext:value-type="string">
            <text:p>BA shall be able to view all LL reqs as a table/grid.</text:p>
          </table:table-cell>
          <table:table-cell table:style-name="ce69" office:value-type="date" office:date-value="2014-05-19" calcext:value-type="date">
            <text:p>41778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6" calcext:value-type="float">
            <text:p>17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new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69" calcext:value-type="float">
            <text:p>169</text:p>
          </table:table-cell>
          <table:table-cell table:style-name="ce32" office:value-type="string" calcext:value-type="string">
            <text:p><text:s text:c="2"/>.ucs</text:p>
          </table:table-cell>
          <table:table-cell table:style-name="ce48" office:value-type="string" calcext:value-type="string">
            <text:p>System shall display UCs as rows in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0" calcext:value-type="float">
            <text:p>170</text:p>
          </table:table-cell>
          <table:table-cell table:style-name="ce34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perform on UCs, all semantic-ID related behaviour applicable to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columns</text:p>
          </table:table-cell>
          <table:table-cell table:style-name="ce59" table:number-columns-repeated="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0" calcext:value-type="float">
            <text:p>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8" office:value-type="string" calcext:value-type="string">
            <text:p>In the LL-req table, System shall always display a column of req des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8" calcext:value-type="float">
            <text:p>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8" office:value-type="string" calcext:value-type="string">
            <text:p>In the LL-req table, System shall always display a column of req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9" calcext:value-type="float">
            <text:p>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8" office:value-type="string" calcext:value-type="string">
            <text:p>In the LL-req table, System shall always display a column of semantic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5" calcext:value-type="float">
            <text:p>95</text:p>
          </table:table-cell>
          <table:table-cell table:style-name="ce40" office:value-type="string" calcext:value-type="string">
            <text:p><text:s text:c="7"/>.dup</text:p>
          </table:table-cell>
          <table:table-cell table:style-name="ce4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4" calcext:value-type="float">
            <text:p>94</text:p>
          </table:table-cell>
          <table:table-cell table:style-name="ce40" office:value-type="string" calcext:value-type="string">
            <text:p><text:s text:c="7"/>.indent</text:p>
          </table:table-cell>
          <table:table-cell table:style-name="ce48" office:value-type="string" calcext:value-type="string">
            <text:p>When rendering a tree of semantic IDs, System shall replace components also in the parent req, with indentatio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3" calcext:value-type="float">
            <text:p>93</text:p>
          </table:table-cell>
          <table:table-cell table:style-name="ce40" office:value-type="string" calcext:value-type="string">
            <text:p><text:s text:c="7"/>.tree</text:p>
          </table:table-cell>
          <table:table-cell table:style-name="ce4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7" calcext:value-type="float">
            <text:p>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8" office:value-type="string" calcext:value-type="string">
            <text:p>In the LL-req table, System shall give each criterion in the sort criteria it's own colum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editor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2" calcext:value-type="float">
            <text:p>172</text:p>
          </table:table-cell>
          <table:table-cell table:style-name="ce34" office:value-type="string" calcext:value-type="string">
            <text:p><text:s text:c="4"/>.copy</text:p>
          </table:table-cell>
          <table:table-cell table:style-name="ce48" office:value-type="string" calcext:value-type="string">
            <text:p>BA shall be able to create a copy of 1 or more (selected)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3" calcext:value-type="float">
            <text:p>173</text:p>
          </table:table-cell>
          <table:table-cell table:style-name="ce34" office:value-type="string" calcext:value-type="string">
            <text:p><text:s text:c="7"/>.selection</text:p>
          </table:table-cell>
          <table:table-cell table:style-name="ce4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4" calcext:value-type="float">
            <text:p>174</text:p>
          </table:table-cell>
          <table:table-cell table:style-name="ce34" office:value-type="string" calcext:value-type="string">
            <text:p><text:s text:c="7"/>.semid</text:p>
          </table:table-cell>
          <table:table-cell table:style-name="ce4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5" calcext:value-type="float">
            <text:p>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6" calcext:value-type="float">
            <text:p>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7" calcext:value-type="float">
            <text:p>17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60" office:value-type="string" calcext:value-type="string">
            <text:p>BA shall be able to update an existing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8" calcext:value-type="float">
            <text:p>178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LL-req is updat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0" calcext:value-type="float">
            <text:p>90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change the requirement type of a requirement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1" calcext:value-type="float">
            <text:p>91</text:p>
          </table:table-cell>
          <table:table-cell table:style-name="ce32" office:value-type="string" calcext:value-type="string">
            <text:p><text:s text:c="6"/>.restore</text:p>
          </table:table-cell>
          <table:table-cell table:style-name="ce48" office:value-type="string" calcext:value-type="string">
            <text:p>When a req's type is changed and later changed back to what it was previously, System restore it's original I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4" calcext:value-type="float">
            <text:p>194</text:p>
          </table:table-cell>
          <table:table-cell table:style-name="ce32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set the req-type for multiple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7" calcext:value-type="float">
            <text:p>97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modify the semantic IDs of existing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3" calcext:value-type="float">
            <text:p>143</text:p>
          </table:table-cell>
          <table:table-cell table:style-name="ce40" office:value-type="string" calcext:value-type="string">
            <text:p><text:s text:c="7"/>.0-n</text:p>
          </table:table-cell>
          <table:table-cell table:style-name="ce48" office:value-type="string" calcext:value-type="string">
            <text:p>BA shall be able to apply 0-n semantic IDs to LL-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6" calcext:value-type="float">
            <text:p>96</text:p>
          </table:table-cell>
          <table:table-cell table:style-name="ce41" office:value-type="string" calcext:value-type="string">
            <text:p><text:s text:c="7"/>.show-all</text:p>
          </table:table-cell>
          <table:table-cell table:style-name="ce48" office:value-type="string" calcext:value-type="string">
            <text:p>BA shall be able to see all semantic IDs for a req with multiple, when editing a single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7" calcext:value-type="float">
            <text:p>167</text:p>
          </table:table-cell>
          <table:table-cell table:style-name="ce34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8" calcext:value-type="float">
            <text:p>168</text:p>
          </table:table-cell>
          <table:table-cell table:style-name="ce34" office:value-type="string" calcext:value-type="string">
            <text:p><text:s text:c="8"/>.no-common</text:p>
          </table:table-cell>
          <table:table-cell table:style-name="ce4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1" calcext:value-type="float">
            <text:p>171</text:p>
          </table:table-cell>
          <table:table-cell table:style-name="ce34" office:value-type="string" calcext:value-type="string">
            <text:p><text:s text:c="4"/>.uc.title</text:p>
          </table:table-cell>
          <table:table-cell table:style-name="ce48" office:value-type="string" calcext:value-type="string">
            <text:p>BA shall be able to edit a UC title from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9" calcext:value-type="float">
            <text:p>179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61" office:value-type="string" calcext:value-type="string">
            <text:p>Able to (soft) delete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LL-req deletion, user shall be able to see a count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1" calcext:value-type="float">
            <text:p>181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LL-req deletion, user shall be able to see each instance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2" calcext:value-type="float">
            <text:p>182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LL-req deletion, System shall move entity to the bin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3" calcext:value-type="float">
            <text:p>183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BA shall be able to restore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4" calcext:value-type="float">
            <text:p>184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LL-req restoration, previous values and associations shall be restored als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filter</text:p>
          </table:table-cell>
          <table:table-cell table:style-name="ce59" table:number-columns-repeated="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7" calcext:value-type="float">
            <text:p>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8" office:value-type="string" calcext:value-type="string">
            <text:p>BA shall be able to filter view of reqs by group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6" calcext:value-type="float">
            <text:p>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filter view of reqs by req-typ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8" calcext:value-type="float">
            <text:p>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8" office:value-type="string" calcext:value-type="string">
            <text:p>BA shall be able to filter view of reqs to rows containing a case-insensitive str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sort</text:p>
          </table:table-cell>
          <table:table-cell table:style-name="ce59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8" calcext:value-type="float">
            <text:p>98</text:p>
          </table:table-cell>
          <table:table-cell table:style-name="ce32" office:value-type="string" calcext:value-type="string">
            <text:p><text:s text:c="4"/>.default</text:p>
          </table:table-cell>
          <table:table-cell table:style-name="ce4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9" calcext:value-type="float">
            <text:p>109</text:p>
          </table:table-cell>
          <table:table-cell table:style-name="ce32" office:value-type="string" calcext:value-type="string">
            <text:p><text:s text:c="4"/>.on-change</text:p>
          </table:table-cell>
          <table:table-cell table:style-name="ce48" office:value-type="string" calcext:value-type="string">
            <text:p>When a req is modified, System shall automatically resort the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string" calcext:value-type="string">
            <text:p><text:s text:c="4"/>.post-change</text:p>
          </table:table-cell>
          <table:table-cell table:style-name="ce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9" calcext:value-type="float">
            <text:p>99</text:p>
          </table:table-cell>
          <table:table-cell table:style-name="ce32" office:value-type="string" calcext:value-type="string">
            <text:p><text:s text:c="4"/>.custom</text:p>
          </table:table-cell>
          <table:table-cell table:style-name="ce48" office:value-type="string" calcext:value-type="string">
            <text:p>BA shall be able to customise sort logic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1" calcext:value-type="float">
            <text:p>141</text:p>
          </table:table-cell>
          <table:table-cell table:style-name="ce32" office:value-type="string" calcext:value-type="string">
            <text:p><text:s text:c="7"/>.fields</text:p>
          </table:table-cell>
          <table:table-cell table:style-name="ce48" office:value-type="string" calcext:value-type="string">
            <text:p>BA shall be able to use custom LL-req fields in the sort criteria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0" calcext:value-type="float">
            <text:p>100</text:p>
          </table:table-cell>
          <table:table-cell table:style-name="ce32" office:value-type="string" calcext:value-type="string">
            <text:p><text:s text:c="7"/>.mult</text:p>
          </table:table-cell>
          <table:table-cell table:style-name="ce48" office:value-type="string" calcext:value-type="string">
            <text:p>BA shall be able to sort by multiple, ordered colum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8" calcext:value-type="float">
            <text:p>108</text:p>
          </table:table-cell>
          <table:table-cell table:style-name="ce32" office:value-type="string" calcext:value-type="string">
            <text:p><text:s text:c="7"/>.off</text:p>
          </table:table-cell>
          <table:table-cell table:style-name="ce4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1" office:value-type="string" calcext:value-type="string">
            <text:p>Refs</text:p>
          </table:table-cell>
          <table:table-cell table:style-name="ce51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2" calcext:value-type="float">
            <text:p>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3" calcext:value-type="float">
            <text:p>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1" calcext:value-type="float">
            <text:p>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8" office:value-type="string" calcext:value-type="string">
            <text:p>For LL-req refs made using unique ID, System shall render the ref using 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5" calcext:value-type="float">
            <text:p>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8" office:value-type="string" calcext:value-type="string">
            <text:p>Where BA can specify refs to LL-reqs, BA can specify using a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4" calcext:value-type="float">
            <text:p>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1" calcext:value-type="float">
            <text:p>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8" office:value-type="string" calcext:value-type="string">
            <text:p>Where BA can specify refs to LL-reqs, BA can specify using a numeric/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1" office:value-type="string" calcext:value-type="string">
            <text:p>SHR (Semantic Header Row)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4" calcext:value-type="float">
            <text:p>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6" calcext:value-type="float">
            <text:p>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update only two attributes of an SHR: {sem-ID, desc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9" calcext:value-type="float">
            <text:p>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50" office:value-type="string" calcext:value-type="string">
            <text:p>When the sem-ID of an SHR changes, System shall rename the matching portion of childrens' sem-I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5" calcext:value-type="float">
            <text:p>17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SHR's semID is modifi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7" calcext:value-type="float">
            <text:p>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8" office:value-type="string" calcext:value-type="string">
            <text:p>BA shall be able to (hard) dele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token</text:p>
          </table:table-cell>
          <table:table-cell table:style-name="ce51" office:value-type="string" calcext:value-type="string">
            <text:p>Text Tokens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7" calcext:value-type="float">
            <text:p>157</text:p>
          </table:table-cell>
          <table:table-cell table:style-name="ce39" office:value-type="string" calcext:value-type="string">
            <text:p><text:s text:c="2"/>.create</text:p>
          </table:table-cell>
          <table:table-cell table:style-name="ce39" office:value-type="string" calcext:value-type="string">
            <text:p>BA shall be able to defin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8" calcext:value-type="float">
            <text:p>158</text:p>
          </table:table-cell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9" calcext:value-type="float">
            <text:p>159</text:p>
          </table:table-cell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0" calcext:value-type="float">
            <text:p>160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after a text-token key is rename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1" calcext:value-type="float">
            <text:p>16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BA shall be able to (hard) delet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2" calcext:value-type="float">
            <text:p>16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text-token deletion, BA shall be able to see a summary of usag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3" calcext:value-type="float">
            <text:p>16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text-token deletion, BA shall be able to see each datem using the text-token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4" calcext:value-type="float">
            <text:p>164</text:p>
          </table:table-cell>
          <table:table-cell table:style-name="ce34" office:value-type="string" calcext:value-type="string">
            <text:p><text:s text:c="2"/>.use</text:p>
          </table:table-cell>
          <table:table-cell table:style-name="ce39" office:value-type="string" calcext:value-type="string">
            <text:p>BA shall be able to insert text-tokens in req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5" calcext:value-type="float">
            <text:p>165</text:p>
          </table:table-cell>
          <table:table-cell table:style-name="ce34" office:value-type="string" calcext:value-type="string">
            <text:p><text:s text:c="4"/>.render</text:p>
          </table:table-cell>
          <table:table-cell table:style-name="ce48" office:value-type="string" calcext:value-type="string">
            <text:p>When rendering a req value, System shall replace text-tokens with their token-valu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6" calcext:value-type="float">
            <text:p>166</text:p>
          </table:table-cell>
          <table:table-cell table:style-name="ce34" office:value-type="string" calcext:value-type="string">
            <text:p><text:s text:c="4"/>.edit</text:p>
          </table:table-cell>
          <table:table-cell table:style-name="ce48" office:value-type="string" calcext:value-type="string">
            <text:p>When editing a req value, System shall display text-tokens (i.e. not expanded with their token-values)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42"/>
          <table:table-cell table:style-name="ce62" office:value-type="string" calcext:value-type="string">
            <text:p>Misc Requirements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3" office:value-type="float" office:value="24" calcext:value-type="float">
            <text:p>24</text:p>
          </table:table-cell>
          <table:table-cell table:style-name="ce32" office:value-type="string" calcext:value-type="string">
            <text:p>readuc.grouping.all</text:p>
          </table:table-cell>
          <table:table-cell table:style-name="ce50" office:value-type="string" calcext:value-type="string">
            <text:p>When reading a UC, the reader shall be able to see all groupings applied to the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32" office:value-type="string" calcext:value-type="string">
            <text:p>shares.read.filter</text:p>
          </table:table-cell>
          <table:table-cell table:style-name="ce63" office:value-type="string" calcext:value-type="string">
            <text:p>When reading shared UCs, AnonReader shall be able to filter UCs by groupings. [Pri=Nice]</text:p>
          </table:table-cell>
          <table:table-cell table:style-name="ce74" office:value-type="date" office:date-value="2014-02-07" calcext:value-type="date">
            <text:p>41677</text:p>
          </table:table-cell>
          <table:table-cell table:style-name="ce80"/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1" office:value-type="string" calcext:value-type="string">
            <text:p>Revision numbers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50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7" calcext:value-type="float">
            <text:p>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50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5" calcext:value-type="float">
            <text:p>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5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2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5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1"/>
          <table:table-cell table:style-name="ce18" table:number-columns-repeated="2"/>
          <table:table-cell table:style-name="ce43"/>
          <table:table-cell table:style-name="ce64" office:value-type="string" calcext:value-type="string">
            <text:p>Deleted or Deferred Requirements</text:p>
          </table:table-cell>
          <table:table-cell table:style-name="ce75" table:number-columns-repeated="2"/>
          <table:table-cell table:number-columns-repeated="1017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<text:s text:c="4"/>.shares</text:p>
          </table:table-cell>
          <table:table-cell table:style-name="ce65" office:value-type="string" calcext:value-type="string">
            <text:p>BA shall be able to filter shares' UC selection criteria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<text:s text:c="4"/>.readown</text:p>
          </table:table-cell>
          <table:table-cell table:style-name="ce65" office:value-type="string" calcext:value-type="string">
            <text:p>When reading own UCs, BA shall be able to filter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<text:s text:c="4"/>.uc-list</text:p>
          </table:table-cell>
          <table:table-cell table:style-name="ce65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42" calcext:value-type="float">
            <text:p>14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6" office:value-type="string" calcext:value-type="string">
            <text:p>BA shall be able to copy a field set from another project.</text:p>
          </table:table-cell>
          <table:table-cell table:style-name="ce76" office:value-type="date" office:date-value="2014-05-19" calcext:value-type="date">
            <text:p>41778</text:p>
          </table:table-cell>
          <table:table-cell table:style-name="ce66"/>
          <table:table-cell table:number-columns-repeated="1017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44" office:value-type="string" calcext:value-type="string">
            <text:p><text:s text:c="4"/>.discards</text:p>
          </table:table-cell>
          <table:table-cell table:style-name="ce6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6" office:value-type="date" office:date-value="2014-02-25" calcext:value-type="date">
            <text:p>41695</text:p>
          </table:table-cell>
          <table:table-cell table:style-name="ce66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5" office:value-type="string" calcext:value-type="string">
            <text:p>BA shall be able to copy a subset of groupings (including child nodes) between projects.</text:p>
          </table:table-cell>
          <table:table-cell table:style-name="ce76" office:value-type="date" office:date-value="2014-02-12" calcext:value-type="date">
            <text:p>41682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0" office:value-type="float" office:value="105" calcext:value-type="float">
            <text:p>105</text:p>
          </table:table-cell>
          <table:table-cell table:style-name="ce44" office:value-type="string" calcext:value-type="string">
            <text:p><text:s text:c="2"/>.refs</text:p>
          </table:table-cell>
          <table:table-cell table:style-name="ce65" office:value-type="string" calcext:value-type="string">
            <text:p>[Dup of FR-55]</text:p>
            <text:p>System shall track refs to deleted LL-reqs as incompletions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111" calcext:value-type="float">
            <text:p>111</text:p>
          </table:table-cell>
          <table:table-cell table:style-name="ce44"/>
          <table:table-cell table:style-name="ce6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76" office:value-type="date" office:date-value="2014-05-16" calcext:value-type="date">
            <text:p>41775</text:p>
          </table:table-cell>
          <table:table-cell table:style-name="ce66"/>
          <table:table-cell table:number-columns-repeated="1017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89" calcext:value-type="float">
            <text:p>89</text:p>
          </table:table-cell>
          <table:table-cell table:style-name="ce44" office:value-type="string" calcext:value-type="string">
            <text:p><text:s text:c="4"/>.copy</text:p>
          </table:table-cell>
          <table:table-cell table:style-name="ce66" office:value-type="string" calcext:value-type="string">
            <text:p>[Replaced by FR-172]</text:p>
            <text:p>BA shall be able to create a new req by copying another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13"/>
          <table:table-cell table:style-name="ce20" table:number-columns-repeated="2"/>
          <table:table-cell table:style-name="ce45"/>
          <table:table-cell table:style-name="ce67" table:number-columns-repeated="2"/>
          <table:table-cell table:style-name="ce81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68"/>
        <table:table-column table:style-name="co20" table:default-cell-style-name="ce14"/>
        <table:table-column table:style-name="co21" table:default-cell-style-name="ce46"/>
        <table:table-column table:style-name="co14" table:number-columns-repeated="1017" table:default-cell-style-name="ce46"/>
        <table:table-row table:style-name="ro4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4" table:number-columns-repeated="1017"/>
        </table:table-row>
        <table:table-row table:style-name="ro4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9" office:value-type="date" office:date-value="2014-02-25" calcext:value-type="date">
            <text:p>41695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9"/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5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8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4">n children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4">n parent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88" office:value-type="string" calcext:value-type="string">
            <text:p>BA shall be able to go from LL-req editor to a view of all LL-req incompletions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88" office:value-type="string" calcext:value-type="string">
            <text:p>BA shall be able to go from a view of all LL-req incompletions to LL-req editor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88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90"/>
        <table:table-column table:style-name="co24" table:default-cell-style-name="ce90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92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93"/>
          <table:table-cell table:style-name="ce100" office:value-type="string" calcext:value-type="string" table:number-columns-spanned="2" table:number-rows-spanned="1">
            <text:p>Fields</text:p>
          </table:table-cell>
          <table:covered-table-cell table:style-name="ce93"/>
          <table:table-cell table:number-columns-repeated="1015"/>
        </table:table-row>
        <table:table-row table:style-name="ro15"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12" calcext:value-type="float">
            <text:p>12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CRUDL</text:p>
          </table:table-cell>
          <table:table-cell table:style-name="ce91"/>
          <table:table-cell table:style-name="ce94" office:value-type="string" calcext:value-type="string">
            <text:p>UC</text:p>
          </table:table-cell>
          <table:table-cell table:style-name="ce94" office:value-type="string" calcext:value-type="string">
            <text:p>LL Req</text:p>
          </table:table-cell>
          <table:table-cell table:style-name="ce94" office:value-type="string" calcext:value-type="string">
            <text:p>SHR</text:p>
          </table:table-cell>
          <table:table-cell table:style-name="ce101" office:value-type="string" calcext:value-type="string">
            <text:p>LL-Req</text:p>
            <text:p>Field</text:p>
          </table:table-cell>
          <table:table-cell table:style-name="ce101" office:value-type="string" calcext:value-type="string">
            <text:p>UC Field</text:p>
          </table:table-cell>
          <table:table-cell table:style-name="ce101" office:value-type="string" calcext:value-type="string">
            <text:p>Req Type</text:p>
          </table:table-cell>
          <table:table-cell table:style-name="ce101" office:value-type="string" calcext:value-type="string">
            <text:p>Grouping</text:p>
          </table:table-cell>
          <table:table-cell table:style-name="ce101" office:value-type="string" calcext:value-type="string">
            <text:p>Incompletion</text:p>
            <text:p>Type</text:p>
          </table:table-cell>
          <table:table-cell table:style-name="ce101" office:value-type="string" calcext:value-type="string">
            <text:p>Text</text:p>
            <text:p>tokens</text:p>
          </table:table-cell>
          <table:table-cell table:style-name="ce104" table:number-columns-repeated="1011"/>
        </table:table-row>
        <table:table-row table:style-name="ro15"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User shall be able to list entities.</text:p>
          </table:table-cell>
          <table:table-cell table:style-name="ce95"/>
          <table:table-cell table:style-name="ce23" office:value-type="float" office:value="83" calcext:value-type="float">
            <text:p>83</text:p>
          </table:table-cell>
          <table:table-cell table:style-name="ce97" office:value-type="float" office:value="84" calcext:value-type="float">
            <text:p>84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create</text:p>
          </table:table-cell>
          <table:table-cell table:style-name="ce50" office:value-type="string" calcext:value-type="string">
            <text:p>User shall be able to create entities.</text:p>
          </table:table-cell>
          <table:table-cell table:style-name="ce95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User shall be able to modify entities.</text:p>
          </table:table-cell>
          <table:table-cell table:style-name="ce95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4"/>.order</text:p>
          </table:table-cell>
          <table:table-cell table:style-name="ce50" office:value-type="string" calcext:value-type="string">
            <text:p>User shall be able to reorder entities.</text:p>
          </table:table-cell>
          <table:table-cell table:style-name="ce95"/>
          <table:table-cell table:number-columns-repeated="2" table:style-name="ce23" office:value-type="string" calcext:value-type="string">
            <text:p>via sem-ID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" calcext:value-type="float">
            <text:p>4</text:p>
          </table:table-cell>
          <table:table-cell table:style-name="ce102" office:value-type="string" calcext:value-type="string">
            <text:p>N/A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5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5" calcext:value-type="float">
            <text:p>175</text:p>
          </table:table-cell>
          <table:table-cell table:style-name="ce95" table:number-columns-repeated="2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1011"/>
        </table:table-row>
        <table:table-row table:style-name="ro4"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User shall be able to (soft) delete entity.</text:p>
          </table:table-cell>
          <table:table-cell table:style-name="ce95"/>
          <table:table-cell table:style-name="ce23" office:value-type="float" office:value="179" calcext:value-type="float">
            <text:p>179</text:p>
          </table:table-cell>
          <table:table-cell table:style-name="ce98" office:value-type="string" calcext:value-type="string">
            <text:p>Hard only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98" office:value-type="string" calcext:value-type="string">
            <text:p>Hard only</text:p>
          </table:table-cell>
          <table:table-cell table:number-columns-repeated="1011"/>
        </table:table-row>
        <table:table-row table:style-name="ro3"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entity deletion, user shall be able to see a summary of usage.</text:p>
          </table:table-cell>
          <table:table-cell table:style-name="ce95"/>
          <table:table-cell table:style-name="ce23" office:value-type="float" office:value="180" calcext:value-type="float">
            <text:p>180</text:p>
          </table:table-cell>
          <table:table-cell table:style-name="ce95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62" calcext:value-type="float">
            <text:p>162</text:p>
          </table:table-cell>
          <table:table-cell table:number-columns-repeated="1011"/>
        </table:table-row>
        <table:table-row table:style-name="ro3"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entity deletion, user shall be able to see each instance of entity's values and associations.</text:p>
          </table:table-cell>
          <table:table-cell table:style-name="ce95"/>
          <table:table-cell table:style-name="ce23" office:value-type="float" office:value="181" calcext:value-type="float">
            <text:p>181</text:p>
          </table:table-cell>
          <table:table-cell table:style-name="ce95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6" calcext:value-type="float">
            <text:p>6</text:p>
          </table:table-cell>
          <table:table-cell table:style-name="ce96" office:value-type="string" calcext:value-type="string">
            <text:p>No.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96" office:value-type="string" calcext:value-type="string">
            <text:p>No.</text:p>
          </table:table-cell>
          <table:table-cell table:style-name="ce23" office:value-type="float" office:value="147" calcext:value-type="float">
            <text:p>147</text:p>
          </table:table-cell>
          <table:table-cell table:style-name="ce95" table:number-columns-repeated="2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entity deletion, System shall move it to the bin.</text:p>
          </table:table-cell>
          <table:table-cell table:style-name="ce95"/>
          <table:table-cell table:style-name="ce23" office:value-type="float" office:value="182" calcext:value-type="float">
            <text:p>182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4"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User shall be able to restore soft-deleted entities.</text:p>
          </table:table-cell>
          <table:table-cell table:style-name="ce95"/>
          <table:table-cell table:style-name="ce23" office:value-type="float" office:value="183" calcext:value-type="float">
            <text:p>183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entity restoration, previous values and associations shall be restored also.</text:p>
          </table:table-cell>
          <table:table-cell table:style-name="ce95"/>
          <table:table-cell table:style-name="ce23" office:value-type="float" office:value="184" calcext:value-type="float">
            <text:p>184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41" calcext:value-type="float">
            <text:p>41</text:p>
          </table:table-cell>
          <table:table-cell table:style-name="ce103" office:value-type="string" calcext:value-type="string">
            <text:p>N/A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07"/>
        <table:table-column table:style-name="co14" table:number-columns-repeated="4" table:default-cell-style-name="Default"/>
        <table:table-row table:style-name="ro1">
          <table:table-cell table:style-name="ce105" office:value-type="string" calcext:value-type="string">
            <text:p>ID</text:p>
          </table:table-cell>
          <table:table-cell table:style-name="ce105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6" table:formula="of:=1-COUNTIF([FRs.$C$2:.$C$990]; &quot;=&quot;&amp;[.A2])" office:value-type="float" office:value="0" calcext:value-type="float">
            <text:p/>
          </table:table-cell>
          <table:table-cell/>
          <table:table-cell table:style-name="ce108" office:value-type="string" calcext:value-type="string">
            <text:p>FRs</text:p>
          </table:table-cell>
          <table:table-cell table:style-name="ce108" office:value-type="string" calcext:value-type="string">
            <text:p>Flat</text:p>
          </table:table-cell>
          <table:table-cell table:style-name="ce108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06" table:formula="of:=1-COUNTIF([FRs.$C$2:.$C$990]; &quot;=&quot;&amp;[.A3])" office:value-type="float" office:value="0" calcext:value-type="float">
            <text:p/>
          </table:table-cell>
          <table:table-cell/>
          <table:table-cell table:style-name="ce39" table:formula="of:=COUNTIF([FRs.$C$2:.$C$1010];&quot;&gt;0&quot;)" office:value-type="float" office:value="194" calcext:value-type="float">
            <text:p/>
          </table:table-cell>
          <table:table-cell table:style-name="ce39" table:formula="of:=COUNTIF([flat.$D$2:.$D$999];&quot;&gt;0&quot;)" office:value-type="float" office:value="34" calcext:value-type="float">
            <text:p/>
          </table:table-cell>
          <table:table-cell table:style-name="ce39" table:formula="of:=[.E3]+[.D3]" office:value-type="float" office:value="228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06" table:formula="of:=1-COUNTIF([FRs.$C$2:.$C$990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06" table:formula="of:=1-COUNTIF([FRs.$C$2:.$C$990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06" table:formula="of:=1-COUNTIF([FRs.$C$2:.$C$990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06" table:formula="of:=1-COUNTIF([FRs.$C$2:.$C$990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06" table:formula="of:=1-COUNTIF([FRs.$C$2:.$C$990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06" table:formula="of:=1-COUNTIF([FRs.$C$2:.$C$990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06" table:formula="of:=1-COUNTIF([FRs.$C$2:.$C$990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06" table:formula="of:=1-COUNTIF([FRs.$C$2:.$C$990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06" table:formula="of:=1-COUNTIF([FRs.$C$2:.$C$990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06" table:formula="of:=1-COUNTIF([FRs.$C$2:.$C$990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06" table:formula="of:=1-COUNTIF([FRs.$C$2:.$C$990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06" table:formula="of:=1-COUNTIF([FRs.$C$2:.$C$990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06" table:formula="of:=1-COUNTIF([FRs.$C$2:.$C$990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06" table:formula="of:=1-COUNTIF([FRs.$C$2:.$C$990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06" table:formula="of:=1-COUNTIF([FRs.$C$2:.$C$990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06" table:formula="of:=1-COUNTIF([FRs.$C$2:.$C$990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06" table:formula="of:=1-COUNTIF([FRs.$C$2:.$C$990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06" table:formula="of:=1-COUNTIF([FRs.$C$2:.$C$990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06" table:formula="of:=1-COUNTIF([FRs.$C$2:.$C$990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06" table:formula="of:=1-COUNTIF([FRs.$C$2:.$C$990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06" table:formula="of:=1-COUNTIF([FRs.$C$2:.$C$990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06" table:formula="of:=1-COUNTIF([FRs.$C$2:.$C$990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06" table:formula="of:=1-COUNTIF([FRs.$C$2:.$C$990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06" table:formula="of:=1-COUNTIF([FRs.$C$2:.$C$990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06" table:formula="of:=1-COUNTIF([FRs.$C$2:.$C$990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06" table:formula="of:=1-COUNTIF([FRs.$C$2:.$C$990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06" table:formula="of:=1-COUNTIF([FRs.$C$2:.$C$990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06" table:formula="of:=1-COUNTIF([FRs.$C$2:.$C$990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06" table:formula="of:=1-COUNTIF([FRs.$C$2:.$C$990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06" table:formula="of:=1-COUNTIF([FRs.$C$2:.$C$990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06" table:formula="of:=1-COUNTIF([FRs.$C$2:.$C$990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06" table:formula="of:=1-COUNTIF([FRs.$C$2:.$C$990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06" table:formula="of:=1-COUNTIF([FRs.$C$2:.$C$990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06" table:formula="of:=1-COUNTIF([FRs.$C$2:.$C$990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06" table:formula="of:=1-COUNTIF([FRs.$C$2:.$C$990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06" table:formula="of:=1-COUNTIF([FRs.$C$2:.$C$990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06" table:formula="of:=1-COUNTIF([FRs.$C$2:.$C$990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06" table:formula="of:=1-COUNTIF([FRs.$C$2:.$C$990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06" table:formula="of:=1-COUNTIF([FRs.$C$2:.$C$990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06" table:formula="of:=1-COUNTIF([FRs.$C$2:.$C$990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06" table:formula="of:=1-COUNTIF([FRs.$C$2:.$C$990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06" table:formula="of:=1-COUNTIF([FRs.$C$2:.$C$990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06" table:formula="of:=1-COUNTIF([FRs.$C$2:.$C$990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06" table:formula="of:=1-COUNTIF([FRs.$C$2:.$C$990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06" table:formula="of:=1-COUNTIF([FRs.$C$2:.$C$990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06" table:formula="of:=1-COUNTIF([FRs.$C$2:.$C$990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06" table:formula="of:=1-COUNTIF([FRs.$C$2:.$C$990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06" table:formula="of:=1-COUNTIF([FRs.$C$2:.$C$990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06" table:formula="of:=1-COUNTIF([FRs.$C$2:.$C$990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06" table:formula="of:=1-COUNTIF([FRs.$C$2:.$C$990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06" table:formula="of:=1-COUNTIF([FRs.$C$2:.$C$990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06" table:formula="of:=1-COUNTIF([FRs.$C$2:.$C$990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06" table:formula="of:=1-COUNTIF([FRs.$C$2:.$C$990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06" table:formula="of:=1-COUNTIF([FRs.$C$2:.$C$990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06" table:formula="of:=1-COUNTIF([FRs.$C$2:.$C$990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06" table:formula="of:=1-COUNTIF([FRs.$C$2:.$C$990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06" table:formula="of:=1-COUNTIF([FRs.$C$2:.$C$990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06" table:formula="of:=1-COUNTIF([FRs.$C$2:.$C$990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06" table:formula="of:=1-COUNTIF([FRs.$C$2:.$C$990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06" table:formula="of:=1-COUNTIF([FRs.$C$2:.$C$990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06" table:formula="of:=1-COUNTIF([FRs.$C$2:.$C$990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06" table:formula="of:=1-COUNTIF([FRs.$C$2:.$C$990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06" table:formula="of:=1-COUNTIF([FRs.$C$2:.$C$990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06" table:formula="of:=1-COUNTIF([FRs.$C$2:.$C$990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06" table:formula="of:=1-COUNTIF([FRs.$C$2:.$C$990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06" table:formula="of:=1-COUNTIF([FRs.$C$2:.$C$990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06" table:formula="of:=1-COUNTIF([FRs.$C$2:.$C$990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06" table:formula="of:=1-COUNTIF([FRs.$C$2:.$C$990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06" table:formula="of:=1-COUNTIF([FRs.$C$2:.$C$990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06" table:formula="of:=1-COUNTIF([FRs.$C$2:.$C$990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06" table:formula="of:=1-COUNTIF([FRs.$C$2:.$C$990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06" table:formula="of:=1-COUNTIF([FRs.$C$2:.$C$990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06" table:formula="of:=1-COUNTIF([FRs.$C$2:.$C$990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06" table:formula="of:=1-COUNTIF([FRs.$C$2:.$C$990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06" table:formula="of:=1-COUNTIF([FRs.$C$2:.$C$990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06" table:formula="of:=1-COUNTIF([FRs.$C$2:.$C$990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06" table:formula="of:=1-COUNTIF([FRs.$C$2:.$C$990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06" table:formula="of:=1-COUNTIF([FRs.$C$2:.$C$990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06" table:formula="of:=1-COUNTIF([FRs.$C$2:.$C$990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06" table:formula="of:=1-COUNTIF([FRs.$C$2:.$C$990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06" table:formula="of:=1-COUNTIF([FRs.$C$2:.$C$990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06" table:formula="of:=1-COUNTIF([FRs.$C$2:.$C$990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06" table:formula="of:=1-COUNTIF([FRs.$C$2:.$C$990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06" table:formula="of:=1-COUNTIF([FRs.$C$2:.$C$990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06" table:formula="of:=1-COUNTIF([FRs.$C$2:.$C$990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06" table:formula="of:=1-COUNTIF([FRs.$C$2:.$C$990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06" table:formula="of:=1-COUNTIF([FRs.$C$2:.$C$990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06" table:formula="of:=1-COUNTIF([FRs.$C$2:.$C$990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06" table:formula="of:=1-COUNTIF([FRs.$C$2:.$C$990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06" table:formula="of:=1-COUNTIF([FRs.$C$2:.$C$990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06" table:formula="of:=1-COUNTIF([FRs.$C$2:.$C$990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06" table:formula="of:=1-COUNTIF([FRs.$C$2:.$C$990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06" table:formula="of:=1-COUNTIF([FRs.$C$2:.$C$990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06" table:formula="of:=1-COUNTIF([FRs.$C$2:.$C$990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06" table:formula="of:=1-COUNTIF([FRs.$C$2:.$C$990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06" table:formula="of:=1-COUNTIF([FRs.$C$2:.$C$990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06" table:formula="of:=1-COUNTIF([FRs.$C$2:.$C$990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06" table:formula="of:=1-COUNTIF([FRs.$C$2:.$C$990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06" table:formula="of:=1-COUNTIF([FRs.$C$2:.$C$990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06" table:formula="of:=1-COUNTIF([FRs.$C$2:.$C$990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06" table:formula="of:=1-COUNTIF([FRs.$C$2:.$C$990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06" table:formula="of:=1-COUNTIF([FRs.$C$2:.$C$990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06" table:formula="of:=1-COUNTIF([FRs.$C$2:.$C$990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06" table:formula="of:=1-COUNTIF([FRs.$C$2:.$C$990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06" table:formula="of:=1-COUNTIF([FRs.$C$2:.$C$990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06" table:formula="of:=1-COUNTIF([FRs.$C$2:.$C$990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06" table:formula="of:=1-COUNTIF([FRs.$C$2:.$C$990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06" table:formula="of:=1-COUNTIF([FRs.$C$2:.$C$990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06" table:formula="of:=1-COUNTIF([FRs.$C$2:.$C$990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06" table:formula="of:=1-COUNTIF([FRs.$C$2:.$C$990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06" table:formula="of:=1-COUNTIF([FRs.$C$2:.$C$990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06" table:formula="of:=1-COUNTIF([FRs.$C$2:.$C$990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06" table:formula="of:=1-COUNTIF([FRs.$C$2:.$C$990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06" table:formula="of:=1-COUNTIF([FRs.$C$2:.$C$990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06" table:formula="of:=1-COUNTIF([FRs.$C$2:.$C$990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06" table:formula="of:=1-COUNTIF([FRs.$C$2:.$C$990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06" table:formula="of:=1-COUNTIF([FRs.$C$2:.$C$990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06" table:formula="of:=1-COUNTIF([FRs.$C$2:.$C$990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06" table:formula="of:=1-COUNTIF([FRs.$C$2:.$C$990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06" table:formula="of:=1-COUNTIF([FRs.$C$2:.$C$990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06" table:formula="of:=1-COUNTIF([FRs.$C$2:.$C$990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06" table:formula="of:=1-COUNTIF([FRs.$C$2:.$C$990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06" table:formula="of:=1-COUNTIF([FRs.$C$2:.$C$990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06" table:formula="of:=1-COUNTIF([FRs.$C$2:.$C$990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06" table:formula="of:=1-COUNTIF([FRs.$C$2:.$C$990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06" table:formula="of:=1-COUNTIF([FRs.$C$2:.$C$990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06" table:formula="of:=1-COUNTIF([FRs.$C$2:.$C$990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06" table:formula="of:=1-COUNTIF([FRs.$C$2:.$C$990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06" table:formula="of:=1-COUNTIF([FRs.$C$2:.$C$990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06" table:formula="of:=1-COUNTIF([FRs.$C$2:.$C$990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06" table:formula="of:=1-COUNTIF([FRs.$C$2:.$C$990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06" table:formula="of:=1-COUNTIF([FRs.$C$2:.$C$990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06" table:formula="of:=1-COUNTIF([FRs.$C$2:.$C$990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06" table:formula="of:=1-COUNTIF([FRs.$C$2:.$C$990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06" table:formula="of:=1-COUNTIF([FRs.$C$2:.$C$990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06" table:formula="of:=1-COUNTIF([FRs.$C$2:.$C$990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06" table:formula="of:=1-COUNTIF([FRs.$C$2:.$C$990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06" table:formula="of:=1-COUNTIF([FRs.$C$2:.$C$990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06" table:formula="of:=1-COUNTIF([FRs.$C$2:.$C$990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06" table:formula="of:=1-COUNTIF([FRs.$C$2:.$C$990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06" table:formula="of:=1-COUNTIF([FRs.$C$2:.$C$990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06" table:formula="of:=1-COUNTIF([FRs.$C$2:.$C$990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06" table:formula="of:=1-COUNTIF([FRs.$C$2:.$C$990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06" table:formula="of:=1-COUNTIF([FRs.$C$2:.$C$990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06" table:formula="of:=1-COUNTIF([FRs.$C$2:.$C$990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06" table:formula="of:=1-COUNTIF([FRs.$C$2:.$C$990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06" table:formula="of:=1-COUNTIF([FRs.$C$2:.$C$990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06" table:formula="of:=1-COUNTIF([FRs.$C$2:.$C$990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06" table:formula="of:=1-COUNTIF([FRs.$C$2:.$C$990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06" table:formula="of:=1-COUNTIF([FRs.$C$2:.$C$990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06" table:formula="of:=1-COUNTIF([FRs.$C$2:.$C$990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06" table:formula="of:=1-COUNTIF([FRs.$C$2:.$C$990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06" table:formula="of:=1-COUNTIF([FRs.$C$2:.$C$990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06" table:formula="of:=1-COUNTIF([FRs.$C$2:.$C$990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06" table:formula="of:=1-COUNTIF([FRs.$C$2:.$C$990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06" table:formula="of:=1-COUNTIF([FRs.$C$2:.$C$990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06" table:formula="of:=1-COUNTIF([FRs.$C$2:.$C$990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06" table:formula="of:=1-COUNTIF([FRs.$C$2:.$C$990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06" table:formula="of:=1-COUNTIF([FRs.$C$2:.$C$990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06" table:formula="of:=1-COUNTIF([FRs.$C$2:.$C$990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06" table:formula="of:=1-COUNTIF([FRs.$C$2:.$C$990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06" table:formula="of:=1-COUNTIF([FRs.$C$2:.$C$990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06" table:formula="of:=1-COUNTIF([FRs.$C$2:.$C$990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06" table:formula="of:=1-COUNTIF([FRs.$C$2:.$C$990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06" table:formula="of:=1-COUNTIF([FRs.$C$2:.$C$990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06" table:formula="of:=1-COUNTIF([FRs.$C$2:.$C$990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06" table:formula="of:=1-COUNTIF([FRs.$C$2:.$C$990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06" table:formula="of:=1-COUNTIF([FRs.$C$2:.$C$990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06" table:formula="of:=1-COUNTIF([FRs.$C$2:.$C$990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06" table:formula="of:=1-COUNTIF([FRs.$C$2:.$C$990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06" table:formula="of:=1-COUNTIF([FRs.$C$2:.$C$990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06" table:formula="of:=1-COUNTIF([FRs.$C$2:.$C$990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06" table:formula="of:=1-COUNTIF([FRs.$C$2:.$C$990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06" table:formula="of:=1-COUNTIF([FRs.$C$2:.$C$990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06" table:formula="of:=1-COUNTIF([FRs.$C$2:.$C$990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06" table:formula="of:=1-COUNTIF([FRs.$C$2:.$C$990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06" table:formula="of:=1-COUNTIF([FRs.$C$2:.$C$990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06" table:formula="of:=1-COUNTIF([FRs.$C$2:.$C$990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06" table:formula="of:=1-COUNTIF([FRs.$C$2:.$C$990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06" table:formula="of:=1-COUNTIF([FRs.$C$2:.$C$990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06" table:formula="of:=1-COUNTIF([FRs.$C$2:.$C$990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06" table:formula="of:=1-COUNTIF([FRs.$C$2:.$C$990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06" table:formula="of:=1-COUNTIF([FRs.$C$2:.$C$990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06" table:formula="of:=1-COUNTIF([FRs.$C$2:.$C$990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06" table:formula="of:=1-COUNTIF([FRs.$C$2:.$C$990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06" table:formula="of:=1-COUNTIF([FRs.$C$2:.$C$990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06" table:formula="of:=1-COUNTIF([FRs.$C$2:.$C$990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06" table:formula="of:=1-COUNTIF([FRs.$C$2:.$C$990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06" table:formula="of:=1-COUNTIF([FRs.$C$2:.$C$990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06" table:formula="of:=1-COUNTIF([FRs.$C$2:.$C$990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06" table:formula="of:=1-COUNTIF([FRs.$C$2:.$C$990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06" table:formula="of:=1-COUNTIF([FRs.$C$2:.$C$990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06" table:formula="of:=1-COUNTIF([FRs.$C$2:.$C$990]; &quot;=&quot;&amp;[.A1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06" table:formula="of:=1-COUNTIF([FRs.$C$2:.$C$990]; &quot;=&quot;&amp;[.A1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06" table:formula="of:=1-COUNTIF([FRs.$C$2:.$C$990]; &quot;=&quot;&amp;[.A1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06" table:formula="of:=1-COUNTIF([FRs.$C$2:.$C$990]; &quot;=&quot;&amp;[.A1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06" table:formula="of:=1-COUNTIF([FRs.$C$2:.$C$990]; &quot;=&quot;&amp;[.A2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06" table:formula="of:=1-COUNTIF([FRs.$C$2:.$C$990]; &quot;=&quot;&amp;[.A20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06" table:formula="of:=1-COUNTIF([FRs.$C$2:.$C$990]; &quot;=&quot;&amp;[.A20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06" table:formula="of:=1-COUNTIF([FRs.$C$2:.$C$990]; &quot;=&quot;&amp;[.A20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06" table:formula="of:=1-COUNTIF([FRs.$C$2:.$C$990]; &quot;=&quot;&amp;[.A20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06" table:formula="of:=1-COUNTIF([FRs.$C$2:.$C$990]; &quot;=&quot;&amp;[.A20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06" table:formula="of:=1-COUNTIF([FRs.$C$2:.$C$990]; &quot;=&quot;&amp;[.A20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06" table:formula="of:=1-COUNTIF([FRs.$C$2:.$C$990]; &quot;=&quot;&amp;[.A20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06" table:formula="of:=1-COUNTIF([FRs.$C$2:.$C$990]; &quot;=&quot;&amp;[.A20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06" table:formula="of:=1-COUNTIF([FRs.$C$2:.$C$990]; &quot;=&quot;&amp;[.A20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06" table:formula="of:=1-COUNTIF([FRs.$C$2:.$C$990]; &quot;=&quot;&amp;[.A21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06" table:formula="of:=1-COUNTIF([FRs.$C$2:.$C$990]; &quot;=&quot;&amp;[.A21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06" table:formula="of:=1-COUNTIF([FRs.$C$2:.$C$990]; &quot;=&quot;&amp;[.A21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06" table:formula="of:=1-COUNTIF([FRs.$C$2:.$C$990]; &quot;=&quot;&amp;[.A21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06" table:formula="of:=1-COUNTIF([FRs.$C$2:.$C$990]; &quot;=&quot;&amp;[.A21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06" table:formula="of:=1-COUNTIF([FRs.$C$2:.$C$990]; &quot;=&quot;&amp;[.A21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06" table:formula="of:=1-COUNTIF([FRs.$C$2:.$C$990]; &quot;=&quot;&amp;[.A21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06" table:formula="of:=1-COUNTIF([FRs.$C$2:.$C$990]; &quot;=&quot;&amp;[.A21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06" table:formula="of:=1-COUNTIF([FRs.$C$2:.$C$990]; &quot;=&quot;&amp;[.A21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06" table:formula="of:=1-COUNTIF([FRs.$C$2:.$C$990]; &quot;=&quot;&amp;[.A21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06" table:formula="of:=1-COUNTIF([FRs.$C$2:.$C$990]; &quot;=&quot;&amp;[.A22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06" table:formula="of:=1-COUNTIF([FRs.$C$2:.$C$990]; &quot;=&quot;&amp;[.A22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06" table:formula="of:=1-COUNTIF([FRs.$C$2:.$C$990]; &quot;=&quot;&amp;[.A22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06" table:formula="of:=1-COUNTIF([FRs.$C$2:.$C$990]; &quot;=&quot;&amp;[.A22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06" table:formula="of:=1-COUNTIF([FRs.$C$2:.$C$990]; &quot;=&quot;&amp;[.A22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06" table:formula="of:=1-COUNTIF([FRs.$C$2:.$C$990]; &quot;=&quot;&amp;[.A22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06" table:formula="of:=1-COUNTIF([FRs.$C$2:.$C$990]; &quot;=&quot;&amp;[.A22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06" table:formula="of:=1-COUNTIF([FRs.$C$2:.$C$990]; &quot;=&quot;&amp;[.A22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06" table:formula="of:=1-COUNTIF([FRs.$C$2:.$C$990]; &quot;=&quot;&amp;[.A22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06" table:formula="of:=1-COUNTIF([FRs.$C$2:.$C$990]; &quot;=&quot;&amp;[.A22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06" table:formula="of:=1-COUNTIF([FRs.$C$2:.$C$990]; &quot;=&quot;&amp;[.A23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06" table:formula="of:=1-COUNTIF([FRs.$C$2:.$C$990]; &quot;=&quot;&amp;[.A23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06" table:formula="of:=1-COUNTIF([FRs.$C$2:.$C$990]; &quot;=&quot;&amp;[.A23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06" table:formula="of:=1-COUNTIF([FRs.$C$2:.$C$990]; &quot;=&quot;&amp;[.A23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06" table:formula="of:=1-COUNTIF([FRs.$C$2:.$C$990]; &quot;=&quot;&amp;[.A23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06" table:formula="of:=1-COUNTIF([FRs.$C$2:.$C$990]; &quot;=&quot;&amp;[.A23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06" table:formula="of:=1-COUNTIF([FRs.$C$2:.$C$990]; &quot;=&quot;&amp;[.A23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06" table:formula="of:=1-COUNTIF([FRs.$C$2:.$C$990]; &quot;=&quot;&amp;[.A23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06" table:formula="of:=1-COUNTIF([FRs.$C$2:.$C$990]; &quot;=&quot;&amp;[.A23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06" table:formula="of:=1-COUNTIF([FRs.$C$2:.$C$990]; &quot;=&quot;&amp;[.A23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06" table:formula="of:=1-COUNTIF([FRs.$C$2:.$C$990]; &quot;=&quot;&amp;[.A24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06" table:formula="of:=1-COUNTIF([FRs.$C$2:.$C$990]; &quot;=&quot;&amp;[.A24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06" table:formula="of:=1-COUNTIF([FRs.$C$2:.$C$990]; &quot;=&quot;&amp;[.A24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06" table:formula="of:=1-COUNTIF([FRs.$C$2:.$C$990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06" table:formula="of:=1-COUNTIF([FRs.$C$2:.$C$990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06" table:formula="of:=1-COUNTIF([FRs.$C$2:.$C$990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06" table:formula="of:=1-COUNTIF([FRs.$C$2:.$C$990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06" table:formula="of:=1-COUNTIF([FRs.$C$2:.$C$990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06" table:formula="of:=1-COUNTIF([FRs.$C$2:.$C$990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06" table:formula="of:=1-COUNTIF([FRs.$C$2:.$C$990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06" table:formula="of:=1-COUNTIF([FRs.$C$2:.$C$990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06" table:formula="of:=1-COUNTIF([FRs.$C$2:.$C$990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06" table:formula="of:=1-COUNTIF([FRs.$C$2:.$C$990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06" table:formula="of:=1-COUNTIF([FRs.$C$2:.$C$990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06" table:formula="of:=1-COUNTIF([FRs.$C$2:.$C$990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06" table:formula="of:=1-COUNTIF([FRs.$C$2:.$C$990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06" table:formula="of:=1-COUNTIF([FRs.$C$2:.$C$990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06" table:formula="of:=1-COUNTIF([FRs.$C$2:.$C$990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06" table:formula="of:=1-COUNTIF([FRs.$C$2:.$C$990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06" table:formula="of:=1-COUNTIF([FRs.$C$2:.$C$990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06" table:formula="of:=1-COUNTIF([FRs.$C$2:.$C$990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06" table:formula="of:=1-COUNTIF([FRs.$C$2:.$C$990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06" table:formula="of:=1-COUNTIF([FRs.$C$2:.$C$990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06" table:formula="of:=1-COUNTIF([FRs.$C$2:.$C$990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06" table:formula="of:=1-COUNTIF([FRs.$C$2:.$C$990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06" table:formula="of:=1-COUNTIF([FRs.$C$2:.$C$990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06" table:formula="of:=1-COUNTIF([FRs.$C$2:.$C$990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06" table:formula="of:=1-COUNTIF([FRs.$C$2:.$C$990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06" table:formula="of:=1-COUNTIF([FRs.$C$2:.$C$990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06" table:formula="of:=1-COUNTIF([FRs.$C$2:.$C$990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06" table:formula="of:=1-COUNTIF([FRs.$C$2:.$C$990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06" table:formula="of:=1-COUNTIF([FRs.$C$2:.$C$990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06" table:formula="of:=1-COUNTIF([FRs.$C$2:.$C$990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06" table:formula="of:=1-COUNTIF([FRs.$C$2:.$C$990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06" table:formula="of:=1-COUNTIF([FRs.$C$2:.$C$990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06" table:formula="of:=1-COUNTIF([FRs.$C$2:.$C$990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06" table:formula="of:=1-COUNTIF([FRs.$C$2:.$C$990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06" table:formula="of:=1-COUNTIF([FRs.$C$2:.$C$990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06" table:formula="of:=1-COUNTIF([FRs.$C$2:.$C$990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06" table:formula="of:=1-COUNTIF([FRs.$C$2:.$C$990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06" table:formula="of:=1-COUNTIF([FRs.$C$2:.$C$990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06" table:formula="of:=1-COUNTIF([FRs.$C$2:.$C$990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06" table:formula="of:=1-COUNTIF([FRs.$C$2:.$C$990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06" table:formula="of:=1-COUNTIF([FRs.$C$2:.$C$990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06" table:formula="of:=1-COUNTIF([FRs.$C$2:.$C$990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06" table:formula="of:=1-COUNTIF([FRs.$C$2:.$C$990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06" table:formula="of:=1-COUNTIF([FRs.$C$2:.$C$990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06" table:formula="of:=1-COUNTIF([FRs.$C$2:.$C$990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06" table:formula="of:=1-COUNTIF([FRs.$C$2:.$C$990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06" table:formula="of:=1-COUNTIF([FRs.$C$2:.$C$990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06" table:formula="of:=1-COUNTIF([FRs.$C$2:.$C$990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06" table:formula="of:=1-COUNTIF([FRs.$C$2:.$C$990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06" table:formula="of:=1-COUNTIF([FRs.$C$2:.$C$990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06" table:formula="of:=1-COUNTIF([FRs.$C$2:.$C$990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06" table:formula="of:=1-COUNTIF([FRs.$C$2:.$C$990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06" table:formula="of:=1-COUNTIF([FRs.$C$2:.$C$990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06" table:formula="of:=1-COUNTIF([FRs.$C$2:.$C$990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06" table:formula="of:=1-COUNTIF([FRs.$C$2:.$C$990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06" table:formula="of:=1-COUNTIF([FRs.$C$2:.$C$990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06" table:formula="of:=1-COUNTIF([FRs.$C$2:.$C$990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06" table:formula="of:=1-COUNTIF([FRs.$C$2:.$C$990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06" table:formula="of:=1-COUNTIF([FRs.$C$2:.$C$990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06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RUDL" table:style-name="ta1">
        <table:table-column table:style-name="co26" table:default-cell-style-name="Default"/>
        <table:table-column table:style-name="co14" table:number-columns-repeated="6" table:default-cell-style-name="ce107"/>
        <table:table-column table:style-name="co14" table:default-cell-style-name="Default"/>
        <table:table-row table:style-name="ro16">
          <table:table-cell table:style-name="ce109" office:value-type="string" calcext:value-type="string">
            <text:p>SUBJECT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R</text:p>
          </table:table-cell>
          <table:table-cell table:style-name="ce110" office:value-type="string" calcext:value-type="string">
            <text:p>U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L</text:p>
          </table:table-cell>
          <table:table-cell table:style-name="ce110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10" office:value-type="string" calcext:value-type="string">
            <text:p>CARD/QTY</text:p>
          </table:table-cell>
        </table:table-row>
        <table:table-row table:style-name="ro16">
          <table:table-cell table:style-name="ce39" office:value-type="string" calcext:value-type="string">
            <text:p>Field-set</text:p>
          </table:table-cell>
          <table:table-cell table:style-name="ce111" office:value-type="string" calcext:value-type="string">
            <text:p>invis</text:p>
          </table:table-cell>
          <table:table-cell table:number-columns-repeated="2" table:style-name="ce111" office:value-type="string" calcext:value-type="string">
            <text:p>UC-9</text:p>
          </table:table-cell>
          <table:table-cell table:style-name="ce111" office:value-type="string" calcext:value-type="string">
            <text:p>invis</text:p>
          </table:table-cell>
          <table:table-cell table:number-columns-repeated="2" table:style-name="ce111" office:value-type="string" calcext:value-type="string">
            <text:p>N/A</text:p>
          </table:table-cell>
          <table:table-cell table:style-name="ce111" office:value-type="string" calcext:value-type="string">
            <text:p>UC-9</text:p>
          </table:table-cell>
        </table:table-row>
        <table:table-row table:style-name="ro16">
          <table:table-cell table:style-name="ce39" office:value-type="string" calcext:value-type="string">
            <text:p>Field</text:p>
          </table:table-cell>
          <table:table-cell table:number-columns-repeated="7" table:style-name="ce111" office:value-type="string" calcext:value-type="string">
            <text:p>UC-9</text:p>
          </table:table-cell>
        </table:table-row>
        <table:table-row table:style-name="ro16">
          <table:table-cell table:style-name="ce39" office:value-type="string" calcext:value-type="string">
            <text:p>Grouping</text:p>
          </table:table-cell>
          <table:table-cell table:style-name="ce111" table:number-columns-repeated="7"/>
        </table:table-row>
        <table:table-row table:style-name="ro16">
          <table:table-cell table:style-name="ce39" office:value-type="string" calcext:value-type="string">
            <text:p>Grouping relationship</text:p>
          </table:table-cell>
          <table:table-cell table:style-name="ce111" table:number-columns-repeated="7"/>
        </table:table-row>
        <table:table-row table:style-name="ro16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7" table:default-cell-style-name="ce46"/>
        <table:table-column table:style-name="co28" table:default-cell-style-name="ce116"/>
        <table:table-column table:style-name="co14" table:number-columns-repeated="2" table:default-cell-style-name="ce68"/>
        <table:table-column table:style-name="co14" table:number-columns-repeated="2" table:default-cell-style-name="ce14"/>
        <table:table-column table:style-name="co14" table:default-cell-style-name="ce83"/>
        <table:table-column table:style-name="co14" table:number-columns-repeated="4" table:default-cell-style-name="ce14"/>
        <table:table-row table:style-name="ro1">
          <table:table-cell/>
          <table:table-cell table:style-name="ce68"/>
          <table:table-cell table:number-columns-repeated="9"/>
        </table:table-row>
        <table:table-row table:style-name="ro4">
          <table:table-cell/>
          <table:table-cell table:style-name="ce113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68"/>
          <table:table-cell table:number-columns-repeated="9"/>
        </table:table-row>
        <table:table-row table:style-name="ro1">
          <table:table-cell table:style-name="ce84"/>
          <table:table-cell table:style-name="ce114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112" office:value-type="string" calcext:value-type="string">
            <text:p>for</text:p>
          </table:table-cell>
          <table:table-cell table:style-name="ce115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112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Rs.A147:FRs.G149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13:10:01.195314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3T14:13:12.226228122</dc:date>
    <meta:editing-duration>P1DT48M42S</meta:editing-duration>
    <meta:editing-cycles>97</meta:editing-cycles>
    <meta:generator>LibreOffice/4.2.3.3$Linux_X86_64 LibreOffice_project/420m0$Build-3</meta:generator>
    <meta:document-statistic meta:table-count="6" meta:cell-count="2268" meta:object-count="0"/>
  </office:meta>
</office:document-meta>
</file>
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187cm"/>
    </style:style>
    <style:style style:name="co3" style:family="table-column">
      <style:table-column-properties fo:break-before="auto" style:column-width="0.741cm"/>
    </style:style>
    <style:style style:name="co4" style:family="table-column">
      <style:table-column-properties fo:break-before="auto" style:column-width="14.817cm"/>
    </style:style>
    <style:style style:name="co5" style:family="table-column">
      <style:table-column-properties fo:break-before="auto" style:column-width="2.80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9.973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0">
      <style:table-cell-properties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style:vertical-align="top"/>
    </style:style>
  </office:automatic-styles>
  <office:body>
    <office:spreadsheet>
      <table:table table:name="req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5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8" table:number-columns-repeated="1018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4" office:value-type="string" calcext:value-type="string">
            <text:p>BR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All use cases in a project share the same field-set.</text:p>
          </table:table-cell>
          <table:table-cell table:style-name="ce7" office:value-type="date" office:date-value="2014-02-06" calcext:value-type="date">
            <text:p>06/02/14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4" office:value-type="string" calcext:value-type="string">
            <text:p>BR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A field-set cannot contain more than 30 fields.</text:p>
          </table:table-cell>
          <table:table-cell table:style-name="ce7" office:value-type="date" office:date-value="2014-02-06" calcext:value-type="date">
            <text:p>06/02/14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4" office:value-type="string" calcext:value-type="string">
            <text:p>BR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Each field name in a field-set must be unique.</text:p>
          </table:table-cell>
          <table:table-cell table:style-name="ce7" office:value-type="date" office:date-value="2014-02-06" calcext:value-type="date">
            <text:p>06/02/14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4" office:value-type="string" calcext:value-type="string">
            <text:p>CO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A field-set cannot be empty.</text:p>
          </table:table-cell>
          <table:table-cell table:style-name="ce7" office:value-type="date" office:date-value="2014-02-06" calcext:value-type="date">
            <text:p>06/02/14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4" office:value-type="string" calcext:value-type="string">
            <text:p>FR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When modifying fields, BA shall be able to remove fields.</text:p>
          </table:table-cell>
          <table:table-cell table:style-name="ce7" office:value-type="date" office:date-value="2014-02-06" calcext:value-type="date">
            <text:p>06/02/14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4" office:value-type="string" calcext:value-type="string">
            <text:p>FR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When modifying fields, BA shall be able to add fields.</text:p>
          </table:table-cell>
          <table:table-cell table:style-name="ce7" office:value-type="date" office:date-value="2014-02-06" calcext:value-type="date">
            <text:p>06/02/14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4" office:value-type="string" calcext:value-type="string">
            <text:p>FR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When modifying fields, BA shall be able to modify fields.</text:p>
          </table:table-cell>
          <table:table-cell table:style-name="ce7" office:value-type="date" office:date-value="2014-02-06" calcext:value-type="date">
            <text:p>06/02/14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4" office:value-type="string" calcext:value-type="string">
            <text:p>FR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When modifying fields, BA shall be able to reorder fields.</text:p>
          </table:table-cell>
          <table:table-cell table:style-name="ce7" office:value-type="date" office:date-value="2014-02-06" calcext:value-type="date">
            <text:p>06/02/14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4" office:value-type="string" calcext:value-type="string">
            <text:p>FR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When modifying fields, System shall indicate how many UCs have non-default content for each field.</text:p>
          </table:table-cell>
          <table:table-cell table:style-name="ce7" office:value-type="date" office:date-value="2014-02-06" calcext:value-type="date">
            <text:p>06/02/14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4" office:value-type="string" calcext:value-type="string">
            <text:p>FR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When modifying fields, BA shall be able to see each instance of non-default content for a field.</text:p>
          </table:table-cell>
          <table:table-cell table:style-name="ce7" office:value-type="date" office:date-value="2014-02-06" calcext:value-type="date">
            <text:p>06/02/14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4" office:value-type="string" calcext:value-type="string">
            <text:p>UC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Modify a Project's Fields</text:p>
          </table:table-cell>
          <table:table-cell table:style-name="ce7" office:value-type="date" office:date-value="2014-02-06" calcext:value-type="date">
            <text:p>06/02/14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ntersection probs" table:style-name="ta1">
        <table:table-column table:style-name="co7" table:number-columns-repeated="2" table:default-cell-style-name="Default"/>
        <table:table-column table:style-name="co8" table:default-cell-style-name="Default"/>
        <table:table-column table:style-name="co6" table:number-columns-repeated="1021" table:default-cell-style-name="Default"/>
        <table:table-row table:style-name="ro1">
          <table:table-cell table:style-name="ce8" office:value-type="string" calcext:value-type="string">
            <text:p>MF-α</text:p>
          </table:table-cell>
          <table:table-cell table:style-name="ce8" office:value-type="string" calcext:value-type="string">
            <text:p>MF-β</text:p>
          </table:table-cell>
          <table:table-cell table:style-name="ce8" office:value-type="string" calcext:value-type="string">
            <text:p>Concern</text:p>
          </table:table-cell>
          <table:table-cell table:style-name="ce8" table:number-columns-repeated="1021"/>
        </table:table-row>
        <table:table-row table:style-name="ro1">
          <table:table-cell office:value-type="string" calcext:value-type="string">
            <text:p>Field Customisation</text:p>
          </table:table-cell>
          <table:table-cell office:value-type="string" calcext:value-type="string">
            <text:p>History/Audit</text:p>
          </table:table-cell>
          <table:table-cell office:value-type="string" calcext:value-type="string">
            <text:p>How will field-set changes affect baselined docs &amp; audit trails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eld Customisation</text:p>
          </table:table-cell>
          <table:table-cell office:value-type="string" calcext:value-type="string">
            <text:p>Incompletions</text:p>
          </table:table-cell>
          <table:table-cell table:style-name="ce9" office:value-type="string" calcext:value-type="string">
            <text:p>Provide a default FV when adding new fields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When modifying fields, field usage data can go stale as others change UC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When modifying fields, what happens if shared field-set updated by others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Concurrent field-set modification: how?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reqs.A1:reqs.D12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integer-digits="1"/>
    </number:number-style>
    <number:number-style style:name="N109">
      <number:number number:decimal-places="0" number:min-integer-digits="2"/>
    </number:number-style>
    <number:number-style style:name="N110">
      <number:text>MF-</number:text>
      <number:number number:decimal-places="0" number:min-integer-digits="2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2-06T15:37:36.747617711</dc:date>
    <meta:editing-duration>PT1M53S</meta:editing-duration>
    <meta:editing-cycles>1</meta:editing-cycles>
    <meta:document-statistic meta:table-count="2" meta:cell-count="78" meta:object-count="0"/>
    <meta:generator>LibreOffice/4.1.4.2$Linux_X86_64 LibreOffice_project/410m0$Build-2</meta:generator>
  </office:meta>
</office:document-meta>
</file>
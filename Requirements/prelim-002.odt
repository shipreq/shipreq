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P1" style:family="paragraph" style:parent-style-name="Standard">
      <style:text-properties officeooo:rsid="002593ba" officeooo:paragraph-rsid="0011f8c5"/>
    </style:style>
    <style:style style:name="P2" style:family="paragraph" style:parent-style-name="Standard">
      <style:text-properties fo:font-style="italic" officeooo:rsid="0020d411" officeooo:paragraph-rsid="0011f8c5" style:font-style-asian="italic" style:font-style-complex="italic"/>
    </style:style>
    <style:style style:name="P3" style:family="paragraph" style:parent-style-name="Standard">
      <style:text-properties fo:font-style="italic" officeooo:rsid="0020d411" officeooo:paragraph-rsid="0019e00c" style:font-style-asian="italic" style:font-style-complex="italic"/>
    </style:style>
    <style:style style:name="P4" style:family="paragraph" style:parent-style-name="Standard">
      <style:text-properties officeooo:rsid="001e4491" officeooo:paragraph-rsid="0011f8c5"/>
    </style:style>
    <style:style style:name="P5" style:family="paragraph" style:parent-style-name="Standard">
      <style:text-properties officeooo:rsid="0020d411" officeooo:paragraph-rsid="0011f8c5"/>
    </style:style>
    <style:style style:name="P6" style:family="paragraph" style:parent-style-name="Standard">
      <style:text-properties officeooo:rsid="0022beae" officeooo:paragraph-rsid="0011f8c5"/>
    </style:style>
    <style:style style:name="P7" style:family="paragraph" style:parent-style-name="Standard">
      <style:text-properties officeooo:rsid="0024a7a8" officeooo:paragraph-rsid="0011f8c5"/>
    </style:style>
    <style:style style:name="P8" style:family="paragraph" style:parent-style-name="Standard">
      <style:text-properties officeooo:rsid="00140119" officeooo:paragraph-rsid="00140119"/>
    </style:style>
    <style:style style:name="P9" style:family="paragraph" style:parent-style-name="Standard">
      <style:text-properties officeooo:rsid="0015a334" officeooo:paragraph-rsid="0015a334"/>
    </style:style>
    <style:style style:name="P10" style:family="paragraph" style:parent-style-name="Standard" style:list-style-name="L1">
      <style:text-properties officeooo:rsid="0015a334" officeooo:paragraph-rsid="0015a334"/>
    </style:style>
    <style:style style:name="P11" style:family="paragraph" style:parent-style-name="Standard" style:list-style-name="L1">
      <style:text-properties officeooo:rsid="0015a334" officeooo:paragraph-rsid="00160b41"/>
    </style:style>
    <style:style style:name="P12" style:family="paragraph" style:parent-style-name="Standard" style:list-style-name="L1">
      <style:text-properties officeooo:rsid="00160b41" officeooo:paragraph-rsid="00160b41"/>
    </style:style>
    <style:style style:name="P13" style:family="paragraph" style:parent-style-name="Standard">
      <style:text-properties officeooo:rsid="001685d5" officeooo:paragraph-rsid="001685d5"/>
    </style:style>
    <style:style style:name="P14" style:family="paragraph" style:parent-style-name="Standard">
      <style:text-properties fo:font-weight="bold" officeooo:rsid="0017fea8" officeooo:paragraph-rsid="0017fea8" style:font-weight-asian="bold" style:font-weight-complex="bold"/>
    </style:style>
    <style:style style:name="P15" style:family="paragraph" style:parent-style-name="Standard">
      <style:text-properties fo:font-weight="bold" officeooo:rsid="001c8cb8" officeooo:paragraph-rsid="0019e00c" style:font-weight-asian="bold" style:font-weight-complex="bold"/>
    </style:style>
    <style:style style:name="P16" style:family="paragraph" style:parent-style-name="Standard">
      <style:text-properties fo:font-weight="bold" officeooo:rsid="001e4491" officeooo:paragraph-rsid="0019e00c" style:font-weight-asian="bold" style:font-weight-complex="bold"/>
    </style:style>
    <style:style style:name="P17" style:family="paragraph" style:parent-style-name="Standard">
      <style:text-properties fo:font-weight="bold" officeooo:rsid="0020e0bb" officeooo:paragraph-rsid="0020e0bb" style:font-weight-asian="bold" style:font-weight-complex="bold"/>
    </style:style>
    <style:style style:name="P18" style:family="paragraph" style:parent-style-name="Standard">
      <style:text-properties fo:font-weight="normal" officeooo:rsid="0017fea8" officeooo:paragraph-rsid="0017fea8" style:font-weight-asian="normal" style:font-weight-complex="normal"/>
    </style:style>
    <style:style style:name="P19" style:family="paragraph" style:parent-style-name="Standard" style:list-style-name="L2">
      <style:text-properties fo:font-weight="normal" officeooo:rsid="0017fea8" officeooo:paragraph-rsid="0017fea8" style:font-weight-asian="normal" style:font-weight-complex="normal"/>
    </style:style>
    <style:style style:name="P20" style:family="paragraph" style:parent-style-name="Standard">
      <style:text-properties fo:font-weight="normal" officeooo:rsid="0019aeaa" officeooo:paragraph-rsid="0019aeaa" style:font-weight-asian="normal" style:font-weight-complex="normal"/>
    </style:style>
    <style:style style:name="P21" style:family="paragraph" style:parent-style-name="Standard" style:list-style-name="L3">
      <style:text-properties fo:font-weight="normal" officeooo:rsid="0019aeaa" officeooo:paragraph-rsid="0019aeaa" style:font-weight-asian="normal" style:font-weight-complex="normal"/>
    </style:style>
    <style:style style:name="P22" style:family="paragraph" style:parent-style-name="Standard">
      <style:text-properties fo:font-weight="normal" officeooo:rsid="0019e00c" officeooo:paragraph-rsid="0019e00c" style:font-weight-asian="normal" style:font-weight-complex="normal"/>
    </style:style>
    <style:style style:name="P23" style:family="paragraph" style:parent-style-name="Standard" style:list-style-name="L4">
      <style:text-properties fo:font-weight="normal" officeooo:rsid="0019e00c" officeooo:paragraph-rsid="0019e00c" style:font-weight-asian="normal" style:font-weight-complex="normal"/>
    </style:style>
    <style:style style:name="P24" style:family="paragraph" style:parent-style-name="Standard" style:list-style-name="L4">
      <style:text-properties fo:font-weight="normal" officeooo:rsid="0019e00c" officeooo:paragraph-rsid="001aa674" style:font-weight-asian="normal" style:font-weight-complex="normal"/>
    </style:style>
    <style:style style:name="P25" style:family="paragraph" style:parent-style-name="Standard" style:list-style-name="L4">
      <style:text-properties fo:font-weight="normal" officeooo:rsid="001c8f72" officeooo:paragraph-rsid="001c8f72" style:font-weight-asian="normal" style:font-weight-complex="normal"/>
    </style:style>
    <style:style style:name="P26" style:family="paragraph" style:parent-style-name="Standard">
      <style:text-properties fo:font-weight="normal" officeooo:rsid="001c8f72" officeooo:paragraph-rsid="001c8f72" style:font-weight-asian="normal" style:font-weight-complex="normal"/>
    </style:style>
    <style:style style:name="P27" style:family="paragraph" style:parent-style-name="Standard" style:list-style-name="L4">
      <style:text-properties fo:font-weight="normal" officeooo:rsid="001e2dc8" officeooo:paragraph-rsid="001e2dc8" style:font-weight-asian="normal" style:font-weight-complex="normal"/>
    </style:style>
    <style:style style:name="P28" style:family="paragraph" style:parent-style-name="Standard">
      <style:text-properties fo:font-weight="normal" officeooo:rsid="0020e0bb" officeooo:paragraph-rsid="0020e0bb" style:font-weight-asian="normal" style:font-weight-complex="normal"/>
    </style:style>
    <style:style style:name="P29" style:family="paragraph" style:parent-style-name="Standard" style:list-style-name="L5">
      <style:text-properties fo:font-weight="normal" officeooo:rsid="0020e0bb" officeooo:paragraph-rsid="0020e0bb" style:font-weight-asian="normal" style:font-weight-complex="normal"/>
    </style:style>
    <style:style style:name="P30" style:family="paragraph" style:parent-style-name="Standard">
      <style:text-properties fo:font-weight="normal" officeooo:rsid="002235b0" officeooo:paragraph-rsid="002235b0" style:font-weight-asian="normal" style:font-weight-complex="normal"/>
    </style:style>
    <style:style style:name="P31" style:family="paragraph" style:parent-style-name="Standard">
      <style:text-properties fo:font-weight="normal" officeooo:rsid="0022a60e" officeooo:paragraph-rsid="0022a60e" style:font-weight-asian="normal" style:font-weight-complex="normal"/>
    </style:style>
    <style:style style:name="P32" style:family="paragraph" style:parent-style-name="Standard">
      <style:text-properties fo:font-weight="normal" officeooo:rsid="0022a60e" officeooo:paragraph-rsid="0023b8df" style:font-weight-asian="normal" style:font-weight-complex="normal"/>
    </style:style>
    <style:style style:name="P33" style:family="paragraph" style:parent-style-name="Standard">
      <style:text-properties fo:font-weight="normal" officeooo:rsid="0024420a" officeooo:paragraph-rsid="0024420a" style:font-weight-asian="normal" style:font-weight-complex="normal"/>
    </style:style>
    <style:style style:name="P34" style:family="paragraph" style:parent-style-name="Standard">
      <style:text-properties fo:font-weight="normal" officeooo:rsid="0024b053" officeooo:paragraph-rsid="0024420a" style:font-weight-asian="normal" style:font-weight-complex="normal"/>
    </style:style>
    <style:style style:name="P35" style:family="paragraph" style:parent-style-name="Standard">
      <style:text-properties officeooo:rsid="00205080" officeooo:paragraph-rsid="00205080"/>
    </style:style>
    <style:style style:name="P36" style:family="paragraph" style:parent-style-name="Standard">
      <style:paragraph-properties fo:break-before="page"/>
      <style:text-properties fo:font-weight="bold" officeooo:rsid="0017fea8" officeooo:paragraph-rsid="0017fea8" style:font-weight-asian="bold" style:font-weight-complex="bold"/>
    </style:style>
    <style:style style:name="T1" style:family="text">
      <style:text-properties officeooo:rsid="0022beae"/>
    </style:style>
    <style:style style:name="T2" style:family="text">
      <style:text-properties fo:font-style="italic" style:font-style-asian="italic" style:font-style-complex="italic"/>
    </style:style>
    <style:style style:name="T3" style:family="text">
      <style:text-properties officeooo:rsid="0024e939"/>
    </style:style>
    <style:style style:name="T4" style:family="text">
      <style:text-properties fo:font-weight="bold" officeooo:rsid="001c8cb8"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officeooo:rsid="00160b41" style:font-style-asian="normal" style:font-style-complex="normal"/>
    </style:style>
    <style:style style:name="T7" style:family="text">
      <style:text-properties fo:font-style="normal" officeooo:rsid="001aa674" style:font-style-asian="normal" style:font-style-complex="normal"/>
    </style:style>
    <style:style style:name="T8" style:family="text">
      <style:text-properties fo:font-style="normal" officeooo:rsid="0023b8df" style:font-style-asian="normal" style:font-style-complex="normal"/>
    </style:style>
    <style:style style:name="T9" style:family="text">
      <style:text-properties officeooo:rsid="001c8cb8"/>
    </style:style>
    <style:style style:name="T10" style:family="text">
      <style:text-properties officeooo:rsid="0019e0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Organisation]</text:span></text:p>
      <text:p text:style-name="P2">[17/12/2013: Continuing on...]</text:p>
      <text:p text:style-name="P4"/>
      <text:p text:style-name="P5">I was reading about Feature Trees. It's a very simple method of organisation and mind-mapping. You start with the project/app in the center, draw a line out of it to a box which is a feature. Now along that line draw protruding lines (like brnahces on a tree) which are the use cases required to implement, or just pertaining to, the feature. Simple and effective. (Additionally, the book recommends writing functional requirements <text:span text:style-name="T1">underneath the UCs but that's a bit verbose. Although a dynamic and interactive diagram might be perfect! Scroll around, zoom into an area, see the functional requirements appear. Cool.)</text:span></text:p>
      <text:p text:style-name="P6">Anyway, I thought about this a little more and Features are just collections of smaller capabilities. They fit the same model described above. They have an <text:span text:style-name="T2">n</text:span>:<text:span text:style-name="T2">n</text:span> mapping with UCs.</text:p>
      <text:p text:style-name="P7">Acutally, they can have their own priority which would probably be either 1) a multiplier to their children UCs' priorities, or 2) a parent priority that would take precedence over the children's priorities. Interesting. Once these were in-place some nice graphs might be doable, I'm imagining a table <text:span text:style-name="T3">or grid</text:span>, versions at the top, features on the left, <text:span text:style-name="T3">and then colours boxes in the middle overlapping versions and... wait that doesn't make sense, there's no overlap. It would just be like the <text:s/>Major Features &amp; Release Plan in V&amp;S docs. Well maybe priority could be introduced. For some reason I imagine different coloured semi-transparent bars overlapping being extremely useful as a visualisation tool. Coming from my subconcious or gut, I'll need to think about that later. One thing is for sure though, automatic or easily generatable diagrams will get lots of points with potential users I think. They appeal. Good diagrams are orders of magnitude more efficient at conveying information that text. They're usually harder to manually draw and maintain than text. Even if I invent my own diagrams, they should provide a lot of business value.</text:span></text:p>
      <text:p text:style-name="P7"/>
      <text:p text:style-name="P1">Where was I? Organisation. Yes! Well Features are another organisational device, they may have their own (arbitrary) attributes, how their attributes affect UC attributes (if at all) will likely be arbitrary.</text:p>
      <text:p text:style-name="P1"/>
      <text:p text:style-name="P8">When the system gets versions, I would to <text:span text:style-name="T5">see a list of versions and as first-class list items. What I mean is, unlike Github and JIRA where you see a list of issues and then apply filters, I want to just see a list of versions, maybe with a little footnote for each one like “23 UCs” or something. Similar to how at the moment you log in, you see projects, click a project you see UCs. I want to see Versions, click, see UCs. I would like the same thing with Features. It would probably be good to be able to do it for all units of organisation. The ability to do it with multiple levels (eg. ver → component) or maybe matrix/filter style would be the trick!</text:span></text:p>
      <text:p text:style-name="P8"><text:span text:style-name="T5"/></text:p>
      <text:p text:style-name="P9"><text:span text:style-name="T5">Two of the most important project goals are simplicity and ease. Therefore the following must be considered:</text:span></text:p>
      <text:list xml:id="list4998523378766848419" text:style-name="L1">
        <text:list-item>
          <text:p text:style-name="P12"><text:span text:style-name="T5">Sensible and intuitive defaults.</text:span></text:p>
        </text:list-item>
        <text:list-item>
          <text:p text:style-name="P11"><text:span text:style-name="T5">Effort to use.</text:span></text:p>
        </text:list-item>
        <text:list-item>
          <text:p text:style-name="P11"><text:span text:style-name="T5">Effort to learn, understand how to modify.</text:span></text:p>
        </text:list-item>
        <text:list-item>
          <text:p text:style-name="P10"><text:span text:style-name="T6">Separate and m</text:span><text:span text:style-name="T5">inimise </text:span><text:span text:style-name="T6">intertwined functions &amp; responsibilities.</text:span></text:p>
        </text:list-item>
      </text:list>
      <text:p text:style-name="P9"><text:span text:style-name="T6"/></text:p>
      <text:p text:style-name="P13"><text:span text:style-name="T6">[</text:span><text:span text:style-name="T5">Just went and wrote Requirements/project-attributes.ods]</text:span></text:p>
      <text:p text:style-name="P13"><text:span text:style-name="T5">Ok, later I should run all my requirements through my project-attributes doc and customise the design.</text:span></text:p>
      <text:p text:style-name="P13"><text:span text:style-name="T5"/></text:p>
      <text:p text:style-name="P35"><text:span text:style-name="T5">Also how will these organisational units affect publish-views? Should they be present? Toggleable?</text:span></text:p>
      <text:p text:style-name="P13"><text:span text:style-name="T5"/></text:p>
      <text:p text:style-name="P14"><text:span text:style-name="T5"/></text:p>
      <text:p text:style-name="P36"><text:span text:style-name="T5">[Read All UCs &amp; Generate PDF]</text:span></text:p>
      <text:p text:style-name="P14"><text:span text:style-name="T5"/></text:p>
      <text:p text:style-name="P18"><text:span text:style-name="T5">I didn't put too much thought into these two functions when I built them into the prototype. </text:span></text:p>
      <text:p text:style-name="P18"><text:span text:style-name="T5"/></text:p>
      <text:p text:style-name="P18"><text:span text:style-name="T5">I originally wanted the features for the following reasons:</text:span></text:p>
      <text:list xml:id="list6542500255184617445" text:style-name="L2">
        <text:list-item>
          <text:p text:style-name="P19"><text:span text:style-name="T5">So I could see/confirm the layout/markup before sharing/printing.</text:span></text:p>
        </text:list-item>
        <text:list-item>
          <text:p text:style-name="P19"><text:span text:style-name="T5">So I could read through and review all my UCs.</text:span></text:p>
        </text:list-item>
      </text:list>
      <text:p text:style-name="P18"><text:span text:style-name="T5"/></text:p>
      <text:p text:style-name="P20"><text:span text:style-name="T5">I see the two random buttons in the prototype as a problem now because:</text:span></text:p>
      <text:list xml:id="list6051931598133033029" text:style-name="L3">
        <text:list-item>
          <text:p text:style-name="P21"><text:span text:style-name="T5">You can't filter the UCs.</text:span></text:p>
        </text:list-item>
        <text:list-item>
          <text:p text:style-name="P21"><text:span text:style-name="T5">You can't add a title &amp; preface.</text:span></text:p>
        </text:list-item>
      </text:list>
      <text:p text:style-name="P20"><text:span text:style-name="T5"/></text:p>
      <text:p text:style-name="P20"><text:span text:style-name="T5">Actually I think I need the same thing as a share, except with the password. Probably overkill saving the “view” or whatnot. Maybe I could be [main] → [filter] ↔ [view] → [pdf]. Something like that would then allow anon users to filter shares they look at and generate a pdf too. Might be useful. Guessing...</text:span></text:p>
      <text:p text:style-name="P20"><text:span text:style-name="T5"/></text:p>
      <text:p text:style-name="P20"><text:span text:style-name="T5"/></text:p>
      <text:p text:style-name="P15"><text:span text:style-name="T5">[Completeness Evaluation]</text:span></text:p>
      <text:p text:style-name="P3"><text:span text:style-name="T4"/></text:p>
      <text:p text:style-name="P3">[<text:span text:style-name="T10">04</text:span>/12/2013: <text:span text:style-name="T9">I also need to know which usecases are complete and which still need work. Usecases will often be a work in progress, filled with TODOs and TBDs, empty fields. I need a way to access the state of (in)completeness across my all usecases without having to click and manually read each one. </text:span>]</text:p>
      <text:p text:style-name="P16"><text:span text:style-name="T5"/></text:p>
      <text:p text:style-name="P22"><text:span text:style-name="T5">When I'm revising UCs I want the following:</text:span></text:p>
      <text:list xml:id="list8064121590374597401" text:style-name="L4">
        <text:list-item>
          <text:p text:style-name="P23"><text:span text:style-name="T5">To know which UCs have </text:span><text:span text:style-name="T7">bad tags</text:span><text:span text:style-name="T5">, and how many: [DELETED] refs, </text:span><text:span text:style-name="T7">invalid step refs, invalid UC refs.</text:span></text:p>
        </text:list-item>
        <text:list-item>
          <text:p text:style-name="P24"><text:span text:style-name="T5">To know which UCs have these, and how many: </text:span><text:span text:style-name="T7">TODOs, TBDs.</text:span></text:p>
        </text:list-item>
        <text:list-item>
          <text:p text:style-name="P24"><text:span text:style-name="T7">To know which UCs have empty (mandatory) fields, and how many.</text:span></text:p>
        </text:list-item>
        <text:list-item>
          <text:p text:style-name="P25"><text:span text:style-name="T7">T</text:span><text:span text:style-name="T5">o be able to see all of the above in context without having to open each UC.</text:span></text:p>
        </text:list-item>
        <text:list-item>
          <text:p text:style-name="P27"><text:span text:style-name="T5">Total number of above.</text:span></text:p>
        </text:list-item>
        <text:list-item>
          <text:p text:style-name="P27"><text:span text:style-name="T5">Ability to filter UC scope.</text:span></text:p>
        </text:list-item>
      </text:list>
      <text:p text:style-name="P26"><text:span text:style-name="T5"/></text:p>
      <text:p text:style-name="P26"><text:span text:style-name="T5">The pros usually add additional info to TODOs and TBDs such as who is responsible for the next step, when they expect to know, etc.</text:span></text:p>
      <text:p text:style-name="P26"><text:span text:style-name="T5"/></text:p>
      <text:p text:style-name="P31"><text:span text:style-name="T5">It might be an idea to auto-populate new UCs with TODOs in each field and use that instead of considering empty fields a problem. Or maybe have the ability to switch empty fields on/off.</text:span></text:p>
      <text:p text:style-name="P26"><text:span text:style-name="T5"/></text:p>
      <text:p text:style-name="P26"><text:span text:style-name="T5"/></text:p>
      <text:p text:style-name="P17"><text:span text:style-name="T5">[Field Management]</text:span></text:p>
      <text:p text:style-name="P28"><text:span text:style-name="T5"/></text:p>
      <text:p text:style-name="P28"><text:span text:style-name="T5">Users will likely need to configure their own UC fields. This includes:</text:span></text:p>
      <text:list xml:id="list1964931624755900001" text:style-name="L5">
        <text:list-item>
          <text:p text:style-name="P29"><text:span text:style-name="T5">Removing fields.</text:span></text:p>
        </text:list-item>
        <text:list-item>
          <text:p text:style-name="P29"><text:span text:style-name="T5">Reordering fields.</text:span></text:p>
        </text:list-item>
        <text:list-item>
          <text:p text:style-name="P29"><text:span text:style-name="T5">Adding new fields.</text:span></text:p>
        </text:list-item>
        <text:list-item>
          <text:p text:style-name="P29"><text:span text:style-name="T5">Changing existing fields.</text:span></text:p>
        </text:list-item>
      </text:list>
      <text:p text:style-name="P28"><text:span text:style-name="T5"/></text:p>
      <text:p text:style-name="P30"><text:span text:style-name="T5">This field set should apply to all UCs in the project.</text:span></text:p>
      <text:p text:style-name="P31"><text:span text:style-name="T5">To be super-detailed, this </text:span><text:span text:style-name="T2">could </text:span><text:span text:style-name="T5">be applied on a UC-by-UC basis, even more extreme would be UCs belonging to a given component get special fieldset modifications. But I think that's way too </text:span><text:soft-page-break/><text:span text:style-name="T5">detailed.</text:span></text:p>
      <text:p text:style-name="P31"><text:span text:style-name="T5"/></text:p>
      <text:p text:style-name="P32"><text:span text:style-name="T5">This affects the </text:span><text:span text:style-name="T2">[Completeness Evaluation]</text:span><text:span text:style-name="T5"> feature. If a user decides they want an extra field for a subset of UCs, then unless functionality for that is provided, they will just add to all and either leave blank on irrelevant UCs, or fill with N/A. </text:span><text:span text:style-name="T8">If they want to leave it empty then it may be considered a TODO within the </text:span><text:span text:style-name="T2">[Completeness Evaluation]</text:span><text:span text:style-name="T5"> feature.</text:span></text:p>
      <text:p text:style-name="P32"><text:span text:style-name="T5"/></text:p>
      <text:p text:style-name="P33"><text:span text:style-name="T5">When the user is configuring their fieldset, it should show them how many UCs are currently using a field and even show them the values. I might think “oh I don't use XXX, I'll just delete it”, where as I might be using it quite effectively in some UCs. Also do we hard delete their data? Maybe we should just soft delete and be able to swtich it on again later.</text:span></text:p>
      <text:p text:style-name="P3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TianZhen" style:font-family-asian="TianZhe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7T11:37:06.359310841</meta:creation-date>
    <dc:date>2013-12-17T17:19:51.453728143</dc:date>
    <meta:editing-duration>PT1H56M48S</meta:editing-duration>
    <meta:editing-cycles>2</meta:editing-cycles>
    <meta:generator>LibreOffice/4.1.3.2$Linux_X86_64 LibreOffice_project/410m0$Build-2</meta:generator>
    <meta:document-statistic meta:table-count="0" meta:image-count="0" meta:object-count="0" meta:page-count="3" meta:paragraph-count="45" meta:word-count="1095" meta:character-count="6303" meta:non-whitespace-character-count="5269"/>
  </office:meta>
</office:document-meta>
</file>
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22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3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anZhe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UCs into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Want to assign groupings to multiple UCs simultaneously, without using the UCE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have relationships with other groupings. (Eg. teams are responsible for components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 are directly interested in indirect groupings (Eg. UC → component → team = UC → team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have relationships with groupings (eg. User A is <text:span text:style-name="T2">part of</text:span><text:span text:style-name="T3"> team X)</text:span>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arbitrarily (eg. User creates group of “Stuff they want to review this week”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need user-definable ordering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hould be able to have children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C selection in Shares should be filterable by groupings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.Pri???</text:p>
          </table:table-cell>
          <table:table-cell office:value-type="string" calcext:value-type="string">
            <text:p>Versions have own attributes: release date; status = [pending, in progress, released]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R.PriLow</text:p>
          </table:table-cell>
          <table:table-cell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are mandatory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want to know when a mandatory grouping isn't applied to a req.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ometimes apply only to a portion of a UC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4">st</text:span>-class like UCs, Projects, Share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office:annotation draw:style-name="gr1" draw:text-style-name="P1" svg:width="6.241cm" svg:height="3.507cm" svg:x="15.99cm" svg:y="11.767cm" draw:caption-point-x="4.196cm" draw:caption-point-y="-0.853cm">
              <dc:date>2014-02-05T00:00:00</dc:date>
              <text:p text:style-name="P1"><text:span text:style-name="T1">I can't remember wtf I meant by this. Probably: UC scheduled for v1 but step 2.0.4 can't be implemented until v2. This isn't an issue with atomic reqs rather than composite reqs (UCs).</text:span></text:p>
            </office:annotation>
            <text:p>There is overlap between groupings and UC fields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Eg. when reading a UC, I expect to see “Priority: Low” for example.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 when reading/printing/reviewing UCs. (i.e. not just editing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User needs to estimate the size/scope of a grouping. (Eg. how much work in v1.1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When sharing/reviewing a UC the Reader will often like to see associated org data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The distinction between groupings being metadata or a RWS/req is blurry. Eg. priority/feature=req/RWS, version/team=meta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 attributes will be of little impact if absent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 descriptions will be useful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User must be able to organise 100 flat reqs of same type into 5 versions in under 5 minutes.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Given a version with 40 UCs in it, a user must be able to redistribute every 5th UC in a different version in under 5 minutes. (eg. 20% to ver A, 20% to ver B, etc.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ample Groupi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ample Grouping Relations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onent ↔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ority ↔ Compon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ority ↔ Fe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sion ↔ Released Status (?)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4" table:number-rows-repeated="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5:32:19.155659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4-02-06T15:32:53.081488604</dc:date>
    <meta:editing-duration>PT8H5M48S</meta:editing-duration>
    <meta:editing-cycles>14</meta:editing-cycles>
    <meta:generator>LibreOffice/4.1.4.2$Linux_X86_64 LibreOffice_project/410m0$Build-2</meta:generator>
    <meta:document-statistic meta:table-count="1" meta:cell-count="110" meta:object-count="0"/>
  </office:meta>
</office:document-meta>
</file>
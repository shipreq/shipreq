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nsolas" svg:font-family="Consolas" style:font-family-generic="swiss" style:font-pitch="fixed"/>
    <style:font-face style:name="Tinos" svg:font-family="Tinos"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494c" officeooo:paragraph-rsid="0010494c"/>
    </style:style>
    <style:style style:name="P2" style:family="paragraph" style:parent-style-name="Standard">
      <style:text-properties officeooo:rsid="0010494c" officeooo:paragraph-rsid="001b6cd2"/>
    </style:style>
    <style:style style:name="P3" style:family="paragraph" style:parent-style-name="Standard">
      <style:text-properties officeooo:rsid="00122aed" officeooo:paragraph-rsid="00122aed"/>
    </style:style>
    <style:style style:name="P4" style:family="paragraph" style:parent-style-name="Standard">
      <style:text-properties officeooo:rsid="00167d2f" officeooo:paragraph-rsid="00167d2f"/>
    </style:style>
    <style:style style:name="P5" style:family="paragraph" style:parent-style-name="Standard">
      <style:text-properties fo:font-weight="normal" officeooo:rsid="0016923c" officeooo:paragraph-rsid="0016923c" style:font-weight-asian="normal" style:font-weight-complex="normal"/>
    </style:style>
    <style:style style:name="P6" style:family="paragraph" style:parent-style-name="Standard">
      <style:text-properties fo:font-weight="normal" officeooo:rsid="001b6cd2" officeooo:paragraph-rsid="001b6cd2" style:font-weight-asian="normal" style:font-weight-complex="normal"/>
    </style:style>
    <style:style style:name="P7" style:family="paragraph" style:parent-style-name="Standard">
      <style:text-properties fo:font-weight="normal" officeooo:rsid="001dfb49" officeooo:paragraph-rsid="001dfb49" style:font-weight-asian="normal" style:font-weight-complex="normal"/>
    </style:style>
    <style:style style:name="P8" style:family="paragraph" style:parent-style-name="Standard">
      <style:text-properties fo:font-weight="normal" officeooo:rsid="0021c1c9" officeooo:paragraph-rsid="0021c1c9" style:font-weight-asian="normal" style:font-weight-complex="normal"/>
    </style:style>
    <style:style style:name="P9" style:family="paragraph" style:parent-style-name="Standard">
      <style:text-properties fo:font-style="normal" fo:font-weight="normal" officeooo:rsid="0017fea8" officeooo:paragraph-rsid="00190de3" style:font-style-asian="normal" style:font-weight-asian="normal" style:font-style-complex="normal" style:font-weight-complex="normal"/>
    </style:style>
    <style:style style:name="P10" style:family="paragraph" style:parent-style-name="Standard">
      <style:text-properties fo:font-style="normal" fo:font-weight="normal" officeooo:rsid="001993dc" officeooo:paragraph-rsid="001993dc" style:font-style-asian="normal" style:font-weight-asian="normal" style:font-style-complex="normal" style:font-weight-complex="normal"/>
    </style:style>
    <style:style style:name="P11" style:family="paragraph" style:parent-style-name="Standard">
      <style:text-properties fo:font-style="normal" fo:font-weight="bold" officeooo:rsid="0017fea8" officeooo:paragraph-rsid="00190de3" style:font-style-asian="normal" style:font-weight-asian="bold" style:font-style-complex="normal" style:font-weight-complex="bold"/>
    </style:style>
    <style:style style:name="P12" style:family="paragraph" style:parent-style-name="Standard">
      <style:text-properties fo:font-weight="bold" officeooo:rsid="0010494c" officeooo:paragraph-rsid="0010494c" style:font-weight-asian="bold" style:font-weight-complex="bold"/>
    </style:style>
    <style:style style:name="P13" style:family="paragraph" style:parent-style-name="Standard">
      <style:text-properties fo:font-weight="bold" officeooo:rsid="0010494c" officeooo:paragraph-rsid="001b6cd2" style:font-weight-asian="bold" style:font-weight-complex="bold"/>
    </style:style>
    <style:style style:name="P14" style:family="paragraph" style:parent-style-name="Standard">
      <style:text-properties fo:font-weight="bold" officeooo:rsid="0010494c" officeooo:paragraph-rsid="001dfb49" style:font-weight-asian="bold" style:font-weight-complex="bold"/>
    </style:style>
    <style:style style:name="P15" style:family="paragraph" style:parent-style-name="Standard">
      <style:text-properties fo:font-weight="bold" officeooo:rsid="00122aed" officeooo:paragraph-rsid="00122aed" style:font-weight-asian="bold" style:font-weight-complex="bold"/>
    </style:style>
    <style:style style:name="P16" style:family="paragraph" style:parent-style-name="Standard">
      <style:text-properties fo:font-weight="bold" officeooo:rsid="00122aed" officeooo:paragraph-rsid="001dfb49" style:font-weight-asian="bold" style:font-weight-complex="bold"/>
    </style:style>
    <style:style style:name="P17" style:family="paragraph" style:parent-style-name="Standard">
      <style:text-properties fo:font-weight="bold" officeooo:rsid="0014ff5a" officeooo:paragraph-rsid="001dfb49" style:font-weight-asian="bold" style:font-weight-complex="bold"/>
    </style:style>
    <style:style style:name="P18" style:family="paragraph" style:parent-style-name="Standard">
      <style:text-properties fo:font-weight="bold" officeooo:rsid="0014ff5a" officeooo:paragraph-rsid="0014ff5a" style:font-weight-asian="bold" style:font-weight-complex="bold"/>
    </style:style>
    <style:style style:name="P19" style:family="paragraph" style:parent-style-name="Standard">
      <style:text-properties fo:font-weight="bold" officeooo:rsid="0014ff5a" officeooo:paragraph-rsid="001b6cd2" style:font-weight-asian="bold" style:font-weight-complex="bold"/>
    </style:style>
    <style:style style:name="P20" style:family="paragraph" style:parent-style-name="Standard">
      <style:text-properties fo:font-weight="bold" officeooo:rsid="00167d2f" officeooo:paragraph-rsid="00167d2f" style:font-weight-asian="bold" style:font-weight-complex="bold"/>
    </style:style>
    <style:style style:name="P21" style:family="paragraph" style:parent-style-name="Standard">
      <style:text-properties fo:font-weight="bold" officeooo:rsid="00190de3" officeooo:paragraph-rsid="00190de3" style:font-weight-asian="bold" style:font-weight-complex="bold"/>
    </style:style>
    <style:style style:name="P22" style:family="paragraph" style:parent-style-name="Standard">
      <style:text-properties fo:color="#ff420e" fo:font-weight="bold" officeooo:rsid="00167d2f" officeooo:paragraph-rsid="00167d2f" style:font-weight-asian="bold" style:font-weight-complex="bold"/>
    </style:style>
    <style:style style:name="P23" style:family="paragraph" style:parent-style-name="Standard">
      <style:text-properties fo:color="#ff420e" fo:font-weight="bold" officeooo:rsid="001c8cb8" officeooo:paragraph-rsid="001c8cb8" style:font-weight-asian="bold" style:font-weight-complex="bold"/>
    </style:style>
    <style:style style:name="P24" style:family="paragraph" style:parent-style-name="Standard">
      <style:text-properties fo:color="#ff420e" fo:font-weight="bold" officeooo:rsid="0016923c" officeooo:paragraph-rsid="0016923c" style:font-weight-asian="bold" style:font-weight-complex="bold"/>
    </style:style>
    <style:style style:name="P25" style:family="paragraph" style:parent-style-name="Standard">
      <style:text-properties fo:color="#ff420e" fo:font-weight="normal" officeooo:rsid="00167d2f" officeooo:paragraph-rsid="00167d2f" style:font-weight-asian="normal" style:font-weight-complex="normal"/>
    </style:style>
    <style:style style:name="P26" style:family="paragraph" style:parent-style-name="Standard">
      <style:text-properties fo:color="#ff420e" fo:font-style="normal" fo:font-weight="bold" officeooo:rsid="0017fea8" officeooo:paragraph-rsid="00190de3" style:font-style-asian="normal" style:font-weight-asian="bold" style:font-style-complex="normal" style:font-weight-complex="bold"/>
    </style:style>
    <style:style style:name="P27" style:family="paragraph" style:parent-style-name="Standard">
      <style:text-properties fo:color="#ff420e" officeooo:rsid="0010494c" officeooo:paragraph-rsid="0010494c"/>
    </style:style>
    <style:style style:name="P28" style:family="paragraph" style:parent-style-name="Standard">
      <style:text-properties fo:color="#ff0000" fo:font-weight="bold" officeooo:rsid="001b6cd2" officeooo:paragraph-rsid="001b6cd2" fo:background-color="#ffff00" style:font-weight-asian="bold" style:font-weight-complex="bold"/>
    </style:style>
    <style:style style:name="P29" style:family="paragraph" style:parent-style-name="Standard">
      <style:text-properties officeooo:rsid="001d0192" officeooo:paragraph-rsid="001d0192"/>
    </style:style>
    <style:style style:name="P30" style:family="paragraph" style:parent-style-name="Standard">
      <style:text-properties officeooo:rsid="001d112e" officeooo:paragraph-rsid="001d112e"/>
    </style:style>
    <style:style style:name="P31" style:family="paragraph" style:parent-style-name="Standard">
      <style:text-properties officeooo:rsid="0021c1c9" officeooo:paragraph-rsid="0021c1c9"/>
    </style:style>
    <style:style style:name="P32" style:family="paragraph" style:parent-style-name="Standard">
      <style:text-properties fo:font-style="italic" officeooo:rsid="0021c1c9" officeooo:paragraph-rsid="0021c1c9" style:font-style-asian="italic" style:font-style-complex="italic"/>
    </style:style>
    <style:style style:name="P33" style:family="paragraph" style:parent-style-name="Standard">
      <style:text-properties fo:font-style="italic" officeooo:rsid="0014ff5a" officeooo:paragraph-rsid="001dfb49" style:font-style-asian="italic" style:font-style-complex="italic"/>
    </style:style>
    <style:style style:name="P34" style:family="paragraph" style:parent-style-name="Standard">
      <style:text-properties fo:font-style="italic" fo:font-weight="bold" officeooo:rsid="0014ff5a" officeooo:paragraph-rsid="0021c1c9" style:font-style-asian="italic" style:font-weight-asian="bold" style:font-style-complex="italic" style:font-weight-complex="bold"/>
    </style:style>
    <style:style style:name="P35" style:family="paragraph" style:parent-style-name="Standard" style:list-style-name="L1">
      <style:text-properties fo:font-weight="normal" officeooo:rsid="001b6cd2" officeooo:paragraph-rsid="001b6cd2" style:font-weight-asian="normal" style:font-weight-complex="normal"/>
    </style:style>
    <style:style style:name="P36" style:family="paragraph" style:parent-style-name="Standard" style:list-style-name="L3">
      <style:text-properties fo:font-weight="normal" officeooo:rsid="001b6cd2" officeooo:paragraph-rsid="001b6cd2" style:font-weight-asian="normal" style:font-weight-complex="normal"/>
    </style:style>
    <style:style style:name="P37" style:family="paragraph" style:parent-style-name="Standard" style:list-style-name="L3">
      <style:text-properties fo:font-weight="normal" officeooo:rsid="001d0192" officeooo:paragraph-rsid="001d0192" style:font-weight-asian="normal" style:font-weight-complex="normal"/>
    </style:style>
    <style:style style:name="P38" style:family="paragraph" style:parent-style-name="Standard">
      <style:text-properties fo:font-weight="normal" officeooo:rsid="00167d2f" officeooo:paragraph-rsid="0022de26" style:font-weight-asian="normal" style:font-weight-complex="normal"/>
    </style:style>
    <style:style style:name="P39" style:family="paragraph" style:parent-style-name="Standard">
      <style:text-properties fo:font-weight="normal" officeooo:rsid="00167d2f" officeooo:paragraph-rsid="00167d2f" style:font-weight-asian="normal" style:font-weight-complex="normal"/>
    </style:style>
    <style:style style:name="P40" style:family="paragraph" style:parent-style-name="Standard">
      <style:text-properties fo:font-weight="normal" officeooo:rsid="00167d2f" officeooo:paragraph-rsid="0023b256" style:font-weight-asian="normal" style:font-weight-complex="normal"/>
    </style:style>
    <style:style style:name="P41" style:family="paragraph" style:parent-style-name="Standard">
      <style:text-properties fo:font-weight="normal" officeooo:rsid="0016923c" officeooo:paragraph-rsid="0016923c" style:font-weight-asian="normal" style:font-weight-complex="normal"/>
    </style:style>
    <style:style style:name="P42" style:family="paragraph" style:parent-style-name="Standard">
      <style:text-properties fo:font-weight="normal" officeooo:rsid="0022de26" officeooo:paragraph-rsid="0022de26" style:font-weight-asian="normal" style:font-weight-complex="normal"/>
    </style:style>
    <style:style style:name="P43" style:family="paragraph" style:parent-style-name="Standard" style:list-style-name="L7">
      <style:text-properties fo:font-weight="normal" officeooo:rsid="0022de26" officeooo:paragraph-rsid="0022de26" style:font-weight-asian="normal" style:font-weight-complex="normal"/>
    </style:style>
    <style:style style:name="P44" style:family="paragraph" style:parent-style-name="Standard" style:list-style-name="L7">
      <style:text-properties fo:font-weight="normal" officeooo:rsid="00234f6f" officeooo:paragraph-rsid="00234f6f" style:font-weight-asian="normal" style:font-weight-complex="normal"/>
    </style:style>
    <style:style style:name="P45" style:family="paragraph" style:parent-style-name="Standard">
      <style:text-properties fo:font-weight="normal" officeooo:rsid="00234f6f" officeooo:paragraph-rsid="00234f6f" style:font-weight-asian="normal" style:font-weight-complex="normal"/>
    </style:style>
    <style:style style:name="P46" style:family="paragraph" style:parent-style-name="Standard">
      <style:text-properties fo:font-weight="normal" officeooo:rsid="0023b256" officeooo:paragraph-rsid="0023b256" style:font-weight-asian="normal" style:font-weight-complex="normal"/>
    </style:style>
    <style:style style:name="P47" style:family="paragraph" style:parent-style-name="Standard">
      <style:text-properties fo:font-weight="normal" officeooo:rsid="0024dfda" officeooo:paragraph-rsid="0024dfda" style:font-weight-asian="normal" style:font-weight-complex="normal"/>
    </style:style>
    <style:style style:name="P48" style:family="paragraph" style:parent-style-name="Standard">
      <style:text-properties fo:font-weight="normal" officeooo:rsid="00257d0b" officeooo:paragraph-rsid="00257d0b" style:font-weight-asian="normal" style:font-weight-complex="normal"/>
    </style:style>
    <style:style style:name="P49" style:family="paragraph" style:parent-style-name="Standard">
      <style:text-properties fo:font-weight="normal" officeooo:rsid="0025f29d" officeooo:paragraph-rsid="0025f29d" style:font-weight-asian="normal" style:font-weight-complex="normal"/>
    </style:style>
    <style:style style:name="P50" style:family="paragraph" style:parent-style-name="Standard">
      <style:text-properties fo:font-weight="normal" officeooo:rsid="0028fd1c" officeooo:paragraph-rsid="0028fd1c" style:font-weight-asian="normal" style:font-weight-complex="normal"/>
    </style:style>
    <style:style style:name="P51" style:family="paragraph" style:parent-style-name="Standard">
      <style:text-properties fo:font-weight="normal" officeooo:rsid="002a6e1e" officeooo:paragraph-rsid="002a6e1e" style:font-weight-asian="normal" style:font-weight-complex="normal"/>
    </style:style>
    <style:style style:name="P52" style:family="paragraph" style:parent-style-name="Standard">
      <style:text-properties fo:font-weight="normal" officeooo:rsid="002ac407" officeooo:paragraph-rsid="002ac407" style:font-weight-asian="normal" style:font-weight-complex="normal"/>
    </style:style>
    <style:style style:name="P53" style:family="paragraph" style:parent-style-name="Standard">
      <style:text-properties fo:font-weight="normal" officeooo:rsid="00180d45" officeooo:paragraph-rsid="00180d45" style:font-weight-asian="normal" style:font-weight-complex="normal"/>
    </style:style>
    <style:style style:name="P54" style:family="paragraph" style:parent-style-name="Standard">
      <style:text-properties fo:font-weight="normal" officeooo:rsid="002c3a95" officeooo:paragraph-rsid="002c3a95" style:font-weight-asian="normal" style:font-weight-complex="normal"/>
    </style:style>
    <style:style style:name="P55" style:family="paragraph" style:parent-style-name="Standard">
      <style:text-properties fo:font-weight="normal" officeooo:rsid="002c445f" officeooo:paragraph-rsid="002c445f" style:font-weight-asian="normal" style:font-weight-complex="normal"/>
    </style:style>
    <style:style style:name="P56" style:family="paragraph" style:parent-style-name="Standard" style:list-style-name="L2">
      <style:text-properties officeooo:rsid="001b6cd2" officeooo:paragraph-rsid="001b6cd2"/>
    </style:style>
    <style:style style:name="P57" style:family="paragraph" style:parent-style-name="Standard" style:list-style-name="L4">
      <style:text-properties officeooo:rsid="001d0192" officeooo:paragraph-rsid="001d0192"/>
    </style:style>
    <style:style style:name="P58" style:family="paragraph" style:parent-style-name="Standard" style:list-style-name="L5">
      <style:text-properties officeooo:rsid="001dfb49" officeooo:paragraph-rsid="001dfb49"/>
    </style:style>
    <style:style style:name="P59" style:family="paragraph" style:parent-style-name="Standard" style:list-style-name="L6">
      <style:text-properties officeooo:rsid="001dfb49" officeooo:paragraph-rsid="001dfb49"/>
    </style:style>
    <style:style style:name="P60" style:family="paragraph" style:parent-style-name="Standard">
      <style:text-properties style:text-underline-style="none" officeooo:rsid="0021c1c9" officeooo:paragraph-rsid="0021c1c9"/>
    </style:style>
    <style:style style:name="P61" style:family="paragraph" style:parent-style-name="Standard">
      <style:text-properties fo:font-weight="bold" officeooo:rsid="00167d2f" officeooo:paragraph-rsid="0022de26" style:font-weight-asian="bold" style:font-weight-complex="bold"/>
    </style:style>
    <style:style style:name="P62" style:family="paragraph" style:parent-style-name="Standard">
      <style:text-properties fo:font-weight="bold" officeooo:rsid="00167d2f" officeooo:paragraph-rsid="00167d2f" style:font-weight-asian="bold" style:font-weight-complex="bold"/>
    </style:style>
    <style:style style:name="P63" style:family="paragraph" style:parent-style-name="Standard">
      <style:text-properties fo:font-weight="bold" officeooo:rsid="001e4491" officeooo:paragraph-rsid="001e4491" style:font-weight-asian="bold" style:font-weight-complex="bold"/>
    </style:style>
    <style:style style:name="P64" style:family="paragraph" style:parent-style-name="Standard">
      <style:text-properties fo:font-weight="bold" officeooo:rsid="0016923c" officeooo:paragraph-rsid="0016923c" style:font-weight-asian="bold" style:font-weight-complex="bold"/>
    </style:style>
    <style:style style:name="P65" style:family="paragraph" style:parent-style-name="Standard">
      <style:text-properties fo:font-weight="bold" officeooo:rsid="0016923c" officeooo:paragraph-rsid="00275add" style:font-weight-asian="bold" style:font-weight-complex="bold"/>
    </style:style>
    <style:style style:name="P66" style:family="paragraph" style:parent-style-name="Standard">
      <style:text-properties fo:font-weight="bold" officeooo:rsid="00180d45" officeooo:paragraph-rsid="00180d45" style:font-weight-asian="bold" style:font-weight-complex="bold"/>
    </style:style>
    <style:style style:name="P67" style:family="paragraph" style:parent-style-name="Standard">
      <style:text-properties fo:font-weight="bold" officeooo:rsid="00180d45" officeooo:paragraph-rsid="002c445f" style:font-weight-asian="bold" style:font-weight-complex="bold"/>
    </style:style>
    <style:style style:name="P68" style:family="paragraph" style:parent-style-name="Standard">
      <style:text-properties fo:font-weight="bold" officeooo:rsid="00190de3" officeooo:paragraph-rsid="00190de3" style:font-weight-asian="bold" style:font-weight-complex="bold"/>
    </style:style>
    <style:style style:name="P69" style:family="paragraph" style:parent-style-name="Standard" style:list-style-name="L8">
      <style:text-properties officeooo:paragraph-rsid="00275add"/>
    </style:style>
    <style:style style:name="P70" style:family="paragraph" style:parent-style-name="Standard" style:list-style-name="L8">
      <style:text-properties officeooo:rsid="00275add" officeooo:paragraph-rsid="00275add"/>
    </style:style>
    <style:style style:name="P71" style:family="paragraph" style:parent-style-name="Standard" style:list-style-name="L9">
      <style:text-properties officeooo:paragraph-rsid="0028fd1c"/>
    </style:style>
    <style:style style:name="P72" style:family="paragraph" style:parent-style-name="Standard" style:list-style-name="L9">
      <style:text-properties officeooo:rsid="0028fd1c" officeooo:paragraph-rsid="0028fd1c"/>
    </style:style>
    <style:style style:name="P73" style:family="paragraph" style:parent-style-name="Standard">
      <style:text-properties fo:font-style="italic" fo:font-weight="bold" officeooo:rsid="00180d45" officeooo:paragraph-rsid="00180d45" style:font-style-asian="italic" style:font-weight-asian="bold" style:font-style-complex="italic" style:font-weight-complex="bold"/>
    </style:style>
    <style:style style:name="P74" style:family="paragraph" style:parent-style-name="Standard">
      <style:text-properties fo:font-style="normal" fo:font-weight="bold" officeooo:rsid="001993dc" officeooo:paragraph-rsid="001993dc" style:font-style-asian="normal" style:font-weight-asian="bold" style:font-style-complex="normal" style:font-weight-complex="bold"/>
    </style:style>
    <style:style style:name="P75" style:family="paragraph" style:parent-style-name="Standard">
      <style:text-properties fo:font-style="normal" fo:font-weight="normal" officeooo:rsid="001993dc" officeooo:paragraph-rsid="002dc379" style:font-style-asian="normal" style:font-weight-asian="normal" style:font-style-complex="normal" style:font-weight-complex="normal"/>
    </style:style>
    <style:style style:name="P76" style:family="paragraph" style:parent-style-name="Standard" style:list-style-name="L14">
      <style:text-properties fo:font-style="normal" fo:font-weight="normal" officeooo:rsid="002dc379" officeooo:paragraph-rsid="002dc379" style:font-style-asian="normal" style:font-weight-asian="normal" style:font-style-complex="normal" style:font-weight-complex="normal"/>
    </style:style>
    <style:style style:name="P77" style:family="paragraph" style:parent-style-name="Standard" style:list-style-name="L15">
      <style:text-properties fo:font-style="normal" fo:font-weight="normal" officeooo:rsid="002de2a5" officeooo:paragraph-rsid="002de2a5" style:font-style-asian="normal" style:font-weight-asian="normal" style:font-style-complex="normal" style:font-weight-complex="normal"/>
    </style:style>
    <style:style style:name="P78" style:family="paragraph" style:parent-style-name="Standard">
      <style:text-properties fo:font-style="normal" fo:font-weight="normal" officeooo:rsid="002de2a5" officeooo:paragraph-rsid="002fe0dd" style:font-style-asian="normal" style:font-weight-asian="normal" style:font-style-complex="normal" style:font-weight-complex="normal"/>
    </style:style>
    <style:style style:name="P79" style:family="paragraph" style:parent-style-name="Standard" style:list-style-name="L13">
      <style:text-properties officeooo:rsid="002dc379" officeooo:paragraph-rsid="002dc379"/>
    </style:style>
    <style:style style:name="P80" style:family="paragraph" style:parent-style-name="Standard" style:list-style-name="L13">
      <style:text-properties officeooo:paragraph-rsid="002dc379"/>
    </style:style>
    <style:style style:name="T1" style:family="text">
      <style:text-properties officeooo:rsid="001b1d05"/>
    </style:style>
    <style:style style:name="T2" style:family="text">
      <style:text-properties officeooo:rsid="00190de3"/>
    </style:style>
    <style:style style:name="T3" style:family="text">
      <style:text-properties fo:color="#ff0000" officeooo:rsid="001b6cd2" fo:background-color="#ffff00"/>
    </style:style>
    <style:style style:name="T4" style:family="text">
      <style:text-properties fo:color="#ff0000" officeooo:rsid="001dfb49" fo:background-color="#ffff00"/>
    </style:style>
    <style:style style:name="T5" style:family="text">
      <style:text-properties fo:color="#ff0000" officeooo:rsid="002c445f" fo:background-color="#ffff00"/>
    </style:style>
    <style:style style:name="T6" style:family="text">
      <style:text-properties officeooo:rsid="001dfb49"/>
    </style:style>
    <style:style style:name="T7" style:family="text">
      <style:text-properties style:font-name="Consolas" fo:font-size="10pt" style:font-size-asian="10pt" style:font-size-complex="10pt"/>
    </style:style>
    <style:style style:name="T8" style:family="text">
      <style:text-properties style:font-name="Consolas" fo:font-size="10pt" fo:font-style="italic" style:font-size-asian="10pt" style:font-style-asian="italic" style:font-size-complex="10pt" style:font-style-complex="italic"/>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2dc379" style:font-style-asian="normal" style:font-weight-asian="normal" style:font-style-complex="normal" style:font-weight-complex="normal"/>
    </style:style>
    <style:style style:name="T13" style:family="text">
      <style:text-properties fo:font-style="normal" fo:font-weight="normal" officeooo:rsid="002de2a5" style:font-style-asian="normal" style:font-weight-asian="normal" style:font-style-complex="normal" style:font-weight-complex="normal"/>
    </style:style>
    <style:style style:name="T14" style:family="text">
      <style:text-properties style:text-underline-style="solid" style:text-underline-width="auto" style:text-underline-color="font-color"/>
    </style:style>
    <style:style style:name="T15" style:family="text">
      <style:text-properties style:text-underline-style="none"/>
    </style:style>
    <style:style style:name="T16" style:family="text">
      <style:text-properties style:text-position="super 58%"/>
    </style:style>
    <style:style style:name="T17" style:family="text">
      <style:text-properties fo:color="#ffffff" fo:background-color="#ff0000"/>
    </style:style>
    <style:style style:name="T18" style:family="text">
      <style:text-properties officeooo:rsid="0023b256"/>
    </style:style>
    <style:style style:name="T19" style:family="text">
      <style:text-properties officeooo:rsid="0024dfda"/>
    </style:style>
    <style:style style:name="T20" style:family="text">
      <style:text-properties officeooo:rsid="0025f29d"/>
    </style:style>
    <style:style style:name="T21" style:family="text">
      <style:text-properties fo:font-weight="normal" style:font-weight-asian="normal" style:font-weight-complex="normal"/>
    </style:style>
    <style:style style:name="T22" style:family="text">
      <style:text-properties fo:font-weight="normal" officeooo:rsid="0025f29d" style:font-weight-asian="normal" style:font-weight-complex="normal"/>
    </style:style>
    <style:style style:name="T23" style:family="text">
      <style:text-properties fo:font-weight="normal" officeooo:rsid="0028fd1c" style:font-weight-asian="normal" style:font-weight-complex="normal"/>
    </style:style>
    <style:style style:name="T24" style:family="text">
      <style:text-properties officeooo:rsid="002c445f"/>
    </style:style>
    <style:style style:name="T25" style:family="text">
      <style:text-properties officeooo:rsid="002f093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Organisation]</text:p>
      <text:p text:style-name="P27"/>
      <text:p text:style-name="P12">You said previously “ <text:span text:style-name="T1">I need </text:span>[…] <text:span text:style-name="T1">organisation for other purposes”. </text:span>What purposes can you think of? <text:span text:style-name="T3">[Q is ambiguous]</text:span></text:p>
      <text:p text:style-name="P28"/>
      <text:p text:style-name="P6">I can think of these purposes:</text:p>
      <text:list xml:id="list4604228410945378243" text:style-name="L1">
        <text:list-item>
          <text:p text:style-name="P35">BA filtering UC scope when reading/printing/reviewing UCs.</text:p>
        </text:list-item>
        <text:list-item>
          <text:p text:style-name="P35">A share filtering UC scope when being accessed by Readers.</text:p>
        </text:list-item>
        <text:list-item>
          <text:p text:style-name="P35">PM/BA determining the scope of their versions.</text:p>
        </text:list-item>
        <text:list-item>
          <text:p text:style-name="P35">BA accessing the influence/scope/size of an organisational unit. Inverse of 1.</text:p>
          <text:p text:style-name="P35">Eg. How big is 1.0, how much work does Team A have to work with, what's completed.</text:p>
        </text:list-item>
      </text:list>
      <text:p text:style-name="P12"/>
      <text:p text:style-name="P12">Who is interested in those purposes and how important is it to them?</text:p>
      <text:p text:style-name="P1"/>
      <text:list xml:id="list1535696228366426535" text:style-name="L2">
        <text:list-item>
          <text:p text:style-name="P56">BA. Very important as project grows. 10 Ucs = slightly important, 50 UCs important. 100+ UCs critical.</text:p>
        </text:list-item>
        <text:list-item>
          <text:p text:style-name="P56">BA &amp; Readers. Same importance as above.</text:p>
        </text:list-item>
        <text:list-item>
          <text:p text:style-name="P56">BA/PM. Somewhat important.</text:p>
        </text:list-item>
        <text:list-item>
          <text:p text:style-name="P56">As above.</text:p>
        </text:list-item>
      </text:list>
      <text:p text:style-name="P1"/>
      <text:p text:style-name="P12">Why do those purposes matter?</text:p>
      <text:p text:style-name="P12"/>
      <text:list xml:id="list175987368746176546" text:style-name="L3">
        <text:list-item>
          <text:p text:style-name="P36">Near impossible to work without being to filter shit out.</text:p>
        </text:list-item>
        <text:list-item>
          <text:p text:style-name="P36">BA needs to manage amount of information washing over Reader. Also Reader, might not be privy to some requirements.</text:p>
        </text:list-item>
        <text:list-item>
          <text:p text:style-name="P37">PM/BA needs to estimate effort for Ucs in a version and balance it against time &amp; cost.</text:p>
        </text:list-item>
        <text:list-item>
          <text:p text:style-name="P37">BA: Confirm allocations match what they've got in their head.</text:p>
          <text:p text:style-name="P37">PM: estimate effort/workload and balance it against external factors.</text:p>
        </text:list-item>
      </text:list>
      <text:p text:style-name="P12"/>
      <text:p text:style-name="P12">What would happen if you couldn't use the product to organise you Ucs in the groups?</text:p>
      <text:p text:style-name="P12"/>
      <text:list xml:id="list3562887863810818027" text:style-name="L4">
        <text:list-item>
          <text:p text:style-name="P57">I would be very pissed off. I would have to use the editor to view each one-by-one. Wrt printing I'd just have to print everything and cross out certain UC titles.</text:p>
        </text:list-item>
        <text:list-item>
          <text:p text:style-name="P57">I would have to manually select Ucs. Every time a UC came in-scope or went out-of-scope I'd have to manually update all shares. Annoying.</text:p>
        </text:list-item>
        <text:list-item>
          <text:p text:style-name="P57">?</text:p>
        </text:list-item>
      </text:list>
      <text:p text:style-name="P29"/>
      <text:p text:style-name="P30">Actually I misread. If the product didn't have any org features in it then I'd have only 2 options.</text:p>
      <text:list xml:id="list1598433707544437200" text:style-name="L5">
        <text:list-item>
          <text:p text:style-name="P58">Use some external tool (Excel) to do the same thing. I'd have a row that matched the requirement Ids and then columns for the org stuff. That would be annoying because I would have to either omit titles from the external doc or copy titles into it and then they'd get out of sync.</text:p>
        </text:list-item>
        <text:list-item>
          <text:p text:style-name="P58">I'd abuse the titles of Ucs to add extra information. Things like [VERSION: 1.0]. Things would get ugly.</text:p>
        </text:list-item>
      </text:list>
      <text:p text:style-name="P2"/>
      <text:p text:style-name="P13">If versions are metadata instead of real UC content, why do some people want them to look like they are part of the UC?</text:p>
      <text:p text:style-name="P13"/>
      <text:list xml:id="list7813531131515160419" text:style-name="L6">
        <text:list-item>
          <text:p text:style-name="P59">People are used to it. It's the way it's commonly done. Decades of precedent.</text:p>
        </text:list-item>
        <text:list-item>
          <text:p text:style-name="P59">The distinction between content and org metadata is fine and not commonly recognised.</text:p>
        </text:list-item>
        <text:list-item>
          <text:p text:style-name="P59">When sharing/reviewing a UC the Reader will often like to see associated org data.</text:p>
        </text:list-item>
        <text:list-item>
          <text:p text:style-name="P59">Where else to put it?</text:p>
        </text:list-item>
      </text:list>
      <text:p text:style-name="P2"><text:soft-page-break/></text:p>
      <text:p text:style-name="P14">What about groupings <text:span text:style-name="T6">other than version</text:span>, do they all have the same relationship to Ucs? <text:span text:style-name="T3">[</text:span><text:span text:style-name="T4">Vague: Make relationships explicit.</text:span><text:span text:style-name="T3">]</text:span></text:p>
      <text:p text:style-name="P17">What attributes do &lt;grouping&gt; have?</text:p>
      <text:p text:style-name="P17"/>
      <text:p text:style-name="P32">See <text:span text:style-name="T7">feature-organisation.ods</text:span>.</text:p>
      <text:p text:style-name="P33"/>
      <text:p text:style-name="P16">If groupings were implemented without attributes, what problems would still exist, or arise?</text:p>
      <text:p text:style-name="P15"/>
      <text:p text:style-name="P31">Looking at the direct attributes, it wouldn't be a big deal. If everything had a single description attribute tht would probably be more than enough. If there were no attributes at all, I don't think it would matter too much.</text:p>
      <text:p text:style-name="P31"/>
      <text:p text:style-name="P31">For relation-attributes however, s<text:span text:style-name="T10">ee</text:span><text:span text:style-name="T9"> </text:span><text:span text:style-name="T8">feature-organisation.ods</text:span><text:span text:style-name="T9">.</text:span></text:p>
      <text:p text:style-name="P3"/>
      <text:p text:style-name="P18">What will the consequences be if &lt;each one&gt; is missing from the app?</text:p>
      <text:p text:style-name="P19">In the UC publish view, how is &lt;grouping&gt; normally integrated?</text:p>
      <text:p text:style-name="P19">Why do readers of the doc need to see it?</text:p>
      <text:p text:style-name="P18"/>
      <text:p text:style-name="P32">See <text:span text:style-name="T7">feature-organisation.ods</text:span>.</text:p>
      <text:p text:style-name="P34"/>
      <text:p text:style-name="P20">What's the trade-off between time and value?</text:p>
      <text:p text:style-name="P20"/>
      <text:p text:style-name="P31">Something <text:span text:style-name="T14">must</text:span><text:span text:style-name="T15"> be done to solve the scope problem. Everything else is nice to have.</text:span></text:p>
      <text:p text:style-name="P60">The value should be sufficient to solve the scope problem with high value costing up to a month of time.</text:p>
      <text:p text:style-name="P4"/>
      <text:p text:style-name="P21">How can we judge the success of this solution?</text:p>
      <text:p text:style-name="P20"/>
      <text:p text:style-name="P8">Have an unorganised project of approx 100 Ucs.</text:p>
      <text:p text:style-name="P8">Organise all 100 in into 5 versions in under 10 minutes.</text:p>
      <text:p text:style-name="P8">Have a version with 40 Ucs in it, redistribute every 5<text:span text:style-name="T16">th</text:span> UC in a different version in under 5 minutes. (eg. 20% to ver A, 20% to ver B, etc.)</text:p>
      <text:p text:style-name="P8"><text:line-break/><text:span text:style-name="T17">???</text:span></text:p>
      <text:p text:style-name="P4"/>
      <text:p text:style-name="P23">[Completeness Evaluation]</text:p>
      <text:p text:style-name="P25"/>
      <text:p text:style-name="P61">How do you deal with this situation currently?</text:p>
      <text:p text:style-name="P42">Two ways:</text:p>
      <text:list xml:id="list5667544451435098997" text:style-name="L7">
        <text:list-item>
          <text:p text:style-name="P43">View all use cases and manually scan text for keywords like TODO, TBD. If using MS Word I normally highlight in red so they stand out.</text:p>
        </text:list-item>
        <text:list-item>
          <text:p text:style-name="P44">Keep a separate table of pending tasks.</text:p>
        </text:list-item>
      </text:list>
      <text:p text:style-name="P38"/>
      <text:p text:style-name="P61">How will you deal with it until an implementation is provided?</text:p>
      <text:p text:style-name="P45">One of the two ways above. Because the UCE doesn't allow me to colour text, I might even deliberately input invalid refs so that I have something red so my eyes see it fast.</text:p>
      <text:p text:style-name="P20"/>
      <text:p text:style-name="P20">Who is this important to? Why?</text:p>
      <text:p text:style-name="P45">The UC editor and reviewer.</text:p>
      <text:p text:style-name="P45">It's important because <text:span text:style-name="T18">the issues these TODO tags represent need to addressed and not forgotten. Because the BA/reviewer will read multiple revisions of a UC, they naturally start to skim making it </text:span><text:soft-page-break/><text:span text:style-name="T18">very easy to overlook important gaps in the requirements.</text:span></text:p>
      <text:p text:style-name="P39"/>
      <text:p text:style-name="P20">What will they do after determining completeness?</text:p>
      <text:p text:style-name="P46">If complete, maybe share for review, print it out maybe. Alert someone.</text:p>
      <text:p text:style-name="P40"/>
      <text:p text:style-name="P20">What will they do after discovering empty fields?</text:p>
      <text:p text:style-name="P46">Fill them in or enter a TODO/TBD with additional info.</text:p>
      <text:p text:style-name="P20"/>
      <text:p text:style-name="P20">What will they do after discovering placeholders?</text:p>
      <text:p text:style-name="P46">Try to <text:span text:style-name="T19">edit the fields and </text:span>resolve the incompletions.</text:p>
      <text:p text:style-name="P46"/>
      <text:p text:style-name="P63"><text:span text:style-name="T1">W</text:span>hat problems could this feature create?</text:p>
      <text:p text:style-name="P47">People could be happy with certain fields being empty which would yield false positives. At least in their mind empty fields could be of less value than TODOs so they wouldn't want to wade through a sea of empty-field errors looking for those few TODOs.</text:p>
      <text:p text:style-name="P47"/>
      <text:p text:style-name="P64">How often would it be used?</text:p>
      <text:p text:style-name="P47">Very often. Tags would be added nearly every time the UCE is opened for new requirements.</text:p>
      <text:p text:style-name="P47">After requirements start to settle the incompletion-overview function would be used regularly until all were gone.</text:p>
      <text:p text:style-name="P5"/>
      <text:p text:style-name="P64">When would it be used?</text:p>
      <text:p text:style-name="P48">All the time until the end of a project.</text:p>
      <text:p text:style-name="P5"/>
      <text:p text:style-name="P64">When you say you want to see all incompletions in context without having to open each UC...</text:p>
      <text:p text:style-name="P64">- why is this important?</text:p>
      <text:p text:style-name="P48">The not-wanting-to-open-UC part is obvious. Much effort.</text:p>
      <text:p text:style-name="P48">The context part... well I was just thinking of diffs actually. Hmm, <text:span text:style-name="T20">well the incompletions just need enough info to make sense without seeing the entire UC. Otherwise displaying them all in a nice list will lose its value if the user then has to open a UC to understand it.</text:span></text:p>
      <text:p text:style-name="P48"/>
      <text:p text:style-name="P64">- what would happen if you couldn't see them in context?</text:p>
      <text:p text:style-name="P49">User would have to open containing UC; no point having a nice summary.</text:p>
      <text:p text:style-name="P64"/>
      <text:p text:style-name="P64">- what do you expect to see when you say context? How much context?</text:p>
      <text:list xml:id="list5312510656731366878" text:style-name="L8">
        <text:list-item>
          <text:p text:style-name="P69"><text:span text:style-name="T22">You'd definitely want to see the UC name, and containing field name for all incompletions.</text:span></text:p>
        </text:list-item>
        <text:list-item>
          <text:p text:style-name="P69"><text:span text:style-name="T22">If TODOs, TBDs etc are able to include additional data, that data should be displayed.</text:span></text:p>
          <text:p text:style-name="P69"><text:span text:style-name="T22">If not the entire field would need to be displayed.</text:span></text:p>
        </text:list-item>
        <text:list-item>
          <text:p text:style-name="P70"><text:span text:style-name="T22">F</text:span><text:span text:style-name="T21">or invalid step/UC refs some of the surrounding text would be useful. Ideally the containing sentence. If not, maybe just a number of words before the tag (important) and a number after (less important).</text:span></text:p>
        </text:list-item>
      </text:list>
      <text:p text:style-name="P65"/>
      <text:p text:style-name="P64">What kind of incompletions are there?</text:p>
      <text:list xml:id="list2372707059699600365" text:style-name="L9">
        <text:list-item>
          <text:p text:style-name="P71"><text:span text:style-name="T23">Empty fields</text:span></text:p>
        </text:list-item>
        <text:list-item>
          <text:p text:style-name="P71"><text:span text:style-name="T23">Deleted step refs</text:span></text:p>
        </text:list-item>
        <text:list-item>
          <text:p text:style-name="P71"><text:span text:style-name="T23">Invalid step refs</text:span></text:p>
        </text:list-item>
        <text:list-item>
          <text:p text:style-name="P72"><text:span text:style-name="T21">Invalid UC refs</text:span></text:p>
        </text:list-item>
        <text:list-item>
          <text:p text:style-name="P72"><text:span text:style-name="T21">User-defined tags: TODO, TBD.</text:span></text:p>
        </text:list-item>
      </text:list>
      <text:p text:style-name="P64"/>
      <text:p text:style-name="P64">What causes them in real-life?</text:p>
      <text:p text:style-name="P50">Bad refs – Mistakes. Deletion of ref target.</text:p>
      <text:p text:style-name="P51">Empty – Don't know/care. Not enough time.</text:p>
      <text:p text:style-name="P51"><text:soft-page-break/>TODO/TBD – Need to think, need to talk to someone, awaiting external event.</text:p>
      <text:p text:style-name="P5"/>
      <text:p text:style-name="P64">What is the typical lifecycle of such an incompletion?</text:p>
      <text:p text:style-name="P51">It occurs, you see it, you ignore it, you resolve or delete it.</text:p>
      <text:p text:style-name="P5"/>
      <text:p text:style-name="P64">Can you think of or do you remember any variations?</text:p>
      <text:p text:style-name="P51">No.</text:p>
      <text:p text:style-name="P64"/>
      <text:p text:style-name="P64">Some fields are mandatory? How often does the mandatory-ness change?</text:p>
      <text:p text:style-name="P51">Well that's at the discresion of the req manager. It can definitely change over time as the project gets underway.</text:p>
      <text:p text:style-name="P5"/>
      <text:p text:style-name="P5"/>
      <text:p text:style-name="P52">Also if a use case is missing a version or priority that is often considered an incompletion.</text:p>
      <text:p text:style-name="P7"/>
      <text:p text:style-name="P5"/>
      <text:p text:style-name="P24">[Field Management]</text:p>
      <text:p text:style-name="P5"/>
      <text:p text:style-name="P73">“Users will likely need to configure their own UC fields.”</text:p>
      <text:p text:style-name="P66">Why?</text:p>
      <text:p text:style-name="P54">Use cases are not set in stone. Teams have their preferences. Somethings work better than others depending on the team and project.</text:p>
      <text:p text:style-name="P54"/>
      <text:p text:style-name="P66">How often?</text:p>
      <text:p text:style-name="P54">Usually only once per-project. Sometimes fields are modified after ending a few UCs.</text:p>
      <text:p text:style-name="P66"/>
      <text:p text:style-name="P66">What will they do if they can't?</text:p>
      <text:p text:style-name="P54">Be very dissatisfied with the product. Some teams will refuse to use it.</text:p>
      <text:p text:style-name="P66"/>
      <text:p text:style-name="P66">When?</text:p>
      <text:p text:style-name="P54">Usually at the beginning of a project when less than 10 UCs have been entered.</text:p>
      <text:p text:style-name="P66"/>
      <text:p text:style-name="P66">Who?</text:p>
      <text:p text:style-name="P54">The BA.</text:p>
      <text:p text:style-name="P21"/>
      <text:p text:style-name="P21">What problems could this feature create?</text:p>
      <text:p text:style-name="P54">If a team has a nice setup and needs to redo it for each project they would be unhappy.</text:p>
      <text:p text:style-name="P54"/>
      <text:p text:style-name="P66">When you say change existing fields, what kind of changes can you imagine specifically?</text:p>
      <text:p text:style-name="P55">Renaming it.</text:p>
      <text:p text:style-name="P55">Changing its mandatory status.</text:p>
      <text:p text:style-name="P55">Changing its position wrt other fields.</text:p>
      <text:p text:style-name="P55"/>
      <text:p text:style-name="P66">When deleting a field, what should happen to its content? <text:span text:style-name="T5">[Dev question]</text:span><text:span text:style-name="T24"> </text:span></text:p>
      <text:p text:style-name="P55">It should be gone from all views.</text:p>
      <text:p text:style-name="P53"/>
      <text:p text:style-name="P66">If a field is deleted it has content, should anyone still be able to see it? If so, how?</text:p>
      <text:p text:style-name="P55">Well just after deletion it might be nice to see it in the editor so that I can copy &amp; paste bits of it around elsewhere. Otherwise, no.</text:p>
      <text:p text:style-name="P53"/>
      <text:p text:style-name="P67">If a field was deleted by mistake, in error or just by bad judgement, what would the consequences be?</text:p>
      <text:p text:style-name="P55"><text:soft-page-break/>Valuable data could be lost. If there are only a few UCs it would be bad, if there were many it could be disasterous.</text:p>
      <text:p text:style-name="P67"/>
      <text:p text:style-name="P67">What are the time/cost/effort implications of said consequences?</text:p>
      <text:p text:style-name="P55">Could be absoluetly massive!</text:p>
      <text:p text:style-name="P67"/>
      <text:p text:style-name="P67"><text:span text:style-name="T2">What </text:span>would you <text:span text:style-name="T2">do </text:span>to remedy the situation?</text:p>
      <text:p text:style-name="P55">Would have to either reenter the info from previous copies lying around and/or from BA's memory, likely having to reengage the client.</text:p>
      <text:p text:style-name="P66"/>
      <text:p text:style-name="P21">How can we judge the success of a solution?</text:p>
      <text:p text:style-name="P55">Find various UCs online and in books with different structures and ensure the system supports creating them with the same or at least very similar structure.</text:p>
      <text:p text:style-name="P11"/>
      <text:p text:style-name="P11"/>
      <text:p text:style-name="P26">[Read All UCs &amp; Generate PDF]</text:p>
      <text:p text:style-name="P9"/>
      <text:p text:style-name="P74">When &amp; why would you want to view/read multiple UCs at once?</text:p>
      <text:list xml:id="list1382963847366784798" text:style-name="L13">
        <text:list-item>
          <text:p text:style-name="P80"><text:span text:style-name="T12">When editing and/or reviewing my UCs to ensure correctness at a larger scope, find problems.</text:span></text:p>
        </text:list-item>
        <text:list-item>
          <text:p text:style-name="P79"><text:span text:style-name="T11">To print out a subset to give/show someone.</text:span></text:p>
        </text:list-item>
        <text:list-item>
          <text:p text:style-name="P79"><text:span text:style-name="T11">When perform</text:span><text:span text:style-name="T13">ing</text:span><text:span text:style-name="T11"> some other tasks that depends on them. (Design, dev, requirements diagrams)</text:span></text:p>
        </text:list-item>
      </text:list>
      <text:p text:style-name="P75"/>
      <text:p text:style-name="P74">When &amp; why would you want to print UCs?</text:p>
      <text:list xml:id="list4348982342631157428" text:style-name="L14">
        <text:list-item>
          <text:p text:style-name="P76">To read and/or review offline.</text:p>
        </text:list-item>
        <text:list-item>
          <text:p text:style-name="P76">To give to someone else to read/review.</text:p>
        </text:list-item>
        <text:list-item>
          <text:p text:style-name="P76">For safe-keeping. Hard copies can be a form of redundancy.</text:p>
        </text:list-item>
      </text:list>
      <text:p text:style-name="P75"/>
      <text:p text:style-name="P74">How often would you want to perform &lt;answers above&gt;?</text:p>
      <text:list xml:id="list7672995415893315484" text:style-name="L15">
        <text:list-item>
          <text:p text:style-name="P77">Very often when working on UCs.</text:p>
        </text:list-item>
        <text:list-item>
          <text:p text:style-name="P77">Often when working with others.</text:p>
        </text:list-item>
        <text:list-item>
          <text:p text:style-name="P77">Depends on the task. Occasional~Often.</text:p>
          <text:p text:style-name="P77"/>
        </text:list-item>
        <text:list-item text:start-value="1">
          <text:p text:style-name="P77">Occasional. Offline is a nice break from the PC.</text:p>
        </text:list-item>
        <text:list-item>
          <text:p text:style-name="P77">Often when working with others.</text:p>
        </text:list-item>
        <text:list-item>
          <text:p text:style-name="P77">Not often.</text:p>
        </text:list-item>
      </text:list>
      <text:p text:style-name="P10"/>
      <text:p text:style-name="P74">How important is a solution to you? What are the consequences of not having a solution?</text:p>
      <text:p text:style-name="P78">Quite important. <text:span text:style-name="T25">Without the ability to view and print multiple UCs at once, UCs are trapped in the app. Without the ability to filter these, <text:s/>the ability to view and print multiple UCs at once becomes increasingly useless as the UC count grow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nsolas" svg:font-family="Consolas" style:font-family-generic="swiss" style:font-pitch="fixed"/>
    <style:font-face style:name="Tinos" svg:font-family="Tinos"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AU" style:letter-kerning="true" style:font-name-asian="AR PL UMing CN"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AU" style:letter-kerning="true" style:font-name-asian="AR PL UMing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mo" fo:font-family="Arimo" style:font-family-generic="swiss" style:font-pitch="variable" fo:font-size="14pt" style:font-name-asian="AR PL UMing CN" style:font-family-asian="'AR PL UMing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0T14:43:53.051324719</meta:creation-date>
    <dc:date>2013-12-23T17:50:19.623740343</dc:date>
    <meta:editing-duration>PT1H34M26S</meta:editing-duration>
    <meta:editing-cycles>10</meta:editing-cycles>
    <meta:generator>LibreOffice/4.1.4.2$Linux_X86_64 LibreOffice_project/410m0$Build-2</meta:generator>
    <meta:document-statistic meta:table-count="0" meta:image-count="0" meta:object-count="0" meta:page-count="5" meta:paragraph-count="148" meta:word-count="1820" meta:character-count="10172" meta:non-whitespace-character-count="8538"/>
  </office:meta>
</office:document-meta>
</file>
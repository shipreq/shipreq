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Completeness Evaluation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determine whether it's complete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placeholders for pending info. (TODOs, TBDs etc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empty field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invalid tokens. ([DELETED], [1.2?] etc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/UC. (?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 across all UCs. (?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fields are mandatory, some are ok empty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y bulk-UC incompleteness analysis should accept a filter on the UC scope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to-populate mandatory fields with TODOs in new UC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completions usually coloured red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ODOs/TBDs often come with additional information to explain the incompletion, or pending condition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Different types of incompletions may be considered less of less importance than other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multiple incompletions, the user may not understand some incompletions without context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en viewing multiple incompletions, the user must be able to comprehend each item in context without leaving the pag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nam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field in which it occurs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TODO/TBD's supplimentary info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TODO/TBD that doesn't contain supplimentary info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invalid referenc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the containing sentence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just a number of words before the tag (important) and a number after (less important)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When a UC is missing a version or priority, it's often considered an incompletion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change the mandatory-ness of a field in-use.</text:p>
          </table:table-cell>
          <table:table-cell table:style-name="ce6" office:value-type="string" calcext:value-type="string">
            <text:p>mandatoryness changes, analy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ncompletion typ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pty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ted step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alid step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alid UC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-defined tags: TODO, TBD.</text:p>
          </table:table-cell>
          <table:table-cell/>
          <table:table-cell table:style-name="ce6" office:value-type="string" calcext:value-type="string">
            <text:p>how to CRUDL tags????</text:p>
          </table:table-cell>
          <table:table-cell table:number-columns-repeated="1020"/>
        </table:table-row>
        <table:table-row table:style-name="ro1" table:number-rows-repeated="1048469">
          <table:table-cell table:number-columns-repeated="1024"/>
        </table:table-row>
        <table:table-row table:style-name="ro4" table:number-rows-repeated="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5:32:18.689927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06T15:33:18.055842964</dc:date>
    <meta:editing-duration>PT8H5M48S</meta:editing-duration>
    <meta:editing-cycles>14</meta:editing-cycles>
    <meta:generator>LibreOffice/4.1.4.2$Linux_X86_64 LibreOffice_project/410m0$Build-2</meta:generator>
    <meta:document-statistic meta:table-count="1" meta:cell-count="79" meta:object-count="0"/>
  </office:meta>
</office:document-meta>
</file>
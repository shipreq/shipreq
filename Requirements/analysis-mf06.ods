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0.7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7.221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1.295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ff420e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cccccc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tyle="italic" style:font-style-asian="italic" style:font-style-complex="italic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able-cell-properties style:vertical-align="top"/>
      <style:text-properties fo:color="#cccccc"/>
    </style:style>
    <style:style style:name="ce7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no-wrap" style:vertical-align="top"/>
      <style:text-properties fo:color="#cccccc"/>
    </style:style>
    <style:style style:name="ce9" style:family="table-cell" style:parent-style-name="Default">
      <style:table-cell-properties fo:wrap-option="no-wrap" style:vertical-align="top"/>
    </style:style>
    <style:style style:name="ce10" style:family="table-cell" style:parent-style-name="Default">
      <style:table-cell-properties fo:wrap-option="wrap" style:vertical-align="top"/>
    </style:style>
    <style:style style:name="ce11" style:family="table-cell" style:parent-style-name="Default">
      <style:table-cell-properties fo:wrap-option="wrap" style:vertical-align="top"/>
      <style:text-properties fo:color="#cccccc"/>
    </style:style>
    <style:style style:name="ce12" style:family="table-cell" style:parent-style-name="Default">
      <style:table-cell-properties style:vertical-align="top"/>
      <style:text-properties fo:color="#ff0000"/>
    </style:style>
    <style:style style:name="ce13" style:family="table-cell" style:parent-style-name="Default">
      <style:table-cell-properties style:vertical-align="top"/>
      <style:text-properties fo:color="#ff0000" fo:font-weight="bold" style:font-weight-asian="bold" style:font-weight-complex="bold"/>
    </style:style>
    <style:style style:name="T1" style:family="text"/>
  </office:automatic-styles>
  <office:body>
    <office:spreadsheet>
      <table:table table:name="reqs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10"/>
        <table:table-column table:style-name="co2" table:number-columns-repeated="1021" table:default-cell-style-name="ce5"/>
        <table:table-row table:style-name="ro1">
          <table:table-cell table:style-name="ce1" office:value-type="string" calcext:value-type="string">
            <text:p>Completeness Evaluation</text:p>
          </table:table-cell>
          <table:table-cell table:number-columns-repeated="102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It's tedious to manually read each UC to determine whether it's complete.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It's tedious to manually read each UC to find placeholders for pending info. (TODOs, TBDs etc)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It's tedious to manually read each UC to find empty fields.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It's tedious to manually read each UC to find invalid tokens. ([DELETED], [1.2?] etc)</text:p>
          </table:table-cell>
          <table:table-cell table:number-columns-repeated="1021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FR</text:p>
          </table:table-cell>
          <table:table-cell table:style-name="ce11" office:value-type="string" calcext:value-type="string">
            <text:p>I want to know how many incompletions are in each UC.</text:p>
          </table:table-cell>
          <table:table-cell table:style-name="ce6" office:value-type="string" calcext:value-type="string">
            <text:p>Just a single UC? Is this: “When looking at a UC list, quickly see how complete each is?”</text:p>
            <text:p>Or in UCE, see a number of incopmletions?</text:p>
            <text:p>Answered in #007</text:p>
          </table:table-cell>
          <table:table-cell table:style-name="ce6" table:number-columns-repeated="1020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 want to know the sum total of incompletions that exist in multiple UCs.</text:p>
          </table:table-cell>
          <table:table-cell table:style-name="ce12"/>
          <table:table-cell table:number-columns-repeated="1020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Some fields are mandatory, some are ok empty.</text:p>
          </table:table-cell>
          <table:table-cell table:style-name="ce6" office:value-type="string" calcext:value-type="string">
            <text:p>Intersection with MF-05: Field Customisation</text:p>
            <text:p>Answered in #007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ny bulk-UC incompleteness analysis should accept a filter on the UC scope.</text:p>
          </table:table-cell>
          <table:table-cell table:number-columns-repeated="1021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SI</text:p>
          </table:table-cell>
          <table:table-cell table:style-name="ce11" office:value-type="string" calcext:value-type="string">
            <text:p>Auto-populate mandatory fields with TODOs in new UCs?</text:p>
          </table:table-cell>
          <table:table-cell table:style-name="ce6" office:value-type="string" calcext:value-type="string">
            <text:p>No. Will be trouble when making a field optional.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Incompletions usually coloured red.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TODOs/TBDs often come with additional information to explain the incompletion, or pending condition.</text:p>
          </table:table-cell>
          <table:table-cell table:style-name="ce6" office:value-type="string" calcext:value-type="string">
            <text:p>Exactly what kind of info</text:p>
            <text:p><text:span text:style-name="T1">Answered in #007</text:span></text:p>
          </table:table-cell>
          <table:table-cell table:number-columns-repeated="1020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RWS</text:p>
          </table:table-cell>
          <table:table-cell table:style-name="ce11" office:value-type="string" calcext:value-type="string">
            <text:p>Different types of incompletions may be considered of less importance than others.</text:p>
          </table:table-cell>
          <table:table-cell table:style-name="ce6" office:value-type="string" calcext:value-type="string">
            <text:p>Shelving this concept. Too detailed, too nitpicky.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When viewing multiple incompletions, the user may not understand some incompletions without context.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When viewing multiple incompletions, the user must be able to comprehend each item in context without leaving the page.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hen viewing multiple incompletions, the user must be able to see each item's UC name.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hen viewing multiple incompletions, the user must be able to see each item's UC field in which it occurs.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hen viewing multiple incompletions, the user must be able to see each TODO/TBD's supplimentary info.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hen viewing multiple incompletions, the user must be able to see field text around each TODO/TBD that doesn't contain supplimentary info.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hen viewing multiple incompletions, the user must be able to see field text around each invalid reference.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When showing field text around an incompletion, it might be an idea to show the containing sentence.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When showing field text around an incompletion, it might be an idea to show just a number of words before the tag (important) and a number after (less important).</text:p>
          </table:table-cell>
          <table:table-cell table:number-columns-repeated="1021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When a UC is missing a version or priority, it's often considered an incompletion.</text:p>
          </table:table-cell>
          <table:table-cell table:number-columns-repeated="1021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User must be able to change the mandatory-ness of a field in-use.</text:p>
          </table:table-cell>
          <table:table-cell table:style-name="ce13"/>
          <table:table-cell table:number-columns-repeated="1020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eed to store free text notes, not associated with a UC or req.</text:p>
          </table:table-cell>
          <table:table-cell table:style-name="ce13"/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ee a list of UCs and the number of incompletions in each one.</text:p>
          </table:table-cell>
          <table:table-cell table:style-name="ce13"/>
          <table:table-cell table:number-columns-repeated="1020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When viewing a list of all incompletions, too many of type A combined with sparse of type B is hard to discern. (Where “type” can be any classification such as source-UC, incompletion type.)</text:p>
          </table:table-cell>
          <table:table-cell table:style-name="ce13"/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Sometimes it's easier to just browse all rather than filter precisely.</text:p>
          </table:table-cell>
          <table:table-cell table:style-name="ce13"/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here is no need to display an incompletion count within the UC editor.</text:p>
          </table:table-cell>
          <table:table-cell table:style-name="ce13"/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User must be able to specify additional information along with an incompletion.</text:p>
          </table:table-cell>
          <table:table-cell table:style-name="ce13"/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User shall be able to specify UC/step refs within an incompletions additional info. [Pri=Nice]</text:p>
          </table:table-cell>
          <table:table-cell table:style-name="ce13"/>
          <table:table-cell table:number-columns-repeated="1020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User shall be able to add new incompletion types.</text:p>
          </table:table-cell>
          <table:table-cell table:style-name="ce13" office:value-type="string" calcext:value-type="string">
            <text:p>Investigate _RUDL?</text:p>
            <text:p>Using existing CRUDL patterns is probably enough.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Field mandatory-ness can change often.</text:p>
          </table:table-cell>
          <table:table-cell table:style-name="ce13"/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User shall be able to specify mandatoryness of field from the field editor (MF-05).</text:p>
          </table:table-cell>
          <table:table-cell table:style-name="ce13"/>
          <table:table-cell table:number-columns-repeated="1020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ach field type shall have a concept of emptyness which can be used to test for incompletion (MF-05).</text:p>
          </table:table-cell>
          <table:table-cell table:style-name="ce13"/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User must be able to specify loose-note completions.</text:p>
          </table:table-cell>
          <table:table-cell table:style-name="ce13"/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User shall be able to specify UC refs within loose-note completions. [Pri=Nice]</text:p>
          </table:table-cell>
          <table:table-cell table:style-name="ce13"/>
          <table:table-cell table:number-columns-repeated="1020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During any kind of incompletion analysis (counts or manifest) user shall be able to filter by incompletion type.</text:p>
          </table:table-cell>
          <table:table-cell table:style-name="ce13"/>
          <table:table-cell table:number-columns-repeated="1020"/>
        </table:table-row>
        <table:table-row table:style-name="ro4" table:number-rows-repeated="2">
          <table:table-cell table:number-columns-repeated="3"/>
          <table:table-cell table:style-name="ce1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Incompletion typ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mpty fields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{Deleted,Invalid} {UC,step} refs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User-defined tags: TODO, TBD.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Loose notes (unrelated to reqs)</text:p>
          </table:table-cell>
          <table:table-cell table:number-columns-repeated="1022"/>
        </table:table-row>
        <table:table-row table:style-name="ro4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4">
          <table:table-cell/>
          <table:table-cell table:style-name="Default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7" office:value-type="string" calcext:value-type="string">
            <text:p>Empty field strategy</text:p>
          </table:table-cell>
          <table:table-cell table:number-columns-repeated="1022"/>
        </table:table-row>
        <table:table-row table:style-name="ro4">
          <table:table-cell/>
          <table:table-cell table:style-name="ce8" office:value-type="string" calcext:value-type="string">
            <text:p>1) Fields get TODOs inserted when new.</text:p>
          </table:table-cell>
          <table:table-cell table:number-columns-repeated="1022"/>
        </table:table-row>
        <table:table-row table:style-name="ro4">
          <table:table-cell/>
          <table:table-cell table:style-name="ce9" office:value-type="string" calcext:value-type="string">
            <text:p>2) Fields have a mandatory switch, incomplete when empty.</text:p>
          </table:table-cell>
          <table:table-cell table:number-columns-repeated="1022"/>
        </table:table-row>
        <table:table-row table:style-name="ro4">
          <table:table-cell/>
          <table:table-cell table:style-name="ce8" office:value-type="string" calcext:value-type="string">
            <text:p>3) Incompletions → Empty fields → Field XXX → UCs</text:p>
          </table:table-cell>
          <table:table-cell table:style-name="Default"/>
          <table:table-cell table:number-columns-repeated="1021"/>
        </table:table-row>
        <table:table-row table:style-name="ro4" table:number-rows-repeated="2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1048461">
          <table:table-cell table:number-columns-repeated="1024"/>
        </table:table-row>
        <table:table-row table:style-name="ro4" table:number-rows-repeated="5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2">00/00/0000</text:date>, <text:time style:data-style-name="N2" text:time-value="09:48:33.7570854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7T17:45:55.440643359</meta:creation-date>
    <dc:date>2014-05-12T14:28:59.760217677</dc:date>
    <meta:editing-duration>PT10H53M22S</meta:editing-duration>
    <meta:editing-cycles>20</meta:editing-cycles>
    <meta:generator>LibreOffice/4.2.4.2$Linux_X86_64 LibreOffice_project/420m0$Build-2</meta:generator>
    <meta:document-statistic meta:table-count="1" meta:cell-count="128" meta:object-count="0"/>
  </office:meta>
</office:document-meta>
</file>
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1d05" officeooo:paragraph-rsid="001b1d05"/>
    </style:style>
    <style:style style:name="P2" style:family="paragraph" style:parent-style-name="Standard">
      <style:text-properties officeooo:rsid="001b1d05" officeooo:paragraph-rsid="001e4491"/>
    </style:style>
    <style:style style:name="P3" style:family="paragraph" style:parent-style-name="Standard">
      <style:text-properties officeooo:rsid="001b1d05" officeooo:paragraph-rsid="001f1a57"/>
    </style:style>
    <style:style style:name="P4" style:family="paragraph" style:parent-style-name="Standard">
      <style:text-properties fo:font-weight="bold" officeooo:rsid="001c8cb8" officeooo:paragraph-rsid="001c8cb8" style:font-weight-asian="bold" style:font-weight-complex="bold"/>
    </style:style>
    <style:style style:name="P5" style:family="paragraph" style:parent-style-name="Standard">
      <style:text-properties fo:font-weight="bold" officeooo:rsid="001e4491" officeooo:paragraph-rsid="001f1a57" style:font-weight-asian="bold" style:font-weight-complex="bold"/>
    </style:style>
    <style:style style:name="P6" style:family="paragraph" style:parent-style-name="Standard">
      <style:text-properties officeooo:rsid="001c8cb8" officeooo:paragraph-rsid="001c8cb8"/>
    </style:style>
    <style:style style:name="P7" style:family="paragraph" style:parent-style-name="Standard">
      <style:text-properties officeooo:rsid="001e4491" officeooo:paragraph-rsid="001e4491"/>
    </style:style>
    <style:style style:name="P8" style:family="paragraph" style:parent-style-name="Standard">
      <style:text-properties officeooo:rsid="001ec3b9" officeooo:paragraph-rsid="001ec3b9"/>
    </style:style>
    <style:style style:name="P9" style:family="paragraph" style:parent-style-name="Standard">
      <style:text-properties officeooo:rsid="001f1a57" officeooo:paragraph-rsid="001f1a57"/>
    </style:style>
    <style:style style:name="P10" style:family="paragraph" style:parent-style-name="Standard">
      <style:text-properties officeooo:rsid="001f1a57" officeooo:paragraph-rsid="001c8cb8"/>
    </style:style>
    <style:style style:name="P11" style:family="paragraph" style:parent-style-name="Standard">
      <style:text-properties fo:color="#ff0000" officeooo:rsid="001f1a57" officeooo:paragraph-rsid="001f1a57"/>
    </style:style>
    <style:style style:name="T1" style:family="text">
      <style:text-properties officeooo:rsid="001b1d05"/>
    </style:style>
    <style:style style:name="T2" style:family="text">
      <style:text-properties officeooo:rsid="001c8cb8"/>
    </style:style>
    <style:style style:name="T3" style:family="text">
      <style:text-properties officeooo:rsid="001e4491"/>
    </style:style>
    <style:style style:name="T4" style:family="text">
      <style:text-properties officeooo:rsid="001ec3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Organisation]</text:p>
      <text:p text:style-name="P6"/>
      <text:p text:style-name="P1">Now that the basic system is up and running, something's are gonna be hard as the usage increases. Currently I can write and store and share usecases, as the number of usecases grow looking at them all as a flat list isn't going to make sense. I'm need to organise them somehow, 1) so that the list isn't overwhelming, and 2) because I need that organisation for other purposes.</text:p>
      <text:p text:style-name="P1"/>
      <text:p text:style-name="P1">The first type of organisation or grouping that comes to mind (and need) is versioning. I need to keep track of which usecases are in which version so that when I'm working on that I can narrow my focus to relevant usecases and ignore the rest. Groupings should be arbitrary, I don't want to be restricted to versions. <text:span text:style-name="T2">JIRA has issue type, components and more; Github uses labels/tags like AwaitingInfo, Enhancement, Defect, etc.</text:span></text:p>
      <text:p text:style-name="P1"/>
      <text:p text:style-name="P6">I was thinking, <text:span text:style-name="T3">the real-world system, and real-world model... Ucs are descriptions of interaction. A version has nothing to do with it. It's separate. Versions are their own entities, part of a project schedule. Users should be able to change which Ucs are in which version without opening a UC, or affecting the content of a UC. In real-life the contents of a version can change very quickly and spontaneously. </text:span></text:p>
      <text:p text:style-name="P6"/>
      <text:p text:style-name="P7">What's similar? … Affected components (isn't that the actors?). I'm not sure if actors will suffice for this. But I know that grouping Ucs by it would be very important. Different teams of people can be responsible for different components and they will often want to only see Ucs for their own component(s). In real life it's: UC (interaction desc) → multiple components → <text:span text:style-name="T4">people. People have their own org strategies (esp. team), components have their own relationships (eg. A and B are part of X).</text:span></text:p>
      <text:p text:style-name="P7"/>
      <text:p text:style-name="P8">Users might just need to group Ucs together. Maybe Ucs 1-8 all relation to a particular function (eg. stock trading)</text:p>
      <text:p text:style-name="P8"/>
      <text:p text:style-name="P8">Priorities are a big one! Similar to versions, fickle and ephemeral, change often, arbitrary strategies/definitions/schemes/approaches. They need an ordering between them (ie. High &gt; med &gt; low). Versions will need that too actually (ie. 1.9 &lt; 1.9.1 &lt; 1.10 &lt; 1.11)</text:p>
      <text:p text:style-name="P8"/>
      <text:p text:style-name="P9">Any organisational units should be applicable to share UC selection. (Eg. Have a share that shows high-pri for 1.x)</text:p>
      <text:p text:style-name="P9"/>
      <text:p text:style-name="P9">Interestingly versions have their own attributes: release date; status/state = pending, in progress, released, in testing; more?) I might want to create a share that shows Ucs for all unreleased versions.</text:p>
      <text:p text:style-name="P9"/>
      <text:p text:style-name="P9">Also some org units might have different cardinality restrictions. 1 version might be required, 1+ components might be required. If a UC is missing a version of component a user would probably want to be able to see, identify and correct that.</text:p>
      <text:p text:style-name="P6"><text:span text:style-name="T3"/></text:p>
      <text:p text:style-name="P7">Complication: Use cases are not always implemented in full. It's normal for 90% of a UC to be in scope for version A, and then the remaining 10% to go in version C. Usually this is because parts of the UC depend on another UC that isn't in the same scope. Function requirements are probably atomic enough to be assigned to a single version without issue.</text:p>
      <text:p text:style-name="P7"/>
      <text:p text:style-name="P2"/>
      <text:p text:style-name="P1"/>
      <text:p text:style-name="P1"><text:soft-page-break/></text:p>
      <text:p text:style-name="P4">[Completeness Evaluation]</text:p>
      <text:p text:style-name="P6"/>
      <text:p text:style-name="P6">Secondly, <text:span text:style-name="T1">I also need to know which usecases are complete and which still need work. Usecases will often be a work in progress, filled with TODOs and TBDs, empty fields. I need a way to access the state of (in)completeness across my all usecases without having to click and manually read each one.</text:span></text:p>
      <text:p text:style-name="P6"/>
      <text:p text:style-name="P10"/>
      <text:p text:style-name="P3"/>
      <text:p text:style-name="P3"/>
      <text:p text:style-name="P3"/>
      <text:p text:style-name="P6"/>
      <text:p text:style-name="P7"><text:span text:style-name="T1">W</text:span>hat problems could this feature create?</text:p>
      <text:p text:style-name="P7">What kind of precision is required?</text:p>
      <text:p text:style-name="P9">How critical to the business value is this feature?</text:p>
      <text:p text:style-name="P9"/>
      <text:p text:style-name="P9"/>
      <text:p text:style-name="P11">SEPERATELY: Browse thru study notes, collect good product/global-scope questions, prepare form, answer the next 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6T13:34:48.687373545</meta:creation-date>
    <dc:date>2013-11-26T14:52:59.214662818</dc:date>
    <meta:editing-duration>PT32M8S</meta:editing-duration>
    <meta:editing-cycles>2</meta:editing-cycles>
    <meta:generator>LibreOffice/4.1.3.2$Linux_x86 LibreOffice_project/410m0$Build-2</meta:generator>
    <meta:document-statistic meta:table-count="0" meta:image-count="0" meta:object-count="0" meta:page-count="2" meta:paragraph-count="17" meta:word-count="609" meta:character-count="3593" meta:non-whitespace-character-count="3000"/>
  </office:meta>
</office:document-meta>
</file>
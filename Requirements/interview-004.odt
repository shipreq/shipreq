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FreeSans" svg:font-family="FreeSans" style:font-family-generic="system" style:font-pitch="variable"/>
    <style:font-face style:name="TianZhen" svg:font-family="TianZhen" style:font-family-generic="system" style:font-pitch="variable"/>
  </office:font-face-decls>
  <office:automatic-styles>
    <style:style style:name="P1" style:family="paragraph" style:parent-style-name="Standard">
      <style:text-properties fo:font-weight="bold" officeooo:rsid="001230a5" officeooo:paragraph-rsid="001230a5" style:font-weight-asian="bold" style:font-weight-complex="bold"/>
    </style:style>
    <style:style style:name="P2" style:family="paragraph" style:parent-style-name="Standard">
      <style:text-properties fo:font-weight="normal" officeooo:rsid="001230a5" officeooo:paragraph-rsid="001230a5" style:font-weight-asian="normal" style:font-weight-complex="normal"/>
    </style:style>
    <style:style style:name="P3" style:family="paragraph" style:parent-style-name="Standard" style:list-style-name="L1">
      <style:text-properties fo:font-weight="normal" officeooo:rsid="001230a5" officeooo:paragraph-rsid="001230a5" style:font-weight-asian="normal" style:font-weight-complex="normal"/>
    </style:style>
    <style:style style:name="P4" style:family="paragraph" style:parent-style-name="Standard">
      <style:text-properties fo:font-weight="normal" officeooo:rsid="0014ccc6" officeooo:paragraph-rsid="0014ccc6" style:font-weight-asian="normal" style:font-weight-complex="normal"/>
    </style:style>
    <style:style style:name="T1" style:family="text">
      <style:text-properties officeooo:rsid="00135e1e"/>
    </style:style>
    <style:style style:name="T2" style:family="text">
      <style:text-properties officeooo:rsid="0014fd4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mplates]</text:p>
      <text:p text:style-name="P2"/>
      <text:p text:style-name="P2">Right, well there are two things under the template umbrella that I'd like.</text:p>
      <text:list xml:id="list8104460451081646525" text:style-name="L1">
        <text:list-item>
          <text:p text:style-name="P3">Viewing an explaination of how to fill-in a UC field.</text:p>
        </text:list-item>
        <text:list-item>
          <text:p text:style-name="P3">Seeing other examples of the field's values.</text:p>
        </text:list-item>
      </text:list>
      <text:p text:style-name="P2"/>
      <text:p text:style-name="P2">First one. Because we're not all experts <text:span text:style-name="T1">sometimes when writing a UC you forget exactly what is supposed to be in a field, exactly where the borders of its scope lie, or maybe there are some important constraints on that field, maybe you'd like some tips on how to write effective values for it. For these reasons it's useful to use or refer to a template. When teams are using Word (or whatever) instead of ShipReq they will often create a template in Word with instructions on what to write in each field. Using ShipReq at the moment, you lose that. When I'm writing a UC FV I'd like to be able to see the instructions for that field for more clarity or help.</text:span></text:p>
      <text:p text:style-name="P2"/>
      <text:p text:style-name="P4">Second one. For all the reasons previously stated, in addition to looking at template instructions when stuck, people also commonly go and look at other UCs to see how they were filled out. Consequentially it would be useful if I were working on “Frequency of Use”, to be able to see “Frequency of Use” values in other UCs within the project. I'm not sure about various revisions, probably the latest revision would be best because older revisions could have bad examples that were later fixed. As for seeing values from other UCs outside of the project... I'm not sure. This would also be nice because I might like to copy &amp; paste a value from another UC then change a word or two.</text:p>
      <text:p text:style-name="P4"/>
      <text:p text:style-name="P4">What about deleted UCs? Should I be able to view their FVs? <text:span text:style-name="T2">Might not hurt. Might be useful.</text:span></text:p>
      <text:p text:style-name="P4"/>
      <text:p text:style-name="P4"><text:span text:style-name="T2">So all of t</text:span>hat's from a UC <text:span text:style-name="T2">W</text:span>riters perspective. From a maintainer's or head-BA's perspective, I'd also <text:span text:style-name="T2">need </text:span>the ability <text:span text:style-name="T2">to customise the template and use it across different projects. I'd want to go in, edit the template value for field X, apply it and then have Writers see it the next time they write a new, or edit an existing U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FreeSans" svg:font-family="FreeSans" style:font-family-generic="system" style:font-pitch="variable"/>
    <style:font-face style:name="TianZhen" svg:font-family="TianZhe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AU" style:letter-kerning="true" style:font-name-asian="TianZhen"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AU" style:letter-kerning="true" style:font-name-asian="TianZhen"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mo" fo:font-family="Arimo" style:font-family-generic="swiss" style:font-pitch="variable" fo:font-size="14pt" style:font-name-asian="TianZhen" style:font-family-asian="TianZhe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4T16:43:36.303773635</meta:creation-date>
    <dc:date>2013-12-24T17:17:02.570750293</dc:date>
    <meta:editing-duration>PT19M25S</meta:editing-duration>
    <meta:editing-cycles>1</meta:editing-cycles>
    <meta:document-statistic meta:table-count="0" meta:image-count="0" meta:object-count="0" meta:page-count="1" meta:paragraph-count="8" meta:word-count="360" meta:character-count="1955" meta:non-whitespace-character-count="1605"/>
    <meta:generator>LibreOffice/4.1.4.2$Linux_X86_64 LibreOffice_project/410m0$Build-2</meta:generator>
  </office:meta>
</office:document-meta>
</file>
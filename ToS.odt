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Roboto, Cantarell, Ubuntu, Arial, sans-serif"/>
    <style:font-face style:name="Verdana" svg:font-family="Verdana, helvetica, arial, sans-serif"/>
    <style:font-face style:name="inherit" svg:font-family="inherit"/>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automatic-styles>
    <style:style style:name="P1" style:family="paragraph" style:list-style-name="L7"/>
    <style:style style:name="P2" style:family="paragraph" style:parent-style-name="Text_20_body" style:list-style-name="L12">
      <style:paragraph-properties fo:margin-top="0cm" fo:margin-bottom="0.268cm" style:contextual-spacing="false" style:line-height-at-least="0.538cm" fo:padding="0cm" fo:border="none"/>
    </style:style>
    <style:style style:name="P3" style:family="paragraph" style:parent-style-name="Text_20_body">
      <style:paragraph-properties fo:margin-top="0cm" fo:margin-bottom="0cm" style:contextual-spacing="false"/>
    </style:style>
    <style:style style:name="P4" style:family="paragraph" style:list-style-name="L13"/>
    <style:style style:name="P5" style:family="paragraph" style:parent-style-name="Standard">
      <style:text-properties officeooo:rsid="00027f05" officeooo:paragraph-rsid="00027f05"/>
    </style:style>
    <style:style style:name="P6" style:family="paragraph" style:parent-style-name="Standard">
      <style:text-properties officeooo:rsid="00035288" officeooo:paragraph-rsid="00035288"/>
    </style:style>
    <style:style style:name="P7" style:family="paragraph" style:parent-style-name="Standard">
      <style:text-properties fo:font-weight="bold" officeooo:rsid="00035288" officeooo:paragraph-rsid="00035288" style:font-weight-asian="bold" style:font-weight-complex="bold"/>
    </style:style>
    <style:style style:name="P8" style:family="paragraph" style:parent-style-name="Standard">
      <style:text-properties fo:font-weight="bold" officeooo:rsid="00045648" officeooo:paragraph-rsid="00045648" style:font-weight-asian="bold" style:font-weight-complex="bold"/>
    </style:style>
    <style:style style:name="P9" style:family="paragraph" style:parent-style-name="Standard">
      <style:text-properties fo:font-weight="bold" officeooo:rsid="0005e24d" officeooo:paragraph-rsid="0005e24d" style:font-weight-asian="bold" style:font-weight-complex="bold"/>
    </style:style>
    <style:style style:name="P10" style:family="paragraph" style:parent-style-name="Standard">
      <style:text-properties fo:font-weight="bold" officeooo:rsid="000832da" officeooo:paragraph-rsid="000832da" style:font-weight-asian="bold" style:font-weight-complex="bold"/>
    </style:style>
    <style:style style:name="P11" style:family="paragraph" style:parent-style-name="Standard">
      <style:text-properties fo:font-weight="bold" officeooo:rsid="0009e6cf" officeooo:paragraph-rsid="0009e6cf" style:font-weight-asian="bold" style:font-weight-complex="bold"/>
    </style:style>
    <style:style style:name="P12" style:family="paragraph" style:parent-style-name="Standard">
      <style:text-properties fo:font-weight="bold" officeooo:rsid="000e501d" officeooo:paragraph-rsid="000e501d" style:font-weight-asian="bold" style:font-weight-complex="bold"/>
    </style:style>
    <style:style style:name="P13" style:family="paragraph" style:parent-style-name="Standard">
      <style:text-properties fo:font-weight="bold" officeooo:rsid="0014f82b" officeooo:paragraph-rsid="0014f82b" style:font-weight-asian="bold" style:font-weight-complex="bold"/>
    </style:style>
    <style:style style:name="P14" style:family="paragraph" style:parent-style-name="Standard" style:list-style-name="L3">
      <style:text-properties officeooo:rsid="00045648" officeooo:paragraph-rsid="00045648"/>
    </style:style>
    <style:style style:name="P15" style:family="paragraph" style:parent-style-name="Standard">
      <style:text-properties fo:font-weight="normal" officeooo:rsid="00045648" officeooo:paragraph-rsid="000832da" style:font-weight-asian="normal" style:font-weight-complex="normal"/>
    </style:style>
    <style:style style:name="P16" style:family="paragraph" style:parent-style-name="Standard" style:list-style-name="L2">
      <style:text-properties fo:font-weight="normal" officeooo:rsid="00045648" officeooo:paragraph-rsid="000832da" style:font-weight-asian="normal" style:font-weight-complex="normal"/>
    </style:style>
    <style:style style:name="P17" style:family="paragraph" style:parent-style-name="Standard" style:list-style-name="L4">
      <style:text-properties fo:font-weight="normal" officeooo:rsid="00045648" officeooo:paragraph-rsid="0005e24d" style:font-weight-asian="normal" style:font-weight-complex="normal"/>
    </style:style>
    <style:style style:name="P18" style:family="paragraph" style:parent-style-name="Standard">
      <style:text-properties fo:font-weight="normal" officeooo:rsid="0005e24d" officeooo:paragraph-rsid="0005e24d" style:font-weight-asian="normal" style:font-weight-complex="normal"/>
    </style:style>
    <style:style style:name="P19" style:family="paragraph" style:parent-style-name="Standard" style:list-style-name="L2">
      <style:text-properties fo:font-weight="normal" officeooo:rsid="0005e24d" officeooo:paragraph-rsid="000f40bb" style:font-weight-asian="normal" style:font-weight-complex="normal"/>
    </style:style>
    <style:style style:name="P20" style:family="paragraph" style:parent-style-name="Standard" style:list-style-name="L2">
      <style:text-properties fo:font-weight="normal" officeooo:rsid="0007c710" officeooo:paragraph-rsid="0007c710" style:font-weight-asian="normal" style:font-weight-complex="normal"/>
    </style:style>
    <style:style style:name="P21" style:family="paragraph" style:parent-style-name="Standard">
      <style:text-properties fo:font-weight="normal" officeooo:rsid="000832da" officeooo:paragraph-rsid="000832da" style:font-weight-asian="normal" style:font-weight-complex="normal"/>
    </style:style>
    <style:style style:name="P22" style:family="paragraph" style:parent-style-name="Standard" style:list-style-name="L5">
      <style:text-properties fo:font-weight="normal" officeooo:rsid="000832da" officeooo:paragraph-rsid="000832da" style:font-weight-asian="normal" style:font-weight-complex="normal"/>
    </style:style>
    <style:style style:name="P23" style:family="paragraph" style:parent-style-name="Standard">
      <style:text-properties fo:font-weight="normal" officeooo:rsid="0009e6cf" officeooo:paragraph-rsid="0009e6cf" style:font-weight-asian="normal" style:font-weight-complex="normal"/>
    </style:style>
    <style:style style:name="P24" style:family="paragraph" style:parent-style-name="Standard" style:list-style-name="L6">
      <style:text-properties fo:font-weight="normal" officeooo:rsid="0009e6cf" officeooo:paragraph-rsid="0009e6cf" style:font-weight-asian="normal" style:font-weight-complex="normal"/>
    </style:style>
    <style:style style:name="P25" style:family="paragraph" style:parent-style-name="Standard">
      <style:text-properties fo:font-weight="normal" officeooo:rsid="000c59db" officeooo:paragraph-rsid="000b3a46" style:font-weight-asian="normal" style:font-weight-complex="normal"/>
    </style:style>
    <style:style style:name="P26" style:family="paragraph" style:parent-style-name="Standard" style:list-style-name="L7">
      <style:text-properties fo:font-weight="normal" officeooo:rsid="000c59db" officeooo:paragraph-rsid="000c59db" style:font-weight-asian="normal" style:font-weight-complex="normal"/>
    </style:style>
    <style:style style:name="P27" style:family="paragraph" style:parent-style-name="Standard" style:list-style-name="L7">
      <style:text-properties fo:font-weight="normal" officeooo:rsid="000c59db" officeooo:paragraph-rsid="00118c23" style:font-weight-asian="normal" style:font-weight-complex="normal"/>
    </style:style>
    <style:style style:name="P28" style:family="paragraph" style:parent-style-name="Standard" style:list-style-name="L7">
      <style:text-properties fo:font-weight="normal" officeooo:rsid="000c59db" officeooo:paragraph-rsid="0014f82b" style:font-weight-asian="normal" style:font-weight-complex="normal"/>
    </style:style>
    <style:style style:name="P29" style:family="paragraph" style:parent-style-name="Standard">
      <style:text-properties fo:font-weight="normal" officeooo:rsid="000e501d" officeooo:paragraph-rsid="000e501d" style:font-weight-asian="normal" style:font-weight-complex="normal"/>
    </style:style>
    <style:style style:name="P30" style:family="paragraph" style:parent-style-name="Standard" style:list-style-name="L6">
      <style:text-properties fo:font-weight="normal" officeooo:rsid="000e501d" officeooo:paragraph-rsid="000e501d" style:font-weight-asian="normal" style:font-weight-complex="normal"/>
    </style:style>
    <style:style style:name="P31" style:family="paragraph" style:parent-style-name="Standard" style:list-style-name="L8">
      <style:text-properties fo:font-weight="normal" officeooo:rsid="000e501d" officeooo:paragraph-rsid="000e501d" style:font-weight-asian="normal" style:font-weight-complex="normal"/>
    </style:style>
    <style:style style:name="P32" style:family="paragraph" style:parent-style-name="Standard" style:list-style-name="L2">
      <style:text-properties fo:font-weight="normal" officeooo:rsid="000f40bb" officeooo:paragraph-rsid="000f40bb" style:font-weight-asian="normal" style:font-weight-complex="normal"/>
    </style:style>
    <style:style style:name="P33" style:family="paragraph" style:parent-style-name="Standard" style:list-style-name="L2">
      <style:text-properties fo:font-weight="normal" officeooo:rsid="0010de3c" officeooo:paragraph-rsid="0010de3c" style:font-weight-asian="normal" style:font-weight-complex="normal"/>
    </style:style>
    <style:style style:name="P34" style:family="paragraph" style:parent-style-name="Standard" style:list-style-name="L5">
      <style:text-properties fo:font-weight="normal" officeooo:rsid="001302fc" officeooo:paragraph-rsid="001302fc" style:font-weight-asian="normal" style:font-weight-complex="normal"/>
    </style:style>
    <style:style style:name="P35" style:family="paragraph" style:parent-style-name="Standard" style:list-style-name="L3">
      <style:text-properties officeooo:rsid="001302fc" officeooo:paragraph-rsid="001302fc"/>
    </style:style>
    <style:style style:name="P36" style:family="paragraph" style:list-style-name="L7"/>
    <style:style style:name="T1" style:family="text">
      <style:text-properties officeooo:rsid="00045648"/>
    </style:style>
    <style:style style:name="T2" style:family="text">
      <style:text-properties officeooo:rsid="0005e24d"/>
    </style:style>
    <style:style style:name="T3" style:family="text">
      <style:text-properties fo:font-weight="normal" officeooo:rsid="000c59db" style:font-weight-asian="normal" style:font-weight-complex="normal"/>
    </style:style>
    <style:style style:name="T4" style:family="text">
      <style:text-properties fo:font-weight="normal" officeooo:rsid="00118c23" style:font-weight-asian="normal" style:font-weight-complex="normal"/>
    </style:style>
    <style:style style:name="T5" style:family="text">
      <style:text-properties officeooo:rsid="0007c710"/>
    </style:style>
    <style:style style:name="T6" style:family="text">
      <style:text-properties officeooo:rsid="000832da"/>
    </style:style>
    <style:style style:name="T7" style:family="text">
      <style:text-properties officeooo:rsid="000b3a46"/>
    </style:style>
    <style:style style:name="T8" style:family="text">
      <style:text-properties officeooo:rsid="000e501d"/>
    </style:style>
    <style:style style:name="T9" style:family="text">
      <style:text-properties officeooo:rsid="000f7629"/>
    </style:style>
    <style:style style:name="T10" style:family="text">
      <style:text-properties officeooo:rsid="0010de3c"/>
    </style:style>
    <style:style style:name="T11" style:family="text">
      <style:text-properties officeooo:rsid="00118c23"/>
    </style:style>
    <style:style style:name="T12" style:family="text">
      <style:text-properties officeooo:rsid="00156cb4"/>
    </style:style>
    <style:style style:name="T13" style:family="text">
      <style:text-properties officeooo:rsid="0015a141"/>
    </style:style>
    <style:style style:name="T14" style:family="text">
      <style:text-properties fo:font-variant="normal" fo:text-transform="none" fo:color="#666666" style:font-name="Roboto" fo:font-size="11.8500003814697pt" fo:letter-spacing="normal" fo:font-style="normal" fo:font-weight="normal"/>
    </style:style>
    <style:style style:name="T15" style:family="text">
      <style:text-properties fo:font-variant="normal" fo:text-transform="none" fo:color="#666666" style:font-name="Roboto" fo:font-size="11.8500003814697pt" fo:letter-spacing="normal" fo:font-style="normal" fo:font-weight="normal" officeooo:rsid="0015a141"/>
    </style:style>
    <style:style style:name="T16" style:family="text">
      <style:text-properties fo:font-variant="normal" fo:text-transform="none" fo:color="#666666" style:font-name="Roboto" fo:font-size="11.8500003814697pt" fo:letter-spacing="normal" fo:font-style="normal" fo:font-weight="normal" officeooo:rsid="001781c6"/>
    </style:style>
    <style:style style:name="T17" style:family="text">
      <style:text-properties officeooo:rsid="001781c6"/>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rms of Service</text:p>
      <text:p text:style-name="P5"/>
      <text:p text:style-name="P5"/>
      <text:p text:style-name="P7">Uptime</text:p>
      <text:list xml:id="list20450850468959097" text:style-name="L3">
        <text:list-item>
          <text:p text:style-name="P14">WE <text:span text:style-name="T10">will occasionally have availability outages </text:span>for maintenance, upgrades, etc.</text:p>
        </text:list-item>
        <text:list-item>
          <text:p text:style-name="P35">WE reserve the right to modify THE SERVICE.</text:p>
        </text:list-item>
        <text:list-item>
          <text:p text:style-name="P14"><text:span text:style-name="T1">W</text:span>E are not liable for consequences occurred as a result of the service not being available.</text:p>
        </text:list-item>
      </text:list>
      <text:p text:style-name="P6"/>
      <text:p text:style-name="P8">Data Loss</text:p>
      <text:list xml:id="list5618268844985724572" text:style-name="L4">
        <text:list-item>
          <text:p text:style-name="P17"><text:span text:style-name="T2">WE will regularly backup users' data.</text:span></text:p>
        </text:list-item>
        <text:list-item>
          <text:p text:style-name="P17"><text:span text:style-name="T2">I</text:span>n the unlikely event that data is lost, WE will not be held accountable, or responsible.</text:p>
        </text:list-item>
      </text:list>
      <text:p text:style-name="P18"/>
      <text:p text:style-name="P9">Data Confidentially</text:p>
      <text:list xml:id="list2686238488717278478" text:style-name="L2">
        <text:list-item>
          <text:p text:style-name="P19">WE will not <text:span text:style-name="T5">knowingly provide anyone except you, access to data that you haven't explicitly indicated can be shared.</text:span></text:p>
        </text:list-item>
        <text:list-item>
          <text:p text:style-name="P33"><text:span text:style-name="T5">B</text:span>y indicating that your data can be shared, you agree that you are in control of access and it is your responsibility to only share the access details and credentials with trusted parties.</text:p>
        </text:list-item>
        <text:list-item>
          <text:p text:style-name="P32">WE apply share filters to available data each time the share is accessed. <text:span text:style-name="T9">In the event that you create new data, you agree that it may be shared according to the rules of your existing share filters.</text:span></text:p>
        </text:list-item>
        <text:list-item>
          <text:p text:style-name="P20">WE will <text:span text:style-name="T6">not publicly transmit your data without encryption.</text:span></text:p>
        </text:list-item>
        <text:list-item>
          <text:p text:style-name="P16"><text:span text:style-name="T2">I</text:span>n the unlikely event that <text:span text:style-name="T6">your </text:span>data is <text:span text:style-name="T6">compromised</text:span>, WE will not be held accountable, or responsible.</text:p>
        </text:list-item>
      </text:list>
      <text:p text:style-name="P15"/>
      <text:p text:style-name="P10"><text:span text:style-name="T8">Your </text:span>IP</text:p>
      <text:list xml:id="list8504899025596063898" text:style-name="L5">
        <text:list-item>
          <text:p text:style-name="P22">WE claim no intellectual property rights over the material you provide to THE SERVICE.</text:p>
        </text:list-item>
        <text:list-item>
          <text:p text:style-name="P34">If you close your account, you agree that all of your data will be removed from THE SERVICE and not be recoverable.</text:p>
        </text:list-item>
        <text:list-item>
          <text:p text:style-name="P34">If you delete a project, you agree that all of your data pertaining to the project will be removed from THE SERVICE and not be recoverable.</text:p>
        </text:list-item>
      </text:list>
      <text:p text:style-name="P21"/>
      <text:p text:style-name="P11"><text:span text:style-name="T8">Our IP</text:span></text:p>
      <text:list xml:id="list4352344098975895177" text:style-name="L6">
        <text:list-item>
          <text:p text:style-name="P24">All HTML, CSS, JavaScript, <text:span text:style-name="T11">copy, visuals, </text:span>etc. are copyright WE, <text:span text:style-name="T11">unless explictply stated otherwise, such as will be the case with portions being used from other third-party libraries</text:span>. You may not duplicate, copy, or reuse any portion <text:span text:style-name="T7">without express written permission from WE.</text:span></text:p>
        </text:list-item>
        <text:list-item>
          <text:p text:style-name="P30"><text:span text:style-name="T7">D</text:span>on't copy my idea. Patent?</text:p>
        </text:list-item>
      </text:list>
      <text:p text:style-name="P23"/>
      <text:p text:style-name="P25"/>
      <text:p text:style-name="P12">Future</text:p>
      <text:list xml:id="list4811129957674010430" text:style-name="L8">
        <text:list-item>
          <text:p text:style-name="P31">WE reserve the right to permanently terminate the service.</text:p>
        </text:list-item>
        <text:list-item>
          <text:p text:style-name="P31">In the case that the service is terminated, WE will strive to provide you with an exported copy of your data.</text:p>
        </text:list-item>
        <text:list-item>
          <text:p text:style-name="P31">WE reserve the right to transfer ownership of the service.</text:p>
        </text:list-item>
      </text:list>
      <text:p text:style-name="P29"/>
      <text:p text:style-name="P29"/>
      <text:p text:style-name="P13">Borrowed</text:p>
      <text:list xml:id="list681599701518209251" text:style-name="L7">
        <text:list-item>
          <text:p text:style-name="P28">You must be 13 years or older to use this Service.</text:p>
        </text:list-item>
        <text:list-item>
          <text:p text:style-name="P28">You must be a human. Accounts registered by "bots" or other automated methods are not permitted.</text:p>
        </text:list-item>
        <text:list-item>
          <text:p text:style-name="P28">You must provide your legal full name, a valid email address, and any other information <text:soft-page-break/>requested in order to complete the signup process.</text:p>
        </text:list-item>
        <text:list-item>
          <text:p text:style-name="P28">Your login may only be used by one person - a single login shared by multiple people is not permitted.</text:p>
        </text:list-item>
        <text:list-item>
          <text:p text:style-name="P28">One person or legal entity may not maintain more than one free account.</text:p>
        </text:list-item>
        <text:list-item>
          <text:p text:style-name="P28">You are responsible for maintaining the security of your account and password. WE cannot and will not be liable for any loss or damage from your failure to comply with this security obligation.</text:p>
        </text:list-item>
        <text:list-item>
          <text:p text:style-name="P28">You are responsible for all <text:span text:style-name="T11">c</text:span>ontent posted and activity that occurs under your account.</text:p>
        </text:list-item>
        <text:list-item>
          <text:p><text:span text:style-name="T3">You may not use </text:span><text:span text:style-name="T4">THE SERVICE </text:span><text:span text:style-name="T3">for any illegal or unauthorized purpose. You must not, in the use of </text:span><text:span text:style-name="T4">THE SERVICE</text:span><text:span text:style-name="T3">, violate any laws in your jurisdiction (including but not limited to copyright or trade</text:span>mark laws).</text:p>
        </text:list-item>
        <text:list-item>
          <text:p>You agree to indemnify and hold Evernote, its subsidiaries, affiliates, officers, agents, employees, advertisers and partners harmless from and against any and all claims, liabilities, damages (actual and consequential), losses and expenses (including legal and other professional fees) arising from or in any way related to any third party claims relating to your use of any of the Service, any violation of these Terms of Service or any other actions connected with your use of the Service (including all actions taken under your account). In the event of such claim, we will provide notice of the claim, suit or action to the contact information we have for the account, provided that any failure to deliver such notice to you shall not eliminate or reduce your indemnification obligation hereunder.</text:p>
        </text:list-item>
        <text:list-item>
          <text:p>Your use of the Service is at your sole risk. The service is provided on an "as is" and "as available" basis.</text:p>
        </text:list-item>
        <text:list-item>
          <text:p>You understand that WE use third party vendors and hosting partners to provide the necessary hardware, software, networking, storage, and related technology required to run the Service.</text:p>
        </text:list-item>
        <text:list-item>
          <text:p><text:bookmark text:name="popup-point-cloudant-7R6vOpRySNo"/>In order to monitor system performance, test, fix and improve systems, and develop and implement upgrades, technical staff will be temporarily allowed access to hosted data. Any copies of this data are created out of necessity to perform these tasks, and are kept only for the time relevant to these processes.</text:p>
        </text:list-item>
        <text:list-item>
          <text:p>WE aren't liable for any unauthorized access or use of your account. This means that you are responsible for maintaining the confidentiality of your account and access credentials.</text:p>
        </text:list-item>
        <text:list-item>
          <text:p>You are not allowed to use anything to copy or reproduce THE SERVICE, including using robots, spiders, other automatic processing program, or other manual process. You also cannot assist others in doing the above.</text:p>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Roboto" svg:font-family="Roboto, Roboto, Cantarell, Ubuntu, Arial, sans-serif"/>
    <style:font-face style:name="Verdana" svg:font-family="Verdana, helvetica, arial, sans-serif"/>
    <style:font-face style:name="inherit" svg:font-family="inherit"/>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TianZhen" svg:font-family="TianZhe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TianZhe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TianZhen" style:font-family-asian="TianZhe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13:46:12.114128607</meta:creation-date>
    <dc:date>2013-12-13T16:56:23.431214673</dc:date>
    <meta:editing-duration>PT24M37S</meta:editing-duration>
    <meta:editing-cycles>2</meta:editing-cycles>
    <meta:generator>LibreOffice/4.1.3.2$Linux_X86_64 LibreOffice_project/410m0$Build-2</meta:generator>
    <meta:document-statistic meta:table-count="0" meta:image-count="0" meta:object-count="0" meta:page-count="2" meta:paragraph-count="41" meta:word-count="824" meta:character-count="4738" meta:non-whitespace-character-count="3973"/>
  </office:meta>
</office:document-meta>
</file>
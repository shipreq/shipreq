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84341637010676" calcext:value-type="percentage">
            <text:p>38.4%</text:p>
          </table:table-cell>
          <table:table-cell table:style-name="ce2" table:formula="of:=SUM([.B5:.B30])" office:value-type="float" office:value="112.4" calcext:value-type="float">
            <text:p>112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 office:value-type="float" office:value="1" calcext:value-type="float">
            <text:p>1.0</text:p>
          </table:table-cell>
          <table:table-cell table:style-name="ce22" table:formula="of:=IF(SUM([.FL5:.FL30])=0;&quot;&quot;;SUM([.FL5:.FL30]))" office:value-type="float" office:value="0.5" calcext:value-type="float">
            <text:p>0.5</text:p>
          </table:table-cell>
          <table:table-cell table:style-name="ce22" table:formula="of:=IF(SUM([.FM5:.FM30])=0;&quot;&quot;;SUM([.FM5:.FM30]))" office:value-type="float" office:value="1" calcext:value-type="float">
            <text:p>1.0</text:p>
          </table:table-cell>
          <table:table-cell table:style-name="ce22" table:formula="of:=IF(SUM([.FN5:.FN30])=0;&quot;&quot;;SUM([.FN5:.FN30]))" office:value-type="float" office:value="0.2" calcext:value-type="float">
            <text:p>0.2</text:p>
          </table:table-cell>
          <table:table-cell table:style-name="ce22" table:formula="of:=IF(SUM([.FO5:.FO30])=0;&quot;&quot;;SUM([.FO5:.FO30]))" office:value-type="float" office:value="1" calcext:value-type="float">
            <text:p>1.0</text:p>
          </table:table-cell>
          <table:table-cell table:style-name="ce16" table:formula="of:=IF(SUM([.FP5:.FP30])=0;&quot;&quot;;SUM([.FP5:.FP30]))" office:value-type="float" office:value="0.3" calcext:value-type="float">
            <text:p>0.3</text:p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 office:value-type="float" office:value="1" calcext:value-type="float">
            <text:p>1.0</text:p>
          </table:table-cell>
          <table:table-cell table:style-name="ce22" table:formula="of:=IF(SUM([.FS5:.FS30])=0;&quot;&quot;;SUM([.FS5:.FS30]))" office:value-type="float" office:value="0.5" calcext:value-type="float">
            <text:p>0.5</text:p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3.2" calcext:value-type="float">
            <text:p>43.2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8.05" calcext:value-type="float">
            <text:p>8.1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10.85" calcext:value-type="float">
            <text:p>10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4.2" calcext:value-type="float">
            <text:p>4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7" calcext:value-type="float">
            <text:p>4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9:07:57.204921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21T19:09:35.999373086</dc:date>
    <meta:editing-duration>P11DT7H20M43S</meta:editing-duration>
    <meta:editing-cycles>183</meta:editing-cycles>
    <meta:generator>LibreOffice/5.1.3.2$Linux_X86_64 LibreOffice_project/10m0$Build-2</meta:generator>
    <meta:document-statistic meta:table-count="2" meta:cell-count="2959" meta:object-count="0"/>
  </office:meta>
</office:document-meta>
</file>
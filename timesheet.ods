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87884267631103" calcext:value-type="percentage">
            <text:p>38.8%</text:p>
          </table:table-cell>
          <table:table-cell table:style-name="ce2" table:formula="of:=SUM([.B5:.B30])" office:value-type="float" office:value="110.6" calcext:value-type="float">
            <text:p>111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 office:value-type="float" office:value="1" calcext:value-type="float">
            <text:p>1.0</text:p>
          </table:table-cell>
          <table:table-cell table:style-name="ce22" table:formula="of:=IF(SUM([.FG5:.FG30])=0;&quot;&quot;;SUM([.FG5:.FG30]))" office:value-type="float" office:value="1" calcext:value-type="float">
            <text:p>1.0</text:p>
          </table:table-cell>
          <table:table-cell table:style-name="ce22" table:formula="of:=IF(SUM([.FH5:.FH30])=0;&quot;&quot;;SUM([.FH5:.FH30]))" office:value-type="float" office:value="0.9" calcext:value-type="float">
            <text:p>0.9</text:p>
          </table:table-cell>
          <table:table-cell table:style-name="ce16" table:formula="of:=IF(SUM([.FI5:.FI30])=0;&quot;&quot;;SUM([.FI5:.FI30]))" office:value-type="float" office:value="0.6" calcext:value-type="float">
            <text:p>0.6</text:p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 office:value-type="float" office:value="1" calcext:value-type="float">
            <text:p>1.0</text:p>
          </table:table-cell>
          <table:table-cell table:style-name="ce22" table:formula="of:=IF(SUM([.FL5:.FL30])=0;&quot;&quot;;SUM([.FL5:.FL30]))" office:value-type="float" office:value="0.5" calcext:value-type="float">
            <text:p>0.5</text:p>
          </table:table-cell>
          <table:table-cell table:style-name="ce22" table:formula="of:=IF(SUM([.FM5:.FM30])=0;&quot;&quot;;SUM([.FM5:.FM30]))" office:value-type="float" office:value="1" calcext:value-type="float">
            <text:p>1.0</text:p>
          </table:table-cell>
          <table:table-cell table:style-name="ce22" table:formula="of:=IF(SUM([.FN5:.FN30])=0;&quot;&quot;;SUM([.FN5:.FN30]))" office:value-type="float" office:value="0.2" calcext:value-type="float">
            <text:p>0.2</text:p>
          </table:table-cell>
          <table:table-cell table:style-name="ce22" table:formula="of:=IF(SUM([.FO5:.FO30])=0;&quot;&quot;;SUM([.FO5:.FO30]))" office:value-type="float" office:value="1" calcext:value-type="float">
            <text:p>1.0</text:p>
          </table:table-cell>
          <table:table-cell table:style-name="ce16" table:formula="of:=IF(SUM([.FP5:.FP30])=0;&quot;&quot;;SUM([.FP5:.FP30]))">
            <text:p/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>
            <text:p/>
          </table:table-cell>
          <table:table-cell table:style-name="ce22" table:formula="of:=IF(SUM([.FS5:.FS30])=0;&quot;&quot;;SUM([.FS5:.FS30]))">
            <text:p/>
          </table:table-cell>
          <table:table-cell table:style-name="ce22" table:formula="of:=IF(SUM([.FT5:.FT30])=0;&quot;&quot;;SUM([.FT5:.FT30]))">
            <text:p/>
          </table:table-cell>
          <table:table-cell table:style-name="ce22" table:formula="of:=IF(SUM([.FU5:.FU30])=0;&quot;&quot;;SUM([.FU5:.FU30]))">
            <text:p/>
          </table:table-cell>
          <table:table-cell table:style-name="ce22" table:formula="of:=IF(SUM([.FV5:.FV30])=0;&quot;&quot;;SUM([.FV5:.FV30]))">
            <text:p/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2.9" calcext:value-type="float">
            <text:p>42.9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7.55" calcext:value-type="float">
            <text:p>7.6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10.25" calcext:value-type="float">
            <text:p>10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8" calcext:value-type="float">
            <text:p>3.8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4.7" calcext:value-type="float">
            <text:p>4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8:12:51.650858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17T18:12:59.988845072</dc:date>
    <meta:editing-duration>P11DT7H19M5S</meta:editing-duration>
    <meta:editing-cycles>182</meta:editing-cycles>
    <meta:generator>LibreOffice/5.1.3.2$Linux_X86_64 LibreOffice_project/10m0$Build-2</meta:generator>
    <meta:document-statistic meta:table-count="2" meta:cell-count="2953" meta:object-count="0"/>
  </office:meta>
</office:document-meta>
</file>
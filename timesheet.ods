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90715667311412" calcext:value-type="percentage">
            <text:p>39.1%</text:p>
          </table:table-cell>
          <table:table-cell table:style-name="ce2" table:formula="of:=SUM([.B5:.B30])" office:value-type="float" office:value="103.4" calcext:value-type="float">
            <text:p>103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>
            <text:p/>
          </table:table-cell>
          <table:table-cell table:style-name="ce22" table:formula="of:=IF(SUM([.FG5:.FG30])=0;&quot;&quot;;SUM([.FG5:.FG30]))">
            <text:p/>
          </table:table-cell>
          <table:table-cell table:style-name="ce22" table:formula="of:=IF(SUM([.FH5:.FH30])=0;&quot;&quot;;SUM([.FH5:.FH30]))">
            <text:p/>
          </table:table-cell>
          <table:table-cell table:style-name="ce16" table:formula="of:=IF(SUM([.FI5:.FI30])=0;&quot;&quot;;SUM([.FI5:.FI30]))">
            <text:p/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>
            <text:p/>
          </table:table-cell>
          <table:table-cell table:style-name="ce22" table:formula="of:=IF(SUM([.FL5:.FL30])=0;&quot;&quot;;SUM([.FL5:.FL30]))">
            <text:p/>
          </table:table-cell>
          <table:table-cell table:style-name="ce22" table:formula="of:=IF(SUM([.FM5:.FM30])=0;&quot;&quot;;SUM([.FM5:.FM30]))">
            <text:p/>
          </table:table-cell>
          <table:table-cell table:style-name="ce22" table:formula="of:=IF(SUM([.FN5:.FN30])=0;&quot;&quot;;SUM([.FN5:.FN30]))">
            <text:p/>
          </table:table-cell>
          <table:table-cell table:style-name="ce22" table:formula="of:=IF(SUM([.FO5:.FO30])=0;&quot;&quot;;SUM([.FO5:.FO30]))">
            <text:p/>
          </table:table-cell>
          <table:table-cell table:style-name="ce16" table:formula="of:=IF(SUM([.FP5:.FP30])=0;&quot;&quot;;SUM([.FP5:.FP30]))">
            <text:p/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>
            <text:p/>
          </table:table-cell>
          <table:table-cell table:style-name="ce22" table:formula="of:=IF(SUM([.FS5:.FS30])=0;&quot;&quot;;SUM([.FS5:.FS30]))">
            <text:p/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0.4" calcext:value-type="float">
            <text:p>40.4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7.55" calcext:value-type="float">
            <text:p>7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5.65" calcext:value-type="float">
            <text:p>5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8" calcext:value-type="float">
            <text:p>3.8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6" calcext:value-type="float">
            <text:p>4.6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21:39:30.14915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07T21:40:02.246905811</dc:date>
    <meta:editing-duration>P11DT7H15M35S</meta:editing-duration>
    <meta:editing-cycles>179</meta:editing-cycles>
    <meta:generator>LibreOffice/5.1.3.2$Linux_X86_64 LibreOffice_project/10m0$Build-2</meta:generator>
    <meta:document-statistic meta:table-count="2" meta:cell-count="2941" meta:object-count="0"/>
  </office:meta>
</office:document-meta>
</file>
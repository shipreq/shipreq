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49]/[.E49]" office:value-type="float" office:value="8.48826683378595" calcext:value-type="float">
            <text:p>8.5</text:p>
          </table:table-cell>
          <table:table-cell table:formula="of:=1-[.E49]/[.E45]" office:value-type="percentage" office:value="-0.00835556803819681" calcext:value-type="percentage">
            <text:p>-1%</text:p>
          </table:table-cell>
          <table:table-cell table:formula="of:=1-[.H49]/[.H45]" office:value-type="percentage" office:value="-0.0472508591065293" calcext:value-type="percentage">
            <text:p>-5%</text:p>
          </table:table-cell>
          <table:table-cell table:formula="of:=[.E49]/[.E$5]" office:value-type="percentage" office:value="0.60702510778595" calcext:value-type="percentage">
            <text:p>61%</text:p>
          </table:table-cell>
          <table:table-cell table:formula="of:=[.H49]/[.H$5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49]" office:value-type="string" office:string-value="99217c96a" calcext:value-type="string">
            <text:p>99217c96a</text:p>
          </table:table-cell>
          <table:table-cell table:formula="of:=[.B49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0]/[.E50]" office:value-type="float" office:value="8.10674384170144" calcext:value-type="float">
            <text:p>8.1</text:p>
          </table:table-cell>
          <table:table-cell table:formula="of:=1-[.E50]/[.E46]" office:value-type="percentage" office:value="0.00675178822113776" calcext:value-type="percentage">
            <text:p>1%</text:p>
          </table:table-cell>
          <table:table-cell table:formula="of:=1-[.H50]/[.H46]" office:value-type="percentage" office:value="-0.000207598090097516" calcext:value-type="percentage">
            <text:p>0%</text:p>
          </table:table-cell>
          <table:table-cell table:formula="of:=[.E50]/[.E$6]" office:value-type="percentage" office:value="0.597985652047048" calcext:value-type="percentage">
            <text:p>60%</text:p>
          </table:table-cell>
          <table:table-cell table:formula="of:=[.H50]/[.H$6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1]/[.E51]" office:value-type="float" office:value="8.52715666918142" calcext:value-type="float">
            <text:p>8.5</text:p>
          </table:table-cell>
          <table:table-cell table:formula="of:=1-[.E51]/[.E47]" office:value-type="percentage" office:value="0.0280562893932146" calcext:value-type="percentage">
            <text:p>3%</text:p>
          </table:table-cell>
          <table:table-cell table:formula="of:=1-[.H51]/[.H47]" office:value-type="percentage" office:value="-0.0256129738078383" calcext:value-type="percentage">
            <text:p>-3%</text:p>
          </table:table-cell>
          <table:table-cell table:formula="of:=[.E51]/[.E$7]" office:value-type="percentage" office:value="0.558414900864078" calcext:value-type="percentage">
            <text:p>56%</text:p>
          </table:table-cell>
          <table:table-cell table:formula="of:=[.H51]/[.H$7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3]/[.E53]" office:value-type="float" office:value="8.67971556337512" calcext:value-type="float">
            <text:p>8.7</text:p>
          </table:table-cell>
          <table:table-cell table:formula="of:=1-[.E53]/[.E49]" office:value-type="percentage" office:value="0.0501357844161271" calcext:value-type="percentage">
            <text:p>5%</text:p>
          </table:table-cell>
          <table:table-cell table:formula="of:=1-[.H53]/[.H49]" office:value-type="percentage" office:value="0.0287120590648072" calcext:value-type="percentage">
            <text:p>3%</text:p>
          </table:table-cell>
          <table:table-cell table:formula="of:=[.E53]/[.E$5]" office:value-type="percentage" office:value="0.576591427846817" calcext:value-type="percentage">
            <text:p>58%</text:p>
          </table:table-cell>
          <table:table-cell table:formula="of:=[.H53]/[.H$5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3]" office:value-type="string" office:string-value="99217c96a" calcext:value-type="string">
            <text:p>99217c96a</text:p>
          </table:table-cell>
          <table:table-cell table:formula="of:=[.B53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4]/[.E54]" office:value-type="float" office:value="8.34364380935785" calcext:value-type="float">
            <text:p>8.3</text:p>
          </table:table-cell>
          <table:table-cell table:formula="of:=1-[.E54]/[.E50]" office:value-type="percentage" office:value="0.0344427244582044" calcext:value-type="percentage">
            <text:p>3%</text:p>
          </table:table-cell>
          <table:table-cell table:formula="of:=1-[.H54]/[.H50]" office:value-type="percentage" office:value="0.00622665006226653" calcext:value-type="percentage">
            <text:p>1%</text:p>
          </table:table-cell>
          <table:table-cell table:formula="of:=[.E54]/[.E$6]" office:value-type="percentage" office:value="0.577389397003632" calcext:value-type="percentage">
            <text:p>58%</text:p>
          </table:table-cell>
          <table:table-cell table:formula="of:=[.H54]/[.H$6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5]/[.E55]" office:value-type="float" office:value="8.72953326756791" calcext:value-type="float">
            <text:p>8.7</text:p>
          </table:table-cell>
          <table:table-cell table:formula="of:=1-[.E55]/[.E51]" office:value-type="percentage" office:value="0.0291283434191024" calcext:value-type="percentage">
            <text:p>3%</text:p>
          </table:table-cell>
          <table:table-cell table:formula="of:=1-[.H55]/[.H51]" office:value-type="percentage" office:value="0.00608646545773983" calcext:value-type="percentage">
            <text:p>1%</text:p>
          </table:table-cell>
          <table:table-cell table:formula="of:=[.E55]/[.E$7]" office:value-type="percentage" office:value="0.542149199861365" calcext:value-type="percentage">
            <text:p>54%</text:p>
          </table:table-cell>
          <table:table-cell table:formula="of:=[.H55]/[.H$7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7]/[.E57]" office:value-type="float" office:value="8.22905444600978" calcext:value-type="float">
            <text:p>8.2</text:p>
          </table:table-cell>
          <table:table-cell table:formula="of:=1-[.E57]/[.E53]" office:value-type="percentage" office:value="0.115387434938787" calcext:value-type="percentage">
            <text:p>12%</text:p>
          </table:table-cell>
          <table:table-cell table:formula="of:=1-[.H57]/[.H53]" office:value-type="percentage" office:value="0.161317567567568" calcext:value-type="percentage">
            <text:p>16%</text:p>
          </table:table-cell>
          <table:table-cell table:formula="of:=[.E57]/[.E$5]" office:value-type="percentage" office:value="0.51006002197988" calcext:value-type="percentage">
            <text:p>51%</text:p>
          </table:table-cell>
          <table:table-cell table:formula="of:=[.H57]/[.H$5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7]" office:value-type="string" office:string-value="d28bd588b" calcext:value-type="string">
            <text:p>d28bd588b</text:p>
          </table:table-cell>
          <table:table-cell table:formula="of:=[.B57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8]/[.E58]" office:value-type="float" office:value="8.06682187640404" calcext:value-type="float">
            <text:p>8.1</text:p>
          </table:table-cell>
          <table:table-cell table:formula="of:=1-[.E58]/[.E54]" office:value-type="percentage" office:value="0.146710812930208" calcext:value-type="percentage">
            <text:p>15%</text:p>
          </table:table-cell>
          <table:table-cell table:formula="of:=1-[.H58]/[.H54]" office:value-type="percentage" office:value="0.175020885547201" calcext:value-type="percentage">
            <text:p>18%</text:p>
          </table:table-cell>
          <table:table-cell table:formula="of:=[.E58]/[.E$6]" office:value-type="percentage" office:value="0.492680129191947" calcext:value-type="percentage">
            <text:p>49%</text:p>
          </table:table-cell>
          <table:table-cell table:formula="of:=[.H58]/[.H$6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59]/[.E59]" office:value-type="float" office:value="8.29265117490074" calcext:value-type="float">
            <text:p>8.3</text:p>
          </table:table-cell>
          <table:table-cell table:formula="of:=1-[.E59]/[.E55]" office:value-type="percentage" office:value="0.15333447228759" calcext:value-type="percentage">
            <text:p>15%</text:p>
          </table:table-cell>
          <table:table-cell table:formula="of:=1-[.H59]/[.H55]" office:value-type="percentage" office:value="0.195707070707071" calcext:value-type="percentage">
            <text:p>20%</text:p>
          </table:table-cell>
          <table:table-cell table:formula="of:=[.E59]/[.E$7]" office:value-type="percentage" office:value="0.459019038399484" calcext:value-type="percentage">
            <text:p>46%</text:p>
          </table:table-cell>
          <table:table-cell table:formula="of:=[.H59]/[.H$7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1]/[.E61]" office:value-type="float" office:value="8.41080893214006" calcext:value-type="float">
            <text:p>8.4</text:p>
          </table:table-cell>
          <table:table-cell table:formula="of:=1-[.E61]/[.E57]" office:value-type="percentage" office:value="0.0462418165244054" calcext:value-type="percentage">
            <text:p>5%</text:p>
          </table:table-cell>
          <table:table-cell table:formula="of:=1-[.H61]/[.H57]" office:value-type="percentage" office:value="0.0251762336354482" calcext:value-type="percentage">
            <text:p>3%</text:p>
          </table:table-cell>
          <table:table-cell table:formula="of:=[.E61]/[.E$5]" office:value-type="percentage" office:value="0.486473920027052" calcext:value-type="percentage">
            <text:p>49%</text:p>
          </table:table-cell>
          <table:table-cell table:formula="of:=[.H61]/[.H$5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1]" office:value-type="string" office:string-value="d7c23ad99" calcext:value-type="string">
            <text:p>d7c23ad99</text:p>
          </table:table-cell>
          <table:table-cell table:formula="of:=[.B61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2]/[.E62]" office:value-type="float" office:value="7.85046338816064" calcext:value-type="float">
            <text:p>7.9</text:p>
          </table:table-cell>
          <table:table-cell table:formula="of:=1-[.E62]/[.E58]" office:value-type="percentage" office:value="0.0216068292284443" calcext:value-type="percentage">
            <text:p>2%</text:p>
          </table:table-cell>
          <table:table-cell table:formula="of:=1-[.H62]/[.H58]" office:value-type="percentage" office:value="0.0478481012658227" calcext:value-type="percentage">
            <text:p>5%</text:p>
          </table:table-cell>
          <table:table-cell table:formula="of:=[.E62]/[.E$6]" office:value-type="percentage" office:value="0.482034873776248" calcext:value-type="percentage">
            <text:p>48%</text:p>
          </table:table-cell>
          <table:table-cell table:formula="of:=[.H62]/[.H$6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3]/[.E63]" office:value-type="float" office:value="8.01706145113364" calcext:value-type="float">
            <text:p>8.0</text:p>
          </table:table-cell>
          <table:table-cell table:formula="of:=1-[.E63]/[.E59]" office:value-type="percentage" office:value="-0.001087027273319" calcext:value-type="percentage">
            <text:p>0%</text:p>
          </table:table-cell>
          <table:table-cell table:formula="of:=1-[.H63]/[.H59]" office:value-type="percentage" office:value="0.0321821036106751" calcext:value-type="percentage">
            <text:p>3%</text:p>
          </table:table-cell>
          <table:table-cell table:formula="of:=[.E63]/[.E$7]" office:value-type="percentage" office:value="0.459518004613197" calcext:value-type="percentage">
            <text:p>46%</text:p>
          </table:table-cell>
          <table:table-cell table:formula="of:=[.H63]/[.H$7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5]/[.E65]" office:value-type="float" office:value="6.61835326988562" calcext:value-type="float">
            <text:p>6.6</text:p>
          </table:table-cell>
          <table:table-cell table:number-columns-repeated="2"/>
          <table:table-cell table:formula="of:=[.E65]/[.E$5]" office:value-type="percentage" office:value="0.484106856031786" calcext:value-type="percentage">
            <text:p>48%</text:p>
          </table:table-cell>
          <table:table-cell table:formula="of:=[.H65]/[.H$5]" office:value-type="percentage" office:value="0.481575603557814" calcext:value-type="percentage">
            <text:p>48%</text:p>
          </table:table-cell>
          <table:table-cell table:number-columns-repeated="49"/>
        </table:table-row>
        <table:table-row table:style-name="ro1">
          <table:table-cell table:formula="of:=[.A65]" office:value-type="string" office:string-value="d7c23ad99" calcext:value-type="string">
            <text:p>d7c23ad99</text:p>
          </table:table-cell>
          <table:table-cell table:formula="of:=[.B65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6]/[.E66]" office:value-type="float" office:value="6.68475474277901" calcext:value-type="float">
            <text:p>6.7</text:p>
          </table:table-cell>
          <table:table-cell table:number-columns-repeated="2"/>
          <table:table-cell table:formula="of:=[.E66]/[.E$6]" office:value-type="percentage" office:value="0.47096702788091" calcext:value-type="percentage">
            <text:p>47%</text:p>
          </table:table-cell>
          <table:table-cell table:formula="of:=[.H66]/[.H$6]" office:value-type="percentage" office:value="0.46198139672228" calcext:value-type="percentage">
            <text:p>46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7]/[.E67]" office:value-type="float" office:value="6.87219655888063" calcext:value-type="float">
            <text:p>6.9</text:p>
          </table:table-cell>
          <table:table-cell table:number-columns-repeated="2"/>
          <table:table-cell table:formula="of:=[.E67]/[.E$7]" office:value-type="percentage" office:value="0.446290918217346" calcext:value-type="percentage">
            <text:p>45%</text:p>
          </table:table-cell>
          <table:table-cell table:formula="of:=[.H67]/[.H$7]" office:value-type="percentage" office:value="0.444372294372294" calcext:value-type="percentage">
            <text:p>44%</text:p>
          </table:table-cell>
          <table:table-cell table:number-columns-repeated="49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14:44.280045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6T21:48:01.593775458</dc:date>
    <meta:editing-duration>P1DT18H31M16S</meta:editing-duration>
    <meta:editing-cycles>27</meta:editing-cycles>
    <meta:generator>LibreOffice/6.4.3.2$Linux_X86_64 LibreOffice_project/40$Build-2</meta:generator>
    <meta:document-statistic meta:table-count="2" meta:cell-count="609" meta:object-count="0"/>
  </office:meta>
</office:document-meta>
</file>
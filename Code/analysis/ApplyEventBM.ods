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1008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1008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1008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1008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49]/[.E49]" office:value-type="float" office:value="8.48826683378595" calcext:value-type="float">
            <text:p>8.5</text:p>
          </table:table-cell>
          <table:table-cell table:formula="of:=1-[.E49]/[.E45]" office:value-type="percentage" office:value="-0.00835556803819681" calcext:value-type="percentage">
            <text:p>-1%</text:p>
          </table:table-cell>
          <table:table-cell table:formula="of:=1-[.H49]/[.H45]" office:value-type="percentage" office:value="-0.0472508591065293" calcext:value-type="percentage">
            <text:p>-5%</text:p>
          </table:table-cell>
          <table:table-cell table:formula="of:=[.E49]/[.E$5]" office:value-type="percentage" office:value="0.60702510778595" calcext:value-type="percentage">
            <text:p>61%</text:p>
          </table:table-cell>
          <table:table-cell table:formula="of:=[.H49]/[.H$5]" office:value-type="percentage" office:value="0.774459974587039" calcext:value-type="percentage">
            <text:p>77%</text:p>
          </table:table-cell>
          <table:table-cell table:number-columns-repeated="1008"/>
        </table:table-row>
        <table:table-row table:style-name="ro1">
          <table:table-cell table:formula="of:=[.A49]" office:value-type="string" office:string-value="99217c96a" calcext:value-type="string">
            <text:p>99217c96a</text:p>
          </table:table-cell>
          <table:table-cell table:formula="of:=[.B49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0]/[.E50]" office:value-type="float" office:value="8.10674384170144" calcext:value-type="float">
            <text:p>8.1</text:p>
          </table:table-cell>
          <table:table-cell table:formula="of:=1-[.E50]/[.E46]" office:value-type="percentage" office:value="0.00675178822113776" calcext:value-type="percentage">
            <text:p>1%</text:p>
          </table:table-cell>
          <table:table-cell table:formula="of:=1-[.H50]/[.H46]" office:value-type="percentage" office:value="-0.000207598090097516" calcext:value-type="percentage">
            <text:p>0%</text:p>
          </table:table-cell>
          <table:table-cell table:formula="of:=[.E50]/[.E$6]" office:value-type="percentage" office:value="0.597985652047048" calcext:value-type="percentage">
            <text:p>60%</text:p>
          </table:table-cell>
          <table:table-cell table:formula="of:=[.H50]/[.H$6]" office:value-type="percentage" office:value="0.711353905211871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1]/[.E51]" office:value-type="float" office:value="8.52715666918142" calcext:value-type="float">
            <text:p>8.5</text:p>
          </table:table-cell>
          <table:table-cell table:formula="of:=1-[.E51]/[.E47]" office:value-type="percentage" office:value="0.0280562893932146" calcext:value-type="percentage">
            <text:p>3%</text:p>
          </table:table-cell>
          <table:table-cell table:formula="of:=1-[.H51]/[.H47]" office:value-type="percentage" office:value="-0.0256129738078383" calcext:value-type="percentage">
            <text:p>-3%</text:p>
          </table:table-cell>
          <table:table-cell table:formula="of:=[.E51]/[.E$7]" office:value-type="percentage" office:value="0.558414900864078" calcext:value-type="percentage">
            <text:p>56%</text:p>
          </table:table-cell>
          <table:table-cell table:formula="of:=[.H51]/[.H$7]" office:value-type="percentage" office:value="0.68991341991342" calcext:value-type="percentage">
            <text:p>6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3]/[.E53]" office:value-type="float" office:value="8.67971556337512" calcext:value-type="float">
            <text:p>8.7</text:p>
          </table:table-cell>
          <table:table-cell table:formula="of:=1-[.E53]/[.E49]" office:value-type="percentage" office:value="0.0501357844161271" calcext:value-type="percentage">
            <text:p>5%</text:p>
          </table:table-cell>
          <table:table-cell table:formula="of:=1-[.H53]/[.H49]" office:value-type="percentage" office:value="0.0287120590648072" calcext:value-type="percentage">
            <text:p>3%</text:p>
          </table:table-cell>
          <table:table-cell table:formula="of:=[.E53]/[.E$5]" office:value-type="percentage" office:value="0.576591427846817" calcext:value-type="percentage">
            <text:p>58%</text:p>
          </table:table-cell>
          <table:table-cell table:formula="of:=[.H53]/[.H$5]" office:value-type="percentage" office:value="0.752223634053367" calcext:value-type="percentage">
            <text:p>75%</text:p>
          </table:table-cell>
          <table:table-cell table:number-columns-repeated="1008"/>
        </table:table-row>
        <table:table-row table:style-name="ro1">
          <table:table-cell table:formula="of:=[.A53]" office:value-type="string" office:string-value="99217c96a" calcext:value-type="string">
            <text:p>99217c96a</text:p>
          </table:table-cell>
          <table:table-cell table:formula="of:=[.B53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4]/[.E54]" office:value-type="float" office:value="8.34364380935785" calcext:value-type="float">
            <text:p>8.3</text:p>
          </table:table-cell>
          <table:table-cell table:formula="of:=1-[.E54]/[.E50]" office:value-type="percentage" office:value="0.0344427244582044" calcext:value-type="percentage">
            <text:p>3%</text:p>
          </table:table-cell>
          <table:table-cell table:formula="of:=1-[.H54]/[.H50]" office:value-type="percentage" office:value="0.00622665006226653" calcext:value-type="percentage">
            <text:p>1%</text:p>
          </table:table-cell>
          <table:table-cell table:formula="of:=[.E54]/[.E$6]" office:value-type="percentage" office:value="0.577389397003632" calcext:value-type="percentage">
            <text:p>58%</text:p>
          </table:table-cell>
          <table:table-cell table:formula="of:=[.H54]/[.H$6]" office:value-type="percentage" office:value="0.70692455337369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5]/[.E55]" office:value-type="float" office:value="8.72953326756791" calcext:value-type="float">
            <text:p>8.7</text:p>
          </table:table-cell>
          <table:table-cell table:formula="of:=1-[.E55]/[.E51]" office:value-type="percentage" office:value="0.0291283434191024" calcext:value-type="percentage">
            <text:p>3%</text:p>
          </table:table-cell>
          <table:table-cell table:formula="of:=1-[.H55]/[.H51]" office:value-type="percentage" office:value="0.00608646545773983" calcext:value-type="percentage">
            <text:p>1%</text:p>
          </table:table-cell>
          <table:table-cell table:formula="of:=[.E55]/[.E$7]" office:value-type="percentage" office:value="0.542149199861365" calcext:value-type="percentage">
            <text:p>54%</text:p>
          </table:table-cell>
          <table:table-cell table:formula="of:=[.H55]/[.H$7]" office:value-type="percentage" office:value="0.685714285714286" calcext:value-type="percentage">
            <text:p>69%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5T12:06:14.739381595</dc:date>
    <meta:editing-duration>PT20H23M2S</meta:editing-duration>
    <meta:editing-cycles>23</meta:editing-cycles>
    <meta:generator>LibreOffice/6.4.2.2$Linux_X86_64 LibreOffice_project/40$Build-2</meta:generator>
    <meta:document-statistic meta:table-count="2" meta:cell-count="489" meta:object-count="0"/>
  </office:meta>
</office:document-meta>
</file>
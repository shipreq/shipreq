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 fo:font-weight="bold" style:font-weight-asian="bold" style:font-weight-complex="bold"/>
    </style:style>
    <style:style style:name="ce4" style:family="table-cell" style:parent-style-name="Default" style:data-style-name="N1">
      <style:text-properties fo:color="#0047ff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  <style:text-properties fo:color="#0047ff"/>
    </style:style>
    <style:style style:name="ce11" style:family="table-cell" style:parent-style-name="Default" style:data-style-name="N1">
      <style:table-cell-properties fo:background-color="transparent"/>
    </style:style>
    <style:style style:name="ce12" style:family="table-cell" style:parent-style-name="Default" style:data-style-name="N120"/>
    <style:style style:name="ce1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/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Default"/>
        <table:table-column table:style-name="co8" table:default-cell-style-name="ce4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1008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13" office:value-type="string" calcext:value-type="string">
            <text:p>JVM ±¹</text:p>
          </table:table-cell>
          <table:table-cell table:style-name="ce13" office:value-type="string" calcext:value-type="string">
            <text:p>JS ±¹</text:p>
          </table:table-cell>
          <table:table-cell table:style-name="ce13" office:value-type="string" calcext:value-type="string">
            <text:p>Σ JVM ±</text:p>
          </table:table-cell>
          <table:table-cell table:style-name="ce13" office:value-type="string" calcext:value-type="string">
            <text:p>Σ JS ±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12" table:formula="of:=[.H2]/[.E2]" office:value-type="float" office:value="5.5486150002154" calcext:value-type="float">
            <text:p>5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12" table:formula="of:=[.H3]/[.E3]" office:value-type="float" office:value="5.71792520126363" calcext:value-type="float">
            <text:p>5.7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9" office:value-type="float" office:value="382" calcext:value-type="float">
            <text:p>382</text:p>
          </table:table-cell>
          <table:table-cell table:style-name="ce10" office:value-type="float" office:value="157.4" calcext:value-type="float">
            <text:p>157</text:p>
          </table:table-cell>
          <table:table-cell table:style-name="ce11" office:value-type="float" office:value="46.6" calcext:value-type="float">
            <text:p>47</text:p>
          </table:table-cell>
          <table:table-cell/>
          <table:table-cell table:style-name="ce12" table:formula="of:=[.H5]/[.E5]" office:value-type="float" office:value="6.65314058669372" calcext:value-type="float">
            <text:p>6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12" table:formula="of:=[.H6]/[.E6]" office:value-type="float" office:value="6.81477456810247" calcext:value-type="float">
            <text:p>6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7]/[.E7]" office:value-type="float" office:value="6.9018679860887" calcext:value-type="float">
            <text:p>6.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9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0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3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4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7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8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65.1" calcext:value-type="float">
            <text:p>165</text:p>
          </table:table-cell>
          <table:table-cell office:value-type="float" office:value="51.5" calcext:value-type="float">
            <text:p>52</text:p>
          </table:table-cell>
          <table:table-cell/>
          <table:table-cell table:style-name="ce12" table:formula="of:=[.H21]/[.E21]" office:value-type="float" office:value="6.50409706901985" calcext:value-type="float">
            <text:p>6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1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82.5" calcext:value-type="float">
            <text:p>683</text:p>
          </table:table-cell>
          <table:table-cell office:value-type="float" office:value="36.9" calcext:value-type="float">
            <text:p>37</text:p>
          </table:table-cell>
          <table:table-cell/>
          <table:table-cell table:style-name="ce12" table:formula="of:=[.H22]/[.E22]" office:value-type="float" office:value="6.41664472941973" calcext:value-type="float">
            <text:p>6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2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42" calcext:value-type="float">
            <text:p>2242</text:p>
          </table:table-cell>
          <table:table-cell office:value-type="float" office:value="188.2" calcext:value-type="float">
            <text:p>188</text:p>
          </table:table-cell>
          <table:table-cell/>
          <table:table-cell table:style-name="ce12" table:formula="of:=[.H23]/[.E23]" office:value-type="float" office:value="6.38631812523678" calcext:value-type="float">
            <text:p>6.4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31ba2eb5</text:p>
          </table:table-cell>
          <table:table-cell office:value-type="string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0.808" calcext:value-type="float">
            <text:p>21</text:p>
          </table:table-cell>
          <table:table-cell office:value-type="float" office:value="0.217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63.3" calcext:value-type="float">
            <text:p>163</text:p>
          </table:table-cell>
          <table:table-cell office:value-type="float" office:value="51.9" calcext:value-type="float">
            <text:p>52</text:p>
          </table:table-cell>
          <table:table-cell/>
          <table:table-cell table:style-name="ce12" table:formula="of:=[.H25]/[.E25]" office:value-type="float" office:value="7.84794309880815" calcext:value-type="float">
            <text:p>7.8</text:p>
          </table:table-cell>
          <table:table-cell table:formula="of:=[.E25]/[.E21]" office:value-type="percentage" office:value="0.819728963126379" calcext:value-type="percentage">
            <text:p>82%</text:p>
          </table:table-cell>
          <table:table-cell table:formula="of:=[.H25]/[.H21]" office:value-type="percentage" office:value="0.989097516656572" calcext:value-type="percentage">
            <text:p>99%</text:p>
          </table:table-cell>
          <table:table-cell table:formula="of:=[.E25]/[.E$5]" office:value-type="percentage" office:value="0.879533350240933" calcext:value-type="percentage">
            <text:p>88%</text:p>
          </table:table-cell>
          <table:table-cell table:formula="of:=[.H25]/[.H$5]" office:value-type="percentage" office:value="1.03748411689962" calcext:value-type="percentage">
            <text:p>104%</text:p>
          </table:table-cell>
          <table:table-cell table:number-columns-repeated="1008"/>
        </table:table-row>
        <table:table-row table:style-name="ro1">
          <table:table-cell table:formula="of:=[.A25]" office:value-type="string" office:string-value="a31ba2eb5" calcext:value-type="string">
            <text:p>a31ba2eb5</text:p>
          </table:table-cell>
          <table:table-cell table:formula="of:=[.B25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7.975" calcext:value-type="float">
            <text:p>98</text:p>
          </table:table-cell>
          <table:table-cell office:value-type="float" office:value="3.492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0.8" calcext:value-type="float">
            <text:p>691</text:p>
          </table:table-cell>
          <table:table-cell office:value-type="float" office:value="39.6" calcext:value-type="float">
            <text:p>40</text:p>
          </table:table-cell>
          <table:table-cell/>
          <table:table-cell table:style-name="ce12" table:formula="of:=[.H26]/[.E26]" office:value-type="float" office:value="7.05077825976014" calcext:value-type="float">
            <text:p>7.1</text:p>
          </table:table-cell>
          <table:table-cell table:formula="of:=[.E26]/[.E22]" office:value-type="percentage" office:value="0.921129329472378" calcext:value-type="percentage">
            <text:p>92%</text:p>
          </table:table-cell>
          <table:table-cell table:formula="of:=[.H26]/[.H22]" office:value-type="percentage" office:value="1.01216117216117" calcext:value-type="percentage">
            <text:p>101%</text:p>
          </table:table-cell>
          <table:table-cell table:formula="of:=[.E26]/[.E$6]" office:value-type="percentage" office:value="0.98579291054162" calcext:value-type="percentage">
            <text:p>99%</text:p>
          </table:table-cell>
          <table:table-cell table:formula="of:=[.H26]/[.H$6]" office:value-type="percentage" office:value="1.01993208327181" calcext:value-type="percentage">
            <text:p>102%</text:p>
          </table:table-cell>
          <table:table-cell table:number-columns-repeated="1008"/>
        </table:table-row>
        <table:table-row table:style-name="ro1">
          <table:table-cell table:formula="of:=[.A26]" office:value-type="string" office:string-value="a31ba2eb5" calcext:value-type="string">
            <text:p>a31ba2eb5</text:p>
          </table:table-cell>
          <table:table-cell table:formula="of:=[.B26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28.48" calcext:value-type="float">
            <text:p>328</text:p>
          </table:table-cell>
          <table:table-cell office:value-type="float" office:value="130.603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2286.3" calcext:value-type="float">
            <text:p>228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2" table:formula="of:=[.H27]/[.E27]" office:value-type="float" office:value="6.9602411105699" calcext:value-type="float">
            <text:p>7.0</text:p>
          </table:table-cell>
          <table:table-cell table:formula="of:=[.E27]/[.E23]" office:value-type="percentage" office:value="0.935672514619883" calcext:value-type="percentage">
            <text:p>94%</text:p>
          </table:table-cell>
          <table:table-cell table:formula="of:=[.H27]/[.H23]" office:value-type="percentage" office:value="1.01975914362177" calcext:value-type="percentage">
            <text:p>102%</text:p>
          </table:table-cell>
          <table:table-cell table:formula="of:=[.E27]/[.E$7]" office:value-type="percentage" office:value="0.981439651978535" calcext:value-type="percentage">
            <text:p>98%</text:p>
          </table:table-cell>
          <table:table-cell table:formula="of:=[.H27]/[.H$7]" office:value-type="percentage" office:value="0.98974025974026" calcext:value-type="percentage">
            <text:p>99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f08f91863</text:p>
          </table:table-cell>
          <table:table-cell office:value-type="string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7.868" calcext:value-type="float">
            <text:p>18</text:p>
          </table:table-cell>
          <table:table-cell office:value-type="float" office:value="1.52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table:formula="of:=[.H29]/[.E29]" office:value-type="float" office:value="7.94716812178196" calcext:value-type="float">
            <text:p>7.9</text:p>
          </table:table-cell>
          <table:table-cell table:formula="of:=[.E29]/[.E25]" office:value-type="percentage" office:value="0.858708189158016" calcext:value-type="percentage">
            <text:p>86%</text:p>
          </table:table-cell>
          <table:table-cell table:formula="of:=[.H29]/[.H25]" office:value-type="percentage" office:value="0.869565217391304" calcext:value-type="percentage">
            <text:p>87%</text:p>
          </table:table-cell>
          <table:table-cell table:formula="of:=[.E29]/[.E$5]" office:value-type="percentage" office:value="0.755262490489475" calcext:value-type="percentage">
            <text:p>76%</text:p>
          </table:table-cell>
          <table:table-cell table:formula="of:=[.H29]/[.H$5]" office:value-type="percentage" office:value="0.902160101651842" calcext:value-type="percentage">
            <text:p>90%</text:p>
          </table:table-cell>
          <table:table-cell table:number-columns-repeated="1008"/>
        </table:table-row>
        <table:table-row table:style-name="ro1">
          <table:table-cell table:formula="of:=[.A29]" office:value-type="string" office:string-value="f08f91863" calcext:value-type="string">
            <text:p>f08f91863</text:p>
          </table:table-cell>
          <table:table-cell table:formula="of:=[.B29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74.709" calcext:value-type="float">
            <text:p>75</text:p>
          </table:table-cell>
          <table:table-cell office:value-type="float" office:value="19.203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72" calcext:value-type="float">
            <text:p>572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2" table:formula="of:=[.H30]/[.E30]" office:value-type="float" office:value="7.65637339544098" calcext:value-type="float">
            <text:p>7.7</text:p>
          </table:table-cell>
          <table:table-cell table:formula="of:=[.E30]/[.E26]" office:value-type="percentage" office:value="0.762531257973973" calcext:value-type="percentage">
            <text:p>76%</text:p>
          </table:table-cell>
          <table:table-cell table:formula="of:=[.H30]/[.H26]" office:value-type="percentage" office:value="0.828025477707006" calcext:value-type="percentage">
            <text:p>83%</text:p>
          </table:table-cell>
          <table:table-cell table:formula="of:=[.E30]/[.E$6]" office:value-type="percentage" office:value="0.751697908177126" calcext:value-type="percentage">
            <text:p>75%</text:p>
          </table:table-cell>
          <table:table-cell table:formula="of:=[.H30]/[.H$6]" office:value-type="percentage" office:value="0.844529750479846" calcext:value-type="percentage">
            <text:p>84%</text:p>
          </table:table-cell>
          <table:table-cell table:number-columns-repeated="1008"/>
        </table:table-row>
        <table:table-row table:style-name="ro1">
          <table:table-cell table:formula="of:=[.A30]" office:value-type="string" office:string-value="f08f91863" calcext:value-type="string">
            <text:p>f08f91863</text:p>
          </table:table-cell>
          <table:table-cell table:formula="of:=[.B30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46.888" calcext:value-type="float">
            <text:p>247</text:p>
          </table:table-cell>
          <table:table-cell office:value-type="float" office:value="38.256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05.3" calcext:value-type="float">
            <text:p>1905</text:p>
          </table:table-cell>
          <table:table-cell office:value-type="float" office:value="221.3" calcext:value-type="float">
            <text:p>221</text:p>
          </table:table-cell>
          <table:table-cell/>
          <table:table-cell table:style-name="ce12" table:formula="of:=[.H31]/[.E31]" office:value-type="float" office:value="7.71726450860309" calcext:value-type="float">
            <text:p>7.7</text:p>
          </table:table-cell>
          <table:table-cell table:formula="of:=[.E31]/[.E27]" office:value-type="percentage" office:value="0.751607403799318" calcext:value-type="percentage">
            <text:p>75%</text:p>
          </table:table-cell>
          <table:table-cell table:formula="of:=[.H31]/[.H27]" office:value-type="percentage" office:value="0.8333552027293" calcext:value-type="percentage">
            <text:p>83%</text:p>
          </table:table-cell>
          <table:table-cell table:formula="of:=[.E31]/[.E$7]" office:value-type="percentage" office:value="0.737657308809293" calcext:value-type="percentage">
            <text:p>74%</text:p>
          </table:table-cell>
          <table:table-cell table:formula="of:=[.H31]/[.H$7]" office:value-type="percentage" office:value="0.824805194805195" calcext:value-type="percentage">
            <text:p>82%</text:p>
          </table:table-cell>
          <table:table-cell table:number-columns-repeated="1008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etail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3T13:08:39.576759391</dc:date>
    <meta:editing-duration>PT55M51S</meta:editing-duration>
    <meta:editing-cycles>12</meta:editing-cycles>
    <meta:generator>LibreOffice/6.4.2.2$Linux_X86_64 LibreOffice_project/40$Build-2</meta:generator>
    <meta:document-statistic meta:table-count="2" meta:cell-count="237" meta:object-count="0"/>
  </office:meta>
</office:document-meta>
</file>
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4" style:family="table-cell" style:parent-style-name="Default" style:data-style-name="N1">
      <style:text-properties fo:color="#0047ff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5]/[.E5]" office:value-type="float" office:value="6.65314058669372" calcext:value-type="float">
            <text:p>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6]/[.E6]" office:value-type="float" office:value="6.81477456810247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7]/[.E7]" office:value-type="float" office:value="6.9018679860887" calcext:value-type="float">
            <text:p>6.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9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3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7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1]/[.E21]" office:value-type="float" office:value="6.5040970690198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1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2]/[.E22]" office:value-type="float" office:value="6.41664472941973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3]/[.E23]" office:value-type="float" office:value="6.38631812523678" calcext:value-type="float">
            <text:p>6.4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5]/[.E25]" office:value-type="float" office:value="7.84794309880815" calcext:value-type="float">
            <text:p>7.8</text:p>
          </table:table-cell>
          <table:table-cell table:formula="of:=1-[.E25]/[.E21]" office:value-type="percentage" office:value="0.180271036873621" calcext:value-type="percentage">
            <text:p>18%</text:p>
          </table:table-cell>
          <table:table-cell table:formula="of:=1-[.H25]/[.H21]" office:value-type="percentage" office:value="0.0109024833434281" calcext:value-type="percentage">
            <text:p>1%</text:p>
          </table:table-cell>
          <table:table-cell table:formula="of:=[.E25]/[.E$5]" office:value-type="percentage" office:value="0.879533350240933" calcext:value-type="percentage">
            <text:p>88%</text:p>
          </table:table-cell>
          <table:table-cell table:formula="of:=[.H25]/[.H$5]" office:value-type="percentage" office:value="1.03748411689962" calcext:value-type="percentage">
            <text:p>104%</text:p>
          </table:table-cell>
          <table:table-cell table:number-columns-repeated="1008"/>
        </table:table-row>
        <table:table-row table:style-name="ro1">
          <table:table-cell table:formula="of:=[.A25]" office:value-type="string" office:string-value="a31ba2eb5" calcext:value-type="string">
            <text:p>a31ba2eb5</text:p>
          </table:table-cell>
          <table:table-cell table:formula="of:=[.B25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6]/[.E26]" office:value-type="float" office:value="7.05077825976014" calcext:value-type="float">
            <text:p>7.1</text:p>
          </table:table-cell>
          <table:table-cell table:formula="of:=1-[.E26]/[.E22]" office:value-type="percentage" office:value="0.0788706705276222" calcext:value-type="percentage">
            <text:p>8%</text:p>
          </table:table-cell>
          <table:table-cell table:formula="of:=1-[.H26]/[.H22]" office:value-type="percentage" office:value="-0.0121611721611721" calcext:value-type="percentage">
            <text:p>-1%</text:p>
          </table:table-cell>
          <table:table-cell table:formula="of:=[.E26]/[.E$6]" office:value-type="percentage" office:value="0.98579291054162" calcext:value-type="percentage">
            <text:p>99%</text:p>
          </table:table-cell>
          <table:table-cell table:formula="of:=[.H26]/[.H$6]" office:value-type="percentage" office:value="1.01993208327181" calcext:value-type="percentage">
            <text:p>102%</text:p>
          </table:table-cell>
          <table:table-cell table:number-columns-repeated="1008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7]/[.E27]" office:value-type="float" office:value="6.9602411105699" calcext:value-type="float">
            <text:p>7.0</text:p>
          </table:table-cell>
          <table:table-cell table:formula="of:=1-[.E27]/[.E23]" office:value-type="percentage" office:value="0.0643274853801169" calcext:value-type="percentage">
            <text:p>6%</text:p>
          </table:table-cell>
          <table:table-cell table:formula="of:=1-[.H27]/[.H23]" office:value-type="percentage" office:value="-0.0197591436217663" calcext:value-type="percentage">
            <text:p>-2%</text:p>
          </table:table-cell>
          <table:table-cell table:formula="of:=[.E27]/[.E$7]" office:value-type="percentage" office:value="0.981439651978535" calcext:value-type="percentage">
            <text:p>98%</text:p>
          </table:table-cell>
          <table:table-cell table:formula="of:=[.H27]/[.H$7]" office:value-type="percentage" office:value="0.98974025974026" calcext:value-type="percentage">
            <text:p>99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29]/[.E29]" office:value-type="float" office:value="7.94716812178196" calcext:value-type="float">
            <text:p>7.9</text:p>
          </table:table-cell>
          <table:table-cell table:formula="of:=1-[.E29]/[.E25]" office:value-type="percentage" office:value="0.141291810841984" calcext:value-type="percentage">
            <text:p>14%</text:p>
          </table:table-cell>
          <table:table-cell table:formula="of:=1-[.H29]/[.H25]" office:value-type="percentage" office:value="0.130434782608696" calcext:value-type="percentage">
            <text:p>13%</text:p>
          </table:table-cell>
          <table:table-cell table:formula="of:=[.E29]/[.E$5]" office:value-type="percentage" office:value="0.755262490489475" calcext:value-type="percentage">
            <text:p>76%</text:p>
          </table:table-cell>
          <table:table-cell table:formula="of:=[.H29]/[.H$5]" office:value-type="percentage" office:value="0.902160101651842" calcext:value-type="percentage">
            <text:p>90%</text:p>
          </table:table-cell>
          <table:table-cell table:number-columns-repeated="1008"/>
        </table:table-row>
        <table:table-row table:style-name="ro1">
          <table:table-cell table:formula="of:=[.A29]" office:value-type="string" office:string-value="f08f91863" calcext:value-type="string">
            <text:p>f08f91863</text:p>
          </table:table-cell>
          <table:table-cell table:formula="of:=[.B29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0]/[.E30]" office:value-type="float" office:value="7.65637339544098" calcext:value-type="float">
            <text:p>7.7</text:p>
          </table:table-cell>
          <table:table-cell table:formula="of:=1-[.E30]/[.E26]" office:value-type="percentage" office:value="0.237468742026027" calcext:value-type="percentage">
            <text:p>24%</text:p>
          </table:table-cell>
          <table:table-cell table:formula="of:=1-[.H30]/[.H26]" office:value-type="percentage" office:value="0.171974522292994" calcext:value-type="percentage">
            <text:p>17%</text:p>
          </table:table-cell>
          <table:table-cell table:formula="of:=[.E30]/[.E$6]" office:value-type="percentage" office:value="0.751697908177126" calcext:value-type="percentage">
            <text:p>75%</text:p>
          </table:table-cell>
          <table:table-cell table:formula="of:=[.H30]/[.H$6]" office:value-type="percentage" office:value="0.844529750479846" calcext:value-type="percentage">
            <text:p>84%</text:p>
          </table:table-cell>
          <table:table-cell table:number-columns-repeated="1008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1]/[.E31]" office:value-type="float" office:value="7.71726450860309" calcext:value-type="float">
            <text:p>7.7</text:p>
          </table:table-cell>
          <table:table-cell table:formula="of:=1-[.E31]/[.E27]" office:value-type="percentage" office:value="0.248392596200682" calcext:value-type="percentage">
            <text:p>25%</text:p>
          </table:table-cell>
          <table:table-cell table:formula="of:=1-[.H31]/[.H27]" office:value-type="percentage" office:value="0.166644797270699" calcext:value-type="percentage">
            <text:p>17%</text:p>
          </table:table-cell>
          <table:table-cell table:formula="of:=[.E31]/[.E$7]" office:value-type="percentage" office:value="0.737657308809293" calcext:value-type="percentage">
            <text:p>74%</text:p>
          </table:table-cell>
          <table:table-cell table:formula="of:=[.H31]/[.H$7]" office:value-type="percentage" office:value="0.824805194805195" calcext:value-type="percentage">
            <text:p>82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3]/[.E33]" office:value-type="float" office:value="8.57686212361331" calcext:value-type="float">
            <text:p>8.6</text:p>
          </table:table-cell>
          <table:table-cell table:formula="of:=1-[.E33]/[.E29]" office:value-type="percentage" office:value="0.117136780837251" calcext:value-type="percentage">
            <text:p>12%</text:p>
          </table:table-cell>
          <table:table-cell table:formula="of:=1-[.H33]/[.H29]" office:value-type="percentage" office:value="0.0471830985915492" calcext:value-type="percentage">
            <text:p>5%</text:p>
          </table:table-cell>
          <table:table-cell table:formula="of:=[.E33]/[.E$5]" office:value-type="percentage" office:value="0.666793473666413" calcext:value-type="percentage">
            <text:p>67%</text:p>
          </table:table-cell>
          <table:table-cell table:formula="of:=[.H33]/[.H$5]" office:value-type="percentage" office:value="0.859593392630242" calcext:value-type="percentage">
            <text:p>86%</text:p>
          </table:table-cell>
          <table:table-cell table:number-columns-repeated="1008"/>
        </table:table-row>
        <table:table-row table:style-name="ro1">
          <table:table-cell table:formula="of:=[.A33]" office:value-type="string" office:string-value="054e39e3e" calcext:value-type="string">
            <text:p>054e39e3e</text:p>
          </table:table-cell>
          <table:table-cell table:formula="of:=[.B33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4]/[.E34]" office:value-type="float" office:value="7.93005103572501" calcext:value-type="float">
            <text:p>7.9</text:p>
          </table:table-cell>
          <table:table-cell table:formula="of:=1-[.E34]/[.E30]" office:value-type="percentage" office:value="0.108273434258255" calcext:value-type="percentage">
            <text:p>11%</text:p>
          </table:table-cell>
          <table:table-cell table:formula="of:=1-[.H34]/[.H30]" office:value-type="percentage" office:value="0.0763986013986014" calcext:value-type="percentage">
            <text:p>8%</text:p>
          </table:table-cell>
          <table:table-cell table:formula="of:=[.E34]/[.E$6]" office:value-type="percentage" office:value="0.670308994134042" calcext:value-type="percentage">
            <text:p>67%</text:p>
          </table:table-cell>
          <table:table-cell table:formula="of:=[.H34]/[.H$6]" office:value-type="percentage" office:value="0.780008858703676" calcext:value-type="percentage">
            <text:p>78%</text:p>
          </table:table-cell>
          <table:table-cell table:number-columns-repeated="1008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5]/[.E35]" office:value-type="float" office:value="8.33755250525052" calcext:value-type="float">
            <text:p>8.3</text:p>
          </table:table-cell>
          <table:table-cell table:formula="of:=1-[.E35]/[.E31]" office:value-type="percentage" office:value="0.135996889277729" calcext:value-type="percentage">
            <text:p>14%</text:p>
          </table:table-cell>
          <table:table-cell table:formula="of:=1-[.H35]/[.H31]" office:value-type="percentage" office:value="0.0665511992862017" calcext:value-type="percentage">
            <text:p>7%</text:p>
          </table:table-cell>
          <table:table-cell table:formula="of:=[.E35]/[.E$7]" office:value-type="percentage" office:value="0.637338209458248" calcext:value-type="percentage">
            <text:p>64%</text:p>
          </table:table-cell>
          <table:table-cell table:formula="of:=[.H35]/[.H$7]" office:value-type="percentage" office:value="0.76991341991342" calcext:value-type="percentage">
            <text:p>77%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7]/[.E37]" office:value-type="float" office:value="8.09746826851286" calcext:value-type="float">
            <text:p>8.1</text:p>
          </table:table-cell>
          <table:table-cell table:formula="of:=1-[.E37]/[.E33]" office:value-type="percentage" office:value="0.066053882725832" calcext:value-type="percentage">
            <text:p>7%</text:p>
          </table:table-cell>
          <table:table-cell table:formula="of:=1-[.H37]/[.H33]" office:value-type="percentage" office:value="0.118255728011826" calcext:value-type="percentage">
            <text:p>12%</text:p>
          </table:table-cell>
          <table:table-cell table:formula="of:=[.E37]/[.E$5]" office:value-type="percentage" office:value="0.622749175754502" calcext:value-type="percentage">
            <text:p>62%</text:p>
          </table:table-cell>
          <table:table-cell table:formula="of:=[.H37]/[.H$5]" office:value-type="percentage" office:value="0.757941550190597" calcext:value-type="percentage">
            <text:p>76%</text:p>
          </table:table-cell>
          <table:table-cell table:number-columns-repeated="1008"/>
        </table:table-row>
        <table:table-row table:style-name="ro1">
          <table:table-cell table:formula="of:=[.A37]" office:value-type="string" office:string-value="5c892acc0" calcext:value-type="string">
            <text:p>5c892acc0</text:p>
          </table:table-cell>
          <table:table-cell table:formula="of:=[.B37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8]/[.E38]" office:value-type="float" office:value="7.61628090561748" calcext:value-type="float">
            <text:p>7.6</text:p>
          </table:table-cell>
          <table:table-cell table:formula="of:=1-[.E38]/[.E34]" office:value-type="percentage" office:value="0.0492644851395978" calcext:value-type="percentage">
            <text:p>5%</text:p>
          </table:table-cell>
          <table:table-cell table:formula="of:=1-[.H38]/[.H34]" office:value-type="percentage" office:value="0.0868824531516183" calcext:value-type="percentage">
            <text:p>9%</text:p>
          </table:table-cell>
          <table:table-cell table:formula="of:=[.E38]/[.E$6]" office:value-type="percentage" office:value="0.637286566653587" calcext:value-type="percentage">
            <text:p>64%</text:p>
          </table:table-cell>
          <table:table-cell table:formula="of:=[.H38]/[.H$6]" office:value-type="percentage" office:value="0.712239775579507" calcext:value-type="percentage">
            <text:p>71%</text:p>
          </table:table-cell>
          <table:table-cell table:number-columns-repeated="1008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39]/[.E39]" office:value-type="float" office:value="7.54415664759566" calcext:value-type="float">
            <text:p>7.5</text:p>
          </table:table-cell>
          <table:table-cell table:formula="of:=1-[.E39]/[.E35]" office:value-type="percentage" office:value="0.0224694344434444" calcext:value-type="percentage">
            <text:p>2%</text:p>
          </table:table-cell>
          <table:table-cell table:formula="of:=1-[.H39]/[.H35]" office:value-type="percentage" office:value="0.115490581951082" calcext:value-type="percentage">
            <text:p>12%</text:p>
          </table:table-cell>
          <table:table-cell table:formula="of:=[.E39]/[.E$7]" office:value-type="percentage" office:value="0.623017580342524" calcext:value-type="percentage">
            <text:p>62%</text:p>
          </table:table-cell>
          <table:table-cell table:formula="of:=[.H39]/[.H$7]" office:value-type="percentage" office:value="0.680995670995671" calcext:value-type="percentage">
            <text:p>68%</text:p>
          </table:table-cell>
          <table:table-cell table:number-columns-repeated="1008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3T20:47:20.518027702</dc:date>
    <meta:editing-duration>PT1H7M</meta:editing-duration>
    <meta:editing-cycles>15</meta:editing-cycles>
    <meta:generator>LibreOffice/6.4.2.2$Linux_X86_64 LibreOffice_project/40$Build-2</meta:generator>
    <meta:document-statistic meta:table-count="2" meta:cell-count="321" meta:object-count="0"/>
  </office:meta>
</office:document-meta>
</file>
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4.464cm"/>
    </style:style>
    <style:style style:name="co2" style:family="table-column">
      <style:table-column-properties fo:break-before="auto" style:column-width="4.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ccccc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color="#b3b3b3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4586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8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sertStep()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1.0</text:p>
          </table:table-cell>
          <table:table-cell table:style-name="ce1" office:value-type="string">
            <text:p>1.1</text:p>
          </table:table-cell>
          <table:table-cell table:style-name="ce1" office:value-type="string">
            <text:p>1.0.2</text:p>
          </table:table-cell>
          <table:table-cell table:style-name="ce1" office:value-type="string">
            <text:p>1.1.2</text:p>
          </table:table-cell>
          <table:table-cell table:style-name="ce1" office:value-type="string">
            <text:p>1.0.2.a</text:p>
          </table:table-cell>
          <table:table-cell table:style-name="ce1" office:value-type="string">
            <text:p>1.0.2.a.i</text:p>
          </table:table-cell>
          <table:table-cell table:style-name="ce1" office:value-type="string">
            <text:p>1.0.2.c.ii</text:p>
          </table:table-cell>
          <table:table-cell table:number-columns-repeated="2" table:style-name="ce1"/>
          <table:table-cell table:style-name="ce1" table:number-columns-repeated="1014"/>
        </table:table-row>
        <table:table-row table:style-name="ro1">
          <table:table-cell table:style-name="ce2" office:value-type="string">
            <text:p>1.0. Step:1.0</text:p>
          </table:table-cell>
          <table:table-cell table:number-columns-repeated="7" table:style-name="ce5" office:value-type="string">
            <text:p>1.0. Step:1.0</text:p>
          </table:table-cell>
          <table:table-cell table:style-name="ce5"/>
          <table:table-cell table:style-name="ce8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style-name="ce6" office:value-type="string">
            <text:p><text:s text:c="2"/>1. N</text:p>
          </table:table-cell>
          <table:table-cell table:number-columns-repeated="6" table:style-name="ce5" office:value-type="string">
            <text:p><text:s text:c="2"/>1. Step:1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7" office:value-type="string">
            <text:p><text:s text:c="2"/>2. Step:1</text:p>
          </table:table-cell>
          <table:table-cell table:number-columns-repeated="6" table:style-name="ce5" office:value-type="string">
            <text:p><text:s text:c="2"/>2. Step:2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7" office:value-type="string">
            <text:p><text:s text:c="2"/>3. Step:2</text:p>
          </table:table-cell>
          <table:table-cell table:style-name="ce5" office:value-type="string">
            <text:p><text:s text:c="4"/>a. Step:a</text:p>
          </table:table-cell>
          <table:table-cell table:style-name="ce6" office:value-type="string">
            <text:p><text:s text:c="4"/>a. N</text:p>
          </table:table-cell>
          <table:table-cell table:number-columns-repeated="4" table:style-name="ce5" office:value-type="string">
            <text:p><text:s text:c="4"/>a. Step:a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style-name="ce7" office:value-type="string">
            <text:p><text:s text:c="4"/>b. Step:a</text:p>
          </table:table-cell>
          <table:table-cell table:style-name="ce5" office:value-type="string">
            <text:p><text:s text:c="6"/>i. Step:i</text:p>
          </table:table-cell>
          <table:table-cell table:style-name="ce6" office:value-type="string">
            <text:p><text:s text:c="6"/>i. N</text:p>
          </table:table-cell>
          <table:table-cell table:number-columns-repeated="2" table:style-name="ce5" office:value-type="string">
            <text:p><text:s text:c="6"/>i. Step: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7" office:value-type="string">
            <text:p><text:s text:c="6"/>ii. Step:i</text:p>
          </table:table-cell>
          <table:table-cell table:style-name="ce6" office:value-type="string">
            <text:p><text:s text:c="6"/>ii. N</text:p>
          </table:table-cell>
          <table:table-cell table:style-name="ce5" office:value-type="string">
            <text:p><text:s text:c="6"/>ii. Step:i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ii. Step:ii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ii. Step:ii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ii. Step:iii</text:p>
          </table:table-cell>
          <table:table-cell table:number-columns-repeated="2" table:style-name="ce7" office:value-type="string">
            <text:p><text:s text:c="6"/>iii. Step:ii</text:p>
          </table:table-cell>
          <table:table-cell table:style-name="ce5" office:value-type="string">
            <text:p><text:s text:c="6"/>iii. Step:ii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5" office:value-type="string">
            <text:p><text:s text:c="6"/>iii. Step:iii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6"/>iii. Step:iii</text:p>
          </table:table-cell>
          <table:table-cell table:style-name="ce5" office:value-type="string">
            <text:p><text:s text:c="4"/>b. Step:b</text:p>
          </table:table-cell>
          <table:table-cell table:number-columns-repeated="2" table:style-name="ce7" office:value-type="string">
            <text:p><text:s text:c="6"/>iv. Step:iii</text:p>
          </table:table-cell>
          <table:table-cell table:style-name="ce5" office:value-type="string">
            <text:p><text:s text:c="4"/>b. Step:b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">
          <table:table-cell table:style-name="ce2" office:value-type="string">
            <text:p><text:s text:c="4"/>c. Step:c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4"/>c. Step:c</text:p>
          </table:table-cell>
          <table:table-cell table:style-name="ce7" office:value-type="string">
            <text:p><text:s text:c="4"/>c. Step:b</text:p>
          </table:table-cell>
          <table:table-cell table:style-name="ce5" office:value-type="string">
            <text:p><text:s text:c="4"/>c. Step:c</text:p>
          </table:table-cell>
          <table:table-cell table:number-columns-repeated="2" table:style-name="ce5" office:value-type="string">
            <text:p><text:s text:c="4"/>b. Step:b</text:p>
          </table:table-cell>
          <table:table-cell table:style-name="ce5" office:value-type="string">
            <text:p><text:s text:c="4"/>c. Step:c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4"/>c. Step:c</text:p>
          </table:table-cell>
          <table:table-cell table:style-name="ce5" office:value-type="string">
            <text:p><text:s text:c="6"/>i. Step:i</text:p>
          </table:table-cell>
          <table:table-cell table:style-name="ce7" office:value-type="string">
            <text:p><text:s text:c="4"/>d. Step:c</text:p>
          </table:table-cell>
          <table:table-cell table:style-name="ce5" office:value-type="string">
            <text:p><text:s text:c="6"/>i. Step:i</text:p>
          </table:table-cell>
          <table:table-cell table:number-columns-repeated="2" table:style-name="ce5" office:value-type="string">
            <text:p><text:s text:c="4"/>c. Step:c</text:p>
          </table:table-cell>
          <table:table-cell table:style-name="ce5" office:value-type="string">
            <text:p><text:s text:c="6"/>i. Step: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number-columns-repeated="2"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2"/>3. Step:3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2"/>3. Step:3</text:p>
          </table:table-cell>
          <table:table-cell table:number-columns-repeated="2" table:style-name="ce5" office:value-type="string">
            <text:p><text:s text:c="6"/>ii. Step:ii</text:p>
          </table:table-cell>
          <table:table-cell table:style-name="ce6" office:value-type="string">
            <text:p><text:s text:c="6"/>iii. N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7" office:value-type="string">
            <text:p><text:s text:c="2"/>4. Step:3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2"/>3. Step:3</text:p>
          </table:table-cell>
          <table:table-cell table:style-name="ce5" office:value-type="string">
            <text:p><text:s text:c="4"/>a. Step:a</text:p>
          </table:table-cell>
          <table:table-cell table:number-columns-repeated="3" table:style-name="ce5" office:value-type="string">
            <text:p><text:s text:c="2"/>3. Step:3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number-columns-repeated="3" table:style-name="ce5" office:value-type="string">
            <text:p><text:s text:c="4"/>a. Step:a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4"/>b. Step:b</text:p>
          </table:table-cell>
          <table:table-cell table:number-columns-repeated="3" table:style-name="ce5" office:value-type="string">
            <text:p><text:s text:c="6"/>i. Step: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4. Step:4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2"/>4. Step:4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2"/>4. Step:4</text:p>
          </table:table-cell>
          <table:table-cell table:number-columns-repeated="3" table:style-name="ce5" office:value-type="string">
            <text:p><text:s text:c="4"/>b. Step:b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1.1. Step:1.1</text:p>
          </table:table-cell>
          <table:table-cell table:style-name="ce7" office:value-type="string">
            <text:p><text:s text:c="2"/>5. Step:4</text:p>
          </table:table-cell>
          <table:table-cell table:style-name="ce5" office:value-type="string">
            <text:p>1.1. Step:1.1</text:p>
          </table:table-cell>
          <table:table-cell table:style-name="ce5" office:value-type="string">
            <text:p><text:s text:c="2"/>4. Step:4</text:p>
          </table:table-cell>
          <table:table-cell table:style-name="ce5" office:value-type="string">
            <text:p>1.1. Step:1.1</text:p>
          </table:table-cell>
          <table:table-cell table:number-columns-repeated="3" table:style-name="ce5" office:value-type="string">
            <text:p><text:s text:c="2"/>4. Step:4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style-name="ce5" office:value-type="string">
            <text:p>1.1. Step:1.1</text:p>
          </table:table-cell>
          <table:table-cell table:style-name="ce6" office:value-type="string">
            <text:p><text:s text:c="2"/>1. N</text:p>
          </table:table-cell>
          <table:table-cell table:style-name="ce5" office:value-type="string">
            <text:p>1.1. Step:1.1</text:p>
          </table:table-cell>
          <table:table-cell table:style-name="ce5" office:value-type="string">
            <text:p><text:s text:c="2"/>1. Step:1</text:p>
          </table:table-cell>
          <table:table-cell table:number-columns-repeated="3" table:style-name="ce5" office:value-type="string">
            <text:p>1.1. Step:1.1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5" office:value-type="string">
            <text:p><text:s text:c="2"/>1. Step:1</text:p>
          </table:table-cell>
          <table:table-cell table:style-name="ce7" office:value-type="string">
            <text:p><text:s text:c="2"/>2. Step:1</text:p>
          </table:table-cell>
          <table:table-cell table:style-name="ce5" office:value-type="string">
            <text:p><text:s text:c="2"/>1. Step:1</text:p>
          </table:table-cell>
          <table:table-cell table:style-name="ce5" office:value-type="string">
            <text:p><text:s text:c="2"/>2. Step:2</text:p>
          </table:table-cell>
          <table:table-cell table:number-columns-repeated="3" table:style-name="ce5" office:value-type="string">
            <text:p><text:s text:c="2"/>1. Step:1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5" office:value-type="string">
            <text:p><text:s text:c="2"/>2. Step:2</text:p>
          </table:table-cell>
          <table:table-cell table:style-name="ce7" office:value-type="string">
            <text:p><text:s text:c="2"/>3. Step:2</text:p>
          </table:table-cell>
          <table:table-cell table:style-name="ce5" office:value-type="string">
            <text:p><text:s text:c="2"/>2. Step:2</text:p>
          </table:table-cell>
          <table:table-cell table:style-name="ce6" office:value-type="string">
            <text:p><text:s text:c="2"/>3. N</text:p>
          </table:table-cell>
          <table:table-cell table:number-columns-repeated="3" table:style-name="ce5" office:value-type="string">
            <text:p><text:s text:c="2"/>2. Step:2</text:p>
          </table:table-cell>
          <table:table-cell table:style-name="ce7"/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1.2. Step:1.2</text:p>
          </table:table-cell>
          <table:table-cell table:style-name="ce5" office:value-type="string">
            <text:p><text:s text:c="2"/>3. Step:3</text:p>
          </table:table-cell>
          <table:table-cell table:style-name="ce7" office:value-type="string">
            <text:p><text:s text:c="2"/>4. Step:3</text:p>
          </table:table-cell>
          <table:table-cell table:style-name="ce5" office:value-type="string">
            <text:p><text:s text:c="2"/>3. Step:3</text:p>
          </table:table-cell>
          <table:table-cell table:style-name="ce7" office:value-type="string">
            <text:p><text:s text:c="2"/>4. Step:3</text:p>
          </table:table-cell>
          <table:table-cell table:number-columns-repeated="3" table:style-name="ce5" office:value-type="string">
            <text:p><text:s text:c="2"/>3. Step:3</text:p>
          </table:table-cell>
          <table:table-cell table:style-name="ce7"/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7" table:style-name="ce5" office:value-type="string">
            <text:p>1.2. Step:1.2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7" table:style-name="ce5" office:value-type="string">
            <text:p><text:s text:c="2"/>1. Step:1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/>
          <table:table-cell table:number-columns-repeated="7" table:style-name="ce5" office:value-type="string">
            <text:p><text:s text:c="2"/>2. Step:2</text:p>
          </table:table-cell>
          <table:table-cell table:number-columns-repeated="2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3" table:formula="of:=&quot;&quot;&quot;decreasing &quot;&amp;[.B$1]&amp;&quot;&quot;&quot; in { test(&quot;&quot;&quot;&amp;[.B$1]&amp;&quot;&quot;&quot;, &quot;&quot;&quot;&quot;&quot;&quot;&quot;" office:value-type="string" office:string-value="&quot;decreasing 1.0&quot; in { test(&quot;1.0&quot;, &quot;&quot;&quot;">
            <text:p>"decreasing 1.0" in { test("1.0", """</text:p>
          </table:table-cell>
          <table:table-cell table:style-name="ce3" table:formula="of:=&quot;&quot;&quot;decreasing &quot;&amp;[.C$1]&amp;&quot;&quot;&quot; in { test(&quot;&quot;&quot;&amp;[.C$1]&amp;&quot;&quot;&quot;, &quot;&quot;&quot;&quot;&quot;&quot;&quot;" office:value-type="string" office:string-value="&quot;decreasing 1.1&quot; in { test(&quot;1.1&quot;, &quot;&quot;&quot;">
            <text:p>"decreasing 1.1" in { test("1.1", """</text:p>
          </table:table-cell>
          <table:table-cell table:style-name="ce3" table:formula="of:=&quot;&quot;&quot;decreasing &quot;&amp;[.D$1]&amp;&quot;&quot;&quot; in { test(&quot;&quot;&quot;&amp;[.D$1]&amp;&quot;&quot;&quot;, &quot;&quot;&quot;&quot;&quot;&quot;&quot;" office:value-type="string" office:string-value="&quot;decreasing 1.0.2&quot; in { test(&quot;1.0.2&quot;, &quot;&quot;&quot;">
            <text:p>"decreasing 1.0.2" in { test("1.0.2", """</text:p>
          </table:table-cell>
          <table:table-cell table:style-name="ce3" table:formula="of:=&quot;&quot;&quot;decreasing &quot;&amp;[.E$1]&amp;&quot;&quot;&quot; in { test(&quot;&quot;&quot;&amp;[.E$1]&amp;&quot;&quot;&quot;, &quot;&quot;&quot;&quot;&quot;&quot;&quot;" office:value-type="string" office:string-value="&quot;decreasing 1.1.2&quot; in { test(&quot;1.1.2&quot;, &quot;&quot;&quot;">
            <text:p>"decreasing 1.1.2" in { test("1.1.2", """</text:p>
          </table:table-cell>
          <table:table-cell table:style-name="ce3" table:formula="of:=&quot;&quot;&quot;decreasing &quot;&amp;[.F$1]&amp;&quot;&quot;&quot; in { test(&quot;&quot;&quot;&amp;[.F$1]&amp;&quot;&quot;&quot;, &quot;&quot;&quot;&quot;&quot;&quot;&quot;" office:value-type="string" office:string-value="&quot;decreasing 1.0.2.a&quot; in { test(&quot;1.0.2.a&quot;, &quot;&quot;&quot;">
            <text:p>"decreasing 1.0.2.a" in { test("1.0.2.a", """</text:p>
          </table:table-cell>
          <table:table-cell table:style-name="ce3" table:formula="of:=&quot;&quot;&quot;decreasing &quot;&amp;[.G$1]&amp;&quot;&quot;&quot; in { test(&quot;&quot;&quot;&amp;[.G$1]&amp;&quot;&quot;&quot;, &quot;&quot;&quot;&quot;&quot;&quot;&quot;" office:value-type="string" office:string-value="&quot;decreasing 1.0.2.a.i&quot; in { test(&quot;1.0.2.a.i&quot;, &quot;&quot;&quot;">
            <text:p>"decreasing 1.0.2.a.i" in { test("1.0.2.a.i", """</text:p>
          </table:table-cell>
          <table:table-cell table:style-name="ce3" table:formula="of:=&quot;&quot;&quot;decreasing &quot;&amp;[.H$1]&amp;&quot;&quot;&quot; in { test(&quot;&quot;&quot;&amp;[.H$1]&amp;&quot;&quot;&quot;, &quot;&quot;&quot;&quot;&quot;&quot;&quot;" office:value-type="string" office:string-value="&quot;decreasing 1.0.2.c.ii&quot; in { test(&quot;1.0.2.c.ii&quot;, &quot;&quot;&quot;">
            <text:p>"decreasing 1.0.2.c.ii" in { test("1.0.2.c.ii", """</text:p>
          </table:table-cell>
          <table:table-cell table:style-name="ce3" table:formula="of:=&quot;&quot;&quot;decreasing &quot;&amp;[.I$1]&amp;&quot;&quot;&quot; in { test(&quot;&quot;&quot;&amp;[.I$1]&amp;&quot;&quot;&quot;, &quot;&quot;&quot;&quot;&quot;&quot;&quot;" office:value-type="string" office:string-value="&quot;decreasing &quot; in { test(&quot;&quot;, &quot;&quot;&quot;">
            <text:p>"decreasing " in { test("", """</text:p>
          </table:table-cell>
          <table:table-cell table:style-name="ce3" table:formula="of:=&quot;&quot;&quot;decreasing &quot;&amp;[.J$1]&amp;&quot;&quot;&quot; in { test(&quot;&quot;&quot;&amp;[.J$1]&amp;&quot;&quot;&quot;, &quot;&quot;&quot;&quot;&quot;&quot;&quot;" office:value-type="string" office:string-value="&quot;decreasing &quot; in { test(&quot;&quot;, &quot;&quot;&quot;">
            <text:p>"decreasing " in { test("", """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 table:formula="of:=CHAR(13)&amp;&quot;          &quot;" office:value-type="string" office:string-value="&#13;          ">
            <text:p> <text:s text:c="9"/></text:p>
          </table:table-cell>
          <table:table-cell table:style-name="ce3" table:formula="of:=[.$A34]&amp;[.B$2]&amp;[.$A34]&amp;[.B$3]&amp;[.$A34]&amp;[.B$4]&amp;[.$A34]&amp;[.B$5]&amp;[.$A34]&amp;[.B$6]&amp;[.$A34]&amp;[.B$7]&amp;[.$A34]&amp;[.B$8]&amp;[.$A34]&amp;[.B$9]&amp;[.$A34]&amp;[.B$10]&amp;[.$A34]&amp;[.B$11]&amp;[.$A34]&amp;[.B$12]&amp;[.$A34]&amp;[.B$13]&amp;[.$A34]&amp;[.B$14]&amp;[.$A34]&amp;[.B$15]&amp;[.$A34]&amp;[.B$16]&amp;[.$A34]&amp;[.B$17]&amp;[.$A34]&amp;[.B$18]&amp;[.$A34]&amp;[.B$19]&amp;[.$A34]&amp;[.B$20]&amp;[.$A34]&amp;[.B$21]&amp;[.$A34]&amp;[.B$22]&amp;[.$A34]&amp;[.B$23]&amp;[.$A34]&amp;[.B$24]&amp;[.$A34]&amp;[.B$25]" office:value-type="string" office:string-value="&#13;          1.0. Step:1.0&#13;            1. N&#13;            2. Step:1&#13;            3. Step:2&#13;              a. Step:a&#13;                i. Step:i&#13;                ii. Step:ii&#13;                iii. Step:iii&#13;              b. Step:b&#13;              c. Step:c&#13;                i. Step:i&#13;                ii. Step:ii&#13;            4. Step:3&#13;              a. Step:a&#13;                i. Step:i&#13;              b. Step:b&#13;            5. Step:4&#13;          1.1. Step:1.1&#13;            1. Step:1&#13;            2. Step:2&#13;            3. Step:3&#13;          1.2. Step:1.2&#13;            1. Step:1&#13;            2. Step:2">
            <text:p> <text:s text:c="9"/>1.0. Step:1.0 <text:s text:c="11"/>1. N <text:s text:c="11"/>2. Step:1 <text:s text:c="11"/>3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4. Step:3 <text:s text:c="13"/>a. Step:a <text:s text:c="15"/>i. Step:i <text:s text:c="13"/>b. Step:b <text:s text:c="11"/>5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C$2]&amp;[.$A34]&amp;[.C$3]&amp;[.$A34]&amp;[.C$4]&amp;[.$A34]&amp;[.C$5]&amp;[.$A34]&amp;[.C$6]&amp;[.$A34]&amp;[.C$7]&amp;[.$A34]&amp;[.C$8]&amp;[.$A34]&amp;[.C$9]&amp;[.$A34]&amp;[.C$10]&amp;[.$A34]&amp;[.C$11]&amp;[.$A34]&amp;[.C$12]&amp;[.$A34]&amp;[.C$13]&amp;[.$A34]&amp;[.C$14]&amp;[.$A34]&amp;[.C$15]&amp;[.$A34]&amp;[.C$16]&amp;[.$A34]&amp;[.C$17]&amp;[.$A34]&amp;[.C$18]&amp;[.$A34]&amp;[.C$19]&amp;[.$A34]&amp;[.C$20]&amp;[.$A34]&amp;[.C$21]&amp;[.$A34]&amp;[.C$22]&amp;[.$A34]&amp;[.C$23]&amp;[.$A34]&amp;[.C$24]&amp;[.$A34]&amp;[.C$25]" office:value-type="string" office:string-value="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N&#13;            2. Step:1&#13;            3. Step:2&#13;            4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N <text:s text:c="11"/>2. Step:1 <text:s text:c="11"/>3. Step:2 <text:s text:c="11"/>4. Step:3 <text:s text:c="9"/>1.2. Step:1.2 <text:s text:c="11"/>1. Step:1 <text:s text:c="11"/>2. Step:2</text:p>
          </table:table-cell>
          <table:table-cell table:style-name="ce3" table:formula="of:=[.$A34]&amp;[.D$2]&amp;[.$A34]&amp;[.D$3]&amp;[.$A34]&amp;[.D$4]&amp;[.$A34]&amp;[.D$5]&amp;[.$A34]&amp;[.D$6]&amp;[.$A34]&amp;[.D$7]&amp;[.$A34]&amp;[.D$8]&amp;[.$A34]&amp;[.D$9]&amp;[.$A34]&amp;[.D$10]&amp;[.$A34]&amp;[.D$11]&amp;[.$A34]&amp;[.D$12]&amp;[.$A34]&amp;[.D$13]&amp;[.$A34]&amp;[.D$14]&amp;[.$A34]&amp;[.D$15]&amp;[.$A34]&amp;[.D$16]&amp;[.$A34]&amp;[.D$17]&amp;[.$A34]&amp;[.D$18]&amp;[.$A34]&amp;[.D$19]&amp;[.$A34]&amp;[.D$20]&amp;[.$A34]&amp;[.D$21]&amp;[.$A34]&amp;[.D$22]&amp;[.$A34]&amp;[.D$23]&amp;[.$A34]&amp;[.D$24]&amp;[.$A34]&amp;[.D$25]" office:value-type="string" office:string-value="&#13;          1.0. Step:1.0&#13;            1. Step:1&#13;            2. Step:2&#13;              a. N&#13;              b. Step:a&#13;                i. Step:i&#13;                ii. Step:ii&#13;                iii. Step:iii&#13;              c. Step:b&#13;              d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N <text:s text:c="13"/>b. Step:a <text:s text:c="15"/>i. Step:i <text:s text:c="15"/>ii. Step:ii <text:s text:c="15"/>iii. Step:iii <text:s text:c="13"/>c. Step:b <text:s text:c="13"/>d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E$2]&amp;[.$A34]&amp;[.E$3]&amp;[.$A34]&amp;[.E$4]&amp;[.$A34]&amp;[.E$5]&amp;[.$A34]&amp;[.E$6]&amp;[.$A34]&amp;[.E$7]&amp;[.$A34]&amp;[.E$8]&amp;[.$A34]&amp;[.E$9]&amp;[.$A34]&amp;[.E$10]&amp;[.$A34]&amp;[.E$11]&amp;[.$A34]&amp;[.E$12]&amp;[.$A34]&amp;[.E$13]&amp;[.$A34]&amp;[.E$14]&amp;[.$A34]&amp;[.E$15]&amp;[.$A34]&amp;[.E$16]&amp;[.$A34]&amp;[.E$17]&amp;[.$A34]&amp;[.E$18]&amp;[.$A34]&amp;[.E$19]&amp;[.$A34]&amp;[.E$20]&amp;[.$A34]&amp;[.E$21]&amp;[.$A34]&amp;[.E$22]&amp;[.$A34]&amp;[.E$23]&amp;[.$A34]&amp;[.E$24]&amp;[.$A34]&amp;[.E$25]" office:value-type="string" office:string-value="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N&#13;            4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N <text:s text:c="11"/>4. Step:3 <text:s text:c="9"/>1.2. Step:1.2 <text:s text:c="11"/>1. Step:1 <text:s text:c="11"/>2. Step:2</text:p>
          </table:table-cell>
          <table:table-cell table:style-name="ce3" table:formula="of:=[.$A34]&amp;[.F$2]&amp;[.$A34]&amp;[.F$3]&amp;[.$A34]&amp;[.F$4]&amp;[.$A34]&amp;[.F$5]&amp;[.$A34]&amp;[.F$6]&amp;[.$A34]&amp;[.F$7]&amp;[.$A34]&amp;[.F$8]&amp;[.$A34]&amp;[.F$9]&amp;[.$A34]&amp;[.F$10]&amp;[.$A34]&amp;[.F$11]&amp;[.$A34]&amp;[.F$12]&amp;[.$A34]&amp;[.F$13]&amp;[.$A34]&amp;[.F$14]&amp;[.$A34]&amp;[.F$15]&amp;[.$A34]&amp;[.F$16]&amp;[.$A34]&amp;[.F$17]&amp;[.$A34]&amp;[.F$18]&amp;[.$A34]&amp;[.F$19]&amp;[.$A34]&amp;[.F$20]&amp;[.$A34]&amp;[.F$21]&amp;[.$A34]&amp;[.F$22]&amp;[.$A34]&amp;[.F$23]&amp;[.$A34]&amp;[.F$24]&amp;[.$A34]&amp;[.F$25]" office:value-type="string" office:string-value="&#13;          1.0. Step:1.0&#13;            1. Step:1&#13;            2. Step:2&#13;              a. Step:a&#13;                i. N&#13;                ii. Step:i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Step:a <text:s text:c="15"/>i. N <text:s text:c="15"/>ii. Step:i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G$2]&amp;[.$A34]&amp;[.G$3]&amp;[.$A34]&amp;[.G$4]&amp;[.$A34]&amp;[.G$5]&amp;[.$A34]&amp;[.G$6]&amp;[.$A34]&amp;[.G$7]&amp;[.$A34]&amp;[.G$8]&amp;[.$A34]&amp;[.G$9]&amp;[.$A34]&amp;[.G$10]&amp;[.$A34]&amp;[.G$11]&amp;[.$A34]&amp;[.G$12]&amp;[.$A34]&amp;[.G$13]&amp;[.$A34]&amp;[.G$14]&amp;[.$A34]&amp;[.G$15]&amp;[.$A34]&amp;[.G$16]&amp;[.$A34]&amp;[.G$17]&amp;[.$A34]&amp;[.G$18]&amp;[.$A34]&amp;[.G$19]&amp;[.$A34]&amp;[.G$20]&amp;[.$A34]&amp;[.G$21]&amp;[.$A34]&amp;[.G$22]&amp;[.$A34]&amp;[.G$23]&amp;[.$A34]&amp;[.G$24]&amp;[.$A34]&amp;[.G$25]" office:value-type="string" office:string-value="&#13;          1.0. Step:1.0&#13;            1. Step:1&#13;            2. Step:2&#13;              a. Step:a&#13;                i. Step:i&#13;                ii. N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N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H$2]&amp;[.$A34]&amp;[.H$3]&amp;[.$A34]&amp;[.H$4]&amp;[.$A34]&amp;[.H$5]&amp;[.$A34]&amp;[.H$6]&amp;[.$A34]&amp;[.H$7]&amp;[.$A34]&amp;[.H$8]&amp;[.$A34]&amp;[.H$9]&amp;[.$A34]&amp;[.H$10]&amp;[.$A34]&amp;[.H$11]&amp;[.$A34]&amp;[.H$12]&amp;[.$A34]&amp;[.H$13]&amp;[.$A34]&amp;[.H$14]&amp;[.$A34]&amp;[.H$15]&amp;[.$A34]&amp;[.H$16]&amp;[.$A34]&amp;[.H$17]&amp;[.$A34]&amp;[.H$18]&amp;[.$A34]&amp;[.H$19]&amp;[.$A34]&amp;[.H$20]&amp;[.$A34]&amp;[.H$21]&amp;[.$A34]&amp;[.H$22]&amp;[.$A34]&amp;[.H$23]&amp;[.$A34]&amp;[.H$24]&amp;[.$A34]&amp;[.H$25]" office:value-type="string" office:string-value="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    iii. N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5"/>iii. N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I$2]&amp;[.$A34]&amp;[.I$3]&amp;[.$A34]&amp;[.I$4]&amp;[.$A34]&amp;[.I$5]&amp;[.$A34]&amp;[.I$6]&amp;[.$A34]&amp;[.I$7]&amp;[.$A34]&amp;[.I$8]&amp;[.$A34]&amp;[.I$9]&amp;[.$A34]&amp;[.I$10]&amp;[.$A34]&amp;[.I$11]&amp;[.$A34]&amp;[.I$12]&amp;[.$A34]&amp;[.I$13]&amp;[.$A34]&amp;[.I$14]&amp;[.$A34]&amp;[.I$15]&amp;[.$A34]&amp;[.I$16]&amp;[.$A34]&amp;[.I$17]&amp;[.$A34]&amp;[.I$18]&amp;[.$A34]&amp;[.I$19]&amp;[.$A34]&amp;[.I$20]&amp;[.$A34]&amp;[.I$21]&amp;[.$A34]&amp;[.I$22]&amp;[.$A34]&amp;[.I$23]&amp;[.$A34]&amp;[.I$24]&amp;[.$A34]&amp;[.I$25]" office:value-type="string" office:string-value="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">
            <text:p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</text:p>
          </table:table-cell>
          <table:table-cell table:style-name="ce3" table:formula="of:=[.$A34]&amp;[.J$2]&amp;[.$A34]&amp;[.J$3]&amp;[.$A34]&amp;[.J$4]&amp;[.$A34]&amp;[.J$5]&amp;[.$A34]&amp;[.J$6]&amp;[.$A34]&amp;[.J$7]&amp;[.$A34]&amp;[.J$8]&amp;[.$A34]&amp;[.J$9]&amp;[.$A34]&amp;[.J$10]&amp;[.$A34]&amp;[.J$11]&amp;[.$A34]&amp;[.J$12]&amp;[.$A34]&amp;[.J$13]&amp;[.$A34]&amp;[.J$14]&amp;[.$A34]&amp;[.J$15]&amp;[.$A34]&amp;[.J$16]&amp;[.$A34]&amp;[.J$17]&amp;[.$A34]&amp;[.J$18]&amp;[.$A34]&amp;[.J$19]&amp;[.$A34]&amp;[.J$20]&amp;[.$A34]&amp;[.J$21]&amp;[.$A34]&amp;[.J$22]&amp;[.$A34]&amp;[.J$23]&amp;[.$A34]&amp;[.J$24]&amp;[.$A34]&amp;[.J$25]" office:value-type="string" office:string-value="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">
            <text:p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/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4" office:value-type="string">
            <text:p>Full Test →</text:p>
          </table:table-cell>
          <table:table-cell table:formula="of:=[.B33]&amp;[.B34]&amp;CHAR(13)&amp;[.B35]" office:value-type="string" office:string-value="&quot;decreasing 1.0&quot; in { test(&quot;1.0&quot;, &quot;&quot;&quot;&#13;          1.0. Step:1.0&#13;            1. N&#13;            2. Step:1&#13;            3. Step:2&#13;              a. Step:a&#13;                i. Step:i&#13;                ii. Step:ii&#13;                iii. Step:iii&#13;              b. Step:b&#13;              c. Step:c&#13;                i. Step:i&#13;                ii. Step:ii&#13;            4. Step:3&#13;              a. Step:a&#13;                i. Step:i&#13;              b. Step:b&#13;            5. Step:4&#13;          1.1. Step:1.1&#13;            1. Step:1&#13;            2. Step:2&#13;            3. Step:3&#13;          1.2. Step:1.2&#13;            1. Step:1&#13;            2. Step:2&#13;    &quot;&quot;&quot;)}&#13;&#13;">
            <text:p>"decreasing 1.0" in { test("1.0", """ <text:s text:c="9"/>1.0. Step:1.0 <text:s text:c="11"/>1. N <text:s text:c="11"/>2. Step:1 <text:s text:c="11"/>3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4. Step:3 <text:s text:c="13"/>a. Step:a <text:s text:c="15"/>i. Step:i <text:s text:c="13"/>b. Step:b <text:s text:c="11"/>5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C33]&amp;[.C34]&amp;CHAR(13)&amp;[.C35]" office:value-type="string" office:string-value="&quot;decreasing 1.1&quot; in { test(&quot;1.1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N&#13;            2. Step:1&#13;            3. Step:2&#13;            4. Step:3&#13;          1.2. Step:1.2&#13;            1. Step:1&#13;            2. Step:2&#13;    &quot;&quot;&quot;)}&#13;&#13;">
            <text:p>"decreasing 1.1" in { test("1.1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N <text:s text:c="11"/>2. Step:1 <text:s text:c="11"/>3. Step:2 <text:s text:c="11"/>4. Step:3 <text:s text:c="9"/>1.2. Step:1.2 <text:s text:c="11"/>1. Step:1 <text:s text:c="11"/>2. Step:2 <text:s text:c="3"/>""")}</text:p>
          </table:table-cell>
          <table:table-cell table:formula="of:=[.D33]&amp;[.D34]&amp;CHAR(13)&amp;[.D35]" office:value-type="string" office:string-value="&quot;decreasing 1.0.2&quot; in { test(&quot;1.0.2&quot;, &quot;&quot;&quot;&#13;          1.0. Step:1.0&#13;            1. Step:1&#13;            2. Step:2&#13;              a. N&#13;              b. Step:a&#13;                i. Step:i&#13;                ii. Step:ii&#13;                iii. Step:iii&#13;              c. Step:b&#13;              d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" in { test("1.0.2", """ <text:s text:c="9"/>1.0. Step:1.0 <text:s text:c="11"/>1. Step:1 <text:s text:c="11"/>2. Step:2 <text:s text:c="13"/>a. N <text:s text:c="13"/>b. Step:a <text:s text:c="15"/>i. Step:i <text:s text:c="15"/>ii. Step:ii <text:s text:c="15"/>iii. Step:iii <text:s text:c="13"/>c. Step:b <text:s text:c="13"/>d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E33]&amp;[.E34]&amp;CHAR(13)&amp;[.E35]" office:value-type="string" office:string-value="&quot;decreasing 1.1.2&quot; in { test(&quot;1.1.2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N&#13;            4. Step:3&#13;          1.2. Step:1.2&#13;            1. Step:1&#13;            2. Step:2&#13;    &quot;&quot;&quot;)}&#13;&#13;">
            <text:p>"decreasing 1.1.2" in { test("1.1.2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N <text:s text:c="11"/>4. Step:3 <text:s text:c="9"/>1.2. Step:1.2 <text:s text:c="11"/>1. Step:1 <text:s text:c="11"/>2. Step:2 <text:s text:c="3"/>""")}</text:p>
          </table:table-cell>
          <table:table-cell table:formula="of:=[.F33]&amp;[.F34]&amp;CHAR(13)&amp;[.F35]" office:value-type="string" office:string-value="&quot;decreasing 1.0.2.a&quot; in { test(&quot;1.0.2.a&quot;, &quot;&quot;&quot;&#13;          1.0. Step:1.0&#13;            1. Step:1&#13;            2. Step:2&#13;              a. Step:a&#13;                i. N&#13;                ii. Step:i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.a" in { test("1.0.2.a", """ <text:s text:c="9"/>1.0. Step:1.0 <text:s text:c="11"/>1. Step:1 <text:s text:c="11"/>2. Step:2 <text:s text:c="13"/>a. Step:a <text:s text:c="15"/>i. N <text:s text:c="15"/>ii. Step:i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G33]&amp;[.G34]&amp;CHAR(13)&amp;[.G35]" office:value-type="string" office:string-value="&quot;decreasing 1.0.2.a.i&quot; in { test(&quot;1.0.2.a.i&quot;, &quot;&quot;&quot;&#13;          1.0. Step:1.0&#13;            1. Step:1&#13;            2. Step:2&#13;              a. Step:a&#13;                i. Step:i&#13;                ii. N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.a.i" in { test("1.0.2.a.i", """ <text:s text:c="9"/>1.0. Step:1.0 <text:s text:c="11"/>1. Step:1 <text:s text:c="11"/>2. Step:2 <text:s text:c="13"/>a. Step:a <text:s text:c="15"/>i. Step:i <text:s text:c="15"/>ii. N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H33]&amp;[.H34]&amp;CHAR(13)&amp;[.H35]" office:value-type="string" office:string-value="&quot;decreasing 1.0.2.c.ii&quot; in { test(&quot;1.0.2.c.ii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    iii. N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.c.ii" in { test("1.0.2.c.ii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5"/>iii. N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I33]&amp;[.I34]&amp;CHAR(13)&amp;[.I35]" office:value-type="string" office:string-value="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">
            <text:p>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</text:p>
          </table:table-cell>
          <table:table-cell table:formula="of:=[.J33]&amp;[.J34]&amp;CHAR(13)&amp;[.J35]" office:value-type="string" office:string-value="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">
            <text:p>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</text:p>
          </table:table-cell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All Tests →</text:p>
          </table:table-cell>
          <table:table-cell table:formula="of:=[.B36]&amp;[.C36]&amp;[.D36]&amp;[.E36]&amp;[.F36]&amp;[.G36]&amp;[.H36]&amp;[.I36]&amp;[.J36]" office:value-type="string" office:string-value="&quot;decreasing 1.0&quot; in { test(&quot;1.0&quot;, &quot;&quot;&quot;&#13;          1.0. Step:1.0&#13;            1. N&#13;            2. Step:1&#13;            3. Step:2&#13;              a. Step:a&#13;                i. Step:i&#13;                ii. Step:ii&#13;                iii. Step:iii&#13;              b. Step:b&#13;              c. Step:c&#13;                i. Step:i&#13;                ii. Step:ii&#13;            4. Step:3&#13;              a. Step:a&#13;                i. Step:i&#13;              b. Step:b&#13;            5. Step:4&#13;          1.1. Step:1.1&#13;            1. Step:1&#13;            2. Step:2&#13;            3. Step:3&#13;          1.2. Step:1.2&#13;            1. Step:1&#13;            2. Step:2&#13;    &quot;&quot;&quot;)}&#13;&#13;&quot;decreasing 1.1&quot; in { test(&quot;1.1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N&#13;            2. Step:1&#13;            3. Step:2&#13;            4. Step:3&#13;          1.2. Step:1.2&#13;            1. Step:1&#13;            2. Step:2&#13;    &quot;&quot;&quot;)}&#13;&#13;&quot;decreasing 1.0.2&quot; in { test(&quot;1.0.2&quot;, &quot;&quot;&quot;&#13;          1.0. Step:1.0&#13;            1. Step:1&#13;            2. Step:2&#13;              a. N&#13;              b. Step:a&#13;                i. Step:i&#13;                ii. Step:ii&#13;                iii. Step:iii&#13;              c. Step:b&#13;              d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1.1.2&quot; in { test(&quot;1.1.2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N&#13;            4. Step:3&#13;          1.2. Step:1.2&#13;            1. Step:1&#13;            2. Step:2&#13;    &quot;&quot;&quot;)}&#13;&#13;&quot;decreasing 1.0.2.a&quot; in { test(&quot;1.0.2.a&quot;, &quot;&quot;&quot;&#13;          1.0. Step:1.0&#13;            1. Step:1&#13;            2. Step:2&#13;              a. Step:a&#13;                i. N&#13;                ii. Step:i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1.0.2.a.i&quot; in { test(&quot;1.0.2.a.i&quot;, &quot;&quot;&quot;&#13;          1.0. Step:1.0&#13;            1. Step:1&#13;            2. Step:2&#13;              a. Step:a&#13;                i. Step:i&#13;                ii. N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1.0.2.c.ii&quot; in { test(&quot;1.0.2.c.ii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    iii. N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">
            <text:p>"decreasing 1.0" in { test("1.0", """ <text:s text:c="9"/>1.0. Step:1.0 <text:s text:c="11"/>1. N <text:s text:c="11"/>2. Step:1 <text:s text:c="11"/>3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4. Step:3 <text:s text:c="13"/>a. Step:a <text:s text:c="15"/>i. Step:i <text:s text:c="13"/>b. Step:b <text:s text:c="11"/>5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1" in { test("1.1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N <text:s text:c="11"/>2. Step:1 <text:s text:c="11"/>3. Step:2 <text:s text:c="11"/>4. Step:3 <text:s text:c="9"/>1.2. Step:1.2 <text:s text:c="11"/>1. Step:1 <text:s text:c="11"/>2. Step:2 <text:s text:c="3"/>""")}"decreasing 1.0.2" in { test("1.0.2", """ <text:s text:c="9"/>1.0. Step:1.0 <text:s text:c="11"/>1. Step:1 <text:s text:c="11"/>2. Step:2 <text:s text:c="13"/>a. N <text:s text:c="13"/>b. Step:a <text:s text:c="15"/>i. Step:i <text:s text:c="15"/>ii. Step:ii <text:s text:c="15"/>iii. Step:iii <text:s text:c="13"/>c. Step:b <text:s text:c="13"/>d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1.2" in { test("1.1.2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N <text:s text:c="11"/>4. Step:3 <text:s text:c="9"/>1.2. Step:1.2 <text:s text:c="11"/>1. Step:1 <text:s text:c="11"/>2. Step:2 <text:s text:c="3"/>""")}"decreasing 1.0.2.a" in { test("1.0.2.a", """ <text:s text:c="9"/>1.0. Step:1.0 <text:s text:c="11"/>1. Step:1 <text:s text:c="11"/>2. Step:2 <text:s text:c="13"/>a. Step:a <text:s text:c="15"/>i. N <text:s text:c="15"/>ii. Step:i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0.2.a.i" in { test("1.0.2.a.i", """ <text:s text:c="9"/>1.0. Step:1.0 <text:s text:c="11"/>1. Step:1 <text:s text:c="11"/>2. Step:2 <text:s text:c="13"/>a. Step:a <text:s text:c="15"/>i. Step:i <text:s text:c="15"/>ii. N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0.2.c.ii" in { test("1.0.2.c.ii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5"/>iii. N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entDecrease()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1.0.3.b</text:p>
          </table:table-cell>
          <table:table-cell table:style-name="ce1" office:value-type="string">
            <text:p>1.0.3.a</text:p>
          </table:table-cell>
          <table:table-cell table:style-name="ce1" office:value-type="string">
            <text:p>1.0.3.a.i</text:p>
          </table:table-cell>
          <table:table-cell table:style-name="ce1" office:value-type="string">
            <text:p>1.0.2.a</text:p>
          </table:table-cell>
          <table:table-cell table:style-name="ce1" office:value-type="string">
            <text:p>1.0.2.a.i</text:p>
          </table:table-cell>
          <table:table-cell table:style-name="ce1" office:value-type="string">
            <text:p>1.0.2.a.ii</text:p>
          </table:table-cell>
          <table:table-cell table:style-name="ce1" office:value-type="string">
            <text:p>1.0.2.a.iii</text:p>
          </table:table-cell>
          <table:table-cell table:style-name="ce1" office:value-type="string">
            <text:p>1.1.2</text:p>
          </table:table-cell>
          <table:table-cell table:style-name="ce1" office:value-type="string">
            <text:p>1.0.2.b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1.0. Step:1.0</text:p>
          </table:table-cell>
          <table:table-cell table:number-columns-repeated="2" table:style-name="ce8" office:value-type="string">
            <text:p>1.0. Step:1.0</text:p>
          </table:table-cell>
          <table:table-cell table:style-name="ce5" office:value-type="string">
            <text:p>1.0. Step:1.0</text:p>
          </table:table-cell>
          <table:table-cell table:style-name="ce8" office:value-type="string">
            <text:p>1.0. Step:1.0</text:p>
          </table:table-cell>
          <table:table-cell table:number-columns-repeated="4" table:style-name="ce5" office:value-type="string">
            <text:p>1.0. Step:1.0</text:p>
          </table:table-cell>
          <table:table-cell table:style-name="ce8" office:value-type="string">
            <text:p>1.0. Step:1.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9" table:style-name="ce5" office:value-type="string">
            <text:p><text:s text:c="2"/>1. Step: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4" table:style-name="ce5" office:value-type="string">
            <text:p><text:s text:c="2"/>2. Step:2</text:p>
          </table:table-cell>
          <table:table-cell table:number-columns-repeated="3" table:style-name="ce8" office:value-type="string">
            <text:p><text:s text:c="2"/>2. Step:2</text:p>
          </table:table-cell>
          <table:table-cell table:number-columns-repeated="2" table:style-name="ce5" office:value-type="string">
            <text:p><text:s text:c="2"/>2. Step: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number-columns-repeated="3" table:style-name="ce5" office:value-type="string">
            <text:p><text:s text:c="4"/>a. Step:a</text:p>
          </table:table-cell>
          <table:table-cell table:style-name="ce6" office:value-type="string">
            <text:p><text:s text:c="2"/>3. Step:a</text:p>
          </table:table-cell>
          <table:table-cell table:number-columns-repeated="5" table:style-name="ce5" office:value-type="string">
            <text:p><text:s text:c="4"/>a. Step:a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number-columns-repeated="3" table:style-name="ce5" office:value-type="string">
            <text:p><text:s text:c="6"/>i. Step:i</text:p>
          </table:table-cell>
          <table:table-cell table:style-name="ce6" office:value-type="string">
            <text:p><text:s text:c="4"/>a. Step:i</text:p>
          </table:table-cell>
          <table:table-cell table:style-name="ce6" office:value-type="string">
            <text:p><text:s text:c="4"/>b. Step:i</text:p>
          </table:table-cell>
          <table:table-cell table:number-columns-repeated="4" table:style-name="ce5" office:value-type="string">
            <text:p><text:s text:c="6"/>i. Step: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number-columns-repeated="3" table:style-name="ce5" office:value-type="string">
            <text:p><text:s text:c="6"/>ii. Step:ii</text:p>
          </table:table-cell>
          <table:table-cell table:style-name="ce6" office:value-type="string">
            <text:p><text:s text:c="4"/>b. Step:ii</text:p>
          </table:table-cell>
          <table:table-cell table:style-name="ce7" office:value-type="string">
            <text:p><text:s text:c="6"/>i. Step:ii</text:p>
          </table:table-cell>
          <table:table-cell table:style-name="ce6" office:value-type="string">
            <text:p><text:s text:c="4"/>b. Step:ii</text:p>
          </table:table-cell>
          <table:table-cell table:number-columns-repeated="3" table:style-name="ce5" office:value-type="string">
            <text:p><text:s text:c="6"/>ii. Step:i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ii. Step:iii</text:p>
          </table:table-cell>
          <table:table-cell table:number-columns-repeated="3" table:style-name="ce5" office:value-type="string">
            <text:p><text:s text:c="6"/>iii. Step:iii</text:p>
          </table:table-cell>
          <table:table-cell table:style-name="ce6" office:value-type="string">
            <text:p><text:s text:c="4"/>c. Step:iii</text:p>
          </table:table-cell>
          <table:table-cell table:style-name="ce7" office:value-type="string">
            <text:p><text:s text:c="6"/>ii. Step:iii</text:p>
          </table:table-cell>
          <table:table-cell table:style-name="ce7" office:value-type="string">
            <text:p><text:s text:c="6"/>i. Step:iii</text:p>
          </table:table-cell>
          <table:table-cell table:style-name="ce6" office:value-type="string">
            <text:p><text:s text:c="4"/>b. Step:iii</text:p>
          </table:table-cell>
          <table:table-cell table:number-columns-repeated="2" table:style-name="ce5" office:value-type="string">
            <text:p><text:s text:c="6"/>iii. Step:ii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number-columns-repeated="3" table:style-name="ce5" office:value-type="string">
            <text:p><text:s text:c="4"/>b. Step:b</text:p>
          </table:table-cell>
          <table:table-cell table:style-name="ce7" office:value-type="string">
            <text:p><text:s text:c="4"/>d. Step:b</text:p>
          </table:table-cell>
          <table:table-cell table:number-columns-repeated="3" table:style-name="ce7" office:value-type="string">
            <text:p><text:s text:c="4"/>c. Step:b</text:p>
          </table:table-cell>
          <table:table-cell table:style-name="ce5" office:value-type="string">
            <text:p><text:s text:c="4"/>b. Step:b</text:p>
          </table:table-cell>
          <table:table-cell table:style-name="ce6" office:value-type="string">
            <text:p><text:s text:c="2"/>3. Step: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4"/>c. Step:c</text:p>
          </table:table-cell>
          <table:table-cell table:number-columns-repeated="3" table:style-name="ce5" office:value-type="string">
            <text:p><text:s text:c="4"/>c. Step:c</text:p>
          </table:table-cell>
          <table:table-cell table:style-name="ce7" office:value-type="string">
            <text:p><text:s text:c="4"/>e. Step:c</text:p>
          </table:table-cell>
          <table:table-cell table:number-columns-repeated="3" table:style-name="ce7" office:value-type="string">
            <text:p><text:s text:c="4"/>d. Step:c</text:p>
          </table:table-cell>
          <table:table-cell table:style-name="ce5" office:value-type="string">
            <text:p><text:s text:c="4"/>c. Step:c</text:p>
          </table:table-cell>
          <table:table-cell table:style-name="ce7" office:value-type="string">
            <text:p><text:s text:c="4"/>a. Step:c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number-columns-repeated="9" table:style-name="ce5" office:value-type="string">
            <text:p><text:s text:c="6"/>i. Step: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number-columns-repeated="9" table:style-name="ce5" office:value-type="string">
            <text:p><text:s text:c="6"/>ii. Step:i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number-columns-repeated="2" table:style-name="ce5" office:value-type="string">
            <text:p><text:s text:c="2"/>3. Step:3</text:p>
          </table:table-cell>
          <table:table-cell table:style-name="ce8" office:value-type="string">
            <text:p><text:s text:c="2"/>3. Step:3</text:p>
          </table:table-cell>
          <table:table-cell table:style-name="ce7" office:value-type="string">
            <text:p><text:s text:c="2"/>4. Step:3</text:p>
          </table:table-cell>
          <table:table-cell table:number-columns-repeated="4" table:style-name="ce5" office:value-type="string">
            <text:p><text:s text:c="2"/>3. Step:3</text:p>
          </table:table-cell>
          <table:table-cell table:style-name="ce7" office:value-type="string">
            <text:p><text:s text:c="2"/>4. Step: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5" office:value-type="string">
            <text:p><text:s text:c="4"/>a. Step:a</text:p>
          </table:table-cell>
          <table:table-cell table:style-name="ce6" office:value-type="string">
            <text:p><text:s text:c="2"/>4. Step:a</text:p>
          </table:table-cell>
          <table:table-cell table:number-columns-repeated="7" table:style-name="ce5" office:value-type="string">
            <text:p><text:s text:c="4"/>a. Step:a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6"/>i. Step:i</text:p>
          </table:table-cell>
          <table:table-cell table:style-name="ce6" office:value-type="string">
            <text:p><text:s text:c="4"/>a. Step:i</text:p>
          </table:table-cell>
          <table:table-cell table:style-name="ce6" office:value-type="string">
            <text:p><text:s text:c="4"/>b. Step:i</text:p>
          </table:table-cell>
          <table:table-cell table:number-columns-repeated="6" table:style-name="ce5" office:value-type="string">
            <text:p><text:s text:c="6"/>i. Step: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6" office:value-type="string">
            <text:p><text:s text:c="2"/>4. Step:b</text:p>
          </table:table-cell>
          <table:table-cell table:style-name="ce7" office:value-type="string">
            <text:p><text:s text:c="4"/>b. Step:b</text:p>
          </table:table-cell>
          <table:table-cell table:style-name="ce7" office:value-type="string">
            <text:p><text:s text:c="4"/>c. Step:b</text:p>
          </table:table-cell>
          <table:table-cell table:number-columns-repeated="6" table:style-name="ce5" office:value-type="string">
            <text:p><text:s text:c="4"/>b. Step: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4. Step:4</text:p>
          </table:table-cell>
          <table:table-cell table:number-columns-repeated="2" table:style-name="ce7" office:value-type="string">
            <text:p><text:s text:c="2"/>5. Step:4</text:p>
          </table:table-cell>
          <table:table-cell table:style-name="ce5" office:value-type="string">
            <text:p><text:s text:c="2"/>4. Step:4</text:p>
          </table:table-cell>
          <table:table-cell table:style-name="ce7" office:value-type="string">
            <text:p><text:s text:c="2"/>5. Step:4</text:p>
          </table:table-cell>
          <table:table-cell table:number-columns-repeated="4" table:style-name="ce5" office:value-type="string">
            <text:p><text:s text:c="2"/>4. Step:4</text:p>
          </table:table-cell>
          <table:table-cell table:style-name="ce7" office:value-type="string">
            <text:p><text:s text:c="2"/>5. Step: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.1. Step:1.1</text:p>
          </table:table-cell>
          <table:table-cell table:number-columns-repeated="9" table:style-name="ce5" office:value-type="string">
            <text:p>1.1. Step:1.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9" table:style-name="ce5" office:value-type="string">
            <text:p><text:s text:c="2"/>1. Step: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7" table:style-name="ce5" office:value-type="string">
            <text:p><text:s text:c="2"/>2. Step:2</text:p>
          </table:table-cell>
          <table:table-cell table:style-name="ce6" office:value-type="string">
            <text:p>1.2. Step:2</text:p>
          </table:table-cell>
          <table:table-cell table:style-name="ce5" office:value-type="string">
            <text:p><text:s text:c="2"/>2. Step: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number-columns-repeated="7" table:style-name="ce5" office:value-type="string">
            <text:p><text:s text:c="2"/>3. Step:3</text:p>
          </table:table-cell>
          <table:table-cell table:style-name="ce7" office:value-type="string">
            <text:p><text:s text:c="2"/>1. Step:3</text:p>
          </table:table-cell>
          <table:table-cell table:style-name="ce5" office:value-type="string">
            <text:p><text:s text:c="2"/>3. Step: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.2. Step:1.2</text:p>
          </table:table-cell>
          <table:table-cell table:number-columns-repeated="7" table:style-name="ce5" office:value-type="string">
            <text:p>1.2. Step:1.2</text:p>
          </table:table-cell>
          <table:table-cell table:style-name="ce7" office:value-type="string">
            <text:p>1.3. Step:1.2</text:p>
          </table:table-cell>
          <table:table-cell table:style-name="ce5" office:value-type="string">
            <text:p>1.2. Step:1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9" table:style-name="ce5" office:value-type="string">
            <text:p><text:s text:c="2"/>1. Step: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9" table:style-name="ce5" office:value-type="string">
            <text:p><text:s text:c="2"/>2. Step:2</text:p>
          </table:table-cell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3" table:formula="of:=&quot;&quot;&quot;decreasing &quot;&amp;[.B$1]&amp;&quot;&quot;&quot; in { test(&quot;&quot;&quot;&amp;[.B$1]&amp;&quot;&quot;&quot;, &quot;&quot;&quot;&quot;&quot;&quot;&quot;" office:value-type="string" office:string-value="&quot;decreasing 1.0.3.b&quot; in { test(&quot;1.0.3.b&quot;, &quot;&quot;&quot;">
            <text:p>"decreasing 1.0.3.b" in { test("1.0.3.b", """</text:p>
          </table:table-cell>
          <table:table-cell table:style-name="ce3" table:formula="of:=&quot;&quot;&quot;decreasing &quot;&amp;[.C$1]&amp;&quot;&quot;&quot; in { test(&quot;&quot;&quot;&amp;[.C$1]&amp;&quot;&quot;&quot;, &quot;&quot;&quot;&quot;&quot;&quot;&quot;" office:value-type="string" office:string-value="&quot;decreasing 1.0.3.a&quot; in { test(&quot;1.0.3.a&quot;, &quot;&quot;&quot;">
            <text:p>"decreasing 1.0.3.a" in { test("1.0.3.a", """</text:p>
          </table:table-cell>
          <table:table-cell table:style-name="ce3" table:formula="of:=&quot;&quot;&quot;decreasing &quot;&amp;[.D$1]&amp;&quot;&quot;&quot; in { test(&quot;&quot;&quot;&amp;[.D$1]&amp;&quot;&quot;&quot;, &quot;&quot;&quot;&quot;&quot;&quot;&quot;" office:value-type="string" office:string-value="&quot;decreasing 1.0.3.a.i&quot; in { test(&quot;1.0.3.a.i&quot;, &quot;&quot;&quot;">
            <text:p>"decreasing 1.0.3.a.i" in { test("1.0.3.a.i", """</text:p>
          </table:table-cell>
          <table:table-cell table:style-name="ce3" table:formula="of:=&quot;&quot;&quot;decreasing &quot;&amp;[.E$1]&amp;&quot;&quot;&quot; in { test(&quot;&quot;&quot;&amp;[.E$1]&amp;&quot;&quot;&quot;, &quot;&quot;&quot;&quot;&quot;&quot;&quot;" office:value-type="string" office:string-value="&quot;decreasing 1.0.2.a&quot; in { test(&quot;1.0.2.a&quot;, &quot;&quot;&quot;">
            <text:p>"decreasing 1.0.2.a" in { test("1.0.2.a", """</text:p>
          </table:table-cell>
          <table:table-cell table:style-name="ce3" table:formula="of:=&quot;&quot;&quot;decreasing &quot;&amp;[.F$1]&amp;&quot;&quot;&quot; in { test(&quot;&quot;&quot;&amp;[.F$1]&amp;&quot;&quot;&quot;, &quot;&quot;&quot;&quot;&quot;&quot;&quot;" office:value-type="string" office:string-value="&quot;decreasing 1.0.2.a.i&quot; in { test(&quot;1.0.2.a.i&quot;, &quot;&quot;&quot;">
            <text:p>"decreasing 1.0.2.a.i" in { test("1.0.2.a.i", """</text:p>
          </table:table-cell>
          <table:table-cell table:style-name="ce3" table:formula="of:=&quot;&quot;&quot;decreasing &quot;&amp;[.G$1]&amp;&quot;&quot;&quot; in { test(&quot;&quot;&quot;&amp;[.G$1]&amp;&quot;&quot;&quot;, &quot;&quot;&quot;&quot;&quot;&quot;&quot;" office:value-type="string" office:string-value="&quot;decreasing 1.0.2.a.ii&quot; in { test(&quot;1.0.2.a.ii&quot;, &quot;&quot;&quot;">
            <text:p>"decreasing 1.0.2.a.ii" in { test("1.0.2.a.ii", """</text:p>
          </table:table-cell>
          <table:table-cell table:style-name="ce3" table:formula="of:=&quot;&quot;&quot;decreasing &quot;&amp;[.H$1]&amp;&quot;&quot;&quot; in { test(&quot;&quot;&quot;&amp;[.H$1]&amp;&quot;&quot;&quot;, &quot;&quot;&quot;&quot;&quot;&quot;&quot;" office:value-type="string" office:string-value="&quot;decreasing 1.0.2.a.iii&quot; in { test(&quot;1.0.2.a.iii&quot;, &quot;&quot;&quot;">
            <text:p>"decreasing 1.0.2.a.iii" in { test("1.0.2.a.iii", """</text:p>
          </table:table-cell>
          <table:table-cell table:style-name="ce3" table:formula="of:=&quot;&quot;&quot;decreasing &quot;&amp;[.I$1]&amp;&quot;&quot;&quot; in { test(&quot;&quot;&quot;&amp;[.I$1]&amp;&quot;&quot;&quot;, &quot;&quot;&quot;&quot;&quot;&quot;&quot;" office:value-type="string" office:string-value="&quot;decreasing 1.1.2&quot; in { test(&quot;1.1.2&quot;, &quot;&quot;&quot;">
            <text:p>"decreasing 1.1.2" in { test("1.1.2", """</text:p>
          </table:table-cell>
          <table:table-cell table:style-name="ce3" table:formula="of:=&quot;&quot;&quot;decreasing &quot;&amp;[.J$1]&amp;&quot;&quot;&quot; in { test(&quot;&quot;&quot;&amp;[.J$1]&amp;&quot;&quot;&quot;, &quot;&quot;&quot;&quot;&quot;&quot;&quot;" office:value-type="string" office:string-value="&quot;decreasing 1.0.2.b&quot; in { test(&quot;1.0.2.b&quot;, &quot;&quot;&quot;">
            <text:p>"decreasing 1.0.2.b" in { test("1.0.2.b", """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 table:formula="of:=CHAR(13)&amp;&quot;        &quot;" office:value-type="string" office:string-value="&#13;        ">
            <text:p> <text:s text:c="7"/></text:p>
          </table:table-cell>
          <table:table-cell table:style-name="ce3" table:formula="of:=[.$A34]&amp;[.B$2]&amp;[.$A34]&amp;[.B$3]&amp;[.$A34]&amp;[.B$4]&amp;[.$A34]&amp;[.B$5]&amp;[.$A34]&amp;[.B$6]&amp;[.$A34]&amp;[.B$7]&amp;[.$A34]&amp;[.B$8]&amp;[.$A34]&amp;[.B$9]&amp;[.$A34]&amp;[.B$10]&amp;[.$A34]&amp;[.B$11]&amp;[.$A34]&amp;[.B$12]&amp;[.$A34]&amp;[.B$13]&amp;[.$A34]&amp;[.B$14]&amp;[.$A34]&amp;[.B$15]&amp;[.$A34]&amp;[.B$16]&amp;[.$A34]&amp;[.B$17]&amp;[.$A34]&amp;[.B$18]&amp;[.$A34]&amp;[.B$19]&amp;[.$A34]&amp;[.B$20]&amp;[.$A34]&amp;[.B$21]&amp;[.$A34]&amp;[.B$22]&amp;[.$A34]&amp;[.B$23]&amp;[.$A34]&amp;[.B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C$2]&amp;[.$A34]&amp;[.C$3]&amp;[.$A34]&amp;[.C$4]&amp;[.$A34]&amp;[.C$5]&amp;[.$A34]&amp;[.C$6]&amp;[.$A34]&amp;[.C$7]&amp;[.$A34]&amp;[.C$8]&amp;[.$A34]&amp;[.C$9]&amp;[.$A34]&amp;[.C$10]&amp;[.$A34]&amp;[.C$11]&amp;[.$A34]&amp;[.C$12]&amp;[.$A34]&amp;[.C$13]&amp;[.$A34]&amp;[.C$14]&amp;[.$A34]&amp;[.C$15]&amp;[.$A34]&amp;[.C$16]&amp;[.$A34]&amp;[.C$17]&amp;[.$A34]&amp;[.C$18]&amp;[.$A34]&amp;[.C$19]&amp;[.$A34]&amp;[.C$20]&amp;[.$A34]&amp;[.C$21]&amp;[.$A34]&amp;[.C$22]&amp;[.$A34]&amp;[.C$23]&amp;[.$A34]&amp;[.C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D$2]&amp;[.$A34]&amp;[.D$3]&amp;[.$A34]&amp;[.D$4]&amp;[.$A34]&amp;[.D$5]&amp;[.$A34]&amp;[.D$6]&amp;[.$A34]&amp;[.D$7]&amp;[.$A34]&amp;[.D$8]&amp;[.$A34]&amp;[.D$9]&amp;[.$A34]&amp;[.D$10]&amp;[.$A34]&amp;[.D$11]&amp;[.$A34]&amp;[.D$12]&amp;[.$A34]&amp;[.D$13]&amp;[.$A34]&amp;[.D$14]&amp;[.$A34]&amp;[.D$15]&amp;[.$A34]&amp;[.D$16]&amp;[.$A34]&amp;[.D$17]&amp;[.$A34]&amp;[.D$18]&amp;[.$A34]&amp;[.D$19]&amp;[.$A34]&amp;[.D$20]&amp;[.$A34]&amp;[.D$21]&amp;[.$A34]&amp;[.D$22]&amp;[.$A34]&amp;[.D$23]&amp;[.$A34]&amp;[.D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E$2]&amp;[.$A34]&amp;[.E$3]&amp;[.$A34]&amp;[.E$4]&amp;[.$A34]&amp;[.E$5]&amp;[.$A34]&amp;[.E$6]&amp;[.$A34]&amp;[.E$7]&amp;[.$A34]&amp;[.E$8]&amp;[.$A34]&amp;[.E$9]&amp;[.$A34]&amp;[.E$10]&amp;[.$A34]&amp;[.E$11]&amp;[.$A34]&amp;[.E$12]&amp;[.$A34]&amp;[.E$13]&amp;[.$A34]&amp;[.E$14]&amp;[.$A34]&amp;[.E$15]&amp;[.$A34]&amp;[.E$16]&amp;[.$A34]&amp;[.E$17]&amp;[.$A34]&amp;[.E$18]&amp;[.$A34]&amp;[.E$19]&amp;[.$A34]&amp;[.E$20]&amp;[.$A34]&amp;[.E$21]&amp;[.$A34]&amp;[.E$22]&amp;[.$A34]&amp;[.E$23]&amp;[.$A34]&amp;[.E$24]" office:value-type="string" office:string-value="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F$2]&amp;[.$A34]&amp;[.F$3]&amp;[.$A34]&amp;[.F$4]&amp;[.$A34]&amp;[.F$5]&amp;[.$A34]&amp;[.F$6]&amp;[.$A34]&amp;[.F$7]&amp;[.$A34]&amp;[.F$8]&amp;[.$A34]&amp;[.F$9]&amp;[.$A34]&amp;[.F$10]&amp;[.$A34]&amp;[.F$11]&amp;[.$A34]&amp;[.F$12]&amp;[.$A34]&amp;[.F$13]&amp;[.$A34]&amp;[.F$14]&amp;[.$A34]&amp;[.F$15]&amp;[.$A34]&amp;[.F$16]&amp;[.$A34]&amp;[.F$17]&amp;[.$A34]&amp;[.F$18]&amp;[.$A34]&amp;[.F$19]&amp;[.$A34]&amp;[.F$20]&amp;[.$A34]&amp;[.F$21]&amp;[.$A34]&amp;[.F$22]&amp;[.$A34]&amp;[.F$23]&amp;[.$A34]&amp;[.F$24]" office:value-type="string" office:string-value="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G$2]&amp;[.$A34]&amp;[.G$3]&amp;[.$A34]&amp;[.G$4]&amp;[.$A34]&amp;[.G$5]&amp;[.$A34]&amp;[.G$6]&amp;[.$A34]&amp;[.G$7]&amp;[.$A34]&amp;[.G$8]&amp;[.$A34]&amp;[.G$9]&amp;[.$A34]&amp;[.G$10]&amp;[.$A34]&amp;[.G$11]&amp;[.$A34]&amp;[.G$12]&amp;[.$A34]&amp;[.G$13]&amp;[.$A34]&amp;[.G$14]&amp;[.$A34]&amp;[.G$15]&amp;[.$A34]&amp;[.G$16]&amp;[.$A34]&amp;[.G$17]&amp;[.$A34]&amp;[.G$18]&amp;[.$A34]&amp;[.G$19]&amp;[.$A34]&amp;[.G$20]&amp;[.$A34]&amp;[.G$21]&amp;[.$A34]&amp;[.G$22]&amp;[.$A34]&amp;[.G$23]&amp;[.$A34]&amp;[.G$24]" office:value-type="string" office:string-value="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H$2]&amp;[.$A34]&amp;[.H$3]&amp;[.$A34]&amp;[.H$4]&amp;[.$A34]&amp;[.H$5]&amp;[.$A34]&amp;[.H$6]&amp;[.$A34]&amp;[.H$7]&amp;[.$A34]&amp;[.H$8]&amp;[.$A34]&amp;[.H$9]&amp;[.$A34]&amp;[.H$10]&amp;[.$A34]&amp;[.H$11]&amp;[.$A34]&amp;[.H$12]&amp;[.$A34]&amp;[.H$13]&amp;[.$A34]&amp;[.H$14]&amp;[.$A34]&amp;[.H$15]&amp;[.$A34]&amp;[.H$16]&amp;[.$A34]&amp;[.H$17]&amp;[.$A34]&amp;[.H$18]&amp;[.$A34]&amp;[.H$19]&amp;[.$A34]&amp;[.H$20]&amp;[.$A34]&amp;[.H$21]&amp;[.$A34]&amp;[.H$22]&amp;[.$A34]&amp;[.H$23]&amp;[.$A34]&amp;[.H$24]" office:value-type="string" office:string-value="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I$2]&amp;[.$A34]&amp;[.I$3]&amp;[.$A34]&amp;[.I$4]&amp;[.$A34]&amp;[.I$5]&amp;[.$A34]&amp;[.I$6]&amp;[.$A34]&amp;[.I$7]&amp;[.$A34]&amp;[.I$8]&amp;[.$A34]&amp;[.I$9]&amp;[.$A34]&amp;[.I$10]&amp;[.$A34]&amp;[.I$11]&amp;[.$A34]&amp;[.I$12]&amp;[.$A34]&amp;[.I$13]&amp;[.$A34]&amp;[.I$14]&amp;[.$A34]&amp;[.I$15]&amp;[.$A34]&amp;[.I$16]&amp;[.$A34]&amp;[.I$17]&amp;[.$A34]&amp;[.I$18]&amp;[.$A34]&amp;[.I$19]&amp;[.$A34]&amp;[.I$20]&amp;[.$A34]&amp;[.I$21]&amp;[.$A34]&amp;[.I$22]&amp;[.$A34]&amp;[.I$23]&amp;[.$A34]&amp;[.I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</text:p>
          </table:table-cell>
          <table:table-cell table:style-name="ce3" table:formula="of:=[.$A34]&amp;[.J$2]&amp;[.$A34]&amp;[.J$3]&amp;[.$A34]&amp;[.J$4]&amp;[.$A34]&amp;[.J$5]&amp;[.$A34]&amp;[.J$6]&amp;[.$A34]&amp;[.J$7]&amp;[.$A34]&amp;[.J$8]&amp;[.$A34]&amp;[.J$9]&amp;[.$A34]&amp;[.J$10]&amp;[.$A34]&amp;[.J$11]&amp;[.$A34]&amp;[.J$12]&amp;[.$A34]&amp;[.J$13]&amp;[.$A34]&amp;[.J$14]&amp;[.$A34]&amp;[.J$15]&amp;[.$A34]&amp;[.J$16]&amp;[.$A34]&amp;[.J$17]&amp;[.$A34]&amp;[.J$18]&amp;[.$A34]&amp;[.J$19]&amp;[.$A34]&amp;[.J$20]&amp;[.$A34]&amp;[.J$21]&amp;[.$A34]&amp;[.J$22]&amp;[.$A34]&amp;[.J$23]&amp;[.$A34]&amp;[.J$24]" office:value-type="string" office:string-value="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/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4" office:value-type="string">
            <text:p>Full Test →</text:p>
          </table:table-cell>
          <table:table-cell table:formula="of:=[.B33]&amp;[.B34]&amp;CHAR(13)&amp;[.B35]" office:value-type="string" office:string-value="&quot;de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C33]&amp;[.C34]&amp;CHAR(13)&amp;[.C35]" office:value-type="string" office:string-value="&quot;decreasing 1.0.3.a&quot; in { test(&quot;1.0.3.a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3.a" in { test("1.0.3.a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D33]&amp;[.D34]&amp;CHAR(13)&amp;[.D35]" office:value-type="string" office:string-value="&quot;decreasing 1.0.3.a.i&quot; in { test(&quot;1.0.3.a.i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3.a.i" in { test("1.0.3.a.i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E33]&amp;[.E34]&amp;CHAR(13)&amp;[.E35]" office:value-type="string" office:string-value="&quot;decreasing 1.0.2.a&quot; in { test(&quot;1.0.2.a&quot;, &quot;&quot;&quot;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2.a" in { test("1.0.2.a", """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F33]&amp;[.F34]&amp;CHAR(13)&amp;[.F35]" office:value-type="string" office:string-value="&quot;decreasing 1.0.2.a.i&quot; in { test(&quot;1.0.2.a.i&quot;, &quot;&quot;&quot;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" in { test("1.0.2.a.i", """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G33]&amp;[.G34]&amp;CHAR(13)&amp;[.G35]" office:value-type="string" office:string-value="&quot;decreasing 1.0.2.a.ii&quot; in { test(&quot;1.0.2.a.ii&quot;, &quot;&quot;&quot;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i" in { test("1.0.2.a.ii", """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H33]&amp;[.H34]&amp;CHAR(13)&amp;[.H35]" office:value-type="string" office:string-value="&quot;decreasing 1.0.2.a.iii&quot; in { test(&quot;1.0.2.a.iii&quot;, &quot;&quot;&quot;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ii" in { test("1.0.2.a.iii", """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I33]&amp;[.I34]&amp;CHAR(13)&amp;[.I35]" office:value-type="string" office:string-value="&quot;de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&#13;    &quot;&quot;&quot;)}&#13;&#13;">
            <text:p>"de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 <text:s text:c="3"/>""")}</text:p>
          </table:table-cell>
          <table:table-cell table:formula="of:=[.J33]&amp;[.J34]&amp;CHAR(13)&amp;[.J35]" office:value-type="string" office:string-value="&quot;decreasing 1.0.2.b&quot; in { test(&quot;1.0.2.b&quot;, &quot;&quot;&quot;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2.b" in { test("1.0.2.b", """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All Tests →</text:p>
          </table:table-cell>
          <table:table-cell table:formula="of:=[.B36]&amp;[.C36]&amp;[.D36]&amp;[.E36]&amp;[.F36]&amp;[.G36]&amp;[.H36]&amp;[.I36]&amp;[.J36]" office:value-type="string" office:string-value="&quot;de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&#13;    &quot;&quot;&quot;)}&#13;&#13;&quot;decreasing 1.0.3.a&quot; in { test(&quot;1.0.3.a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&#13;    &quot;&quot;&quot;)}&#13;&#13;&quot;decreasing 1.0.3.a.i&quot; in { test(&quot;1.0.3.a.i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&#13;    &quot;&quot;&quot;)}&#13;&#13;&quot;decreasing 1.0.2.a&quot; in { test(&quot;1.0.2.a&quot;, &quot;&quot;&quot;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&quot;decreasing 1.0.2.a.i&quot; in { test(&quot;1.0.2.a.i&quot;, &quot;&quot;&quot;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0.2.a.ii&quot; in { test(&quot;1.0.2.a.ii&quot;, &quot;&quot;&quot;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0.2.a.iii&quot; in { test(&quot;1.0.2.a.iii&quot;, &quot;&quot;&quot;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&#13;    &quot;&quot;&quot;)}&#13;&#13;&quot;decreasing 1.0.2.b&quot; in { test(&quot;1.0.2.b&quot;, &quot;&quot;&quot;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3.a" in { test("1.0.3.a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3.a.i" in { test("1.0.3.a.i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" in { test("1.0.2.a", """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" in { test("1.0.2.a.i", """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i" in { test("1.0.2.a.ii", """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ii" in { test("1.0.2.a.iii", """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 <text:s text:c="3"/>""")}"decreasing 1.0.2.b" in { test("1.0.2.b", """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08:41:08</meta:creation-date>
    <dc:date>2013-05-06T17:42:18</dc:date>
    <meta:editing-duration>PT8H18M58S</meta:editing-duration>
    <meta:editing-cycles>6</meta:editing-cycles>
    <meta:generator>LibreOffice/4.0.2.2$Linux_X86_64 LibreOffice_project/400m0$Build-2</meta:generator>
    <meta:document-statistic meta:table-count="2" meta:cell-count="579" meta:object-count="0"/>
  </office:meta>
</office:document-meta>
</file>
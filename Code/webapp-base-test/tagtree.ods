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0.91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131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082cm"/>
    </style:style>
    <style:style style:name="co11" style:family="table-column">
      <style:table-column-properties fo:break-before="auto" style:column-width="4.6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latte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Good</text:p>
          </table:table-cell>
          <table:table-cell office:value-type="string" calcext:value-type="string">
            <text:p>Good kids</text:p>
          </table:table-cell>
          <table:table-cell/>
          <table:table-cell office:value-type="string" calcext:value-type="string">
            <text:p>OmitNothing</text:p>
          </table:table-cell>
          <table:table-cell table:style-name="ce3" office:value-type="string" calcext:value-type="string">
            <text:p>OmitBadBranches</text:p>
          </table:table-cell>
          <table:table-cell table:style-name="ce3" office:value-type="string" calcext:value-type="string">
            <text:p>OmitAnythingWithBadParent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C2]&amp;[.D2]&amp;[.E2]&amp;[.F2]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</text:p>
          </table:table-cell>
          <table:table-cell table:number-columns-repeated="2" table:style-name="ce3" office:value-type="string" calcext:value-type="string">
            <text:p>G</text:p>
          </table:table-cell>
          <table:table-cell/>
          <table:table-cell table:formula="of:=&quot;t(&quot;&amp;[.A2]&amp;&quot;, &quot;&quot;&quot;&amp;[.B2]&amp;&quot;&quot;&quot;)(),&quot;" office:value-type="string" office:string-value="t(1, &quot;A&quot;)()," calcext:value-type="string">
            <text:p>t(1, "A")(),</text:p>
          </table:table-cell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1" table:formula="of:=[.C3]&amp;[.D3]&amp;[.E3]&amp;[.F3]" office:value-type="string" office:string-value="B*" calcext:value-type="string">
            <text:p>B*</text:p>
          </table:table-cell>
          <table:table-cell/>
          <table:table-cell office:value-type="string" calcext:value-type="string">
            <text:p>B*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PGK</text:p>
          </table:table-cell>
          <table:table-cell table:style-name="ce3" office:value-type="string" calcext:value-type="string">
            <text:p>BPGK</text:p>
          </table:table-cell>
          <table:table-cell table:style-name="ce3" office:value-type="string" calcext:value-type="string">
            <text:p>-</text:p>
          </table:table-cell>
          <table:table-cell/>
          <table:table-cell table:formula="of:=&quot;t(&quot;&amp;[.A3]&amp;&quot;, &quot;&quot;&quot;&amp;[.B3]&amp;&quot;&quot;&quot;)(),&quot;" office:value-type="string" office:string-value="t(2, &quot;B*&quot;)()," calcext:value-type="string">
            <text:p>t(2, "B*")(),</text:p>
          </table:table-cell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1" table:formula="of:=[.C4]&amp;[.D4]&amp;[.E4]&amp;[.F4]" office:value-type="string" office:string-value="X*" calcext:value-type="string">
            <text:p>X*</text:p>
          </table:table-cell>
          <table:table-cell table:number-columns-repeated="2"/>
          <table:table-cell office:value-type="string" calcext:value-type="string">
            <text:p>X*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PGK</text:p>
          </table:table-cell>
          <table:table-cell table:style-name="ce3" office:value-type="string" calcext:value-type="string">
            <text:p>BPGK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4]&amp;&quot;, &quot;&quot;&quot;&amp;[.B4]&amp;&quot;&quot;&quot;)(),&quot;" office:value-type="string" office:string-value="t(3, &quot;X*&quot;)()," calcext:value-type="string">
            <text:p>t(3, "X*")(),</text:p>
          </table:table-cell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1" table:formula="of:=[.C5]&amp;[.D5]&amp;[.E5]&amp;[.F5]" office:value-type="string" office:string-value="XA" calcext:value-type="string">
            <text:p>XA</text:p>
          </table:table-cell>
          <table:table-cell table:number-columns-repeated="3"/>
          <table:table-cell office:value-type="string" calcext:value-type="string">
            <text:p>XA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5]&amp;&quot;, &quot;&quot;&quot;&amp;[.B5]&amp;&quot;&quot;&quot;)(),&quot;" office:value-type="string" office:string-value="t(4, &quot;XA&quot;)()," calcext:value-type="string">
            <text:p>t(4, "XA")(),</text:p>
          </table:table-cell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1" table:formula="of:=[.C6]&amp;[.D6]&amp;[.E6]&amp;[.F6]" office:value-type="string" office:string-value="XB" calcext:value-type="string">
            <text:p>XB</text:p>
          </table:table-cell>
          <table:table-cell table:number-columns-repeated="3"/>
          <table:table-cell office:value-type="string" calcext:value-type="string">
            <text:p>XB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6]&amp;&quot;, &quot;&quot;&quot;&amp;[.B6]&amp;&quot;&quot;&quot;)(),&quot;" office:value-type="string" office:string-value="t(5, &quot;XB&quot;)()," calcext:value-type="string">
            <text:p>t(5, "XB")(),</text:p>
          </table:table-cell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1" table:formula="of:=[.C7]&amp;[.D7]&amp;[.E7]&amp;[.F7]" office:value-type="string" office:string-value="Y*" calcext:value-type="string">
            <text:p>Y*</text:p>
          </table:table-cell>
          <table:table-cell table:number-columns-repeated="2"/>
          <table:table-cell office:value-type="string" calcext:value-type="string">
            <text:p>Y*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7]&amp;&quot;, &quot;&quot;&quot;&amp;[.B7]&amp;&quot;&quot;&quot;)(),&quot;" office:value-type="string" office:string-value="t(6, &quot;Y*&quot;)()," calcext:value-type="string">
            <text:p>t(6, "Y*")(),</text:p>
          </table:table-cell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1" table:formula="of:=[.C8]&amp;[.D8]&amp;[.E8]&amp;[.F8]" office:value-type="string" office:string-value="YA*" calcext:value-type="string">
            <text:p>YA*</text:p>
          </table:table-cell>
          <table:table-cell table:number-columns-repeated="3"/>
          <table:table-cell office:value-type="string" calcext:value-type="string">
            <text:p>YA*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8]&amp;&quot;, &quot;&quot;&quot;&amp;[.B8]&amp;&quot;&quot;&quot;)(),&quot;" office:value-type="string" office:string-value="t(7, &quot;YA*&quot;)()," calcext:value-type="string">
            <text:p>t(7, "YA*")(),</text:p>
          </table:table-cell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1" table:formula="of:=[.C9]&amp;[.D9]&amp;[.E9]&amp;[.F9]" office:value-type="string" office:string-value="YB*" calcext:value-type="string">
            <text:p>YB*</text:p>
          </table:table-cell>
          <table:table-cell table:number-columns-repeated="3"/>
          <table:table-cell office:value-type="string" calcext:value-type="string">
            <text:p>YB*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9]&amp;&quot;, &quot;&quot;&quot;&amp;[.B9]&amp;&quot;&quot;&quot;)(),&quot;" office:value-type="string" office:string-value="t(8, &quot;YB*&quot;)()," calcext:value-type="string">
            <text:p>t(8, "YB*")(),</text:p>
          </table:table-cell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1" table:formula="of:=[.C10]&amp;[.D10]&amp;[.E10]&amp;[.F10]" office:value-type="string" office:string-value="Z*" calcext:value-type="string">
            <text:p>Z*</text:p>
          </table:table-cell>
          <table:table-cell table:number-columns-repeated="2"/>
          <table:table-cell office:value-type="string" calcext:value-type="string">
            <text:p>Z*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PGK</text:p>
          </table:table-cell>
          <table:table-cell table:style-name="ce3" office:value-type="string" calcext:value-type="string">
            <text:p>BPGK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0]&amp;&quot;, &quot;&quot;&quot;&amp;[.B10]&amp;&quot;&quot;&quot;)(),&quot;" office:value-type="string" office:string-value="t(9, &quot;Z*&quot;)()," calcext:value-type="string">
            <text:p>t(9, "Z*")(),</text:p>
          </table:table-cell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1" table:formula="of:=[.C11]&amp;[.D11]&amp;[.E11]&amp;[.F11]" office:value-type="string" office:string-value="ZA*" calcext:value-type="string">
            <text:p>ZA*</text:p>
          </table:table-cell>
          <table:table-cell table:number-columns-repeated="3"/>
          <table:table-cell office:value-type="string" calcext:value-type="string">
            <text:p>ZA*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1]&amp;&quot;, &quot;&quot;&quot;&amp;[.B11]&amp;&quot;&quot;&quot;)(),&quot;" office:value-type="string" office:string-value="t(10, &quot;ZA*&quot;)()," calcext:value-type="string">
            <text:p>t(10, "ZA*")(),</text:p>
          </table:table-cell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1" table:formula="of:=[.C12]&amp;[.D12]&amp;[.E12]&amp;[.F12]" office:value-type="string" office:string-value="ZB" calcext:value-type="string">
            <text:p>ZB</text:p>
          </table:table-cell>
          <table:table-cell table:number-columns-repeated="3"/>
          <table:table-cell office:value-type="string" calcext:value-type="string">
            <text:p>ZB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2]&amp;&quot;, &quot;&quot;&quot;&amp;[.B12]&amp;&quot;&quot;&quot;)(),&quot;" office:value-type="string" office:string-value="t(11, &quot;ZB&quot;)()," calcext:value-type="string">
            <text:p>t(11, "ZB")(),</text:p>
          </table:table-cell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1" table:formula="of:=[.C13]&amp;[.D13]&amp;[.E13]&amp;[.F13]" office:value-type="string" office:string-value="Q*" calcext:value-type="string">
            <text:p>Q*</text:p>
          </table:table-cell>
          <table:table-cell table:number-columns-repeated="2"/>
          <table:table-cell office:value-type="string" calcext:value-type="string">
            <text:p>Q*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PGK</text:p>
          </table:table-cell>
          <table:table-cell table:style-name="ce3" office:value-type="string" calcext:value-type="string">
            <text:p>BPGK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3]&amp;&quot;, &quot;&quot;&quot;&amp;[.B13]&amp;&quot;&quot;&quot;)(),&quot;" office:value-type="string" office:string-value="t(12, &quot;Q*&quot;)()," calcext:value-type="string">
            <text:p>t(12, "Q*")(),</text:p>
          </table:table-cell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1" table:formula="of:=[.C14]&amp;[.D14]&amp;[.E14]&amp;[.F14]" office:value-type="string" office:string-value="QA" calcext:value-type="string">
            <text:p>QA</text:p>
          </table:table-cell>
          <table:table-cell table:number-columns-repeated="3"/>
          <table:table-cell office:value-type="string" calcext:value-type="string">
            <text:p>QA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4]&amp;&quot;, &quot;&quot;&quot;&amp;[.B14]&amp;&quot;&quot;&quot;)(),&quot;" office:value-type="string" office:string-value="t(13, &quot;QA&quot;)()," calcext:value-type="string">
            <text:p>t(13, "QA")(),</text:p>
          </table:table-cell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1" table:formula="of:=[.C15]&amp;[.D15]&amp;[.E15]&amp;[.F15]" office:value-type="string" office:string-value="QB*" calcext:value-type="string">
            <text:p>QB*</text:p>
          </table:table-cell>
          <table:table-cell table:number-columns-repeated="3"/>
          <table:table-cell office:value-type="string" calcext:value-type="string">
            <text:p>QB*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5]&amp;&quot;, &quot;&quot;&quot;&amp;[.B15]&amp;&quot;&quot;&quot;)(),&quot;" office:value-type="string" office:string-value="t(14, &quot;QB*&quot;)()," calcext:value-type="string">
            <text:p>t(14, "QB*")(),</text:p>
          </table:table-cell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1" table:formula="of:=[.C16]&amp;[.D16]&amp;[.E16]&amp;[.F16]" office:value-type="string" office:string-value="C*" calcext:value-type="string">
            <text:p>C*</text:p>
          </table:table-cell>
          <table:table-cell/>
          <table:table-cell office:value-type="string" calcext:value-type="string">
            <text:p>C*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string" calcext:value-type="string">
            <text:p>-</text:p>
          </table:table-cell>
          <table:table-cell/>
          <table:table-cell table:formula="of:=&quot;t(&quot;&amp;[.A16]&amp;&quot;, &quot;&quot;&quot;&amp;[.B16]&amp;&quot;&quot;&quot;)(),&quot;" office:value-type="string" office:string-value="t(15, &quot;C*&quot;)()," calcext:value-type="string">
            <text:p>t(15, "C*")(),</text:p>
          </table:table-cell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1" table:formula="of:=[.C17]&amp;[.D17]&amp;[.E17]&amp;[.F17]" office:value-type="string" office:string-value="CA*" calcext:value-type="string">
            <text:p>CA*</text:p>
          </table:table-cell>
          <table:table-cell table:number-columns-repeated="2"/>
          <table:table-cell office:value-type="string" calcext:value-type="string">
            <text:p>CA*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/>
          <table:table-cell table:formula="of:=&quot;t(&quot;&amp;[.A17]&amp;&quot;, &quot;&quot;&quot;&amp;[.B17]&amp;&quot;&quot;&quot;)(),&quot;" office:value-type="string" office:string-value="t(16, &quot;CA*&quot;)()," calcext:value-type="string">
            <text:p>t(16, "CA*")(),</text:p>
          </table:table-cell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1" table:formula="of:=[.C18]&amp;[.D18]&amp;[.E18]&amp;[.F18]" office:value-type="string" office:string-value="D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</text:p>
          </table:table-cell>
          <table:table-cell table:number-columns-repeated="2" table:style-name="ce3" office:value-type="string" calcext:value-type="string">
            <text:p>G</text:p>
          </table:table-cell>
          <table:table-cell/>
          <table:table-cell table:formula="of:=&quot;t(&quot;&amp;[.A18]&amp;&quot;, &quot;&quot;&quot;&amp;[.B18]&amp;&quot;&quot;&quot;)(),&quot;" office:value-type="string" office:string-value="t(17, &quot;D&quot;)()," calcext:value-type="string">
            <text:p>t(17, "D")(),</text:p>
          </table:table-cell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1" table:formula="of:=[.C19]&amp;[.D19]&amp;[.E19]&amp;[.F19]" office:value-type="string" office:string-value="DA" calcext:value-type="string">
            <text:p>DA</text:p>
          </table:table-cell>
          <table:table-cell table:number-columns-repeated="2"/>
          <table:table-cell office:value-type="string" calcext:value-type="string">
            <text:p>D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</text:p>
          </table:table-cell>
          <table:table-cell table:number-columns-repeated="2" table:style-name="ce3" office:value-type="string" calcext:value-type="string">
            <text:p>G</text:p>
          </table:table-cell>
          <table:table-cell/>
          <table:table-cell table:formula="of:=&quot;t(&quot;&amp;[.A19]&amp;&quot;, &quot;&quot;&quot;&amp;[.B19]&amp;&quot;&quot;&quot;)(),&quot;" office:value-type="string" office:string-value="t(18, &quot;DA&quot;)()," calcext:value-type="string">
            <text:p>t(18, "DA")(),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0:05:14.113833184</meta:creation-date>
    <dc:date>2014-12-30T12:00:44.932962515</dc:date>
    <meta:editing-duration>PT1H2M15S</meta:editing-duration>
    <meta:editing-cycles>4</meta:editing-cycles>
    <meta:generator>LibreOffice/4.2.8.2$Linux_X86_64 LibreOffice_project/420m0$Build-2</meta:generator>
    <meta:document-statistic meta:table-count="1" meta:cell-count="167" meta:object-count="0"/>
  </office:meta>
</office:document-meta>
</file>
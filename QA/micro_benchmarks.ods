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1.972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2.2cm"/>
    </style:style>
    <style:style style:name="co7" style:family="table-column">
      <style:table-column-properties fo:break-before="auto" style:column-width="1.639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0.561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2.379cm"/>
    </style:style>
    <style:style style:name="co18" style:family="table-column">
      <style:table-column-properties fo:break-before="auto" style:column-width="1.526cm"/>
    </style:style>
    <style:style style:name="ro1" style:family="table-row">
      <style:table-row-properties style:row-height="0.8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99pt solid #000000" fo:border-left="none" fo:border-right="none" fo:border-top="none" style:vertical-align="middle"/>
      <style:text-properties fo:color="#333333" fo:font-weight="bold" style:font-weight-asian="bold" style:font-weight-complex="bold"/>
    </style:style>
    <style:style style:name="ce6" style:family="table-cell" style:parent-style-name="Default">
      <style:text-properties style:use-window-font-color="true" style:font-name="Inconsolata" fo:font-size="8pt" style:font-size-asian="8pt" style:font-size-complex="8pt"/>
    </style:style>
    <style:style style:name="ce7" style:family="table-cell" style:parent-style-name="Default">
      <style:text-properties fo:color="#008000" style:font-name="Inconsolata" fo:font-size="8pt" style:font-size-asian="8pt" style:font-size-complex="8pt"/>
    </style:style>
    <style:style style:name="ce8" style:family="table-cell" style:parent-style-name="Default">
      <style:text-properties fo:color="#333333" style:font-name="Inconsolata" fo:font-size="8pt" style:font-size-asian="8pt" style:font-size-complex="8pt"/>
    </style:style>
    <style:style style:name="ce9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ext-properties fo:color="#008000" fo:font-size="7pt" style:font-size-asian="7pt" style:font-size-complex="7pt"/>
    </style:style>
    <style:style style:name="ce11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able-cell-properties fo:background-color="#ffff99"/>
      <style:text-properties fo:color="#008000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ext-properties style:use-window-font-color="true"/>
    </style:style>
    <style:style style:name="ce17" style:family="table-cell" style:parent-style-name="Default" style:data-style-name="N109">
      <style:text-properties fo:color="#008000"/>
    </style:style>
    <style:style style:name="ce18" style:family="table-cell" style:parent-style-name="Default" style:data-style-name="N109"/>
    <style:style style:name="ce19" style:family="table-cell" style:parent-style-name="Default" style:data-style-name="N3">
      <style:text-properties style:use-window-font-color="true"/>
    </style:style>
    <style:style style:name="ce20" style:family="table-cell" style:parent-style-name="Default" style:data-style-name="N3">
      <style:text-properties fo:color="#008000"/>
    </style:style>
    <style:style style:name="ce2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ext-properties fo:color="#e6e6e6" style:font-name="Arimo" style:font-name-asian="Lucida Sans Unicode" style:font-name-complex="FreeSans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84d1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b0094"/>
    </style:style>
    <style:style style:name="ce29" style:family="table-cell" style:parent-style-name="Default">
      <style:text-properties fo:color="#0084d1" style:font-name="Inconsolata" fo:font-size="8pt" style:font-size-asian="8pt" style:font-size-complex="8pt"/>
    </style:style>
    <style:style style:name="ce30" style:family="table-cell" style:parent-style-name="Default">
      <style:text-properties fo:color="#6b0094" style:font-name="Inconsolata" fo:font-size="8pt" style:font-size-asian="8pt" style:font-size-complex="8pt"/>
    </style:style>
    <style:style style:name="ce31" style:family="table-cell" style:parent-style-name="Default">
      <style:text-properties style:use-window-font-color="true" fo:font-size="7pt" style:font-size-asian="7pt" style:font-size-complex="7pt"/>
    </style:style>
    <style:style style:name="ce32" style:family="table-cell" style:parent-style-name="Default">
      <style:text-properties fo:color="#0084d1" fo:font-size="7pt" style:font-size-asian="7pt" style:font-size-complex="7pt"/>
    </style:style>
    <style:style style:name="ce33" style:family="table-cell" style:parent-style-name="Default">
      <style:text-properties fo:color="#6b0094" fo:font-size="7pt" style:font-size-asian="7pt" style:font-size-complex="7pt"/>
    </style:style>
    <style:style style:name="ce34" style:family="table-cell" style:parent-style-name="Default">
      <style:text-properties fo:color="#0084d1"/>
    </style:style>
    <style:style style:name="ce35" style:family="table-cell" style:parent-style-name="Default">
      <style:text-properties fo:color="#6b0094"/>
    </style:style>
    <style:style style:name="ce36" style:family="table-cell" style:parent-style-name="Default">
      <style:table-cell-properties fo:background-color="#ffff99"/>
      <style:text-properties fo:color="#0084d1"/>
    </style:style>
    <style:style style:name="ce37" style:family="table-cell" style:parent-style-name="Default">
      <style:table-cell-properties fo:background-color="#ffff99"/>
      <style:text-properties fo:color="#6b0094"/>
    </style:style>
    <style:style style:name="ce38" style:family="table-cell" style:parent-style-name="Default">
      <style:text-properties style:use-window-font-color="true" style:font-name="Arimo" style:font-name-asian="Lucida Sans Unicode" style:font-name-complex="FreeSans"/>
    </style:style>
    <style:style style:name="ce39" style:family="table-cell" style:parent-style-name="Default">
      <style:text-properties fo:color="#0084d1" style:font-name="Arimo" style:font-name-asian="Lucida Sans Unicode" style:font-name-complex="FreeSans"/>
    </style:style>
    <style:style style:name="ce40" style:family="table-cell" style:parent-style-name="Default">
      <style:text-properties fo:color="#6b0094" style:font-name="Arimo" style:font-name-asian="Lucida Sans Unicode" style:font-name-complex="FreeSans"/>
    </style:style>
    <style:style style:name="ce41" style:family="table-cell" style:parent-style-name="Default" style:data-style-name="N109">
      <style:text-properties fo:color="#0084d1"/>
    </style:style>
    <style:style style:name="ce42" style:family="table-cell" style:parent-style-name="Default" style:data-style-name="N109">
      <style:text-properties fo:color="#6b0094"/>
    </style:style>
    <style:style style:name="ce43" style:family="table-cell" style:parent-style-name="Default" style:data-style-name="N3">
      <style:text-properties fo:color="#0084d1"/>
    </style:style>
    <style:style style:name="ce44" style:family="table-cell" style:parent-style-name="Default" style:data-style-name="N3">
      <style:text-properties fo:color="#6b0094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4d1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6b0094"/>
    </style:style>
    <style:style style:name="ce47" style:family="table-cell" style:parent-style-name="Default">
      <style:text-properties fo:color="#e6e6e6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1" style:family="table-cell" style:parent-style-name="Default" style:data-style-name="N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3"/>
    <style:style style:name="ce53" style:family="table-cell" style:parent-style-name="Default" style:data-style-name="N10">
      <style:text-properties style:use-window-font-color="true"/>
    </style:style>
    <style:style style:name="ce5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ext-properties fo:color="#ff0000"/>
    </style:style>
    <style:style style:name="ce5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table table:name="Lapto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12" office:value-type="string" calcext:value-type="string">
            <text:p>hash_100</text:p>
          </table:table-cell>
          <table:table-cell table:style-name="ce16" office:value-type="float" office:value="595.001" calcext:value-type="float">
            <text:p>595.0</text:p>
          </table:table-cell>
          <table:table-cell table:style-name="ce19" table:formula="of:=1000000/[.H2]" office:value-type="float" office:value="1680.66944425304" calcext:value-type="float">
            <text:p>1,681</text:p>
          </table:table-cell>
          <table:table-cell table:style-name="ce16" office:value-type="float" office:value="2.847" calcext:value-type="float">
            <text:p>2.8</text:p>
          </table:table-cell>
          <table:table-cell table:style-name="ce21" table:formula="of:=[.J2]/[.H2]" office:value-type="percentage" office:value="0.00478486590778839" calcext:value-type="percentage">
            <text:p>0%</text:p>
          </table:table-cell>
          <table:table-cell table:style-name="ce25" table:formula="of:=IF([.E2]=&quot;JVM&quot;;1;2)&amp;[.G2]&amp;[.D2]&amp;[.A2]" office:value-type="string" office:string-value="1hash_100dev42186" calcext:value-type="string">
            <text:p>1hash_100dev42186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12" office:value-type="string" calcext:value-type="string">
            <text:p>hash_100</text:p>
          </table:table-cell>
          <table:table-cell table:style-name="ce16" office:value-type="float" office:value="548.526" calcext:value-type="float">
            <text:p>548.5</text:p>
          </table:table-cell>
          <table:table-cell table:style-name="ce19" table:formula="of:=1000000/[.H3]" office:value-type="float" office:value="1823.06763945556" calcext:value-type="float">
            <text:p>1,823</text:p>
          </table:table-cell>
          <table:table-cell table:style-name="ce16" office:value-type="float" office:value="3.414" calcext:value-type="float">
            <text:p>3.4</text:p>
          </table:table-cell>
          <table:table-cell table:style-name="ce21" table:formula="of:=[.J3]/[.H3]" office:value-type="percentage" office:value="0.00622395292110128" calcext:value-type="percentage">
            <text:p>1%</text:p>
          </table:table-cell>
          <table:table-cell table:style-name="ce25" table:formula="of:=IF([.E3]=&quot;JVM&quot;;1;2)&amp;[.G3]&amp;[.D3]&amp;[.A3]" office:value-type="string" office:string-value="1hash_100dev42191" calcext:value-type="string">
            <text:p>1hash_100dev42191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82.9783245" calcext:value-type="float">
            <text:p>83.0</text:p>
          </table:table-cell>
          <table:table-cell table:style-name="ce20" table:formula="of:=1000000/[.H4]" office:value-type="float" office:value="12051.3399857815" calcext:value-type="float">
            <text:p>12,051</text:p>
          </table:table-cell>
          <table:table-cell table:style-name="ce17" office:value-type="float" office:value="0.661733917" calcext:value-type="float">
            <text:p>0.7</text:p>
          </table:table-cell>
          <table:table-cell table:style-name="ce22" table:formula="of:=[.J4]/[.H4]" office:value-type="percentage" office:value="0.0079747804138899" calcext:value-type="percentage">
            <text:p>1%</text:p>
          </table:table-cell>
          <table:table-cell table:style-name="ce25" table:formula="of:=IF([.E4]=&quot;JVM&quot;;1;2)&amp;[.G4]&amp;[.D4]&amp;[.A4]" office:value-type="string" office:string-value="2hash_100dev:fullOpt42186" calcext:value-type="string">
            <text:p>2hash_100dev:fullOpt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08.668497054" calcext:value-type="float">
            <text:p>108.7</text:p>
          </table:table-cell>
          <table:table-cell table:style-name="ce20" table:formula="of:=1000000/[.H5]" office:value-type="float" office:value="9202.29898369788" calcext:value-type="float">
            <text:p>9,202</text:p>
          </table:table-cell>
          <table:table-cell table:style-name="ce17" office:value-type="float" office:value="0.544659155" calcext:value-type="float">
            <text:p>0.5</text:p>
          </table:table-cell>
          <table:table-cell table:style-name="ce22" table:formula="of:=[.J5]/[.H5]" office:value-type="percentage" office:value="0.00501211638851825" calcext:value-type="percentage">
            <text:p>1%</text:p>
          </table:table-cell>
          <table:table-cell table:style-name="ce25" table:formula="of:=IF([.E5]=&quot;JVM&quot;;1;2)&amp;[.G5]&amp;[.D5]&amp;[.A5]" office:value-type="string" office:string-value="2hash_100dev:fullOpt42190" calcext:value-type="string">
            <text:p>2hash_100dev:fullOpt42190</text:p>
          </table:table-cell>
          <table:table-cell table:number-columns-repeated="1011"/>
        </table:table-row>
        <table:table-row table:style-name="ro2" table:number-rows-repeated="16"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2" table:number-rows-repeated="6">
          <table:table-cell table:number-columns-repeated="2"/>
          <table:table-cell table:style-name="ce9"/>
          <table:table-cell table:number-columns-repeated="1020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skto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40.111" calcext:value-type="float">
            <text:p>1,740.1</text:p>
          </table:table-cell>
          <table:table-cell table:style-name="ce20" table:formula="of:=1000000/[.H2]" office:value-type="float" office:value="574.675983313708" calcext:value-type="float">
            <text:p>575</text:p>
          </table:table-cell>
          <table:table-cell table:style-name="ce17" office:value-type="float" office:value="14.295" calcext:value-type="float">
            <text:p>14.3</text:p>
          </table:table-cell>
          <table:table-cell table:style-name="ce22" table:formula="of:=[.J2]/[.H2]" office:value-type="percentage" office:value="0.00821499318146946" calcext:value-type="percentage">
            <text:p>1%</text:p>
          </table:table-cell>
          <table:table-cell table:style-name="ce47" table:formula="of:=IF([.E2]=&quot;JVM&quot;;1;2)&amp;[.G2]&amp;[.D2]&amp;[.A2]" office:value-type="string" office:string-value="1hash_100dev42186" calcext:value-type="string">
            <text:p>1hash_100dev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69.946" calcext:value-type="float">
            <text:p>1,769.9</text:p>
          </table:table-cell>
          <table:table-cell table:style-name="ce20" table:formula="of:=1000000/[.H3]" office:value-type="float" office:value="564.988988364617" calcext:value-type="float">
            <text:p>565</text:p>
          </table:table-cell>
          <table:table-cell table:style-name="ce17" office:value-type="float" office:value="15.294" calcext:value-type="float">
            <text:p>15.3</text:p>
          </table:table-cell>
          <table:table-cell table:style-name="ce22" table:formula="of:=[.J3]/[.H3]" office:value-type="percentage" office:value="0.00864094158804845" calcext:value-type="percentage">
            <text:p>1%</text:p>
          </table:table-cell>
          <table:table-cell table:style-name="ce47" table:formula="of:=IF([.E3]=&quot;JVM&quot;;1;2)&amp;[.G3]&amp;[.D3]&amp;[.A3]" office:value-type="string" office:string-value="1hash_100dev42190" calcext:value-type="string">
            <text:p>1hash_100dev42190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3" calcext:value-type="date">
            <text:p>23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86.703" calcext:value-type="float">
            <text:p>1,786.7</text:p>
          </table:table-cell>
          <table:table-cell table:style-name="ce20" table:formula="of:=1000000/[.H4]" office:value-type="float" office:value="559.690110779464" calcext:value-type="float">
            <text:p>560</text:p>
          </table:table-cell>
          <table:table-cell table:style-name="ce17" office:value-type="float" office:value="20.334" calcext:value-type="float">
            <text:p>20.3</text:p>
          </table:table-cell>
          <table:table-cell table:style-name="ce22" table:formula="of:=[.J4]/[.H4]" office:value-type="percentage" office:value="0.0113807387125896" calcext:value-type="percentage">
            <text:p>1%</text:p>
          </table:table-cell>
          <table:table-cell table:style-name="ce47" table:formula="of:=IF([.E4]=&quot;JVM&quot;;1;2)&amp;[.G4]&amp;[.D4]&amp;[.A4]" office:value-type="string" office:string-value="1hash_100dev42208" calcext:value-type="string">
            <text:p>1hash_100dev42208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4" calcext:value-type="date">
            <text:p>24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51-b16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85.405" calcext:value-type="float">
            <text:p>1,785.4</text:p>
          </table:table-cell>
          <table:table-cell table:style-name="ce20" table:formula="of:=1000000/[.H5]" office:value-type="float" office:value="560.097008801925" calcext:value-type="float">
            <text:p>560</text:p>
          </table:table-cell>
          <table:table-cell table:style-name="ce17" office:value-type="float" office:value="24.346" calcext:value-type="float">
            <text:p>24.3</text:p>
          </table:table-cell>
          <table:table-cell table:style-name="ce22" table:formula="of:=[.J5]/[.H5]" office:value-type="percentage" office:value="0.0136361217762917" calcext:value-type="percentage">
            <text:p>1%</text:p>
          </table:table-cell>
          <table:table-cell table:style-name="ce47" table:formula="of:=IF([.E5]=&quot;JVM&quot;;1;2)&amp;[.G5]&amp;[.D5]&amp;[.A5]" office:value-type="string" office:string-value="1hash_100dev42209" calcext:value-type="string">
            <text:p>1hash_100dev42209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23" calcext:value-type="date">
            <text:p>23/07/15</text:p>
          </table:table-cell>
          <table:table-cell table:style-name="ce6" office:value-type="string" calcext:value-type="string">
            <text:p>164a86c4cb8f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PropCheck</text:p>
          </table:table-cell>
          <table:table-cell table:style-name="ce38" office:value-type="string" calcext:value-type="string">
            <text:p>prop_100</text:p>
          </table:table-cell>
          <table:table-cell table:style-name="ce16" office:value-type="float" office:value="63.158" calcext:value-type="float">
            <text:p>63.2</text:p>
          </table:table-cell>
          <table:table-cell table:style-name="ce19" table:formula="of:=1000000/[.H6]" office:value-type="float" office:value="15833.3069444884" calcext:value-type="float">
            <text:p>15,833</text:p>
          </table:table-cell>
          <table:table-cell table:style-name="ce16" office:value-type="float" office:value="0.72" calcext:value-type="float">
            <text:p>0.7</text:p>
          </table:table-cell>
          <table:table-cell table:style-name="ce21" table:formula="of:=[.J6]/[.H6]" office:value-type="percentage" office:value="0.0113999810000317" calcext:value-type="percentage">
            <text:p>1%</text:p>
          </table:table-cell>
          <table:table-cell table:style-name="ce47" table:formula="of:=IF([.E6]=&quot;JVM&quot;;1;2)&amp;[.G6]&amp;[.D6]&amp;[.A6]" office:value-type="string" office:string-value="1prop_100dev42208" calcext:value-type="string">
            <text:p>1prop_100dev42208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24" calcext:value-type="date">
            <text:p>24/07/15</text:p>
          </table:table-cell>
          <table:table-cell table:style-name="ce6" office:value-type="string" calcext:value-type="string">
            <text:p>164a86c4cb8f</text:p>
          </table:table-cell>
          <table:table-cell table:style-name="ce31" office:value-type="string" calcext:value-type="string">
            <text:p>1.8.0_51-b16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PropCheck</text:p>
          </table:table-cell>
          <table:table-cell table:style-name="ce38" office:value-type="string" calcext:value-type="string">
            <text:p>prop_100</text:p>
          </table:table-cell>
          <table:table-cell table:style-name="ce16" office:value-type="float" office:value="64.995" calcext:value-type="float">
            <text:p>65.0</text:p>
          </table:table-cell>
          <table:table-cell table:style-name="ce19" table:formula="of:=1000000/[.H7]" office:value-type="float" office:value="15385.7989076083" calcext:value-type="float">
            <text:p>15,386</text:p>
          </table:table-cell>
          <table:table-cell table:style-name="ce16" office:value-type="float" office:value="0.761" calcext:value-type="float">
            <text:p>0.8</text:p>
          </table:table-cell>
          <table:table-cell table:style-name="ce21" table:formula="of:=[.J7]/[.H7]" office:value-type="percentage" office:value="0.0117085929686899" calcext:value-type="percentage">
            <text:p>1%</text:p>
          </table:table-cell>
          <table:table-cell table:style-name="ce47" table:formula="of:=IF([.E7]=&quot;JVM&quot;;1;2)&amp;[.G7]&amp;[.D7]&amp;[.A7]" office:value-type="string" office:string-value="1prop_100dev42209" calcext:value-type="string">
            <text:p>1prop_100dev42209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19" calcext:value-type="date">
            <text:p>19/07/15</text:p>
          </table:table-cell>
          <table:table-cell table:style-name="ce29" office:value-type="string" calcext:value-type="string">
            <text:p>b634decd0878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60.645" calcext:value-type="float">
            <text:p>60.6</text:p>
          </table:table-cell>
          <table:table-cell table:style-name="ce43" table:formula="of:=1000000/[.H8]" office:value-type="float" office:value="16489.4055569297" calcext:value-type="float">
            <text:p>16,489</text:p>
          </table:table-cell>
          <table:table-cell table:style-name="ce41" office:value-type="float" office:value="0.622" calcext:value-type="float">
            <text:p>0.6</text:p>
          </table:table-cell>
          <table:table-cell table:style-name="ce45" table:formula="of:=[.J8]/[.H8]" office:value-type="percentage" office:value="0.0102564102564103" calcext:value-type="percentage">
            <text:p>1%</text:p>
          </table:table-cell>
          <table:table-cell table:style-name="ce47" table:formula="of:=IF([.E8]=&quot;JVM&quot;;1;2)&amp;[.G8]&amp;[.D8]&amp;[.A8]" office:value-type="string" office:string-value="1read_100dev42204" calcext:value-type="string">
            <text:p>1read_100dev42204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3" calcext:value-type="date">
            <text:p>23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967.486" calcext:value-type="float">
            <text:p>967.5</text:p>
          </table:table-cell>
          <table:table-cell table:style-name="ce43" table:formula="of:=1000000/[.H9]" office:value-type="float" office:value="1033.60668784871" calcext:value-type="float">
            <text:p>1,034</text:p>
          </table:table-cell>
          <table:table-cell table:style-name="ce41" office:value-type="float" office:value="8.837" calcext:value-type="float">
            <text:p>8.8</text:p>
          </table:table-cell>
          <table:table-cell table:style-name="ce45" table:formula="of:=[.J9]/[.H9]" office:value-type="percentage" office:value="0.00913398230051908" calcext:value-type="percentage">
            <text:p>1%</text:p>
          </table:table-cell>
          <table:table-cell table:style-name="ce47" table:formula="of:=IF([.E9]=&quot;JVM&quot;;1;2)&amp;[.G9]&amp;[.D9]&amp;[.A9]" office:value-type="string" office:string-value="1read_100dev42208" calcext:value-type="string">
            <text:p>1read_100dev42208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4" calcext:value-type="date">
            <text:p>24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51-b16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972.612" calcext:value-type="float">
            <text:p>972.6</text:p>
          </table:table-cell>
          <table:table-cell table:style-name="ce43" table:formula="of:=1000000/[.H10]" office:value-type="float" office:value="1028.1592248502" calcext:value-type="float">
            <text:p>1,028</text:p>
          </table:table-cell>
          <table:table-cell table:style-name="ce41" office:value-type="float" office:value="11.868" calcext:value-type="float">
            <text:p>11.9</text:p>
          </table:table-cell>
          <table:table-cell table:style-name="ce45" table:formula="of:=[.J10]/[.H10]" office:value-type="percentage" office:value="0.0122021936805221" calcext:value-type="percentage">
            <text:p>1%</text:p>
          </table:table-cell>
          <table:table-cell table:style-name="ce47" table:formula="of:=IF([.E10]=&quot;JVM&quot;;1;2)&amp;[.G10]&amp;[.D10]&amp;[.A10]" office:value-type="string" office:string-value="1read_100dev42209" calcext:value-type="string">
            <text:p>1read_100dev42209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19" calcext:value-type="date">
            <text:p>19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47.866" calcext:value-type="float">
            <text:p>547.9</text:p>
          </table:table-cell>
          <table:table-cell table:style-name="ce44" table:formula="of:=1000000/[.H11]" office:value-type="float" office:value="1825.26384188835" calcext:value-type="float">
            <text:p>1,825</text:p>
          </table:table-cell>
          <table:table-cell table:style-name="ce42" office:value-type="float" office:value="4.624" calcext:value-type="float">
            <text:p>4.6</text:p>
          </table:table-cell>
          <table:table-cell table:style-name="ce46" table:formula="of:=[.J11]/[.H11]" office:value-type="percentage" office:value="0.00844002000489171" calcext:value-type="percentage">
            <text:p>1%</text:p>
          </table:table-cell>
          <table:table-cell table:style-name="ce47" table:formula="of:=IF([.E11]=&quot;JVM&quot;;1;2)&amp;[.G11]&amp;[.D11]&amp;[.A11]" office:value-type="string" office:string-value="1write_100dev42204" calcext:value-type="string">
            <text:p>1write_100dev42204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3" calcext:value-type="date">
            <text:p>23/07/15</text:p>
          </table:table-cell>
          <table:table-cell table:style-name="ce30" office:value-type="string" calcext:value-type="string">
            <text:p>164a86c4cb8f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52.548" calcext:value-type="float">
            <text:p>552.5</text:p>
          </table:table-cell>
          <table:table-cell table:style-name="ce44" table:formula="of:=1000000/[.H12]" office:value-type="float" office:value="1809.79751985348" calcext:value-type="float">
            <text:p>1,810</text:p>
          </table:table-cell>
          <table:table-cell table:style-name="ce42" office:value-type="float" office:value="5.586" calcext:value-type="float">
            <text:p>5.6</text:p>
          </table:table-cell>
          <table:table-cell table:style-name="ce46" table:formula="of:=[.J12]/[.H12]" office:value-type="percentage" office:value="0.0101095289459015" calcext:value-type="percentage">
            <text:p>1%</text:p>
          </table:table-cell>
          <table:table-cell table:style-name="ce47" table:formula="of:=IF([.E12]=&quot;JVM&quot;;1;2)&amp;[.G12]&amp;[.D12]&amp;[.A12]" office:value-type="string" office:string-value="1write_100dev42208" calcext:value-type="string">
            <text:p>1write_100dev42208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4" calcext:value-type="date">
            <text:p>24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51-b16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78.509" calcext:value-type="float">
            <text:p>578.5</text:p>
          </table:table-cell>
          <table:table-cell table:style-name="ce44" table:formula="of:=1000000/[.H13]" office:value-type="float" office:value="1728.58157781469" calcext:value-type="float">
            <text:p>1,729</text:p>
          </table:table-cell>
          <table:table-cell table:style-name="ce42" office:value-type="float" office:value="6.354" calcext:value-type="float">
            <text:p>6.4</text:p>
          </table:table-cell>
          <table:table-cell table:style-name="ce46" table:formula="of:=[.J13]/[.H13]" office:value-type="percentage" office:value="0.0109834073454346" calcext:value-type="percentage">
            <text:p>1%</text:p>
          </table:table-cell>
          <table:table-cell table:style-name="ce47" table:formula="of:=IF([.E13]=&quot;JVM&quot;;1;2)&amp;[.G13]&amp;[.D13]&amp;[.A13]" office:value-type="string" office:string-value="1write_100dev42209" calcext:value-type="string">
            <text:p>1write_100dev42209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41.859825395" calcext:value-type="float">
            <text:p>241.9</text:p>
          </table:table-cell>
          <table:table-cell table:style-name="ce20" table:formula="of:=1000000/[.H14]" office:value-type="float" office:value="4134.62632070797" calcext:value-type="float">
            <text:p>4,135</text:p>
          </table:table-cell>
          <table:table-cell table:style-name="ce17" office:value-type="float" office:value="1.599290269" calcext:value-type="float">
            <text:p>1.6</text:p>
          </table:table-cell>
          <table:table-cell table:style-name="ce22" table:formula="of:=[.J14]/[.H14]" office:value-type="percentage" office:value="0.00661246764065952" calcext:value-type="percentage">
            <text:p>1%</text:p>
          </table:table-cell>
          <table:table-cell table:style-name="ce47" table:formula="of:=IF([.E14]=&quot;JVM&quot;;1;2)&amp;[.G14]&amp;[.D14]&amp;[.A14]" office:value-type="string" office:string-value="2hash_100dev:fullOpt42186" calcext:value-type="string">
            <text:p>2hash_100dev:fullOpt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95.936431146" calcext:value-type="float">
            <text:p>295.9</text:p>
          </table:table-cell>
          <table:table-cell table:style-name="ce20" table:formula="of:=1000000/[.H15]" office:value-type="float" office:value="3379.10407355913" calcext:value-type="float">
            <text:p>3,379</text:p>
          </table:table-cell>
          <table:table-cell table:style-name="ce17" office:value-type="float" office:value="2.793304749" calcext:value-type="float">
            <text:p>2.8</text:p>
          </table:table-cell>
          <table:table-cell table:style-name="ce22" table:formula="of:=[.J15]/[.H15]" office:value-type="percentage" office:value="0.00943886745603797" calcext:value-type="percentage">
            <text:p>1%</text:p>
          </table:table-cell>
          <table:table-cell table:style-name="ce47" table:formula="of:=IF([.E15]=&quot;JVM&quot;;1;2)&amp;[.G15]&amp;[.D15]&amp;[.A15]" office:value-type="string" office:string-value="2hash_100dev:fullOpt42190" calcext:value-type="string">
            <text:p>2hash_100dev:fullOpt42190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3" calcext:value-type="date">
            <text:p>23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55.807479596" calcext:value-type="float">
            <text:p>255.8</text:p>
          </table:table-cell>
          <table:table-cell table:style-name="ce20" table:formula="of:=1000000/[.H16]" office:value-type="float" office:value="3909.18983909037" calcext:value-type="float">
            <text:p>3,909</text:p>
          </table:table-cell>
          <table:table-cell table:style-name="ce17" office:value-type="float" office:value="10.563171879" calcext:value-type="float">
            <text:p>10.6</text:p>
          </table:table-cell>
          <table:table-cell table:style-name="ce22" table:formula="of:=[.J16]/[.H16]" office:value-type="percentage" office:value="0.0412934441779519" calcext:value-type="percentage">
            <text:p>4%</text:p>
          </table:table-cell>
          <table:table-cell table:style-name="ce47" table:formula="of:=IF([.E16]=&quot;JVM&quot;;1;2)&amp;[.G16]&amp;[.D16]&amp;[.A16]" office:value-type="string" office:string-value="2hash_100dev:fullOpt42208" calcext:value-type="string">
            <text:p>2hash_100dev:fullOpt42208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19" calcext:value-type="date">
            <text:p>19/07/15</text:p>
          </table:table-cell>
          <table:table-cell table:style-name="ce29" office:value-type="string" calcext:value-type="string">
            <text:p>b634decd0878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:fullOpt</text:p>
          </table:table-cell>
          <table:table-cell table:style-name="ce36" office:value-type="string" calcext:value-type="string">
            <text:p>JS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5.097271876" calcext:value-type="float">
            <text:p>5.1</text:p>
          </table:table-cell>
          <table:table-cell table:style-name="ce43" table:formula="of:=1000000/[.H17]" office:value-type="float" office:value="196183.375014466" calcext:value-type="float">
            <text:p>196,183</text:p>
          </table:table-cell>
          <table:table-cell table:style-name="ce41" office:value-type="float" office:value="0.095746784" calcext:value-type="float">
            <text:p>0.1</text:p>
          </table:table-cell>
          <table:table-cell table:style-name="ce45" table:formula="of:=[.J17]/[.H17]" office:value-type="percentage" office:value="0.0187839272319011" calcext:value-type="percentage">
            <text:p>2%</text:p>
          </table:table-cell>
          <table:table-cell table:style-name="ce47" table:formula="of:=IF([.E17]=&quot;JVM&quot;;1;2)&amp;[.G17]&amp;[.D17]&amp;[.A17]" office:value-type="string" office:string-value="2read_100dev:fullOpt42204" calcext:value-type="string">
            <text:p>2read_100dev:fullOpt42204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3" calcext:value-type="date">
            <text:p>23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:fullOpt</text:p>
          </table:table-cell>
          <table:table-cell table:style-name="ce36" office:value-type="string" calcext:value-type="string">
            <text:p>JS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64.726779059" calcext:value-type="float">
            <text:p>64.7</text:p>
          </table:table-cell>
          <table:table-cell table:style-name="ce43" table:formula="of:=1000000/[.H18]" office:value-type="float" office:value="15449.5560344271" calcext:value-type="float">
            <text:p>15,450</text:p>
          </table:table-cell>
          <table:table-cell table:style-name="ce41" office:value-type="float" office:value="2.261178484" calcext:value-type="float">
            <text:p>2.3</text:p>
          </table:table-cell>
          <table:table-cell table:style-name="ce45" table:formula="of:=[.J18]/[.H18]" office:value-type="percentage" office:value="0.0349342036923988" calcext:value-type="percentage">
            <text:p>3%</text:p>
          </table:table-cell>
          <table:table-cell table:style-name="ce47" table:formula="of:=IF([.E18]=&quot;JVM&quot;;1;2)&amp;[.G18]&amp;[.D18]&amp;[.A18]" office:value-type="string" office:string-value="2read_100dev:fullOpt42208" calcext:value-type="string">
            <text:p>2read_100dev:fullOpt42208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19" calcext:value-type="date">
            <text:p>19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:fullOpt</text:p>
          </table:table-cell>
          <table:table-cell table:style-name="ce37" office:value-type="string" calcext:value-type="string">
            <text:p>JS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29.949026448" calcext:value-type="float">
            <text:p>29.9</text:p>
          </table:table-cell>
          <table:table-cell table:style-name="ce44" table:formula="of:=1000000/[.H19]" office:value-type="float" office:value="33390.0670105682" calcext:value-type="float">
            <text:p>33,390</text:p>
          </table:table-cell>
          <table:table-cell table:style-name="ce42" office:value-type="float" office:value="0.974475791" calcext:value-type="float">
            <text:p>1.0</text:p>
          </table:table-cell>
          <table:table-cell table:style-name="ce46" table:formula="of:=[.J19]/[.H19]" office:value-type="percentage" office:value="0.0325378119616665" calcext:value-type="percentage">
            <text:p>3%</text:p>
          </table:table-cell>
          <table:table-cell table:style-name="ce47" table:formula="of:=IF([.E19]=&quot;JVM&quot;;1;2)&amp;[.G19]&amp;[.D19]&amp;[.A19]" office:value-type="string" office:string-value="2write_100dev:fullOpt42204" calcext:value-type="string">
            <text:p>2write_100dev:fullOpt42204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3" calcext:value-type="date">
            <text:p>23/07/15</text:p>
          </table:table-cell>
          <table:table-cell table:style-name="ce30" office:value-type="string" calcext:value-type="string">
            <text:p>164a86c4cb8f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:fullOpt</text:p>
          </table:table-cell>
          <table:table-cell table:style-name="ce37" office:value-type="string" calcext:value-type="string">
            <text:p>JS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33.118510307" calcext:value-type="float">
            <text:p>33.1</text:p>
          </table:table-cell>
          <table:table-cell table:style-name="ce44" table:formula="of:=1000000/[.H20]" office:value-type="float" office:value="30194.5948271906" calcext:value-type="float">
            <text:p>30,195</text:p>
          </table:table-cell>
          <table:table-cell table:style-name="ce42" office:value-type="float" office:value="0.661308239" calcext:value-type="float">
            <text:p>0.7</text:p>
          </table:table-cell>
          <table:table-cell table:style-name="ce46" table:formula="of:=[.J20]/[.H20]" office:value-type="percentage" office:value="0.0199679343324879" calcext:value-type="percentage">
            <text:p>2%</text:p>
          </table:table-cell>
          <table:table-cell table:style-name="ce47" table:formula="of:=IF([.E20]=&quot;JVM&quot;;1;2)&amp;[.G20]&amp;[.D20]&amp;[.A20]" office:value-type="string" office:string-value="2write_100dev:fullOpt42208" calcext:value-type="string">
            <text:p>2write_100dev:fullOpt42208</text:p>
          </table:table-cell>
          <table:table-cell table:number-columns-repeated="1011"/>
        </table:table-row>
        <table:table-row table:style-name="ro2" table:number-rows-repeated="3"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ze" table:style-name="ta1">
        <table:table-column table:style-name="co13" table:default-cell-style-name="ce50"/>
        <table:table-column table:style-name="co1" table:default-cell-style-name="ce4"/>
        <table:table-column table:style-name="co14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52"/>
        <table:table-column table:style-name="co18" table:default-cell-style-name="ce52"/>
        <table:table-column table:style-name="co10" table:number-columns-repeated="1012" table:default-cell-style-name="Default"/>
        <table:table-row table:style-name="ro2">
          <table:table-cell table:style-name="ce48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Format</text:p>
          </table:table-cell>
          <table:table-cell table:style-name="ce51" office:value-type="string" calcext:value-type="string">
            <text:p>Size</text:p>
          </table:table-cell>
          <table:table-cell table:style-name="ce51" office:value-type="string" calcext:value-type="string">
            <text:p>Zip <text:s/>Size</text:p>
          </table:table-cell>
          <table:table-cell table:style-name="ce51" office:value-type="string" calcext:value-type="string">
            <text:p>Zip 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0</text:p>
          </table:table-cell>
          <table:table-cell table:style-name="ce12" office:value-type="string" calcext:value-type="string">
            <text:p>json</text:p>
          </table:table-cell>
          <table:table-cell table:style-name="ce19" office:value-type="float" office:value="2683298" calcext:value-type="float">
            <text:p>2,683,298</text:p>
          </table:table-cell>
          <table:table-cell table:style-name="ce19" office:value-type="float" office:value="1478371" calcext:value-type="float">
            <text:p>1,478,371</text:p>
          </table:table-cell>
          <table:table-cell table:style-name="ce53" table:formula="of:=[.G2]/[.F2]" office:value-type="percentage" office:value="0.550952969070152" calcext:value-type="percentage">
            <text:p>55%</text:p>
          </table:table-cell>
          <table:table-cell table:style-name="ce47" table:formula="of:=[.D2]&amp;[.B2]&amp;[.A2]" office:value-type="string" office:string-value="P1000422042" calcext:value-type="string">
            <text:p>P1000422042</text:p>
          </table:table-cell>
          <table:table-cell table:number-columns-repeated="1011"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197178" calcext:value-type="float">
            <text:p>1,197,178</text:p>
          </table:table-cell>
          <table:table-cell table:style-name="ce19" office:value-type="float" office:value="1102609" calcext:value-type="float">
            <text:p>1,102,609</text:p>
          </table:table-cell>
          <table:table-cell table:style-name="ce53" table:formula="of:=[.G3]/[.F3]" office:value-type="percentage" office:value="0.921006734169856" calcext:value-type="percentage">
            <text:p>92%</text:p>
          </table:table-cell>
          <table:table-cell table:style-name="ce47" table:formula="of:=[.D3]&amp;[.B3]&amp;[.A3]" office:value-type="string" office:string-value="P1000422043" calcext:value-type="string">
            <text:p>P1000422043</text:p>
          </table:table-cell>
          <table:table-cell table:number-columns-repeated="1011"/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json</text:p>
          </table:table-cell>
          <table:table-cell table:style-name="ce19" office:value-type="float" office:value="224574" calcext:value-type="float">
            <text:p>224,574</text:p>
          </table:table-cell>
          <table:table-cell table:style-name="ce19" office:value-type="float" office:value="108563" calcext:value-type="float">
            <text:p>108,563</text:p>
          </table:table-cell>
          <table:table-cell table:style-name="ce53" table:formula="of:=[.G4]/[.F4]" office:value-type="percentage" office:value="0.48341749267502" calcext:value-type="percentage">
            <text:p>48%</text:p>
          </table:table-cell>
          <table:table-cell table:style-name="ce47" table:formula="of:=[.D4]&amp;[.B4]&amp;[.A4]" office:value-type="string" office:string-value="P100422044" calcext:value-type="string">
            <text:p>P100422044</text:p>
          </table:table-cell>
          <table:table-cell table:number-columns-repeated="1011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05525" calcext:value-type="float">
            <text:p>105,525</text:p>
          </table:table-cell>
          <table:table-cell table:style-name="ce19" office:value-type="float" office:value="97150" calcext:value-type="float">
            <text:p>97,150</text:p>
          </table:table-cell>
          <table:table-cell table:style-name="ce53" table:formula="of:=[.G5]/[.F5]" office:value-type="percentage" office:value="0.920634920634921" calcext:value-type="percentage">
            <text:p>92%</text:p>
          </table:table-cell>
          <table:table-cell table:style-name="ce47" table:formula="of:=[.D5]&amp;[.B5]&amp;[.A5]" office:value-type="string" office:string-value="P100422045" calcext:value-type="string">
            <text:p>P100422045</text:p>
          </table:table-cell>
          <table:table-cell table:number-columns-repeated="1011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2" office:value-type="date" office:date-value="2015-07-23" calcext:value-type="date">
            <text:p>23/07/15</text:p>
          </table:table-cell>
          <table:table-cell table:style-name="ce6" office:value-type="string" calcext:value-type="string">
            <text:p>164a86c4cb8f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02267" calcext:value-type="float">
            <text:p>102,267</text:p>
          </table:table-cell>
          <table:table-cell table:style-name="ce19" office:value-type="float" office:value="93795" calcext:value-type="float">
            <text:p>93,795</text:p>
          </table:table-cell>
          <table:table-cell table:style-name="ce53" table:formula="of:=[.G6]/[.F6]" office:value-type="percentage" office:value="0.917158027516208" calcext:value-type="percentage">
            <text:p>92%</text:p>
          </table:table-cell>
          <table:table-cell table:style-name="ce47" table:formula="of:=[.D6]&amp;[.B6]&amp;[.A6]" office:value-type="string" office:string-value="P100422085" calcext:value-type="string">
            <text:p>P100422085</text:p>
          </table:table-cell>
          <table:table-cell table:number-columns-repeated="1011"/>
        </table:table-row>
        <table:table-row table:style-name="ro2" table:number-rows-repeated="15">
          <table:table-cell table:style-name="ce49"/>
          <table:table-cell table:style-name="ce2"/>
          <table:table-cell table:style-name="ce6"/>
          <table:table-cell table:style-name="ce12" table:number-columns-repeated="2"/>
          <table:table-cell table:style-name="ce19" table:number-columns-repeated="3"/>
          <table:table-cell table:style-name="ce47"/>
          <table:table-cell table:number-columns-repeated="1011"/>
        </table:table-row>
        <table:table-row table:style-name="ro2" table:number-rows-repeated="1048554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Obsolete" table:style-name="ta1">
        <table:table-column table:style-name="co3" table:default-cell-style-name="Default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3">
          <table:table-cell table:style-name="ce11" office:value-type="string" calcext:value-type="string">
            <text:p>Machine</text:p>
          </table:table-cell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8.525891896" calcext:value-type="float">
            <text:p>18.5</text:p>
          </table:table-cell>
          <table:table-cell table:style-name="ce19" table:formula="of:=1000000/[Obsolete.I2]" office:value-type="float" office:value="53978.5077886541" calcext:value-type="float">
            <text:p>53,979</text:p>
          </table:table-cell>
          <table:table-cell table:style-name="ce16" office:value-type="float" office:value="0.088174624" calcext:value-type="float">
            <text:p>0.1</text:p>
          </table:table-cell>
          <table:table-cell table:style-name="ce21" table:formula="of:=[Obsolete.K2]/[Obsolete.I2]" office:value-type="percentage" office:value="0.00475953462834565" calcext:value-type="percentage">
            <text:p>0%</text:p>
          </table:table-cell>
          <table:table-cell table:style-name="ce47" table:formula="of:=[.F2]&amp;[.H2]&amp;[.E2]&amp;[.B2]" office:value-type="string" office:string-value="JShash_1000dev:fullOpt42186" calcext:value-type="string">
            <text:p>JShash_1000dev:fullOpt42186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22.934306971" calcext:value-type="float">
            <text:p>22.9</text:p>
          </table:table-cell>
          <table:table-cell table:style-name="ce19" table:formula="of:=1000000/[Obsolete.I3]" office:value-type="float" office:value="43602.8000002128" calcext:value-type="float">
            <text:p>43,603</text:p>
          </table:table-cell>
          <table:table-cell table:style-name="ce16" office:value-type="float" office:value="0.199546021" calcext:value-type="float">
            <text:p>0.2</text:p>
          </table:table-cell>
          <table:table-cell table:style-name="ce21" table:formula="of:=[Obsolete.K3]/[Obsolete.I3]" office:value-type="percentage" office:value="0.00870076524450127" calcext:value-type="percentage">
            <text:p>1%</text:p>
          </table:table-cell>
          <table:table-cell table:style-name="ce47" table:formula="of:=[.F3]&amp;[.H3]&amp;[.E3]&amp;[.B3]" office:value-type="string" office:string-value="JShash_1000dev:fullOpt42190" calcext:value-type="string">
            <text:p>JShash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161669977" calcext:value-type="float">
            <text:p>0.2</text:p>
          </table:table-cell>
          <table:table-cell table:style-name="ce19" table:formula="of:=1000000/[Obsolete.I4]" office:value-type="float" office:value="6185440.35544707" calcext:value-type="float">
            <text:p>6,185,440</text:p>
          </table:table-cell>
          <table:table-cell table:style-name="ce16" office:value-type="float" office:value="0.00055132" calcext:value-type="float">
            <text:p>0.0</text:p>
          </table:table-cell>
          <table:table-cell table:style-name="ce21" table:formula="of:=[Obsolete.K4]/[Obsolete.I4]" office:value-type="percentage" office:value="0.00341015697676508" calcext:value-type="percentage">
            <text:p>0%</text:p>
          </table:table-cell>
          <table:table-cell table:style-name="ce47" table:formula="of:=[.F4]&amp;[.H4]&amp;[.E4]&amp;[.B4]" office:value-type="string" office:string-value="JSread_1000dev:fullOpt42185" calcext:value-type="string">
            <text:p>JSread_1000dev:fullOpt4218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168602295" calcext:value-type="float">
            <text:p>0.2</text:p>
          </table:table-cell>
          <table:table-cell table:style-name="ce19" table:formula="of:=1000000/[Obsolete.I5]" office:value-type="float" office:value="5931117.36705601" calcext:value-type="float">
            <text:p>5,931,117</text:p>
          </table:table-cell>
          <table:table-cell table:style-name="ce16" office:value-type="float" office:value="0.002534505" calcext:value-type="float">
            <text:p>0.0</text:p>
          </table:table-cell>
          <table:table-cell table:style-name="ce21" table:formula="of:=[Obsolete.K5]/[Obsolete.I5]" office:value-type="percentage" office:value="0.0150324466223903" calcext:value-type="percentage">
            <text:p>2%</text:p>
          </table:table-cell>
          <table:table-cell table:style-name="ce47" table:formula="of:=[.F5]&amp;[.H5]&amp;[.E5]&amp;[.B5]" office:value-type="string" office:string-value="JSread_1000dev:fullOpt42190" calcext:value-type="string">
            <text:p>JSread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4.470397506" calcext:value-type="float">
            <text:p>4.5</text:p>
          </table:table-cell>
          <table:table-cell table:style-name="ce19" table:formula="of:=1000000/[Obsolete.I6]" office:value-type="float" office:value="223693.754002376" calcext:value-type="float">
            <text:p>223,694</text:p>
          </table:table-cell>
          <table:table-cell table:style-name="ce16" office:value-type="float" office:value="0.018286643" calcext:value-type="float">
            <text:p>0.0</text:p>
          </table:table-cell>
          <table:table-cell table:style-name="ce21" table:formula="of:=[Obsolete.K6]/[Obsolete.I6]" office:value-type="percentage" office:value="0.00409060782077127" calcext:value-type="percentage">
            <text:p>0%</text:p>
          </table:table-cell>
          <table:table-cell table:style-name="ce47" table:formula="of:=[.F6]&amp;[.H6]&amp;[.E6]&amp;[.B6]" office:value-type="string" office:string-value="JSread_100dev:fullOpt42185" calcext:value-type="string">
            <text:p>JSread_100dev:fullOpt4218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.339292874" calcext:value-type="float">
            <text:p>5.3</text:p>
          </table:table-cell>
          <table:table-cell table:style-name="ce19" table:formula="of:=1000000/[Obsolete.I7]" office:value-type="float" office:value="187290.718752208" calcext:value-type="float">
            <text:p>187,291</text:p>
          </table:table-cell>
          <table:table-cell table:style-name="ce16" office:value-type="float" office:value="0.230054533" calcext:value-type="float">
            <text:p>0.2</text:p>
          </table:table-cell>
          <table:table-cell table:style-name="ce21" table:formula="of:=[Obsolete.K7]/[Obsolete.I7]" office:value-type="percentage" office:value="0.0430870788377735" calcext:value-type="percentage">
            <text:p>4%</text:p>
          </table:table-cell>
          <table:table-cell table:style-name="ce47" table:formula="of:=[.F7]&amp;[.H7]&amp;[.E7]&amp;[.B7]" office:value-type="string" office:string-value="JSread_100dev:fullOpt42190" calcext:value-type="string">
            <text:p>JSread_1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1.555500934" calcext:value-type="float">
            <text:p>1.6</text:p>
          </table:table-cell>
          <table:table-cell table:style-name="ce19" table:formula="of:=1000000/[Obsolete.I8]" office:value-type="float" office:value="642879.71684368" calcext:value-type="float">
            <text:p>642,880</text:p>
          </table:table-cell>
          <table:table-cell table:style-name="ce16" office:value-type="float" office:value="0.043925651" calcext:value-type="float">
            <text:p>0.0</text:p>
          </table:table-cell>
          <table:table-cell table:style-name="ce21" table:formula="of:=[Obsolete.K8]/[Obsolete.I8]" office:value-type="percentage" office:value="0.0282389100770543" calcext:value-type="percentage">
            <text:p>3%</text:p>
          </table:table-cell>
          <table:table-cell table:style-name="ce47" table:formula="of:=[.F8]&amp;[.H8]&amp;[.E8]&amp;[.B8]" office:value-type="string" office:string-value="JSwrite_1000dev:fullOpt42190" calcext:value-type="string">
            <text:p>JSwrite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19.166748106" calcext:value-type="float">
            <text:p>19.2</text:p>
          </table:table-cell>
          <table:table-cell table:style-name="ce19" table:formula="of:=1000000/[Obsolete.I9]" office:value-type="float" office:value="52173.69135701" calcext:value-type="float">
            <text:p>52,174</text:p>
          </table:table-cell>
          <table:table-cell table:style-name="ce16" office:value-type="float" office:value="0.952872664" calcext:value-type="float">
            <text:p>1.0</text:p>
          </table:table-cell>
          <table:table-cell table:style-name="ce21" table:formula="of:=[Obsolete.K9]/[Obsolete.I9]" office:value-type="percentage" office:value="0.0497148842740679" calcext:value-type="percentage">
            <text:p>5%</text:p>
          </table:table-cell>
          <table:table-cell table:style-name="ce47" table:formula="of:=[.F9]&amp;[.H9]&amp;[.E9]&amp;[.B9]" office:value-type="string" office:string-value="JSwrite_100dev:fullOpt42190" calcext:value-type="string">
            <text:p>JSwrite_1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18.344" calcext:value-type="float">
            <text:p>118.3</text:p>
          </table:table-cell>
          <table:table-cell table:style-name="ce19" table:formula="of:=1000000/[Obsolete.I10]" office:value-type="float" office:value="8449.94254039073" calcext:value-type="float">
            <text:p>8,450</text:p>
          </table:table-cell>
          <table:table-cell table:style-name="ce16" office:value-type="float" office:value="1.249" calcext:value-type="float">
            <text:p>1.2</text:p>
          </table:table-cell>
          <table:table-cell table:style-name="ce21" table:formula="of:=[Obsolete.K10]/[Obsolete.I10]" office:value-type="percentage" office:value="0.010553978232948" calcext:value-type="percentage">
            <text:p>1%</text:p>
          </table:table-cell>
          <table:table-cell table:style-name="ce47" table:formula="of:=[.F10]&amp;[.H10]&amp;[.E10]&amp;[.B10]" office:value-type="string" office:string-value="JVMhash_1000dev42186" calcext:value-type="string">
            <text:p>JVMhash_1000dev42186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19.054" calcext:value-type="float">
            <text:p>119.1</text:p>
          </table:table-cell>
          <table:table-cell table:style-name="ce19" table:formula="of:=1000000/[Obsolete.I11]" office:value-type="float" office:value="8399.54978413157" calcext:value-type="float">
            <text:p>8,400</text:p>
          </table:table-cell>
          <table:table-cell table:style-name="ce16" office:value-type="float" office:value="1.03" calcext:value-type="float">
            <text:p>1.0</text:p>
          </table:table-cell>
          <table:table-cell table:style-name="ce21" table:formula="of:=[Obsolete.K11]/[Obsolete.I11]" office:value-type="percentage" office:value="0.00865153627765552" calcext:value-type="percentage">
            <text:p>1%</text:p>
          </table:table-cell>
          <table:table-cell table:style-name="ce47" table:formula="of:=[.F11]&amp;[.H11]&amp;[.E11]&amp;[.B11]" office:value-type="string" office:string-value="JVMhash_1000dev42190" calcext:value-type="string">
            <text:p>JVMhash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ae928e43a72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3.241" calcext:value-type="float">
            <text:p>3.2</text:p>
          </table:table-cell>
          <table:table-cell table:style-name="ce19" table:formula="of:=1000000/[Obsolete.I12]" office:value-type="float" office:value="308546.744831842" calcext:value-type="float">
            <text:p>308,547</text:p>
          </table:table-cell>
          <table:table-cell table:style-name="ce16" office:value-type="float" office:value="0.046" calcext:value-type="float">
            <text:p>0.0</text:p>
          </table:table-cell>
          <table:table-cell table:style-name="ce21" table:formula="of:=[Obsolete.K12]/[Obsolete.I12]" office:value-type="percentage" office:value="0.0141931502622647" calcext:value-type="percentage">
            <text:p>1%</text:p>
          </table:table-cell>
          <table:table-cell table:style-name="ce47" table:formula="of:=[.F12]&amp;[.H12]&amp;[.E12]&amp;[.B12]" office:value-type="string" office:string-value="JVMread_1000dev42190" calcext:value-type="string">
            <text:p>JVMread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3.331" calcext:value-type="float">
            <text:p>3.3</text:p>
          </table:table-cell>
          <table:table-cell table:style-name="ce19" table:formula="of:=1000000/[Obsolete.I13]" office:value-type="float" office:value="300210.147102972" calcext:value-type="float">
            <text:p>300,210</text:p>
          </table:table-cell>
          <table:table-cell table:style-name="ce16" office:value-type="float" office:value="0.017" calcext:value-type="float">
            <text:p>0.0</text:p>
          </table:table-cell>
          <table:table-cell table:style-name="ce21" table:formula="of:=[Obsolete.K13]/[Obsolete.I13]" office:value-type="percentage" office:value="0.00510357250075053" calcext:value-type="percentage">
            <text:p>1%</text:p>
          </table:table-cell>
          <table:table-cell table:style-name="ce47" table:formula="of:=[.F13]&amp;[.H13]&amp;[.E13]&amp;[.B13]" office:value-type="string" office:string-value="JVMread_1000dev42190" calcext:value-type="string">
            <text:p>JVMread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ae928e43a72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5.844" calcext:value-type="float">
            <text:p>55.8</text:p>
          </table:table-cell>
          <table:table-cell table:style-name="ce19" table:formula="of:=1000000/[Obsolete.I14]" office:value-type="float" office:value="17907.0267172839" calcext:value-type="float">
            <text:p>17,907</text:p>
          </table:table-cell>
          <table:table-cell table:style-name="ce16" office:value-type="float" office:value="0.048715241" calcext:value-type="float">
            <text:p>0.0</text:p>
          </table:table-cell>
          <table:table-cell table:style-name="ce21" table:formula="of:=[Obsolete.K14]/[Obsolete.I14]" office:value-type="percentage" office:value="0.000872345122125922" calcext:value-type="percentage">
            <text:p>0%</text:p>
          </table:table-cell>
          <table:table-cell table:style-name="ce47" table:formula="of:=[.F14]&amp;[.H14]&amp;[.E14]&amp;[.B14]" office:value-type="string" office:string-value="JVMread_100dev42190" calcext:value-type="string">
            <text:p>JVMread_1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7.139" calcext:value-type="float">
            <text:p>57.1</text:p>
          </table:table-cell>
          <table:table-cell table:style-name="ce19" table:formula="of:=1000000/[Obsolete.I15]" office:value-type="float" office:value="17501.1813297398" calcext:value-type="float">
            <text:p>17,501</text:p>
          </table:table-cell>
          <table:table-cell table:style-name="ce16" office:value-type="float" office:value="0.465" calcext:value-type="float">
            <text:p>0.5</text:p>
          </table:table-cell>
          <table:table-cell table:style-name="ce21" table:formula="of:=[Obsolete.K15]/[Obsolete.I15]" office:value-type="percentage" office:value="0.00813804931832899" calcext:value-type="percentage">
            <text:p>1%</text:p>
          </table:table-cell>
          <table:table-cell table:style-name="ce47" table:formula="of:=[.F15]&amp;[.H15]&amp;[.E15]&amp;[.B15]" office:value-type="string" office:string-value="JVMread_100dev42190" calcext:value-type="string">
            <text:p>JVMread_1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27.461" calcext:value-type="float">
            <text:p>27.5</text:p>
          </table:table-cell>
          <table:table-cell table:style-name="ce19" table:formula="of:=1000000/[Obsolete.I16]" office:value-type="float" office:value="36415.2798514257" calcext:value-type="float">
            <text:p>36,415</text:p>
          </table:table-cell>
          <table:table-cell table:style-name="ce16" office:value-type="float" office:value="0.257" calcext:value-type="float">
            <text:p>0.3</text:p>
          </table:table-cell>
          <table:table-cell table:style-name="ce21" table:formula="of:=[Obsolete.K16]/[Obsolete.I16]" office:value-type="percentage" office:value="0.00935872692181639" calcext:value-type="percentage">
            <text:p>1%</text:p>
          </table:table-cell>
          <table:table-cell table:style-name="ce47" table:formula="of:=[.F16]&amp;[.H16]&amp;[.E16]&amp;[.B16]" office:value-type="string" office:string-value="JVMwrite_1000dev42183" calcext:value-type="string">
            <text:p>JVMwrite_1000dev4218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26.751" calcext:value-type="float">
            <text:p>26.8</text:p>
          </table:table-cell>
          <table:table-cell table:style-name="ce19" table:formula="of:=1000000/[Obsolete.I17]" office:value-type="float" office:value="37381.7801203693" calcext:value-type="float">
            <text:p>37,382</text:p>
          </table:table-cell>
          <table:table-cell table:style-name="ce16" office:value-type="float" office:value="0.208" calcext:value-type="float">
            <text:p>0.2</text:p>
          </table:table-cell>
          <table:table-cell table:style-name="ce21" table:formula="of:=[Obsolete.K17]/[Obsolete.I17]" office:value-type="percentage" office:value="0.00777541026503682" calcext:value-type="percentage">
            <text:p>1%</text:p>
          </table:table-cell>
          <table:table-cell table:style-name="ce47" table:formula="of:=[.F17]&amp;[.H17]&amp;[.E17]&amp;[.B17]" office:value-type="string" office:string-value="JVMwrite_1000dev42190" calcext:value-type="string">
            <text:p>JVMwrite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357.43" calcext:value-type="float">
            <text:p>357.4</text:p>
          </table:table-cell>
          <table:table-cell table:style-name="ce19" table:formula="of:=1000000/[Obsolete.I18]" office:value-type="float" office:value="2797.75060851076" calcext:value-type="float">
            <text:p>2,798</text:p>
          </table:table-cell>
          <table:table-cell table:style-name="ce16" office:value-type="float" office:value="4.428" calcext:value-type="float">
            <text:p>4.4</text:p>
          </table:table-cell>
          <table:table-cell table:style-name="ce21" table:formula="of:=[Obsolete.K18]/[Obsolete.I18]" office:value-type="percentage" office:value="0.0123884396944856" calcext:value-type="percentage">
            <text:p>1%</text:p>
          </table:table-cell>
          <table:table-cell table:style-name="ce47" table:formula="of:=[.F18]&amp;[.H18]&amp;[.E18]&amp;[.B18]" office:value-type="string" office:string-value="JVMwrite_100dev42183" calcext:value-type="string">
            <text:p>JVMwrite_100dev4218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345.374" calcext:value-type="float">
            <text:p>345.4</text:p>
          </table:table-cell>
          <table:table-cell table:style-name="ce19" table:formula="of:=1000000/[Obsolete.I19]" office:value-type="float" office:value="2895.41193025532" calcext:value-type="float">
            <text:p>2,895</text:p>
          </table:table-cell>
          <table:table-cell table:style-name="ce16" office:value-type="float" office:value="2.829" calcext:value-type="float">
            <text:p>2.8</text:p>
          </table:table-cell>
          <table:table-cell table:style-name="ce21" table:formula="of:=[Obsolete.K19]/[Obsolete.I19]" office:value-type="percentage" office:value="0.00819112035069229" calcext:value-type="percentage">
            <text:p>1%</text:p>
          </table:table-cell>
          <table:table-cell table:style-name="ce47" table:formula="of:=[.F19]&amp;[.H19]&amp;[.E19]&amp;[.B19]" office:value-type="string" office:string-value="JVMwrite_100dev42190" calcext:value-type="string">
            <text:p>JVMwrite_100dev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7.663613506" calcext:value-type="float">
            <text:p>7.7</text:p>
          </table:table-cell>
          <table:table-cell table:style-name="ce19" table:formula="of:=1000000/[Obsolete.I20]" office:value-type="float" office:value="130486.747435408" calcext:value-type="float">
            <text:p>130,487</text:p>
          </table:table-cell>
          <table:table-cell table:style-name="ce16" office:value-type="float" office:value="0.937" calcext:value-type="float">
            <text:p>0.9</text:p>
          </table:table-cell>
          <table:table-cell table:style-name="ce56" table:formula="of:=[Obsolete.K20]/[Obsolete.I20]" office:value-type="percentage" office:value="0.122266082346977" calcext:value-type="percentage">
            <text:p>12%</text:p>
          </table:table-cell>
          <table:table-cell table:style-name="ce47" table:formula="of:=[Obsolete.F20]&amp;[Obsolete.H20]&amp;[Obsolete.E20]&amp;[Obsolete.B20]" office:value-type="string" office:string-value="JShash_1000dev:fullOpt42186" calcext:value-type="string">
            <text:p>JShash_1000dev:fullOpt42186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9.078008906" calcext:value-type="float">
            <text:p>9.1</text:p>
          </table:table-cell>
          <table:table-cell table:style-name="ce19" table:formula="of:=1000000/[Obsolete.I21]" office:value-type="float" office:value="110156.314050217" calcext:value-type="float">
            <text:p>110,156</text:p>
          </table:table-cell>
          <table:table-cell table:style-name="ce16" office:value-type="float" office:value="0.033475428" calcext:value-type="float">
            <text:p>0.0</text:p>
          </table:table-cell>
          <table:table-cell table:style-name="ce21" table:formula="of:=[Obsolete.K21]/[Obsolete.I21]" office:value-type="percentage" office:value="0.00368752975973342" calcext:value-type="percentage">
            <text:p>0%</text:p>
          </table:table-cell>
          <table:table-cell table:style-name="ce47" table:formula="of:=[Obsolete.F21]&amp;[Obsolete.H21]&amp;[Obsolete.E21]&amp;[Obsolete.B21]" office:value-type="string" office:string-value="JShash_1000dev:fullOpt42190" calcext:value-type="string">
            <text:p>JShash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072155308" calcext:value-type="float">
            <text:p>0.1</text:p>
          </table:table-cell>
          <table:table-cell table:style-name="ce19" table:formula="of:=1000000/[Obsolete.I22]" office:value-type="float" office:value="13858994.268308" calcext:value-type="float">
            <text:p>13,858,994</text:p>
          </table:table-cell>
          <table:table-cell table:style-name="ce16" office:value-type="float" office:value="0.000365988" calcext:value-type="float">
            <text:p>0.0</text:p>
          </table:table-cell>
          <table:table-cell table:style-name="ce21" table:formula="of:=[Obsolete.K22]/[Obsolete.I22]" office:value-type="percentage" office:value="0.00507222559426952" calcext:value-type="percentage">
            <text:p>1%</text:p>
          </table:table-cell>
          <table:table-cell table:style-name="ce47" table:formula="of:=[Obsolete.F22]&amp;[Obsolete.H22]&amp;[Obsolete.E22]&amp;[Obsolete.B22]" office:value-type="string" office:string-value="JSread_1000dev:fullOpt42185" calcext:value-type="string">
            <text:p>JSread_1000dev:fullOpt42185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058956782" calcext:value-type="float">
            <text:p>0.1</text:p>
          </table:table-cell>
          <table:table-cell table:style-name="ce19" table:formula="of:=1000000/[Obsolete.I23]" office:value-type="float" office:value="16961577.0412978" calcext:value-type="float">
            <text:p>16,961,577</text:p>
          </table:table-cell>
          <table:table-cell table:style-name="ce16" office:value-type="float" office:value="0.000453765" calcext:value-type="float">
            <text:p>0.0</text:p>
          </table:table-cell>
          <table:table-cell table:style-name="ce21" table:formula="of:=[Obsolete.K23]/[Obsolete.I23]" office:value-type="percentage" office:value="0.0076965700061445" calcext:value-type="percentage">
            <text:p>1%</text:p>
          </table:table-cell>
          <table:table-cell table:style-name="ce47" table:formula="of:=[Obsolete.F23]&amp;[Obsolete.H23]&amp;[Obsolete.E23]&amp;[Obsolete.B23]" office:value-type="string" office:string-value="JSread_1000dev:fullOpt42190" calcext:value-type="string">
            <text:p>JSread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1.969445566" calcext:value-type="float">
            <text:p>2.0</text:p>
          </table:table-cell>
          <table:table-cell table:style-name="ce19" table:formula="of:=1000000/[Obsolete.I24]" office:value-type="float" office:value="507757.11563891" calcext:value-type="float">
            <text:p>507,757</text:p>
          </table:table-cell>
          <table:table-cell table:style-name="ce16" office:value-type="float" office:value="0.015828753" calcext:value-type="float">
            <text:p>0.0</text:p>
          </table:table-cell>
          <table:table-cell table:style-name="ce21" table:formula="of:=[Obsolete.K24]/[Obsolete.I24]" office:value-type="percentage" office:value="0.00803716196744074" calcext:value-type="percentage">
            <text:p>1%</text:p>
          </table:table-cell>
          <table:table-cell table:style-name="ce47" table:formula="of:=[Obsolete.F24]&amp;[Obsolete.H24]&amp;[Obsolete.E24]&amp;[Obsolete.B24]" office:value-type="string" office:string-value="JSread_100dev:fullOpt42185" calcext:value-type="string">
            <text:p>JSread_100dev:fullOpt42185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2.145401589" calcext:value-type="float">
            <text:p>2.1</text:p>
          </table:table-cell>
          <table:table-cell table:style-name="ce19" table:formula="of:=1000000/[Obsolete.I25]" office:value-type="float" office:value="466113.200030822" calcext:value-type="float">
            <text:p>466,113</text:p>
          </table:table-cell>
          <table:table-cell table:style-name="ce16" office:value-type="float" office:value="0.044162004" calcext:value-type="float">
            <text:p>0.0</text:p>
          </table:table-cell>
          <table:table-cell table:style-name="ce21" table:formula="of:=[Obsolete.K25]/[Obsolete.I25]" office:value-type="percentage" office:value="0.020584493004214" calcext:value-type="percentage">
            <text:p>2%</text:p>
          </table:table-cell>
          <table:table-cell table:style-name="ce47" table:formula="of:=[Obsolete.F25]&amp;[Obsolete.H25]&amp;[Obsolete.E25]&amp;[Obsolete.B25]" office:value-type="string" office:string-value="JSread_100dev:fullOpt42190" calcext:value-type="string">
            <text:p>JSread_1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0.555757148" calcext:value-type="float">
            <text:p>0.6</text:p>
          </table:table-cell>
          <table:table-cell table:style-name="ce19" table:formula="of:=1000000/[Obsolete.I26]" office:value-type="float" office:value="1799347.07740367" calcext:value-type="float">
            <text:p>1,799,347</text:p>
          </table:table-cell>
          <table:table-cell table:style-name="ce16" office:value-type="float" office:value="0.012446982" calcext:value-type="float">
            <text:p>0.0</text:p>
          </table:table-cell>
          <table:table-cell table:style-name="ce21" table:formula="of:=[Obsolete.K26]/[Obsolete.I26]" office:value-type="percentage" office:value="0.0223964406841961" calcext:value-type="percentage">
            <text:p>2%</text:p>
          </table:table-cell>
          <table:table-cell table:style-name="ce47" table:formula="of:=[Obsolete.F26]&amp;[Obsolete.H26]&amp;[Obsolete.E26]&amp;[Obsolete.B26]" office:value-type="string" office:string-value="JSwrite_1000dev:fullOpt42190" calcext:value-type="string">
            <text:p>JSwrite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44.814" calcext:value-type="float">
            <text:p>44.8</text:p>
          </table:table-cell>
          <table:table-cell table:style-name="ce19" table:formula="of:=1000000/[Obsolete.I27]" office:value-type="float" office:value="22314.455304146" calcext:value-type="float">
            <text:p>22,314</text:p>
          </table:table-cell>
          <table:table-cell table:style-name="ce16" office:value-type="float" office:value="0.269" calcext:value-type="float">
            <text:p>0.3</text:p>
          </table:table-cell>
          <table:table-cell table:style-name="ce21" table:formula="of:=[Obsolete.K27]/[Obsolete.I27]" office:value-type="percentage" office:value="0.00600258847681528" calcext:value-type="percentage">
            <text:p>1%</text:p>
          </table:table-cell>
          <table:table-cell table:style-name="ce47" table:formula="of:=[Obsolete.F27]&amp;[Obsolete.H27]&amp;[Obsolete.E27]&amp;[Obsolete.B27]" office:value-type="string" office:string-value="JVMhash_1000dev42186" calcext:value-type="string">
            <text:p>JVMhash_1000dev42186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40.384" calcext:value-type="float">
            <text:p>40.4</text:p>
          </table:table-cell>
          <table:table-cell table:style-name="ce19" table:formula="of:=1000000/[Obsolete.I28]" office:value-type="float" office:value="24762.2820919176" calcext:value-type="float">
            <text:p>24,762</text:p>
          </table:table-cell>
          <table:table-cell table:style-name="ce16" office:value-type="float" office:value="0.337" calcext:value-type="float">
            <text:p>0.3</text:p>
          </table:table-cell>
          <table:table-cell table:style-name="ce21" table:formula="of:=[Obsolete.K28]/[Obsolete.I28]" office:value-type="percentage" office:value="0.00834488906497623" calcext:value-type="percentage">
            <text:p>1%</text:p>
          </table:table-cell>
          <table:table-cell table:style-name="ce47" table:formula="of:=[Obsolete.F28]&amp;[Obsolete.H28]&amp;[Obsolete.E28]&amp;[Obsolete.B28]" office:value-type="string" office:string-value="JVMhash_1000dev42191" calcext:value-type="string">
            <text:p>JVMhash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799" calcext:value-type="float">
            <text:p>0.8</text:p>
          </table:table-cell>
          <table:table-cell table:style-name="ce19" table:formula="of:=1000000/[Obsolete.I29]" office:value-type="float" office:value="1251564.45556946" calcext:value-type="float">
            <text:p>1,251,564</text:p>
          </table:table-cell>
          <table:table-cell table:style-name="ce16" office:value-type="float" office:value="0.021" calcext:value-type="float">
            <text:p>0.0</text:p>
          </table:table-cell>
          <table:table-cell table:style-name="ce21" table:formula="of:=[Obsolete.K29]/[Obsolete.I29]" office:value-type="percentage" office:value="0.0262828535669587" calcext:value-type="percentage">
            <text:p>3%</text:p>
          </table:table-cell>
          <table:table-cell table:style-name="ce47" table:formula="of:=[Obsolete.F29]&amp;[Obsolete.H29]&amp;[Obsolete.E29]&amp;[Obsolete.B29]" office:value-type="string" office:string-value="JVMread_1000dev42191" calcext:value-type="string">
            <text:p>JVMread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17.607" calcext:value-type="float">
            <text:p>17.6</text:p>
          </table:table-cell>
          <table:table-cell table:style-name="ce19" table:formula="of:=1000000/[Obsolete.I30]" office:value-type="float" office:value="56795.5926620094" calcext:value-type="float">
            <text:p>56,796</text:p>
          </table:table-cell>
          <table:table-cell table:style-name="ce16" office:value-type="float" office:value="0.064" calcext:value-type="float">
            <text:p>0.1</text:p>
          </table:table-cell>
          <table:table-cell table:style-name="ce21" table:formula="of:=[Obsolete.K30]/[Obsolete.I30]" office:value-type="percentage" office:value="0.0036349179303686" calcext:value-type="percentage">
            <text:p>0%</text:p>
          </table:table-cell>
          <table:table-cell table:style-name="ce47" table:formula="of:=[Obsolete.F30]&amp;[Obsolete.H30]&amp;[Obsolete.E30]&amp;[Obsolete.B30]" office:value-type="string" office:string-value="JVMread_100dev42191" calcext:value-type="string">
            <text:p>JVMread_1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6.933" calcext:value-type="float">
            <text:p>6.9</text:p>
          </table:table-cell>
          <table:table-cell table:style-name="ce19" table:formula="of:=1000000/[Obsolete.I31]" office:value-type="float" office:value="144237.703735757" calcext:value-type="float">
            <text:p>144,238</text:p>
          </table:table-cell>
          <table:table-cell table:style-name="ce16" office:value-type="float" office:value="0.068" calcext:value-type="float">
            <text:p>0.1</text:p>
          </table:table-cell>
          <table:table-cell table:style-name="ce21" table:formula="of:=[Obsolete.K31]/[Obsolete.I31]" office:value-type="percentage" office:value="0.00980816385403145" calcext:value-type="percentage">
            <text:p>1%</text:p>
          </table:table-cell>
          <table:table-cell table:style-name="ce47" table:formula="of:=[Obsolete.F31]&amp;[Obsolete.H31]&amp;[Obsolete.E31]&amp;[Obsolete.B31]" office:value-type="string" office:string-value="JVMwrite_1000dev42183" calcext:value-type="string">
            <text:p>JVMwrite_1000dev42183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6.833" calcext:value-type="float">
            <text:p>6.8</text:p>
          </table:table-cell>
          <table:table-cell table:style-name="ce19" table:formula="of:=1000000/[Obsolete.I32]" office:value-type="float" office:value="146348.602370847" calcext:value-type="float">
            <text:p>146,349</text:p>
          </table:table-cell>
          <table:table-cell table:style-name="ce16" office:value-type="float" office:value="0.078" calcext:value-type="float">
            <text:p>0.1</text:p>
          </table:table-cell>
          <table:table-cell table:style-name="ce21" table:formula="of:=[Obsolete.K32]/[Obsolete.I32]" office:value-type="percentage" office:value="0.0114151909849261" calcext:value-type="percentage">
            <text:p>1%</text:p>
          </table:table-cell>
          <table:table-cell table:style-name="ce47" table:formula="of:=[Obsolete.F32]&amp;[Obsolete.H32]&amp;[Obsolete.E32]&amp;[Obsolete.B32]" office:value-type="string" office:string-value="JVMwrite_1000dev42191" calcext:value-type="string">
            <text:p>JVMwrite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101.425" calcext:value-type="float">
            <text:p>101.4</text:p>
          </table:table-cell>
          <table:table-cell table:style-name="ce19" table:formula="of:=1000000/[Obsolete.I33]" office:value-type="float" office:value="9859.5020951442" calcext:value-type="float">
            <text:p>9,860</text:p>
          </table:table-cell>
          <table:table-cell table:style-name="ce16" office:value-type="float" office:value="1.04" calcext:value-type="float">
            <text:p>1.0</text:p>
          </table:table-cell>
          <table:table-cell table:style-name="ce21" table:formula="of:=[Obsolete.K33]/[Obsolete.I33]" office:value-type="percentage" office:value="0.01025388217895" calcext:value-type="percentage">
            <text:p>1%</text:p>
          </table:table-cell>
          <table:table-cell table:style-name="ce47" table:formula="of:=[Obsolete.F33]&amp;[Obsolete.H33]&amp;[Obsolete.E33]&amp;[Obsolete.B33]" office:value-type="string" office:string-value="JVMwrite_100dev42183" calcext:value-type="string">
            <text:p>JVMwrite_100dev42183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95.461" calcext:value-type="float">
            <text:p>95.5</text:p>
          </table:table-cell>
          <table:table-cell table:style-name="ce19" table:formula="of:=1000000/[Obsolete.I34]" office:value-type="float" office:value="10475.4821340652" calcext:value-type="float">
            <text:p>10,475</text:p>
          </table:table-cell>
          <table:table-cell table:style-name="ce16" office:value-type="float" office:value="1.294" calcext:value-type="float">
            <text:p>1.3</text:p>
          </table:table-cell>
          <table:table-cell table:style-name="ce21" table:formula="of:=[Obsolete.K34]/[Obsolete.I34]" office:value-type="percentage" office:value="0.0135552738814804" calcext:value-type="percentage">
            <text:p>1%</text:p>
          </table:table-cell>
          <table:table-cell table:style-name="ce47" table:formula="of:=[Obsolete.F34]&amp;[Obsolete.H34]&amp;[Obsolete.E34]&amp;[Obsolete.B34]" office:value-type="string" office:string-value="JVMwrite_100dev42191" calcext:value-type="string">
            <text:p>JVMwrite_1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54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6.478333019" calcext:value-type="float">
            <text:p>6.5</text:p>
          </table:table-cell>
          <table:table-cell table:style-name="ce19" table:formula="of:=1000000/[.I35]" office:value-type="float" office:value="154360.696967437" calcext:value-type="float">
            <text:p>154,361</text:p>
          </table:table-cell>
          <table:table-cell table:style-name="ce16" office:value-type="float" office:value="0.623364554" calcext:value-type="float">
            <text:p>0.6</text:p>
          </table:table-cell>
          <table:table-cell table:style-name="ce56" table:formula="of:=[.K35]/[.I35]" office:value-type="percentage" office:value="0.0962229870202355" calcext:value-type="percentage">
            <text:p>10%</text:p>
          </table:table-cell>
          <table:table-cell table:style-name="ce25" table:formula="of:=IF([.F35]=&quot;JVM&quot;;1;2)&amp;[.H35]&amp;[.E35]&amp;[.B35]" office:value-type="string" office:string-value="2write_100dev:fullOpt42190" calcext:value-type="string">
            <text:p>2write_100dev:fullOpt42190</text:p>
          </table:table-cell>
          <table:table-cell table:number-columns-repeated="101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aptop.A1:Laptop.L6">
          <table:sort>
            <table:sort-by table:field-number="11" table:data-type="automatic"/>
          </table:sort>
        </table:database-range>
        <table:database-range table:name="__Anonymous_Sheet_DB__1" table:target-range-address="Desktop.A1:Desktop.L20">
          <table:sort>
            <table:sort-by table:field-number="11" table:data-type="automatic"/>
          </table:sort>
        </table:database-range>
        <table:database-range table:name="__Anonymous_Sheet_DB__2" table:target-range-address="Size.A1:Size.I5">
          <table:sort>
            <table:sort-by table:field-number="8" table:data-type="automatic"/>
          </table:sort>
        </table:database-range>
        <table:database-range table:name="__Anonymous_Sheet_DB__3" table:target-range-address="Obsolete.A1:Obsolete.M27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5:08:07.919035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24T15:11:12.733428882</dc:date>
    <meta:editing-duration>PT32M58S</meta:editing-duration>
    <meta:editing-cycles>26</meta:editing-cycles>
    <meta:generator>LibreOffice/4.3.7.2$Linux_X86_64 LibreOffice_project/430m0$Build-2</meta:generator>
    <meta:document-statistic meta:table-count="4" meta:cell-count="809" meta:object-count="0"/>
  </office:meta>
</office:document-meta>
</file>
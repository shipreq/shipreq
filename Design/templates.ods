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  <style:style style:name="T1" style:family="text">
      <style:text-properties style:text-position="super"/>
    </style:style>
  </office:automatic-styles>
  <office:body>
    <office:spreadsheet>
      <table:table table:name="templat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See Software Requirements 3<text:span text:style-name="T1">rd</text:span> Ed. pg 13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Business Proble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usiness Objectiv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ccess Criteri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usiness Ris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mitation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clusion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ssump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penden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usiness Requir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Ris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</text:p>
          </table:table-cell>
          <table:table-cell office:value-type="string" calcext:value-type="string">
            <text:p>User Requirement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mpReq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</text:p>
          </table:table-cell>
          <table:table-cell office:value-type="string" calcext:value-type="string">
            <text:p>Business Rul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  <table:table-cell table:formula="of:=&quot;reqType(&quot;&quot;&quot;&amp;[.A17]&amp;&quot;&quot;&quot;, &quot;&quot;&quot;&amp;[.B17]&amp;&quot;&quot;&quot;, ImplicationRequired&quot;&amp;IF([.C17];&quot;&quot;;&quot;.Not&quot;)&amp;&quot;)&quot;" office:value-type="string" office:string-value="reqType(&quot;BL&quot;, &quot;Business Rule&quot;, ImplicationRequired.Not)" calcext:value-type="string">
            <text:p>reqType("BL", "Business Rule", ImplicationRequired.Not)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Constraint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  <table:table-cell table:formula="of:=&quot;reqType(&quot;&quot;&quot;&amp;[.A18]&amp;&quot;&quot;&quot;, &quot;&quot;&quot;&amp;[.B18]&amp;&quot;&quot;&quot;, ImplicationRequired&quot;&amp;IF([.C18];&quot;&quot;;&quot;.Not&quot;)&amp;&quot;)&quot;" office:value-type="string" office:string-value="reqType(&quot;CO&quot;, &quot;Constraint&quot;, ImplicationRequired.Not)" calcext:value-type="string">
            <text:p>reqType("CO", "Constraint", ImplicationRequired.Not)</text:p>
          </table:table-cell>
        </table:table-row>
        <table:table-row table:style-name="ro1">
          <table:table-cell office:value-type="string" calcext:value-type="string">
            <text:p>DR</text:p>
          </table:table-cell>
          <table:table-cell office:value-type="string" calcext:value-type="string">
            <text:p>Data Requirement</text:p>
          </table:table-cell>
          <table:table-cell table:style-name="ce2" office:value-type="boolean" office:boolean-value="true" calcext:value-type="boolean">
            <text:p>TRUE</text:p>
          </table:table-cell>
          <table:table-cell/>
          <table:table-cell table:formula="of:=&quot;reqType(&quot;&quot;&quot;&amp;[.A19]&amp;&quot;&quot;&quot;, &quot;&quot;&quot;&amp;[.B19]&amp;&quot;&quot;&quot;, ImplicationRequired&quot;&amp;IF([.C19];&quot;&quot;;&quot;.Not&quot;)&amp;&quot;)&quot;" office:value-type="string" office:string-value="reqType(&quot;DR&quot;, &quot;Data Requirement&quot;, ImplicationRequired)" calcext:value-type="string">
            <text:p>reqType("DR", "Data Requirement", ImplicationRequired)</text:p>
          </table:table-cell>
        </table:table-row>
        <table:table-row table:style-name="ro1">
          <table:table-cell office:value-type="string" calcext:value-type="string">
            <text:p>EI</text:p>
          </table:table-cell>
          <table:table-cell office:value-type="string" calcext:value-type="string">
            <text:p>External Interface Requirement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  <table:table-cell table:formula="of:=&quot;reqType(&quot;&quot;&quot;&amp;[.A20]&amp;&quot;&quot;&quot;, &quot;&quot;&quot;&amp;[.B20]&amp;&quot;&quot;&quot;, ImplicationRequired&quot;&amp;IF([.C20];&quot;&quot;;&quot;.Not&quot;)&amp;&quot;)&quot;" office:value-type="string" office:string-value="reqType(&quot;EI&quot;, &quot;External Interface Requirement&quot;, ImplicationRequired.Not)" calcext:value-type="string">
            <text:p>reqType("EI", "External Interface Requirement", ImplicationRequired.Not)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Functional Requirement</text:p>
          </table:table-cell>
          <table:table-cell table:style-name="ce2" office:value-type="boolean" office:boolean-value="true" calcext:value-type="boolean">
            <text:p>TRUE</text:p>
          </table:table-cell>
          <table:table-cell/>
          <table:table-cell table:formula="of:=&quot;reqType(&quot;&quot;&quot;&amp;[.A21]&amp;&quot;&quot;&quot;, &quot;&quot;&quot;&amp;[.B21]&amp;&quot;&quot;&quot;, ImplicationRequired&quot;&amp;IF([.C21];&quot;&quot;;&quot;.Not&quot;)&amp;&quot;)&quot;" office:value-type="string" office:string-value="reqType(&quot;FR&quot;, &quot;Functional Requirement&quot;, ImplicationRequired)" calcext:value-type="string">
            <text:p>reqType("FR", "Functional Requirement", ImplicationRequired)</text:p>
          </table:table-cell>
        </table:table-row>
        <table:table-row table:style-name="ro1">
          <table:table-cell office:value-type="string" calcext:value-type="string">
            <text:p>MF</text:p>
          </table:table-cell>
          <table:table-cell office:value-type="string" calcext:value-type="string">
            <text:p>Major Featur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  <table:table-cell table:formula="of:=&quot;reqType(&quot;&quot;&quot;&amp;[.A22]&amp;&quot;&quot;&quot;, &quot;&quot;&quot;&amp;[.B22]&amp;&quot;&quot;&quot;, ImplicationRequired&quot;&amp;IF([.C22];&quot;&quot;;&quot;.Not&quot;)&amp;&quot;)&quot;" office:value-type="string" office:string-value="reqType(&quot;MF&quot;, &quot;Major Feature&quot;, ImplicationRequired.Not)" calcext:value-type="string">
            <text:p>reqType("MF", "Major Feature", ImplicationRequired.Not)</text:p>
          </table:table-cell>
        </table:table-row>
        <table:table-row table:style-name="ro1">
          <table:table-cell office:value-type="string" calcext:value-type="string">
            <text:p>OE</text:p>
          </table:table-cell>
          <table:table-cell office:value-type="string" calcext:value-type="string">
            <text:p>Operating Environment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  <table:table-cell table:formula="of:=&quot;reqType(&quot;&quot;&quot;&amp;[.A23]&amp;&quot;&quot;&quot;, &quot;&quot;&quot;&amp;[.B23]&amp;&quot;&quot;&quot;, ImplicationRequired&quot;&amp;IF([.C23];&quot;&quot;;&quot;.Not&quot;)&amp;&quot;)&quot;" office:value-type="string" office:string-value="reqType(&quot;OE&quot;, &quot;Operating Environment&quot;, ImplicationRequired.Not)" calcext:value-type="string">
            <text:p>reqType("OE", "Operating Environment", ImplicationRequired.Not)</text:p>
          </table:table-cell>
        </table:table-row>
        <table:table-row table:style-name="ro1">
          <table:table-cell office:value-type="string" calcext:value-type="string">
            <text:p>QA</text:p>
          </table:table-cell>
          <table:table-cell office:value-type="string" calcext:value-type="string">
            <text:p>Quality Attribut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  <table:table-cell table:formula="of:=&quot;reqType(&quot;&quot;&quot;&amp;[.A24]&amp;&quot;&quot;&quot;, &quot;&quot;&quot;&amp;[.B24]&amp;&quot;&quot;&quot;, ImplicationRequired&quot;&amp;IF([.C24];&quot;&quot;;&quot;.Not&quot;)&amp;&quot;)&quot;" office:value-type="string" office:string-value="reqType(&quot;QA&quot;, &quot;Quality Attribute&quot;, ImplicationRequired.Not)" calcext:value-type="string">
            <text:p>reqType("QA", "Quality Attribute", ImplicationRequired.Not)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olution Idea</text:p>
          </table:table-cell>
          <table:table-cell table:style-name="ce2" office:value-type="boolean" office:boolean-value="true" calcext:value-type="boolean">
            <text:p>TRUE</text:p>
          </table:table-cell>
          <table:table-cell/>
          <table:table-cell table:formula="of:=&quot;reqType(&quot;&quot;&quot;&amp;[.A25]&amp;&quot;&quot;&quot;, &quot;&quot;&quot;&amp;[.B25]&amp;&quot;&quot;&quot;, ImplicationRequired&quot;&amp;IF([.C25];&quot;&quot;;&quot;.Not&quot;)&amp;&quot;)&quot;" office:value-type="string" office:string-value="reqType(&quot;SI&quot;, &quot;Solution Idea&quot;, ImplicationRequired)" calcext:value-type="string">
            <text:p>reqType("SI", "Solution Idea", ImplicationRequired)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ODO</text:p>
          </table:table-cell>
          <table:table-cell office:value-type="string" calcext:value-type="string">
            <text:p>Unfinished. A task that needs doing.</text:p>
          </table:table-cell>
          <table:table-cell table:number-columns-repeated="2"/>
          <table:table-cell table:formula="of:=&quot;issueType(&quot;&quot;&quot;&amp;[.A28]&amp;&quot;&quot;&quot;, &quot;&quot;&quot;&amp;[.B28]&amp;&quot;&quot;&quot;)&quot;" office:value-type="string" office:string-value="issueType(&quot;TODO&quot;, &quot;Unfinished. A task that needs doing.&quot;)" calcext:value-type="string">
            <text:p>issueType("TODO", "Unfinished. A task that needs doing.")</text:p>
          </table:table-cell>
        </table:table-row>
        <table:table-row table:style-name="ro1">
          <table:table-cell office:value-type="string" calcext:value-type="string">
            <text:p>MAYBE</text:p>
          </table:table-cell>
          <table:table-cell table:number-columns-repeated="3"/>
          <table:table-cell table:formula="of:=&quot;issueType(&quot;&quot;&quot;&amp;[.A29]&amp;&quot;&quot;&quot;, &quot;&quot;&quot;&amp;[.B29]&amp;&quot;&quot;&quot;)&quot;" office:value-type="string" office:string-value="issueType(&quot;MAYBE&quot;, &quot;&quot;)" calcext:value-type="string">
            <text:p>issueType("MAYBE", "")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table:number-columns-repeated="3"/>
          <table:table-cell table:formula="of:=&quot;issueType(&quot;&quot;&quot;&amp;[.A30]&amp;&quot;&quot;&quot;, &quot;&quot;&quot;&amp;[.B30]&amp;&quot;&quot;&quot;)&quot;" office:value-type="string" office:string-value="issueType(&quot;PENDING&quot;, &quot;&quot;)" calcext:value-type="string">
            <text:p>issueType("PENDING", "")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a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o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or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us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oul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u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ease Ver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 Unreleas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- v1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u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lim</text:p>
          </table:table-cell>
          <table:table-cell office:value-type="string" calcext:value-type="string">
            <text:p>Preliminary investigation performed.</text:p>
          </table:table-cell>
          <table:table-cell/>
          <table:table-cell table:formula="of:=&quot;val &quot;&amp;[.B44]&amp;&quot; = applicableTag(&quot;&quot;&quot;&amp;[.B44]&amp;&quot;&quot;&quot;, &quot;&quot;&quot;&amp;[.C44]&amp;&quot;&quot;&quot;, HashRefKey(&quot;&quot;&quot;&amp;[.B44]&amp;&quot;&quot;&quot;))&quot;" office:value-type="string" office:string-value="val prelim = applicableTag(&quot;prelim&quot;, &quot;Preliminary investigation performed.&quot;, HashRefKey(&quot;prelim&quot;))" calcext:value-type="string">
            <text:p>val prelim = applicableTag("prelim", "Preliminary investigation performed.", HashRefKey("prelim"))</text:p>
          </table:table-cell>
        </table:table-row>
        <table:table-row table:style-name="ro1">
          <table:table-cell/>
          <table:table-cell office:value-type="string" calcext:value-type="string">
            <text:p>wip</text:p>
          </table:table-cell>
          <table:table-cell office:value-type="string" calcext:value-type="string">
            <text:p>The requirements are a Work In Progress.</text:p>
          </table:table-cell>
          <table:table-cell/>
          <table:table-cell table:formula="of:=&quot;val &quot;&amp;[.B45]&amp;&quot; = applicableTag(&quot;&quot;&quot;&amp;[.B45]&amp;&quot;&quot;&quot;, &quot;&quot;&quot;&amp;[.C45]&amp;&quot;&quot;&quot;, HashRefKey(&quot;&quot;&quot;&amp;[.B45]&amp;&quot;&quot;&quot;))&quot;" office:value-type="string" office:string-value="val wip = applicableTag(&quot;wip&quot;, &quot;The requirements are a Work In Progress.&quot;, HashRefKey(&quot;wip&quot;))" calcext:value-type="string">
            <text:p>val wip = applicableTag("wip", "The requirements are a Work In Progress.", HashRefKey("wip"))</text:p>
          </table:table-cell>
        </table:table-row>
        <table:table-row table:style-name="ro1">
          <table:table-cell/>
          <table:table-cell office:value-type="string" calcext:value-type="string">
            <text:p>review</text:p>
          </table:table-cell>
          <table:table-cell office:value-type="string" calcext:value-type="string">
            <text:p>Review in progress or pending.</text:p>
          </table:table-cell>
          <table:table-cell/>
          <table:table-cell table:formula="of:=&quot;val &quot;&amp;[.B46]&amp;&quot; = applicableTag(&quot;&quot;&quot;&amp;[.B46]&amp;&quot;&quot;&quot;, &quot;&quot;&quot;&amp;[.C46]&amp;&quot;&quot;&quot;, HashRefKey(&quot;&quot;&quot;&amp;[.B46]&amp;&quot;&quot;&quot;))&quot;" office:value-type="string" office:string-value="val review = applicableTag(&quot;review&quot;, &quot;Review in progress or pending.&quot;, HashRefKey(&quot;review&quot;))" calcext:value-type="string">
            <text:p>val review = applicableTag("review", "Review in progress or pending.", HashRefKey("review"))</text:p>
          </table:table-cell>
        </table:table-row>
        <table:table-row table:style-name="ro1">
          <table:table-cell/>
          <table:table-cell office:value-type="string" calcext:value-type="string">
            <text:p>dev</text:p>
          </table:table-cell>
          <table:table-cell office:value-type="string" calcext:value-type="string">
            <text:p>Implementation being developed.</text:p>
          </table:table-cell>
          <table:table-cell/>
          <table:table-cell table:formula="of:=&quot;val &quot;&amp;[.B47]&amp;&quot; = applicableTag(&quot;&quot;&quot;&amp;[.B47]&amp;&quot;&quot;&quot;, &quot;&quot;&quot;&amp;[.C47]&amp;&quot;&quot;&quot;, HashRefKey(&quot;&quot;&quot;&amp;[.B47]&amp;&quot;&quot;&quot;))&quot;" office:value-type="string" office:string-value="val dev = applicableTag(&quot;dev&quot;, &quot;Implementation being developed.&quot;, HashRefKey(&quot;dev&quot;))" calcext:value-type="string">
            <text:p>val dev = applicableTag("dev", "Implementation being developed.", HashRefKey("dev"))</text:p>
          </table:table-cell>
        </table:table-row>
        <table:table-row table:style-name="ro1">
          <table:table-cell/>
          <table:table-cell office:value-type="string" calcext:value-type="string">
            <text:p>released</text:p>
          </table:table-cell>
          <table:table-cell office:value-type="string" calcext:value-type="string">
            <text:p>Implementation released.</text:p>
          </table:table-cell>
          <table:table-cell/>
          <table:table-cell table:formula="of:=&quot;val &quot;&amp;[.B48]&amp;&quot; = applicableTag(&quot;&quot;&quot;&amp;[.B48]&amp;&quot;&quot;&quot;, &quot;&quot;&quot;&amp;[.C48]&amp;&quot;&quot;&quot;, HashRefKey(&quot;&quot;&quot;&amp;[.B48]&amp;&quot;&quot;&quot;))&quot;" office:value-type="string" office:string-value="val released = applicableTag(&quot;released&quot;, &quot;Implementation released.&quot;, HashRefKey(&quot;released&quot;))" calcext:value-type="string">
            <text:p>val released = applicableTag("released", "Implementation released.", HashRefKey("released"))</text:p>
          </table:table-cell>
        </table:table-row>
        <table:table-row table:style-name="ro1">
          <table:table-cell/>
          <table:table-cell office:value-type="string" calcext:value-type="string">
            <text:p>aborted</text:p>
          </table:table-cell>
          <table:table-cell office:value-type="string" calcext:value-type="string">
            <text:p>Feature has been aborted.</text:p>
          </table:table-cell>
          <table:table-cell/>
          <table:table-cell table:formula="of:=&quot;val &quot;&amp;[.B49]&amp;&quot; = applicableTag(&quot;&quot;&quot;&amp;[.B49]&amp;&quot;&quot;&quot;, &quot;&quot;&quot;&amp;[.C49]&amp;&quot;&quot;&quot;, HashRefKey(&quot;&quot;&quot;&amp;[.B49]&amp;&quot;&quot;&quot;))&quot;" office:value-type="string" office:string-value="val aborted = applicableTag(&quot;aborted&quot;, &quot;Feature has been aborted.&quot;, HashRefKey(&quot;aborted&quot;))" calcext:value-type="string">
            <text:p>val aborted = applicableTag("aborted", "Feature has been aborted.", HashRefKey("aborted"))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Fiel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mp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o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ease Ver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or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jor Feature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template.A17:template.B2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5">00/00/0000</text:date>, <text:time style:data-style-name="N2" text:time-value="12:37:33.5184676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9T10:59:55.578530063</meta:creation-date>
    <dc:date>2015-07-25T14:13:12.916264032</dc:date>
    <meta:editing-duration>PT30M4S</meta:editing-duration>
    <meta:editing-cycles>7</meta:editing-cycles>
    <meta:generator>LibreOffice/4.3.7.2$Linux_X86_64 LibreOffice_project/430m0$Build-2</meta:generator>
    <meta:document-statistic meta:table-count="1" meta:cell-count="97" meta:object-count="0"/>
  </office:meta>
</office:document-meta>
</file>
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9.4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3.327cm"/>
    </style:style>
    <style:style style:name="co6" style:family="table-column">
      <style:table-column-properties fo:break-before="auto" style:column-width="3.604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995cm" fo:break-before="auto" style:use-optimal-row-height="true"/>
    </style:style>
    <style:style style:name="ro3" style:family="table-row">
      <style:table-row-properties style:row-height="1.494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  <style:text-properties fo:font-size="12pt" style:font-size-asian="12pt" style:font-size-complex="12pt" fo:hyphenate="true"/>
    </style:style>
    <style:style style:name="ce2" style:family="table-cell" style:parent-style-name="Default">
      <style:table-cell-properties fo:wrap-option="no-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5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6" style:family="table-cell" style:parent-style-name="Default">
      <style:table-cell-properties fo:wrap-option="wrap" style:vertical-align="top"/>
      <style:text-properties fo:font-size="12pt" style:font-size-asian="12pt" style:font-size-complex="12pt" fo:hyphenate="true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color="#4c1900" fo:font-size="12pt" style:font-size-asian="12pt" style:font-size-complex="12pt"/>
    </style:style>
    <style:style style:name="ce11" style:family="table-cell" style:parent-style-name="Default">
      <style:text-properties fo:color="#ff00ff" fo:font-size="12pt" style:font-size-asian="12pt" style:font-size-complex="12pt"/>
    </style:style>
    <style:style style:name="ce12" style:family="table-cell" style:parent-style-name="Default">
      <style:text-properties style:font-name="Arimo" fo:font-size="12pt" style:font-name-asian="TianZhen" style:font-size-asian="12pt" style:font-name-complex="FreeSans" style:font-size-complex="12pt"/>
    </style:style>
    <style:style style:name="ce1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mo" style:font-name-asian="TianZhen" style:font-name-complex="FreeSans"/>
    </style:style>
    <style:style style:name="T3" style:family="text">
      <style:text-properties style:font-name="Arimo" fo:font-weight="bold" style:font-name-asian="TianZhen" style:font-weight-asian="bold" style:font-name-complex="FreeSans" style:font-weight-complex="bold"/>
    </style:style>
  </office:automatic-styles>
  <office:body>
    <office:spreadsheet>
      <table:table table:name="Overall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3" table:number-columns-repeated="1021" table:default-cell-style-name="ce6"/>
        <table:table-row table:style-name="ro1">
          <table:table-cell/>
          <table:table-cell table:style-name="ce4" office:value-type="string">
            <text:p>Approach #1</text:p>
          </table:table-cell>
          <table:table-cell table:style-name="ce4" office:value-type="string">
            <text:p>Approach #2c</text:p>
          </table:table-cell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Pros</text:p>
          </table:table-cell>
          <table:table-cell table:formula="of:=['1'.A48]" office:value-type="string" office:string-value="Steps are first-class citizens.">
            <text:p>Steps are first-class citizens.</text:p>
          </table:table-cell>
          <table:table-cell table:formula="of:=[2c.A38]" office:value-type="string" office:string-value="Step tree is flat and stored with labels.">
            <text:p>Step tree is flat and stored with labels.</text:p>
          </table:table-cell>
          <table:table-cell table:number-columns-repeated="1021"/>
        </table:table-row>
        <table:table-row table:style-name="ro1">
          <table:table-cell/>
          <table:table-cell table:formula="of:=['1'.A49]" office:value-type="string" office:string-value="Partial step trees are reusable.">
            <text:p>Partial step trees are reusable.</text:p>
          </table:table-cell>
          <table:table-cell table:formula="of:=[2c.A39]" office:value-type="string" office:string-value="Steps are first-class citizens.">
            <text:p>Steps are first-class citizens.</text:p>
          </table:table-cell>
          <table:table-cell table:number-columns-repeated="1021"/>
        </table:table-row>
        <table:table-row table:style-name="ro1">
          <table:table-cell/>
          <table:table-cell table:formula="of:=['1'.A50]" office:value-type="string" office:string-value="Identity (data) separate from state (value)">
            <text:p>Identity (data) separate from state (value)</text:p>
          </table:table-cell>
          <table:table-cell table:formula="of:=[2c.A40]" office:value-type="string" office:string-value="Identity (data) separate from state (value)">
            <text:p>Identity (data) separate from state (value)</text:p>
          </table:table-cell>
          <table:table-cell table:number-columns-repeated="1021"/>
        </table:table-row>
        <table:table-row table:style-name="ro1">
          <table:table-cell/>
          <table:table-cell table:formula="of:=['1'.A51]" office:value-type="string" office:string-value="Field values are reusable.">
            <text:p>Field values are reusable.</text:p>
          </table:table-cell>
          <table:table-cell table:formula="of:=[2c.A41]" office:value-type="string" office:string-value="Each step/textfield has its own audit trail.">
            <text:p>Each step/textfield has its own audit trail.</text:p>
          </table:table-cell>
          <table:table-cell table:number-columns-repeated="1021"/>
        </table:table-row>
        <table:table-row table:style-name="ro2">
          <table:table-cell/>
          <table:table-cell table:formula="of:=['1'.A52]" office:value-type="string" office:string-value="Can add new data types and relations without schema change.">
            <text:p>Can add new data types and relations without schema change.</text:p>
          </table:table-cell>
          <table:table-cell table:formula="of:=[2c.A42]" office:value-type="string" office:string-value="Easy to inspect via SQL">
            <text:p>Easy to inspect via SQL</text:p>
          </table:table-cell>
          <table:table-cell table:number-columns-repeated="1021"/>
        </table:table-row>
        <table:table-row table:style-name="ro3">
          <table:table-cell/>
          <table:table-cell table:formula="of:=['1'.A53]" office:value-type="string" office:string-value="Each step/textfield has its own audit trail.">
            <text:p>Each step/textfield has its own audit trail.</text:p>
          </table:table-cell>
          <table:table-cell table:formula="of:=[2c.A43]" office:value-type="string" office:string-value="Structure closely matches logical UC (with the exception of FK being on the outside, ie. TEXTR→TEXT→FK)">
            <text:p>Structure closely matches logical UC (with the exception of FK being on the outside, ie. TEXTR→TEXT→FK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ns</text:p>
          </table:table-cell>
          <table:table-cell table:formula="of:=['1'.A58]" office:value-type="string" office:string-value="Very hard to inspect via SQL.">
            <text:p>Very hard to inspect via SQL.</text:p>
          </table:table-cell>
          <table:table-cell table:formula="of:=[2c.A46]" office:value-type="string" office:string-value="2 implicit RI rules.">
            <text:p>2 implicit RI rules.</text:p>
          </table:table-cell>
          <table:table-cell table:number-columns-repeated="1021"/>
        </table:table-row>
        <table:table-row table:style-name="ro2">
          <table:table-cell/>
          <table:table-cell table:formula="of:=['1'.A59]" office:value-type="string" office:string-value="ID overlap between different data types.">
            <text:p>ID overlap between different data types.</text:p>
          </table:table-cell>
          <table:table-cell table:formula="of:=[2c.A47]" office:value-type="string" office:string-value="Enforcing uc_id between uc_step → step_rev → step would need a trigger.">
            <text:p>Enforcing uc_id between uc_step → step_rev → step would need a trigger.</text:p>
          </table:table-cell>
          <table:table-cell table:number-columns-repeated="1021"/>
        </table:table-row>
        <table:table-row table:style-name="ro2">
          <table:table-cell/>
          <table:table-cell table:formula="of:=['1'.A60]" office:value-type="string" office:string-value="Cross-table data-type integrity checks missing and would need to be done via triggers (slow).">
            <text:p>Cross-table data-type integrity checks missing and would need to be done via triggers (slow).</text:p>
          </table:table-cell>
          <table:table-cell table:formula="of:=[2c.A48]" office:value-type="string" office:string-value="Enforcing uc_step &amp; uc_text match the correct type of text.FK would need a trigger.">
            <text:p>Enforcing uc_step &amp; uc_text match the correct type of text.FK would need a trigger.</text:p>
          </table:table-cell>
          <table:table-cell table:number-columns-repeated="1021"/>
        </table:table-row>
        <table:table-row table:style-name="ro2">
          <table:table-cell/>
          <table:table-cell table:formula="of:=['1'.A61]" office:value-type="string" office:string-value="Complex structure and implicit rules (meaning any sanity-check-like behaviour will also be complex)">
            <text:p>Complex structure and implicit rules (meaning any sanity-check-like behaviour will also be complex)</text:p>
          </table:table-cell>
          <table:table-cell table:formula="of:=[2c.A49]" office:value-type="string" office:string-value="Doesn't inherently support new field types.">
            <text:p>Doesn't inherently support new field types.</text:p>
          </table:table-cell>
          <table:table-cell table:number-columns-repeated="1021"/>
        </table:table-row>
        <table:table-row table:style-name="ro1">
          <table:table-cell/>
          <table:table-cell table:formula="of:=['1'.A62]" office:value-type="string" office:string-value="Can't enforce: A step belongs to a single UC.">
            <text:p>Can't enforce: A step belongs to a single UC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Need: Reference a step, being unaffected by step text/label changes. (intra-UC)</text:p>
          </table:table-cell>
          <table:table-cell table:number-columns-repeated="1023"/>
        </table:table-row>
        <table:table-row table:style-name="ro2">
          <table:table-cell/>
          <table:table-cell table:number-columns-repeated="2" office:value-type="string">
            <text:p>Normalises to use step's data id. Denormalised on loa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eed: Reference a step, being unaffected by step text/label changes. (inter-UC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Text change: fine.</text:p>
            <text:p>Label change... No way to discern without loading &amp; unpacking entire UC.</text:p>
          </table:table-cell>
          <table:table-cell office:value-type="string">
            <text:p>Fine. Denormalise via:</text:p>
            <text:p>(UC, TEXTR) → UC_FIELD</text:p>
            <text:p>or UC → UC_FIELD → TEXT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eed: Reference a UC, being unaffected by title/number changes.</text:p>
          </table:table-cell>
          <table:table-cell table:number-columns-repeated="1023"/>
        </table:table-row>
        <table:table-row table:style-name="ro1">
          <table:table-cell/>
          <table:table-cell table:number-columns-repeated="2" office:value-type="string">
            <text:p>Normalise to use UC's data id. Denormalise on loa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eed: Lookup step by label.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Can't be done. Will need to unpack UC first.</text:p>
          </table:table-cell>
          <table:table-cell office:value-type="string">
            <text:p>Easy, look up UC_FIELD.lab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Want: Audit trail for a text field.</text:p>
          </table:table-cell>
          <table:table-cell table:number-columns-repeated="1023"/>
        </table:table-row>
        <table:table-row table:style-name="ro4">
          <table:table-cell table:number-columns-repeated="2"/>
          <table:table-cell office:value-type="string">
            <text:p>Done. TEXT *-- TEXTR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>
            <text:p>Want: Audit trail for a step.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formula="of:=[.C35]" office:value-type="string" office:string-value="Done. TEXT *-- TEXTR">
            <text:p>Done. TEXT *-- TEXTR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>
        <table:table-column table:style-name="co4" table:number-columns-repeated="5" table:default-cell-style-name="ce8"/>
        <table:table-column table:style-name="co3" table:number-columns-repeated="1019" table:default-cell-style-name="ce8"/>
        <table:table-row table:style-name="ro1">
          <table:table-cell table:style-name="ce7" office:value-type="string">
            <text:p>Approach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data</text:p>
          </table:table-cell>
          <table:table-cell office:value-type="string">
            <text:p>type_id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_type</text:p>
          </table:table-cell>
          <table:table-cell office:value-type="string">
            <text:p>id</text:p>
          </table:table-cell>
          <table:table-cell office:value-type="string">
            <text:p>INT2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data_type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1020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type_id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id</text:p>
          </table:table-cell>
          <table:table-cell office:value-type="string">
            <text:p>INT2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value</text:p>
          </table:table-cell>
          <table:table-cell office:value-type="string">
            <text:p>field_key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field_value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field_value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from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index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to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type_id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_type</text:p>
          </table:table-cell>
          <table:table-cell office:value-type="string">
            <text:p>id</text:p>
          </table:table-cell>
          <table:table-cell office:value-type="string">
            <text:p>INT2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relation_type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ep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secase</text:p>
          </table:table-cell>
          <table:table-cell office:value-type="string">
            <text:p>field_list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usecase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usecase</text:p>
          </table:table-cell>
          <table:table-cell office:value-type="string">
            <text:p>number</text:p>
          </table:table-cell>
          <table:table-cell office:value-type="string">
            <text:p>INT2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usecase</text:p>
          </table:table-cell>
          <table:table-cell office:value-type="string">
            <text:p>title</text:p>
          </table:table-cell>
          <table:table-cell office:value-type="string">
            <text:p>VARCHAR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ue</text:p>
          </table:table-cell>
          <table:table-cell office:value-type="string">
            <text:p>data_id</text:p>
          </table:table-cell>
          <table:table-cell office:value-type="string">
            <text:p>BIG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value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>
            <text:p>value</text:p>
          </table:table-cell>
          <table:table-cell office:value-type="string">
            <text:p>rev</text:p>
          </table:table-cell>
          <table:table-cell office:value-type="string">
            <text:p>INT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>
            <text:p>valu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office:value-type="string">
            <text:p>NOT NULL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>
            <text:p>Pros</text:p>
          </table:table-cell>
          <table:table-cell table:number-columns-repeated="1023"/>
        </table:table-row>
        <table:table-row table:style-name="ro1">
          <table:table-cell office:value-type="string">
            <text:p>Steps are first-class citizens.</text:p>
          </table:table-cell>
          <table:table-cell table:number-columns-repeated="1023"/>
        </table:table-row>
        <table:table-row table:style-name="ro1">
          <table:table-cell office:value-type="string">
            <text:p>Partial step trees are reusable.</text:p>
          </table:table-cell>
          <table:table-cell table:number-columns-repeated="1023"/>
        </table:table-row>
        <table:table-row table:style-name="ro1">
          <table:table-cell office:value-type="string">
            <text:p>Identity (data) separate from state (value)</text:p>
          </table:table-cell>
          <table:table-cell table:number-columns-repeated="1023"/>
        </table:table-row>
        <table:table-row table:style-name="ro1">
          <table:table-cell office:value-type="string">
            <text:p>Field values are reusable.</text:p>
          </table:table-cell>
          <table:table-cell table:number-columns-repeated="1023"/>
        </table:table-row>
        <table:table-row table:style-name="ro1">
          <table:table-cell office:value-type="string">
            <text:p>Can add new data types and relations without schema change.</text:p>
          </table:table-cell>
          <table:table-cell table:number-columns-repeated="1023"/>
        </table:table-row>
        <table:table-row table:style-name="ro1">
          <table:table-cell office:value-type="string">
            <text:p>Each step/textfield has its own audit trail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>
            <text:p>Cons</text:p>
          </table:table-cell>
          <table:table-cell table:number-columns-repeated="1023"/>
        </table:table-row>
        <table:table-row table:style-name="ro1">
          <table:table-cell office:value-type="string">
            <text:p>Very hard to inspect via SQL.</text:p>
          </table:table-cell>
          <table:table-cell table:number-columns-repeated="1023"/>
        </table:table-row>
        <table:table-row table:style-name="ro1">
          <table:table-cell office:value-type="string">
            <text:p>ID overlap between different data types.</text:p>
          </table:table-cell>
          <table:table-cell table:number-columns-repeated="1023"/>
        </table:table-row>
        <table:table-row table:style-name="ro1">
          <table:table-cell office:value-type="string">
            <text:p>Cross-table data-type integrity checks missing and would need to be done via triggers (slow).</text:p>
          </table:table-cell>
          <table:table-cell table:number-columns-repeated="1023"/>
        </table:table-row>
        <table:table-row table:style-name="ro1">
          <table:table-cell office:value-type="string">
            <text:p>Complex structure and implicit rules (meaning any sanity-check-like behaviour will also be complex)</text:p>
          </table:table-cell>
          <table:table-cell table:number-columns-repeated="1023"/>
        </table:table-row>
        <table:table-row table:style-name="ro1">
          <table:table-cell office:value-type="string">
            <text:p>Can't enforce: A step belongs to a single UC.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a" table:style-name="ta1">
        <table:table-column table:style-name="co5" table:default-cell-style-name="ce7"/>
        <table:table-column table:style-name="co5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3" table:number-columns-repeated="1019" table:default-cell-style-name="ce8"/>
        <table:table-row table:style-name="ro3">
          <table:table-cell office:value-type="string">
            <text:p>usecase</text:p>
          </table:table-cell>
          <table:table-cell office:value-type="string">
            <text:p>id</text:p>
          </table:table-cell>
          <table:table-cell office:value-type="string">
            <text:p>← usecase_rev.ident_id</text:p>
            <text:p>← step.uc_id</text:p>
            <text:p>← text_field.uc_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_id</text:p>
          </table:table-cell>
          <table:table-cell table:number-columns-repeated="2"/>
          <table:table-cell office:value-type="string">
            <text:p>?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test_rev_id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usecase_rev</text:p>
          </table:table-cell>
          <table:table-cell office:value-type="string">
            <text:p>id</text:p>
          </table:table-cell>
          <table:table-cell table:style-name="ce12" office:value-type="string">
            <text:p>← <text:span text:style-name="T1">usecase</text:span>.latest_rev_id</text:p>
            <text:p>← <text:span text:style-name="T1">uc_step</text:span>.uc_rev_id</text:p>
            <text:p>← <text:span text:style-name="T1">uc_tf</text:span>.uc_rev_id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_step</text:p>
          </table:table-cell>
          <table:table-cell office:value-type="string">
            <text:p>uc_rev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b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v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d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ep_rev_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ep</text:p>
          </table:table-cell>
          <table:table-cell office:value-type="string">
            <text:p>id</text:p>
          </table:table-cell>
          <table:table-cell table:style-name="ce12" office:value-type="string">
            <text:p>← step_rev.ident_id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uc_id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fk_id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step_rev</text:p>
          </table:table-cell>
          <table:table-cell office:value-type="string">
            <text:p>id</text:p>
          </table:table-cell>
          <table:table-cell table:style-name="ce12" office:value-type="string">
            <text:p>← <text:span text:style-name="T1">uc_step</text:span>.step_id</text:p>
          </table:table-cell>
          <table:table-cell/>
          <table:table-cell table:style-name="ce13" office:value-type="string">
            <text:p>?? delete ??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_tf</text:p>
          </table:table-cell>
          <table:table-cell office:value-type="string">
            <text:p>uc_rev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f_rev_i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ext_field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uc_id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fk_id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text_field_rev</text:p>
          </table:table-cell>
          <table:table-cell office:value-type="string">
            <text:p>id</text:p>
          </table:table-cell>
          <table:table-cell table:number-columns-repeated="2"/>
          <table:table-cell table:style-name="ce13" office:value-type="string">
            <text:p>?? delete ??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8 tables: UC → UCR → (UC_STEP → STEPR → STEP) + (UC_TF → TFR → TF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tep tree is flat and stored with labels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teps are first-class citizen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Identity (data) separate from state (value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ach step/textfield has its own audit trail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 office:value-type="string">
            <text:p>Easy to inspect via SQL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ema is very repetitive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 office:value-type="string">
            <text:p>2 implicit RI rules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nforcing uc_id between uc_step → step_rev → step would need a trigger.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8" office:value-type="string">
            <text:p>Enforcing text_field &amp; step fk_ids match the correct type of FK would need a trigger.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Doesn't inherently support new field types.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UC loads hits 8 tabl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/>
          <table:table-cell table:style-name="ce7" office:value-type="string">
            <text:p>Pi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revision has steps (specific revs)</text:p>
          </table:table-cell>
          <table:table-cell/>
          <table:table-cell office:value-type="string">
            <text:p>easy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revision has steps (global ident)</text:p>
          </table:table-cell>
          <table:table-cell/>
          <table:table-cell office:value-type="string">
            <text:p>filter by d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!</text:p>
          </table:table-cell>
          <table:table-cell table:number-columns-repeated="1023"/>
        </table:table-row>
        <table:table-row table:style-name="ro1">
          <table:table-cell office:value-type="string">
            <text:p>steps (ident) belong to a single UC</text:p>
          </table:table-cell>
          <table:table-cell table:number-columns-repeated="1023"/>
        </table:table-row>
        <table:table-row table:style-name="ro1">
          <table:table-cell office:value-type="string">
            <text:p>steps (ident) belong to a single FK</text:p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b" table:style-name="ta1">
        <table:table-column table:style-name="co5" table:default-cell-style-name="ce7"/>
        <table:table-column table:style-name="co5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3" table:number-columns-repeated="1019" table:default-cell-style-name="ce8"/>
        <table:table-row table:style-name="ro3">
          <table:table-cell office:value-type="string">
            <text:p>usecase</text:p>
          </table:table-cell>
          <table:table-cell office:value-type="string">
            <text:p>id</text:p>
          </table:table-cell>
          <table:table-cell office:value-type="string">
            <text:p>← usecase_rev.ident_id</text:p>
            <text:p>← step.uc_id</text:p>
            <text:p>← text_field.uc_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_id</text:p>
          </table:table-cell>
          <table:table-cell table:number-columns-repeated="2"/>
          <table:table-cell office:value-type="string">
            <text:p>?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test_rev_id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usecase_rev</text:p>
          </table:table-cell>
          <table:table-cell office:value-type="string">
            <text:p>id</text:p>
          </table:table-cell>
          <table:table-cell table:style-name="ce12" office:value-type="string">
            <text:p>← <text:span text:style-name="T1">usecase</text:span>.latest_rev_id</text:p>
            <text:p>← <text:span text:style-name="T1">uc_step</text:span>.uc_rev_id</text:p>
            <text:p>← <text:span text:style-name="T1">uc_tf</text:span>.uc_rev_id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_step</text:p>
          </table:table-cell>
          <table:table-cell office:value-type="string">
            <text:p>uc_rev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b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v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d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_rev_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_text</text:p>
          </table:table-cell>
          <table:table-cell office:value-type="string">
            <text:p>uc_rev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_rev_i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ext</text:p>
          </table:table-cell>
          <table:table-cell office:value-type="string">
            <text:p>id</text:p>
          </table:table-cell>
          <table:table-cell office:value-type="string">
            <text:p>← text_rev.ident_id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uc_id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fk_id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text_rev</text:p>
          </table:table-cell>
          <table:table-cell office:value-type="string">
            <text:p>id</text:p>
          </table:table-cell>
          <table:table-cell office:value-type="string">
            <text:p>← <text:span text:style-name="T1">uc_step.</text:span>text_rev_id</text:p>
            <text:p><text:span text:style-name="T2">← </text:span><text:span text:style-name="T3">uc_text.</text:span><text:span text:style-name="T2">text_rev_id</text:span>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Default"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6 tables: UC → UCR → (UC_STEP | UC_TEXT) → TEXTR → TE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tep tree is flat and stored with labels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teps are first-class citizen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Identity (data) separate from state (value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ach step/textfield has its own audit trail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 office:value-type="string">
            <text:p>Easy to inspect via SQL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2 implicit RI rule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Enforcing uc_id between uc_step → step_rev → step would need a trigger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nforcing uc_step &amp; uc_text match the correct type of text.FK would need a trigger.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8" office:value-type="string">
            <text:p>Doesn't inherently support new field types.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c" table:style-name="ta1">
        <table:table-column table:style-name="co5" table:default-cell-style-name="ce7"/>
        <table:table-column table:style-name="co5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3" table:number-columns-repeated="1019" table:default-cell-style-name="ce8"/>
        <table:table-row table:style-name="ro3">
          <table:table-cell office:value-type="string">
            <text:p>usecase</text:p>
          </table:table-cell>
          <table:table-cell office:value-type="string">
            <text:p>id</text:p>
          </table:table-cell>
          <table:table-cell office:value-type="string">
            <text:p>← usecase_rev.ident_id</text:p>
            <text:p>← step.uc_id</text:p>
            <text:p>← text_field.uc_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_id</text:p>
          </table:table-cell>
          <table:table-cell table:number-columns-repeated="2"/>
          <table:table-cell office:value-type="string">
            <text:p>?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test_rev_id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usecase_rev</text:p>
          </table:table-cell>
          <table:table-cell office:value-type="string">
            <text:p>id</text:p>
          </table:table-cell>
          <table:table-cell table:style-name="ce12" office:value-type="string">
            <text:p>← <text:span text:style-name="T1">usecase</text:span>.latest_rev_id</text:p>
            <text:p>← <text:span text:style-name="T1">uc_step</text:span>.uc_rev_id</text:p>
            <text:p>← <text:span text:style-name="T1">uc_tf</text:span>.uc_rev_id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_field</text:p>
          </table:table-cell>
          <table:table-cell office:value-type="string">
            <text:p>uc_rev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xt_rev_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xt</text:p>
          </table:table-cell>
          <table:table-cell office:value-type="string">
            <text:p>id</text:p>
          </table:table-cell>
          <table:table-cell office:value-type="string">
            <text:p>← text_rev.ident_id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uc_id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fk_id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text_rev</text:p>
          </table:table-cell>
          <table:table-cell office:value-type="string">
            <text:p>id</text:p>
          </table:table-cell>
          <table:table-cell office:value-type="string">
            <text:p>← <text:span text:style-name="T1">uc_step.</text:span>text_rev_id</text:p>
            <text:p><text:span text:style-name="T2">← </text:span><text:span text:style-name="T3">uc_text.</text:span><text:span text:style-name="T2">text_rev_id</text:span>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Default"/>
          <table:table-cell table:style-name="ce10" office:value-type="string">
            <text:p>ident_id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rev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 office:value-type="string">
            <text:p>updated_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_key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field_key_type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5 tables: UC → UCR → UC_FIELD → TEXTR → TE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tep tree is flat and stored with labels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teps are first-class citizen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Identity (data) separate from state (value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ach step/textfield has its own audit trail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 office:value-type="string">
            <text:p>Easy to inspect via SQL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tructure closely matches logical UC (with the exception of FK being on the outside, ie. TEXTR→TEXT→FK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2 implicit RI rules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Enforcing uc_id between uc_step → step_rev → step would need a trigger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nforcing uc_step &amp; uc_text match the correct type of text.FK would need a trigger.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8" office:value-type="string">
            <text:p>Doesn't inherently support new field types.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5" table:number-rows-repeated="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14:51:51</meta:creation-date>
    <dc:date>2013-08-08T10:52:39</dc:date>
    <meta:editing-duration>PT48M22S</meta:editing-duration>
    <meta:editing-cycles>2</meta:editing-cycles>
    <meta:generator>LibreOffice/4.0.4.2$Linux_X86_64 LibreOffice_project/400m0$Build-2</meta:generator>
    <meta:document-statistic meta:table-count="5" meta:cell-count="356" meta:object-count="0"/>
  </office:meta>
</office:document-meta>
</file>
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/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Default"/>
        <table:table-column table:style-name="co1" table:default-cell-style-name="ce6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ApplyTempla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TagGroup</text:p>
          </table:table-cell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ApplicableTag</text:p>
          </table:table-cell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11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table:style-name="ce4" office:value-type="string" calcext:value-type="string">
            <text:p>UpdateTagPosition</text:p>
          </table:table-cell>
          <table:table-cell table:style-name="ce7"/>
          <table:table-cell table:style-name="ce9" office:value-type="string" calcext:value-type="string">
            <text:p>&lt;id&gt;</text:p>
          </table:table-cell>
          <table:table-cell table:style-name="ce4" office:value-type="string" calcext:value-type="string">
            <text:p>{“c”:3,”p”:2}</text:p>
          </table:table-cell>
          <table:table-cell table:style-name="ce4" office:value-type="string" calcext:value-type="string">
            <text:p>dataid = parent, c = child, p = position: Option[TagId]</text:p>
          </table:table-cell>
        </table:table-row>
        <table:table-row table:style-name="ro1">
          <table:table-cell office:value-type="string" calcext:value-type="string">
            <text:p>UpdateFieldPosition</text:p>
          </table:table-cell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DeleteField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“r”</text:p>
          </table:table-cell>
          <table:table-cell table:formula="of:=[.E14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formula="of:=[.B24]+1" office:value-type="float" office:value="1001" calcext:value-type="float">
            <text:p>100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formula="of:=[.B25]+1" office:value-type="float" office:value="1002" calcext:value-type="float">
            <text:p>100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formula="of:=[.B26]+1" office:value-type="float" office:value="1003" calcext:value-type="float">
            <text:p>100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formula="of:=[.B27]+1" office:value-type="float" office:value="1004" calcext:value-type="float">
            <text:p>1004</text:p>
          </table:table-cell>
          <table:table-cell office:value-type="string" calcext:value-type="string">
            <text:p>&lt;id&gt;</text:p>
          </table:table-cell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formula="of:=[.B28]+1" office:value-type="float" office:value="1005" calcext:value-type="float">
            <text:p>100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formula="of:=[.B29]+1" office:value-type="float" office:value="1006" calcext:value-type="float">
            <text:p>100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formula="of:=[.B30]+1" office:value-type="float" office:value="1007" calcext:value-type="float">
            <text:p>100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formula="of:=[.B31]+1" office:value-type="float" office:value="1008" calcext:value-type="float">
            <text:p>100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2 bytes</text:p>
          </table:table-cell>
          <table:table-cell table:style-name="ce11" office:value-type="string" calcext:value-type="string">
            <text:p>small-range integer</text:p>
          </table:table-cell>
          <table:table-cell table:style-name="ce11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integer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typical choice for integer</text:p>
          </table:table-cell>
          <table:table-cell table:style-name="ce11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large-range integer</text:p>
          </table:table-cell>
          <table:table-cell table:style-name="ce11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user-specified precision, exact</text:p>
          </table:table-cell>
          <table:table-cell table:style-name="ce11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numeric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user-specified precision, exact</text:p>
          </table:table-cell>
          <table:table-cell table:style-name="ce11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variable-precision, inexact</text:p>
          </table:table-cell>
          <table:table-cell table:style-name="ce11" office:value-type="string" calcext:value-type="string">
            <text:p>6 decimal digits precision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double precision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variable-precision, inexact</text:p>
          </table:table-cell>
          <table:table-cell table:style-name="ce11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mallserial</text:p>
          </table:table-cell>
          <table:table-cell table:style-name="ce11" office:value-type="string" calcext:value-type="string">
            <text:p>2 bytes</text:p>
          </table:table-cell>
          <table:table-cell table:style-name="ce11" office:value-type="string" calcext:value-type="string">
            <text:p>small autoincrementing integer</text:p>
          </table:table-cell>
          <table:table-cell table:style-name="ce11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erial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autoincrementing integer</text:p>
          </table:table-cell>
          <table:table-cell table:style-name="ce11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bigserial</text:p>
          </table:table-cell>
          <table:table-cell table:style-name="ce11" office:value-type="string" calcext:value-type="string">
            <text:p>8 bytes</text:p>
          </table:table-cell>
          <table:table-cell table:style-name="ce11" office:value-type="string" calcext:value-type="string">
            <text:p>large autoincrementing integer</text:p>
          </table:table-cell>
          <table:table-cell table:style-name="ce11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≥ 0. Use 0 for template, else start a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ev_data_id</text:p>
          </table:table-cell>
          <table:table-cell table:style-name="ce10"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<text:span text:style-name="T1">Upd/Del field uses &lt;sf&gt; here – store as negative numbers, ids are all &gt; 0</text:span></text:p>
            <text:p>integer should be ample. ids are scoped to a project. There will never be 2 billion anythings per projec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v_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onb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occurr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/>
          <table:table-cell office:value-type="string" calcext:value-type="string">
            <text:p>No F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08:01:29.29855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7-12T10:31:37.699372100</dc:date>
    <meta:editing-duration>PT4H8M13S</meta:editing-duration>
    <meta:editing-cycles>16</meta:editing-cycles>
    <meta:generator>LibreOffice/4.3.7.2$Linux_X86_64 LibreOffice_project/430m0$Build-2</meta:generator>
    <meta:document-statistic meta:table-count="3" meta:cell-count="305" meta:object-count="0"/>
  </office:meta>
</office:document-meta>
</file>
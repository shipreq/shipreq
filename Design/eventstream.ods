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Default"/>
        <table:table-column table:style-name="co1" table:default-cell-style-name="ce5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InitProjec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TagGroup</text:p>
          </table:table-cell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ApplicableTag</text:p>
          </table:table-cell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11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UpdateFieldPosition</text:p>
          </table:table-cell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DeleteField</text:p>
          </table:table-cell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“r”</text:p>
          </table:table-cell>
          <table:table-cell table:formula="of:=[.E14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3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4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5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6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7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8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29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0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16:47:35.618037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03T16:08:35.612245158</dc:date>
    <meta:editing-duration>PT22M52S</meta:editing-duration>
    <meta:editing-cycles>10</meta:editing-cycles>
    <meta:generator>LibreOffice/4.3.7.2$Linux_X86_64 LibreOffice_project/430m0$Build-2</meta:generator>
    <meta:document-statistic meta:table-count="2" meta:cell-count="187" meta:object-count="0"/>
  </office:meta>
</office:document-meta>
</file>
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378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0047ff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font-name="Arimo" style:font-name-asian="Lucida Sans Unicode" style:font-name-complex="FreeSans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arget is Req</text:p>
          </table:table-cell>
          <table:table-cell table:style-name="ce1" office:value-type="string" calcext:value-type="string">
            <text:p>Target is RCG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3" office:value-type="string" calcext:value-type="string">
            <text:p>Warn on delete, but allow</text:p>
            <text:p>Display but mark as err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2" office:value-type="string" calcext:value-type="string">
            <text:p>Update ref</text:p>
          </table:table-cell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3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2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table:formula="of:=[.C7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3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2" office:value-type="string" calcext:value-type="string">
            <text:p>must remember orig cod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3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4" office:value-type="string" calcext:value-type="string">
            <text:p>ReqC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6:40:32.873038133</meta:creation-date>
    <dc:date>2015-04-22T20:53:31.579858711</dc:date>
    <meta:editing-duration>PT6H33M52S</meta:editing-duration>
    <meta:editing-cycles>3</meta:editing-cycles>
    <meta:generator>LibreOffice/4.3.6.2$Linux_X86_64 LibreOffice_project/430m0$Build-2</meta:generator>
    <meta:document-statistic meta:table-count="1" meta:cell-count="46" meta:object-count="0"/>
  </office:meta>
</office:document-meta>
</file>
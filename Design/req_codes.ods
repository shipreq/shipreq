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5.911cm"/>
    </style:style>
    <style:style style:name="co11" style:family="table-column">
      <style:table-column-properties fo:break-before="auto" style:column-width="9.726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1.9cm" fo:break-before="auto" style:use-optimal-row-height="true"/>
    </style:style>
    <style:style style:name="ro4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1.046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.302cm" fo:break-before="auto" style:use-optimal-row-height="true"/>
    </style:style>
    <style:style style:name="ro9" style:family="table-row">
      <style:table-row-properties style:row-height="1.464cm" fo:break-before="auto" style:use-optimal-row-height="true"/>
    </style:style>
    <style:style style:name="ro10" style:family="table-row">
      <style:table-row-properties style:row-height="1.882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fo:background-color="#cccccc" style:text-align-source="fix" style:repeat-content="false" fo:padding-bottom="0.199cm" fo:padding-left="0.035cm" fo:padding-right="0.035cm" fo:padding-top="0.035cm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26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2" style:family="table-cell" style:parent-style-name="Default" style:data-style-name="N126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 style:data-style-name="N127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cccccc" fo:padding-bottom="0.199cm" fo:padding-left="0.035cm" fo:padding-right="0.035cm" fo:padding-top="0.035cm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padding-bottom="0.199cm" fo:padding-left="0.035cm" fo:padding-right="0.035cm" fo:padding-top="0.035cm" style:vertical-align="top"/>
    </style:style>
    <style:style style:name="ce17" style:family="table-cell" style:parent-style-name="Default">
      <style:table-cell-properties fo:padding-bottom="0.199cm" fo:padding-left="0.035cm" fo:padding-right="0.035cm" fo:padding-top="0.035cm" style:vertical-align="top"/>
    </style:style>
    <style:style style:name="ce18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style:vertical-align="top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transparent" style:vertical-align="top"/>
      <style:text-properties fo:color="#ff0000"/>
    </style:style>
    <style:style style:name="ce22" style:family="table-cell" style:parent-style-name="Default">
      <style:table-cell-properties fo:background-color="transparent" style:vertical-align="top"/>
      <style:text-properties style:font-name="Arimo" style:font-name-asian="Lucida Sans Unicode" style:font-name-complex="FreeSans"/>
    </style:style>
    <style:style style:name="ce23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24" style:family="table-cell" style:parent-style-name="Default">
      <style:table-cell-properties style:vertical-align="top"/>
      <style:text-properties fo:color="#ff00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 style:vertical-align="top"/>
      <style:text-properties style:use-window-font-color="true" style:font-name="Arimo" style:font-name-asian="Lucida Sans Unicode" style:font-name-complex="FreeSans"/>
    </style:style>
    <style:style style:name="ce26" style:family="table-cell" style:parent-style-name="Default">
      <style:table-cell-properties style:vertical-align="top"/>
      <style:text-properties fo:color="#008000" style:font-name="Lucida Consol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transparent"/>
      <style:text-properties fo:color="#008000" style:font-name="Lucida Console" fo:font-size="8pt" style:font-size-asian="8pt" style:font-size-complex="8pt"/>
    </style:style>
    <style:style style:name="ce28" style:family="table-cell" style:parent-style-name="Default">
      <style:text-properties fo:color="#008000" style:font-name="Lucida Console" fo:font-size="8pt" style:font-size-asian="8pt" style:font-size-complex="8pt"/>
    </style:style>
    <style:style style:name="ce29" style:family="table-cell" style:parent-style-name="Default">
      <style:table-cell-properties style:vertical-align="top"/>
      <style:text-properties fo:color="#008000" style:font-name="Lucida Console" fo:font-size="8pt" style:font-size-asian="8pt" style:font-size-complex="8pt"/>
    </style:style>
    <style:style style:name="ce30" style:family="table-cell" style:parent-style-name="Default">
      <style:table-cell-properties fo:background-color="transparent" style:vertical-align="top"/>
      <style:text-properties fo:color="#008000" style:font-name="Lucida Console" fo:font-size="8pt" style:font-size-asian="8pt" style:font-size-complex="8pt"/>
    </style:style>
    <style:style style:name="ce3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>
      <style:text-properties style:font-name="Inconsolata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style:font-name="Arimo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mo" style:font-name-asian="Lucida Sans Unicode" style:font-name-complex="FreeSan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color="#008000"/>
    </style:style>
    <style:style style:name="T9" style:family="text">
      <style:text-properties fo:color="#e6e6e6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0</text:p>
          </table:table-cell>
          <table:table-cell table:formula="of:=[.B11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n+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ref logic" table:style-name="ta1">
        <table:table-column table:style-name="co5" table:default-cell-style-name="ce13"/>
        <table:table-column table:style-name="co6" table:default-cell-style-name="ce17"/>
        <table:table-column table:style-name="co7" table:number-columns-repeated="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default-cell-style-name="ce29"/>
        <table:table-column table:style-name="co4" table:number-columns-repeated="1015" table:default-cell-style-name="ce20"/>
        <table:table-row table:style-name="ro3">
          <table:table-cell table:style-name="ce10" office:value-type="string" calcext:value-type="string">
            <text:p>#</text:p>
          </table:table-cell>
          <table:table-cell table:style-name="ce15" office:value-type="string" calcext:value-type="string">
            <text:p>RC trie view</text:p>
            <text:p>AD = Active Data</text:p>
            <text:p>RR = RefsToReqs</text:p>
            <text:p>RG = RefsToGroup</text:p>
          </table:table-cell>
          <table:table-cell table:style-name="ce18" office:value-type="string" calcext:value-type="string">
            <text:p>Inactive ∧ Ref'd</text:p>
            <text:p>(logical view, ¬data)</text:p>
          </table:table-cell>
          <table:table-cell table:style-name="ce18" office:value-type="string" calcext:value-type="string">
            <text:p>Active</text:p>
            <text:p><text:span text:style-name="T2">(logical view, ¬data)</text:span></text:p>
          </table:table-cell>
          <table:table-cell table:style-name="ce18" office:value-type="string" calcext:value-type="string">
            <text:p>Txt</text:p>
          </table:table-cell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Notes</text:p>
          </table:table-cell>
          <table:table-cell table:style-name="ce26"/>
          <table:table-cell table:style-name="ce31" table:number-columns-repeated="1015"/>
        </table:table-row>
        <table:table-row table:style-name="ro4">
          <table:table-cell table:style-name="ce11" office:value-type="float" office:value="1" calcext:value-type="float">
            <text:p>1.1</text:p>
          </table:table-cell>
          <table:table-cell table:style-name="ce16" office:value-type="string" calcext:value-type="string">
            <text:p>a.b.c: AD[#3Grp]</text:p>
          </table:table-cell>
          <table:table-cell table:style-name="ce19"/>
          <table:table-cell table:style-name="ce19" office:value-type="string" calcext:value-type="string">
            <text:p>#3 – a.b.c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Create RCG ref</text:p>
          </table:table-cell>
          <table:table-cell table:style-name="ce19" office:value-type="string" calcext:value-type="string">
            <text:p>CreateRCG $ a.b.c=3</text:p>
          </table:table-cell>
          <table:table-cell table:style-name="ce19" office:value-type="string" calcext:value-type="string">
            <text:p>Each RC</text:p>
          </table:table-cell>
          <table:table-cell table:style-name="ce27" table:formula="of:=&quot;// 1.&quot;&amp;[.A2]&amp;&quot;: &quot;&amp;[.F2]" office:value-type="string" office:string-value="// 1.1: Create RCG ref" calcext:value-type="string">
            <text:p>// 1.1: Create RCG ref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2]+1" office:value-type="float" office:value="2" calcext:value-type="float">
            <text:p>1.2</text:p>
          </table:table-cell>
          <table:table-cell table:style-name="ce16" office:value-type="string" calcext:value-type="string">
            <text:p>a.x: AD[#3Grp]</text:p>
          </table:table-cell>
          <table:table-cell table:style-name="ce19"/>
          <table:table-cell table:style-name="ce19" office:value-type="string" calcext:value-type="string">
            <text:p>#3 – a.x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Rename 1→1'</text:p>
          </table:table-cell>
          <table:table-cell table:style-name="ce19" office:value-type="string" calcext:value-type="string">
            <text:p>SetRCG $ a.x</text:p>
          </table:table-cell>
          <table:table-cell table:style-name="ce19" office:value-type="string" calcext:value-type="string">
            <text:p>* Can only have 1 active target</text:p>
          </table:table-cell>
          <table:table-cell table:style-name="ce27" table:formula="of:=&quot;// 1.&quot;&amp;[.A3]&amp;&quot;: &quot;&amp;[.F3]" office:value-type="string" office:string-value="// 1.2: Rename 1→1'" calcext:value-type="string">
            <text:p>// 1.2: Rename 1→1'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3]+1" office:value-type="float" office:value="3" calcext:value-type="float">
            <text:p>1.3</text:p>
          </table:table-cell>
          <table:table-cell table:style-name="ce16" office:value-type="string" calcext:value-type="string">
            <text:p>a.x: RG[#3]</text:p>
          </table:table-cell>
          <table:table-cell table:style-name="ce19" office:value-type="string" calcext:value-type="string">
            <text:p>#3 – a.x [Grp]</text:p>
          </table:table-cell>
          <table:table-cell table:style-name="ce19"/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Delete RCG</text:p>
          </table:table-cell>
          <table:table-cell table:style-name="ce19" office:value-type="string" calcext:value-type="string">
            <text:p>HardDelRCG</text:p>
          </table:table-cell>
          <table:table-cell table:style-name="ce19" office:value-type="string" calcext:value-type="string">
            <text:p>* Can have many old, inactive targets</text:p>
          </table:table-cell>
          <table:table-cell table:style-name="ce27" table:formula="of:=&quot;// 1.&quot;&amp;[.A4]&amp;&quot;: &quot;&amp;[.F4]" office:value-type="string" office:string-value="// 1.3: Delete RCG" calcext:value-type="string">
            <text:p>// 1.3: Delete RCG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4]+1" office:value-type="float" office:value="4" calcext:value-type="float">
            <text:p>1.4</text:p>
          </table:table-cell>
          <table:table-cell table:style-name="ce16" office:value-type="string" calcext:value-type="string">
            <text:p>a.x: AD[#3Grp]</text:p>
          </table:table-cell>
          <table:table-cell table:style-name="ce19"/>
          <table:table-cell table:style-name="ce19" office:value-type="string" calcext:value-type="string">
            <text:p>#3 – a.x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Restore RCG</text:p>
          </table:table-cell>
          <table:table-cell table:style-name="ce19" office:value-type="string" calcext:value-type="string">
            <text:p>CreateRCG $ a.x=3</text:p>
          </table:table-cell>
          <table:table-cell table:style-name="ce19"/>
          <table:table-cell table:style-name="ce27" table:formula="of:=&quot;// 1.&quot;&amp;[.A5]&amp;&quot;: &quot;&amp;[.F5]" office:value-type="string" office:string-value="// 1.4: Restore RCG" calcext:value-type="string">
            <text:p>// 1.4: Restore RCG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5]+1" office:value-type="float" office:value="5" calcext:value-type="float">
            <text:p>1.5</text:p>
          </table:table-cell>
          <table:table-cell table:style-name="ce16" office:value-type="string" calcext:value-type="string">
            <text:p>a.x: RG[#3]</text:p>
          </table:table-cell>
          <table:table-cell table:style-name="ce19" office:value-type="string" calcext:value-type="string">
            <text:p>#3 – a.x [Grp]</text:p>
          </table:table-cell>
          <table:table-cell table:style-name="ce19"/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Delete RCG</text:p>
          </table:table-cell>
          <table:table-cell table:style-name="ce19" table:formula="of:=[.G4]" office:value-type="string" office:string-value="HardDelRCG" calcext:value-type="string">
            <text:p>HardDelRCG</text:p>
          </table:table-cell>
          <table:table-cell table:style-name="ce19" office:value-type="string" calcext:value-type="string">
            <text:p>- current: Option[(Id, Target)]</text:p>
          </table:table-cell>
          <table:table-cell table:style-name="ce27" table:formula="of:=&quot;// 1.&quot;&amp;[.A6]&amp;&quot;: &quot;&amp;[.F6]" office:value-type="string" office:string-value="// 1.5: Delete RCG" calcext:value-type="string">
            <text:p>// 1.5: Delete RCG</text:p>
          </table:table-cell>
          <table:table-cell table:style-name="ce19" table:number-columns-repeated="1015"/>
        </table:table-row>
        <table:table-row table:style-name="ro5">
          <table:table-cell table:style-name="ce11" table:formula="of:=[.A6]+1" office:value-type="float" office:value="6" calcext:value-type="float">
            <text:p>1.6</text:p>
          </table:table-cell>
          <table:table-cell table:style-name="ce16" office:value-type="string" calcext:value-type="string">
            <text:p>a.x: AD[#4Req(#a)]</text:p>
            <text:p>      RG[#3]</text:p>
          </table:table-cell>
          <table:table-cell table:style-name="ce19" office:value-type="string" calcext:value-type="string">
            <text:p>#3 – a.x [Grp]</text:p>
          </table:table-cell>
          <table:table-cell table:style-name="ce22" office:value-type="string" calcext:value-type="string">
            <text:p>#4 – a.x [Req(#a)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Create RCᵣ</text:p>
          </table:table-cell>
          <table:table-cell table:style-name="ce19" office:value-type="string" calcext:value-type="string">
            <text:p>CreateGR $ code = {a.x=4}</text:p>
          </table:table-cell>
          <table:table-cell table:style-name="ce19" office:value-type="string" calcext:value-type="string">
            <text:p>- referenced: Vector[(Id, Target)]</text:p>
          </table:table-cell>
          <table:table-cell table:style-name="ce27" table:formula="of:=&quot;// 1.&quot;&amp;[.A7]&amp;&quot;: &quot;&amp;[.F7]" office:value-type="string" office:string-value="// 1.6: Create RCᵣ" calcext:value-type="string">
            <text:p>// 1.6: Create RCᵣ</text:p>
          </table:table-cell>
          <table:table-cell table:style-name="ce19" table:number-columns-repeated="1015"/>
        </table:table-row>
        <table:table-row table:style-name="ro5">
          <table:table-cell table:style-name="ce12" table:formula="of:=[.A7]+1" office:value-type="float" office:value="7" calcext:value-type="float">
            <text:p>1.7</text:p>
          </table:table-cell>
          <table:table-cell office:value-type="string" calcext:value-type="string">
            <text:p>a.x: RG[#3]</text:p>
            <text:p><text:span text:style-name="T2">y: AD[#4Req(#a)]</text:span></text:p>
          </table:table-cell>
          <table:table-cell office:value-type="string" calcext:value-type="string">
            <text:p>#3 – a.x [Grp]</text:p>
          </table:table-cell>
          <table:table-cell table:style-name="ce23" office:value-type="string" calcext:value-type="string"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RCᵣ</text:p>
          </table:table-cell>
          <table:table-cell table:style-name="ce24" office:value-type="string" calcext:value-type="string">
            <text:p><text:span text:style-name="T4">PatchRC $ -4,+y=4</text:span></text:p>
            <text:p><text:span text:style-name="T5">PatchRC $ rename 4→y</text:span></text:p>
          </table:table-cell>
          <table:table-cell table:style-name="Default"/>
          <table:table-cell table:style-name="ce28" table:formula="of:=&quot;// 1.&quot;&amp;[.A8]&amp;&quot;: &quot;&amp;[.F8]" office:value-type="string" office:string-value="// 1.7: Rename RCᵣ" calcext:value-type="string">
            <text:p>// 1.7: Rename RCᵣ</text:p>
          </table:table-cell>
          <table:table-cell table:number-columns-repeated="1015"/>
        </table:table-row>
        <table:table-row table:style-name="ro5">
          <table:table-cell table:style-name="ce12" table:formula="of:=[.A8]+1" office:value-type="float" office:value="8" calcext:value-type="float">
            <text:p>1.8</text:p>
          </table:table-cell>
          <table:table-cell office:value-type="string" calcext:value-type="string">
            <text:p>a.x: AD[#3Grp]</text:p>
            <text:p>y: AD[#4Req(#a)]</text:p>
          </table:table-cell>
          <table:table-cell/>
          <table:table-cell table:style-name="ce23" office:value-type="string" calcext:value-type="string">
            <text:p>#3 – a.x [Grp]</text:p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table:formula="of:=[.G5]" office:value-type="string" office:string-value="CreateRCG $ a.x=3" calcext:value-type="string">
            <text:p>CreateRCG $ a.x=3</text:p>
          </table:table-cell>
          <table:table-cell/>
          <table:table-cell table:style-name="ce28" table:formula="of:=&quot;// 1.&quot;&amp;[.A9]&amp;&quot;: &quot;&amp;[.F9]" office:value-type="string" office:string-value="// 1.8: Restore RCG" calcext:value-type="string">
            <text:p>// 1.8: Restore RCG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4" office:value-type="float" office:value="1" calcext:value-type="float">
            <text:p>2.1</text:p>
          </table:table-cell>
          <table:table-cell table:style-name="ce16" office:value-type="string" calcext:value-type="string">
            <text:p>a.b.c: AD[#1Req(#a)]</text:p>
          </table:table-cell>
          <table:table-cell table:style-name="ce19"/>
          <table:table-cell table:style-name="ce19" office:value-type="string" calcext:value-type="string">
            <text:p>#1 – a.b.c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Create RCᵣ ref</text:p>
          </table:table-cell>
          <table:table-cell table:style-name="ce19" office:value-type="string" calcext:value-type="string">
            <text:p>CreateGR $ code = {a.b.c=1}</text:p>
          </table:table-cell>
          <table:table-cell table:style-name="ce19"/>
          <table:table-cell table:style-name="ce30" table:formula="of:=&quot;// 2.&quot;&amp;[.A13]&amp;&quot;: &quot;&amp;[.F13]" office:value-type="string" office:string-value="// 2.1: Create RCᵣ ref" calcext:value-type="string">
            <text:p>// 2.1: Create RCᵣ ref</text:p>
          </table:table-cell>
          <table:table-cell table:style-name="ce19" table:number-columns-repeated="1015"/>
        </table:table-row>
        <table:table-row table:style-name="ro6">
          <table:table-cell table:style-name="ce14" table:formula="of:=[.A13]+1" office:value-type="float" office:value="2" calcext:value-type="float">
            <text:p>2.2</text:p>
          </table:table-cell>
          <table:table-cell table:style-name="ce16" office:value-type="string" calcext:value-type="string"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1'</text:p>
          </table:table-cell>
          <table:table-cell table:style-name="ce21" office:value-type="string" calcext:value-type="string">
            <text:p><text:span text:style-name="T4">PatchRC $ -1,+y.y.z=1</text:span></text:p>
            <text:p><text:span text:style-name="T6">PatchRC $ rename 1→y.y.z</text:span></text:p>
          </table:table-cell>
          <table:table-cell table:style-name="ce25" office:value-type="string" calcext:value-type="string">
            <text:p><text:span text:style-name="T3">Also note the RC view, a.b.c is removed because no refs exist.</text:span></text:p>
            <text:p><text:span text:style-name="T3">Must track refs...</text:span></text:p>
          </table:table-cell>
          <table:table-cell table:style-name="ce30" table:formula="of:=&quot;// 2.&quot;&amp;[.A14]&amp;&quot;: &quot;&amp;[.F14]" office:value-type="string" office:string-value="// 2.2: Rename 1→1'" calcext:value-type="string">
            <text:p>// 2.2: Rename 1→1'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4]+1" office:value-type="float" office:value="3" calcext:value-type="float">
            <text:p>2.3</text:p>
          </table:table-cell>
          <table:table-cell table:style-name="ce16" office:value-type="string" calcext:value-type="string">
            <text:p>y.y.z: RR[#1Req(#a)]</text:p>
          </table:table-cell>
          <table:table-cell table:style-name="ce19" office:value-type="string" calcext:value-type="string">
            <text:p>#1 – y.y.z [Req(#a)]</text:p>
          </table:table-cell>
          <table:table-cell table:style-name="ce19"/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Delete RCᵣ</text:p>
          </table:table-cell>
          <table:table-cell table:style-name="ce19" office:value-type="string" calcext:value-type="string">
            <text:p>DelGR $ SoftDel</text:p>
          </table:table-cell>
          <table:table-cell table:style-name="ce19"/>
          <table:table-cell table:style-name="ce30" table:formula="of:=&quot;// 2.&quot;&amp;[.A15]&amp;&quot;: &quot;&amp;[.F15]" office:value-type="string" office:string-value="// 2.3: Delete RCᵣ" calcext:value-type="string">
            <text:p>// 2.3: Delete RCᵣ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5]+1" office:value-type="float" office:value="4" calcext:value-type="float">
            <text:p>2.4</text:p>
          </table:table-cell>
          <table:table-cell table:style-name="ce16" office:value-type="string" calcext:value-type="string"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store RCᵣ</text:p>
          </table:table-cell>
          <table:table-cell table:style-name="ce19" office:value-type="string" calcext:value-type="string">
            <text:p>DelGR $ Restore</text:p>
          </table:table-cell>
          <table:table-cell table:style-name="ce19"/>
          <table:table-cell table:style-name="ce30" table:formula="of:=&quot;// 2.&quot;&amp;[.A16]&amp;&quot;: &quot;&amp;[.F16]" office:value-type="string" office:string-value="// 2.4: Restore RCᵣ" calcext:value-type="string">
            <text:p>// 2.4: Restore RCᵣ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16]+1" office:value-type="float" office:value="5" calcext:value-type="float">
            <text:p>2.5</text:p>
          </table:table-cell>
          <table:table-cell table:style-name="ce16" office:value-type="string" calcext:value-type="string">
            <text:p>n.a: AD[#2Req(#a)]</text:p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  <text:p><text:span text:style-name="T2">#2 – n.a [Req(#a)]</text:span>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a=2</text:p>
          </table:table-cell>
          <table:table-cell table:style-name="ce19"/>
          <table:table-cell table:style-name="ce30" table:formula="of:=&quot;// 2.&quot;&amp;[.A17]&amp;&quot;: &quot;&amp;[.F17]" office:value-type="string" office:string-value="// 2.5: Rename 1→n+1" calcext:value-type="string">
            <text:p>// 2.5: Rename 1→n+1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7]+1" office:value-type="float" office:value="6" calcext:value-type="float">
            <text:p>2.6</text:p>
          </table:table-cell>
          <table:table-cell table:style-name="ce16" office:value-type="string" calcext:value-type="string">
            <text:p>y.y.z: AD[#1Req(#a)]</text:p>
          </table:table-cell>
          <table:table-cell table:style-name="ce21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n+1→1</text:p>
          </table:table-cell>
          <table:table-cell table:style-name="ce19" office:value-type="string" calcext:value-type="string">
            <text:p>PatchRC $ -2</text:p>
          </table:table-cell>
          <table:table-cell table:style-name="ce19" office:value-type="string" calcext:value-type="string">
            <text:p>#2 gone cos no refs</text:p>
          </table:table-cell>
          <table:table-cell table:style-name="ce30" table:formula="of:=&quot;// 2.&quot;&amp;[.A18]&amp;&quot;: &quot;&amp;[.F18]" office:value-type="string" office:string-value="// 2.6: Rename n+1→1" calcext:value-type="string">
            <text:p>// 2.6: Rename n+1→1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18]+1" office:value-type="float" office:value="7" calcext:value-type="float">
            <text:p>2.7</text:p>
          </table:table-cell>
          <table:table-cell table:style-name="ce16" office:value-type="string" calcext:value-type="string">
            <text:p>n.b: AD[#3Req(#a)]</text:p>
            <text:p>n.c: AD[#4Req(#a)]</text:p>
            <text:p>y.y.z: RR[#1Req(#a)]</text:p>
          </table:table-cell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#3 – n.b [Req(#a)]</text:p>
            <text:p><text:span text:style-name="T2">#4 – n.c [Req(#a)]</text:span>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n</text:p>
          </table:table-cell>
          <table:table-cell table:style-name="ce19" office:value-type="string" calcext:value-type="string">
            <text:p>PatchRC $ -1, +n.b=3, +n.c=4</text:p>
          </table:table-cell>
          <table:table-cell table:style-name="ce19"/>
          <table:table-cell table:style-name="ce30" table:formula="of:=&quot;// 2.&quot;&amp;[.A19]&amp;&quot;: &quot;&amp;[.F19]" office:value-type="string" office:string-value="// 2.7: Rename 1→n" calcext:value-type="string">
            <text:p>// 2.7: Rename 1→n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19]+1" office:value-type="float" office:value="8" calcext:value-type="float">
            <text:p>2.8</text:p>
          </table:table-cell>
          <table:table-cell table:style-name="ce16" office:value-type="string" calcext:value-type="string">
            <text:p>n.b: AD[#3Req(#a)]</text:p>
            <text:p>n.c: AD[#4Req(#a)]</text:p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  <text:p>#3 – n.b [Req(#a)]</text:p>
            <text:p><text:span text:style-name="T2">#4 – n.c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→n+1</text:p>
          </table:table-cell>
          <table:table-cell table:style-name="ce21" office:value-type="string" calcext:value-type="string">
            <text:p><text:span text:style-name="T6">PatchRC $ +y.y.z=1</text:span></text:p>
            <text:p><text:span text:style-name="T7">PatchRC $ restore 1</text:span></text:p>
          </table:table-cell>
          <table:table-cell table:style-name="ce19"/>
          <table:table-cell table:style-name="ce30" table:formula="of:=&quot;// 2.&quot;&amp;[.A20]&amp;&quot;: &quot;&amp;[.F20]" office:value-type="string" office:string-value="// 2.8: Rename n→n+1" calcext:value-type="string">
            <text:p>// 2.8: Rename n→n+1</text:p>
          </table:table-cell>
          <table:table-cell table:style-name="ce19" table:number-columns-repeated="1015"/>
        </table:table-row>
        <table:table-row table:style-name="ro8">
          <table:table-cell table:style-name="ce14" table:formula="of:=[.A20]+1" office:value-type="float" office:value="9" calcext:value-type="float">
            <text:p>2.9</text:p>
          </table:table-cell>
          <table:table-cell table:style-name="ce16" office:value-type="string" calcext:value-type="string">
            <text:p>aaa: AD[#1Req(#a)]</text:p>
            <text:p>        RR[#3Req(#a)]</text:p>
          </table:table-cell>
          <table:table-cell table:style-name="ce21"/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1'</text:p>
          </table:table-cell>
          <table:table-cell table:style-name="ce21" office:value-type="string" calcext:value-type="string">
            <text:p><text:span text:style-name="T8">PatchRC $ -{1,3,4},+aaa={1,3}</text:span></text:p>
            <text:p><text:span text:style-name="T7">PatchRC $ rename {1,3,4}→aaa</text:span></text:p>
            <text:p><text:span text:style-name="T7">PatchRC $ rename {1,3}→aaa, -4</text:span></text:p>
          </table:table-cell>
          <table:table-cell table:style-name="ce21"/>
          <table:table-cell table:style-name="ce30" table:formula="of:=&quot;// 2.&quot;&amp;[.A21]&amp;&quot;: &quot;&amp;[.F21]" office:value-type="string" office:string-value="// 2.9: Rename n+1→1'" calcext:value-type="string">
            <text:p>// 2.9: Rename n+1→1'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1]+1" office:value-type="float" office:value="10" calcext:value-type="float">
            <text:p>2.10</text:p>
          </table:table-cell>
          <table:table-cell table:style-name="ce16" office:value-type="string" calcext:value-type="string">
            <text:p>aaa: AD[#1Req(#a)]</text:p>
            <text:p>        RR[#3Req(#a)]</text:p>
            <text:p>n.d: AD[#50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50 – n.d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d=50</text:p>
          </table:table-cell>
          <table:table-cell table:style-name="ce19"/>
          <table:table-cell table:style-name="ce30" table:formula="of:=&quot;// 2.&quot;&amp;[.A22]&amp;&quot;: &quot;&amp;[.F22]" office:value-type="string" office:string-value="// 2.10: Rename 1→n+1" calcext:value-type="string">
            <text:p>// 2.10: Rename 1→n+1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22]+1" office:value-type="float" office:value="11" calcext:value-type="float">
            <text:p>2.11</text:p>
          </table:table-cell>
          <table:table-cell table:style-name="ce16" office:value-type="string" calcext:value-type="string">
            <text:p>aaa: AD[#1Req(#a)]</text:p>
            <text:p>        RR[#3Req(#a)]</text:p>
            <text:p>n.ee: AD[#5Req(#a)]</text:p>
            <text:p>n.ef: AD[#6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5 – n.ee [Req(#a)]</text:span></text:p>
            <text:p><text:span text:style-name="T2">#6 – n.e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n+1</text:p>
          </table:table-cell>
          <table:table-cell table:style-name="ce21" office:value-type="string" calcext:value-type="string">
            <text:p><text:span text:style-name="T8">PatchRC $ -50, +n.ee=5, +n.ef=6</text:span></text:p>
            <text:p><text:span text:style-name="T7">PatchRC $ rename 50→n.ee, +n.ef=6</text:span></text:p>
          </table:table-cell>
          <table:table-cell table:style-name="ce19"/>
          <table:table-cell table:style-name="ce30" table:formula="of:=&quot;// 2.&quot;&amp;[.A23]&amp;&quot;: &quot;&amp;[.F23]" office:value-type="string" office:string-value="// 2.11: Rename n+1→n+1" calcext:value-type="string">
            <text:p>// 2.11: Rename n+1→n+1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23]+1" office:value-type="float" office:value="12" calcext:value-type="float">
            <text:p>2.12</text:p>
          </table:table-cell>
          <table:table-cell table:style-name="ce16" office:value-type="string" calcext:value-type="string">
            <text:p>aaa: RR[#1Req(#a)]</text:p>
            <text:p>        RR[#3Req(#a)]</text:p>
            <text:p>n.ee: AD[#5Req(#a)]</text:p>
            <text:p>n.ef: AD[#6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22" office:value-type="string" calcext:value-type="string">
            <text:p><text:span text:style-name="T3">#5 – n.ee [Req(#a)]</text:span></text:p>
            <text:p><text:span text:style-name="T3">#6 – n.e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n</text:p>
          </table:table-cell>
          <table:table-cell table:style-name="ce19" office:value-type="string" calcext:value-type="string">
            <text:p>PatchRC $ -{1,3}</text:p>
          </table:table-cell>
          <table:table-cell table:style-name="ce19"/>
          <table:table-cell table:style-name="ce30" table:formula="of:=&quot;// 2.&quot;&amp;[.A24]&amp;&quot;: &quot;&amp;[.F24]" office:value-type="string" office:string-value="// 2.12: Rename n+1→n" calcext:value-type="string">
            <text:p>// 2.12: Rename n+1→n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4]+1" office:value-type="float" office:value="13" calcext:value-type="float">
            <text:p>2.13</text:p>
          </table:table-cell>
          <table:table-cell table:style-name="ce16" office:value-type="string" calcext:value-type="string">
            <text:p>aaa: AD[#1Req(#a)]</text:p>
            <text:p>        RR[#3Req(#a)]</text:p>
          </table:table-cell>
          <table:table-cell table:style-name="ce19"/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→1</text:p>
          </table:table-cell>
          <table:table-cell table:style-name="ce21" office:value-type="string" calcext:value-type="string">
            <text:p><text:span text:style-name="T8">PatchRC $ -{5,6}, restore {1,3}</text:span></text:p>
            <text:p><text:span text:style-name="T2">PatchRC $ rename {5,6}→aaa</text:span></text:p>
          </table:table-cell>
          <table:table-cell table:style-name="ce19"/>
          <table:table-cell table:style-name="ce30" table:formula="of:=&quot;// 2.&quot;&amp;[.A25]&amp;&quot;: &quot;&amp;[.F25]" office:value-type="string" office:string-value="// 2.13: Rename n→1" calcext:value-type="string">
            <text:p>// 2.13: Rename n→1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5]+1" office:value-type="float" office:value="14" calcext:value-type="float">
            <text:p>2.14</text:p>
          </table:table-cell>
          <table:table-cell table:style-name="ce16" office:value-type="string" calcext:value-type="string">
            <text:p>aaa: AD[#1Req(#a)]</text:p>
            <text:p>        RR[#3Req(#a)]</text:p>
            <text:p>n.f: AD[#7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7 – n.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f=7</text:p>
          </table:table-cell>
          <table:table-cell table:style-name="ce19"/>
          <table:table-cell table:style-name="ce30" table:formula="of:=&quot;// 2.&quot;&amp;[.A26]&amp;&quot;: &quot;&amp;[.F26]" office:value-type="string" office:string-value="// 2.14: Rename 1→n+1" calcext:value-type="string">
            <text:p>// 2.14: Rename 1→n+1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6]+1" office:value-type="float" office:value="15" calcext:value-type="float">
            <text:p>2.15</text:p>
          </table:table-cell>
          <table:table-cell table:style-name="ce16" office:value-type="string" calcext:value-type="string">
            <text:p>aaa: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/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0</text:p>
          </table:table-cell>
          <table:table-cell table:style-name="ce19" office:value-type="string" calcext:value-type="string">
            <text:p>PatchRC $ -{1,3,7}</text:p>
          </table:table-cell>
          <table:table-cell table:style-name="ce19"/>
          <table:table-cell table:style-name="ce30" table:formula="of:=&quot;// 2.&quot;&amp;[.A27]&amp;&quot;: &quot;&amp;[.F27]" office:value-type="string" office:string-value="// 2.15: Rename n+1→0" calcext:value-type="string">
            <text:p>// 2.15: Rename n+1→0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7]+1" office:value-type="float" office:value="16" calcext:value-type="float">
            <text:p>2.16</text:p>
          </table:table-cell>
          <table:table-cell table:style-name="ce16" office:value-type="string" calcext:value-type="string">
            <text:p>aaa: AD[#1Req(#a)]</text:p>
            <text:p>        RR[#3Req(#a)]</text:p>
            <text:p>n.h: AD[#8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8 – n.h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store RCᵣ + n</text:p>
          </table:table-cell>
          <table:table-cell table:style-name="ce21" office:value-type="string" calcext:value-type="string">
            <text:p><text:span text:style-name="T8">PatchRC $ +n.h=8, restore {1,3}</text:span></text:p>
            <text:p><text:span text:style-name="T2">PatchRC $ +n.h=8, +aaa={1,3}</text:span></text:p>
          </table:table-cell>
          <table:table-cell table:style-name="ce19"/>
          <table:table-cell table:style-name="ce30" table:formula="of:=&quot;// 2.&quot;&amp;[.A28]&amp;&quot;: &quot;&amp;[.F28]" office:value-type="string" office:string-value="// 2.16: Restore RCᵣ + n" calcext:value-type="string">
            <text:p>// 2.16: Restore RCᵣ + n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8]+1" office:value-type="float" office:value="17" calcext:value-type="float">
            <text:p>2.17</text:p>
          </table:table-cell>
          <table:table-cell table:style-name="ce16" office:value-type="string" calcext:value-type="string">
            <text:p>aaa: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/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Delete RCᵣ + n</text:p>
          </table:table-cell>
          <table:table-cell table:style-name="ce19" table:formula="of:=[.G15]" office:value-type="string" office:string-value="DelGR $ SoftDel" calcext:value-type="string">
            <text:p>DelGR $ SoftDel</text:p>
          </table:table-cell>
          <table:table-cell table:style-name="ce19" office:value-type="string" calcext:value-type="string">
            <text:p>n.h gone because there are no refs to it</text:p>
          </table:table-cell>
          <table:table-cell table:style-name="ce30" table:formula="of:=&quot;// 2.&quot;&amp;[.A29]&amp;&quot;: &quot;&amp;[.F29]" office:value-type="string" office:string-value="// 2.17: Delete RCᵣ + n" calcext:value-type="string">
            <text:p>// 2.17: Delete RCᵣ + n</text:p>
          </table:table-cell>
          <table:table-cell table:style-name="ce19" table:number-columns-repeated="1015"/>
        </table:table-row>
        <table:table-row table:style-name="ro9">
          <table:table-cell table:style-name="ce14" table:formula="of:=[.A29]+1" office:value-type="float" office:value="18" calcext:value-type="float">
            <text:p>2.18</text:p>
          </table:table-cell>
          <table:table-cell table:style-name="ce16" office:value-type="string" calcext:value-type="string">
            <text:p>aaa: AD[#9Grp]</text:p>
            <text:p>       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9 – aaa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Create RCG</text:p>
          </table:table-cell>
          <table:table-cell table:style-name="ce19" office:value-type="string" calcext:value-type="string">
            <text:p>CreateRCG $ aaa=9</text:p>
          </table:table-cell>
          <table:table-cell table:style-name="ce19"/>
          <table:table-cell table:style-name="ce30" table:formula="of:=&quot;// 2.&quot;&amp;[.A30]&amp;&quot;: &quot;&amp;[.F30]" office:value-type="string" office:string-value="// 2.18: Create RCG" calcext:value-type="string">
            <text:p>// 2.18: Create RCG</text:p>
          </table:table-cell>
          <table:table-cell table:style-name="ce19" table:number-columns-repeated="1015"/>
        </table:table-row>
        <table:table-row table:style-name="ro9">
          <table:table-cell table:style-name="ce14" table:formula="of:=[.A30]+1" office:value-type="float" office:value="19" calcext:value-type="float">
            <text:p>2.19</text:p>
          </table:table-cell>
          <table:table-cell table:style-name="ce16" office:value-type="string" calcext:value-type="string">
            <text:p>aaa: RR[#1Req(#a)]</text:p>
            <text:p>        RR[#3Req(#a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RCG</text:p>
          </table:table-cell>
          <table:table-cell table:style-name="ce19" office:value-type="string" calcext:value-type="string">
            <text:p>SetRCG $ ggg</text:p>
          </table:table-cell>
          <table:table-cell table:style-name="ce19"/>
          <table:table-cell table:style-name="ce30" table:formula="of:=&quot;// 2.&quot;&amp;[.A31]&amp;&quot;: &quot;&amp;[.F31]" office:value-type="string" office:string-value="// 2.19: Rename RCG" calcext:value-type="string">
            <text:p>// 2.19: Rename RCG</text:p>
          </table:table-cell>
          <table:table-cell table:style-name="ce19" table:number-columns-repeated="1015"/>
        </table:table-row>
        <table:table-row table:style-name="ro10">
          <table:table-cell table:style-name="ce14" table:formula="of:=[.A31]+1" office:value-type="float" office:value="20" calcext:value-type="float">
            <text:p>2.20</text:p>
          </table:table-cell>
          <table:table-cell table:style-name="ce16" office:value-type="string" calcext:value-type="string">
            <text:p>aaa: AD[#10Req(#b)]</text:p>
            <text:p>        RR[#1Req(#a)]</text:p>
            <text:p>        RR[#3Req(#a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10 – aaa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Create RCᵣ #b</text:p>
          </table:table-cell>
          <table:table-cell table:style-name="ce19" office:value-type="string" calcext:value-type="string">
            <text:p>CreateGR $ code = {aaa=10}</text:p>
          </table:table-cell>
          <table:table-cell table:style-name="ce19"/>
          <table:table-cell table:style-name="ce30" table:formula="of:=&quot;// 2.&quot;&amp;[.A32]&amp;&quot;: &quot;&amp;[.F32]" office:value-type="string" office:string-value="// 2.20: Create RCᵣ #b" calcext:value-type="string">
            <text:p>// 2.20: Create RCᵣ #b</text:p>
          </table:table-cell>
          <table:table-cell table:style-name="ce19" table:number-columns-repeated="1015"/>
        </table:table-row>
        <table:table-row table:style-name="ro10">
          <table:table-cell table:style-name="ce14" table:formula="of:=[.A32]+1" office:value-type="float" office:value="21" calcext:value-type="float">
            <text:p>2.21</text:p>
          </table:table-cell>
          <table:table-cell table:style-name="ce16" office:value-type="string" calcext:value-type="string">
            <text:p>aaa: RR[#1Req(#a)]</text:p>
            <text:p>        RR[#3Req(#a)]</text:p>
            <text:p>bbb: AD[#10Req(#b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10 – bbb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RCᵣ #b</text:p>
          </table:table-cell>
          <table:table-cell table:style-name="ce21" office:value-type="string" calcext:value-type="string">
            <text:p><text:span text:style-name="T8">PatchRC $ -10,+bbb=10</text:span></text:p>
            <text:p><text:span text:style-name="T6">PatchRC $ rename 10→bbb</text:span></text:p>
          </table:table-cell>
          <table:table-cell table:style-name="ce19"/>
          <table:table-cell table:style-name="ce30" table:formula="of:=&quot;// 2.&quot;&amp;[.A33]&amp;&quot;: &quot;&amp;[.F33]" office:value-type="string" office:string-value="// 2.21: Rename RCᵣ #b" calcext:value-type="string">
            <text:p>// 2.21: Rename RCᵣ #b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33]+1" office:value-type="float" office:value="22" calcext:value-type="float">
            <text:p>2.22</text:p>
          </table:table-cell>
          <table:table-cell table:style-name="ce16" office:value-type="string" calcext:value-type="string">
            <text:p>aaa: AD[#1Req(#a)]</text:p>
            <text:p>        RR[#3Req(#a)]</text:p>
            <text:p>bbb: AD[#10Req(#b)]</text:p>
            <text:p>ggg: AD[#9Grp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8 – n.h [Req(#a)]</text:span></text:p>
            <text:p>#10 – bbb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store RCᵣ</text:p>
          </table:table-cell>
          <table:table-cell table:style-name="ce19" table:formula="of:=[.G16]" office:value-type="string" office:string-value="DelGR $ Restore" calcext:value-type="string">
            <text:p>DelGR $ Restore</text:p>
          </table:table-cell>
          <table:table-cell table:style-name="ce19"/>
          <table:table-cell table:style-name="ce30" table:formula="of:=&quot;// 2.&quot;&amp;[.A34]&amp;&quot;: &quot;&amp;[.F34]" office:value-type="string" office:string-value="// 2.22: Restore RCᵣ" calcext:value-type="string">
            <text:p>// 2.22: Restore RCᵣ</text:p>
          </table:table-cell>
          <table:table-cell table:style-name="ce19"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splay" table:style-name="ta1">
        <table:table-column table:style-name="co12" table:default-cell-style-name="ce32"/>
        <table:table-column table:style-name="co13" table:number-columns-repeated="2" table:default-cell-style-name="Default"/>
        <table:table-column table:style-name="co4" table:default-cell-style-name="ce32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32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32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2"/>
          <table:table-cell table:style-name="ce32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32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32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2"/>
          <table:table-cell table:style-name="ce32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32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32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32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3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32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32" office:value-type="string" calcext:value-type="string">
            <text:p><text:span text:style-name="T9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32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32" office:value-type="string" calcext:value-type="string">
            <text:p>a.b.c</text:p>
            <text:p><text:span text:style-name="T9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32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1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32" office:value-type="string" calcext:value-type="string">
            <text:p><text:span text:style-name="T9">| |</text:span>.e</text:p>
            <text:p><text:span text:style-name="T9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32" office:value-type="string" calcext:value-type="string">
            <text:p><text:span text:style-name="T9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32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9">|    |    |</text:span>    .disp</text:p>
          </table:table-cell>
          <table:table-cell table:number-columns-repeated="2"/>
          <table:table-cell table:style-name="ce32" office:value-type="string" calcext:value-type="string">
            <text:p><text:span text:style-name="T9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9">|    |</text:span>    .change.restore</text:p>
          </table:table-cell>
          <table:table-cell table:number-columns-repeated="2"/>
          <table:table-cell table:style-name="ce32" office:value-type="string" calcext:value-type="string">
            <text:p><text:span text:style-name="T9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9">|    |    |</text:span>      .update</text:p>
          </table:table-cell>
          <table:table-cell table:number-columns-repeated="2"/>
          <table:table-cell table:style-name="ce32" office:value-type="string" calcext:value-type="string">
            <text:p><text:span text:style-name="T9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9">|    |    |</text:span>      .warn</text:p>
          </table:table-cell>
          <table:table-cell table:number-columns-repeated="2"/>
          <table:table-cell table:style-name="ce32" office:value-type="string" calcext:value-type="string">
            <text:p><text:span text:style-name="T9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9">|    |</text:span>    .display</text:p>
          </table:table-cell>
          <table:table-cell table:number-columns-repeated="2"/>
          <table:table-cell table:style-name="ce32" office:value-type="string" calcext:value-type="string">
            <text:p><text:span text:style-name="T9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33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33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9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9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9">| |</text:span> <text:span text:style-name="T9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9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9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9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9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9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9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9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9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9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9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9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9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9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9"> | |</text:span> <text:span text:style-name="T9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9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9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9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9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9"> |</text:span>.code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9"> | |   </text:span> <text:span text:style-name="T9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9"> | |</text:span>   .change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9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9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9"> | |</text:span>   .displ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3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parse</text:p>
          </table:table-cell>
          <table:table-cell table:number-columns-repeated="2"/>
          <table:table-cell office:value-type="string" calcext:value-type="string">
            <text:p> <text:span text:style-name="T9">|</text:span>.c.s.parse</text:p>
          </table:table-cell>
          <table:table-cell/>
          <table:table-cell table:style-name="ce32" office:value-type="string" calcext:value-type="string">
            <text:p> <text:span text:style-name="T9">└</text:span>.c.s.pa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disp</text:p>
          </table:table-cell>
          <table:table-cell table:number-columns-repeated="2"/>
          <table:table-cell office:value-type="string" calcext:value-type="string">
            <text:p><text:span text:style-name="T9"> | |</text:span> <text:span text:style-name="T9">|</text:span>.disp</text:p>
          </table:table-cell>
          <table:table-cell/>
          <table:table-cell table:style-name="ce32" office:value-type="string" calcext:value-type="string">
            <text:p><text:span text:style-name="T9">   │</text:span> <text:span text:style-name="T9">└</text:span>.di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</text:p>
          </table:table-cell>
          <table:table-cell table:number-columns-repeated="2"/>
          <table:table-cell office:value-type="string" calcext:value-type="string">
            <text:p><text:span text:style-name="T9"> | |</text:span>.h</text:p>
          </table:table-cell>
          <table:table-cell/>
          <table:table-cell table:style-name="ce32" office:value-type="string" calcext:value-type="string">
            <text:p><text:span text:style-name="T9">   ├</text:span>.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update</text:p>
          </table:table-cell>
          <table:table-cell table:number-columns-repeated="2"/>
          <table:table-cell office:value-type="string" calcext:value-type="string">
            <text:p><text:span text:style-name="T9"> | | |</text:span>.update</text:p>
          </table:table-cell>
          <table:table-cell/>
          <table:table-cell table:style-name="ce32" office:value-type="string" calcext:value-type="string">
            <text:p><text:span text:style-name="T9">   │ │</text:span>.up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warn</text:p>
          </table:table-cell>
          <table:table-cell table:number-columns-repeated="2"/>
          <table:table-cell office:value-type="string" calcext:value-type="string">
            <text:p><text:span text:style-name="T9"> | | |</text:span>.warn</text:p>
          </table:table-cell>
          <table:table-cell/>
          <table:table-cell table:style-name="ce32" office:value-type="string" calcext:value-type="string">
            <text:p><text:span text:style-name="T9">   │ └</text:span>.wa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display</text:p>
          </table:table-cell>
          <table:table-cell table:number-columns-repeated="2"/>
          <table:table-cell office:value-type="string" calcext:value-type="string">
            <text:p><text:span text:style-name="T9"> | |</text:span>.display</text:p>
          </table:table-cell>
          <table:table-cell/>
          <table:table-cell table:style-name="ce32" office:value-type="string" calcext:value-type="string">
            <text:p><text:span text:style-name="T9">   └</text:span>.displa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6">
      <number:text>1.</number:text>
      <number:number number:decimal-places="0" number:min-integer-digits="1"/>
    </number:number-style>
    <number:number-style style:name="N127">
      <number:text>2.</number:text>
      <number:number number:decimal-places="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6:23:57.199322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7-16T18:58:50.144446350</dc:date>
    <meta:editing-duration>P1DT20H31M9S</meta:editing-duration>
    <meta:editing-cycles>34</meta:editing-cycles>
    <meta:generator>LibreOffice/4.3.7.2$Linux_X86_64 LibreOffice_project/430m0$Build-2</meta:generator>
    <meta:document-statistic meta:table-count="3" meta:cell-count="539" meta:object-count="0"/>
  </office:meta>
</office:document-meta>
</file>
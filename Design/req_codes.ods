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7.881cm"/>
    </style:style>
    <style:style style:name="co2" style:family="table-column">
      <style:table-column-properties fo:break-before="auto" style:column-width="4.907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39cm"/>
    </style:style>
    <style:style style:name="co7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style:font-name="Arimo" style:font-name-asian="Lucida Sans Unicode" style:font-name-complex="FreeSans"/>
    </style:style>
    <style:style style:name="ce10" style:family="table-cell" style:parent-style-name="Default">
      <style:text-properties style:font-name="Inconsolata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/>
    </style:style>
    <style:style style:name="T1" style:family="text">
      <style:text-properties style:font-name="Arimo" style:font-name-asian="Lucida Sans Unicode"/>
    </style:style>
    <style:style style:name="T2" style:family="text">
      <style:text-properties fo:color="#e6e6e6"/>
    </style:style>
    <style:style style:name="T3" style:family="text"/>
  </office:automatic-styles>
  <office:body>
    <office:spreadsheet>
      <table:table table:name="Req 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Target is Req</text:p>
          </table:table-cell>
          <table:table-cell table:style-name="ce4" office:value-type="string" calcext:value-type="string">
            <text:p>Target is RCGroup</text:p>
          </table:table-cell>
          <table:table-cell table:style-name="ce4" office:value-type="string" calcext:value-type="string">
            <text:p>Target is Req</text:p>
          </table:table-cell>
          <table:table-cell table:style-name="ce4" office:value-type="string" calcext:value-type="string">
            <text:p>Target is RCGroup</text:p>
          </table:table-cell>
        </table:table-row>
        <table:table-row table:style-name="ro1">
          <table:table-cell office:value-type="string" calcext:value-type="string">
            <text:p>Create ref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Target deleted</text:p>
          </table:table-cell>
          <table:table-cell office:value-type="string" calcext:value-type="string">
            <text:p>same as ReqRefs</text:p>
          </table:table-cell>
          <table:table-cell table:style-name="ce6" office:value-type="string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rget code renamed 1→1'</text:p>
          </table:table-cell>
          <table:table-cell table:number-columns-repeated="2" table:style-name="ce5" office:value-type="string" calcext:value-type="string">
            <text:p>Update 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0</text:p>
          </table:table-cell>
          <table:table-cell office:value-type="string" calcext:value-type="string">
            <text:p>display pubid</text:p>
          </table:table-cell>
          <table:table-cell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n+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1'</text:p>
          </table:table-cell>
          <table:table-cell table:style-name="ce5" office:value-type="string" calcext:value-type="string">
            <text:p>Update ref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0</text:p>
          </table:table-cell>
          <table:table-cell table:formula="of:=[.B7]" office:value-type="string" office:string-value="display pubid" calcext:value-type="string">
            <text:p>display pubid</text:p>
          </table:table-cell>
          <table:table-cell table:formula="of:=[.C7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n+1</text:p>
          </table:table-cell>
          <table:table-cell table:formula="of:=[.B8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stored</text:p>
          </table:table-cell>
          <table:table-cell table:number-columns-repeated="2" table:style-name="ce5" office:value-type="string" calcext:value-type="string">
            <text:p>must remember orig c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Can become unassociated</text:p>
          </table:table-cell>
          <table:table-cell office:value-type="string" calcext:value-type="string">
            <text:p>Never!</text:p>
          </table:table-cell>
          <table:table-cell table:style-name="ce6"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Reqs grouped by arbitrary trait in 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Ref requirement</text:p>
          </table:table-cell>
          <table:table-cell office:value-type="string" calcext:value-type="string">
            <text:p>Refer to reqs with arbitrary trait in common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Data available to atom</text:p>
          </table:table-cell>
          <table:table-cell office:value-type="string" calcext:value-type="string">
            <text:p>Req.Id</text:p>
            <text:p><text:span text:style-name="T1">ReqCode</text:span></text:p>
          </table:table-cell>
          <table:table-cell table:style-name="ce9" office:value-type="string" calcext:value-type="string">
            <text:p>ReqC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in ref needs to outlive Code in active code tri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revity over the wire &gt; memory in J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in JS &gt; memory in J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torage:</text:p>
          </table:table-cell>
          <table:table-cell table:style-name="ce1" office:value-type="string" calcext:value-type="string">
            <text:p>Actio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reqcodes – lots of node &amp; prefix repetition</text:p>
          </table:table-cell>
          <table:table-cell table:style-name="ce2" office:value-type="string" calcext:value-type="string">
            <text:p>sort: Vector[ReqCode] ⇒ 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ch reqcode may have a target Req or RCGroup</text:p>
          </table:table-cell>
          <table:table-cell table:style-name="ce2" office:value-type="string" calcext:value-type="string">
            <text:p>ReqCode.Id ⇒ Must Req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ch reqcode has id</text:p>
          </table:table-cell>
          <table:table-cell table:style-name="ce2" office:value-type="string" calcext:value-type="string">
            <text:p>ReqCode.Id ⇒ Must 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code refs store a reqcode id</text:p>
          </table:table-cell>
          <table:table-cell table:style-name="ce2" office:value-type="string" calcext:value-type="string">
            <text:p>ReqCode ⇒ Option ReqCode.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code refs need to know req target</text:p>
          </table:table-cell>
          <table:table-cell office:value-type="string" calcext:value-type="string">
            <text:p>active: ReqCode ⇒ Boo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arget ⇒ Set[ReqCode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[ReqCode]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rget = Req.Id | class RCG | Tombstone</text:p>
          </table:table-cell>
          <table:table-cell office:value-type="string" calcext:value-type="string">
            <text:p>Update ref: (NEV[ReqCode.Id], ReqCode.Id) ⇒ 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cg lens: RCG ⊕ Option ReqCo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fTarget = Req.Id | obj RCG</text:p>
          </table:table-cell>
          <table:table-cell office:value-type="string" calcext:value-type="string">
            <text:p>req lens: Req.Id ⊕ Set ReqCo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qCodeRef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2"/>→ ReqCode.I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2"/>→ RefTarge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ype ReqCode = NEV[ReqCode.Node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1) Flat #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[ReqCode.Id, (ReqCode, Target)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ReqCode, ReqCode.Id]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7" office:value-type="string" calcext:value-type="string">
            <text:p>☒ No ReqCode uniqueness pro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) T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ie{</text:p>
          </table:table-cell>
          <table:table-cell office:value-type="string" calcext:value-type="string">
            <text:p>☑ Concise proto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k = ReqCode.Node</text:p>
          </table:table-cell>
          <table:table-cell office:value-type="string" calcext:value-type="string">
            <text:p>☑ ReqCode uniqueness p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leaf has Option Target</text:p>
          </table:table-cell>
          <table:table-cell table:style-name="ce7" office:value-type="string" calcext:value-type="string">
            <text:p>☒ No ReqCode.id uniqueness p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erminal has Target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arget has ReqCode.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Map[ReqCode.Id, ReqCode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3) Flat #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[ReqCode.Id, Target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ap[ReqCode, ReqCode.Id]</text:p>
          </table:table-cell>
          <table:table-cell table:style-name="ce7" office:value-type="string" calcext:value-type="string">
            <text:p>☒ ReqCode.Id repetition in proto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 uniqueness pro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 table:number-columns-repeated="3"/>
        </table:table-row>
      </table:table>
      <table:table table:name="display" table:style-name="ta1">
        <table:table-column table:style-name="co6" table:default-cell-style-name="ce10"/>
        <table:table-column table:style-name="co7" table:number-columns-repeated="2" table:default-cell-style-name="Default"/>
        <table:table-column table:style-name="co5" table:default-cell-style-name="ce10"/>
        <table:table-column table:style-name="co5" table:number-columns-repeated="1020" table:default-cell-style-name="Default"/>
        <table:table-row table:style-name="ro1">
          <table:table-cell table:style-name="ce4" office:value-type="string" calcext:value-type="string">
            <text:p>1&gt;1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</text:p>
          </table:table-cell>
          <table:table-cell table:style-name="ce10" office:value-type="string" calcext:value-type="string">
            <text:p>b.c.d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c.d.e</text:p>
          </table:table-cell>
          <table:table-cell table:style-name="ce10" office:value-type="string" calcext:value-type="string">
            <text:p>a.c.d.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0" office:value-type="string" calcext:value-type="string">
            <text:p><text:span text:style-name="T2">| | |</text:span>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0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10"/>
          <table:table-cell table:style-name="Default"/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</text:p>
          </table:table-cell>
          <table:table-cell table:style-name="ce10" office:value-type="string" calcext:value-type="string">
            <text:p>b.c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a</text:p>
          </table:table-cell>
          <table:table-cell table:style-name="ce10" office:value-type="string" calcext:value-type="string">
            <text:p>a.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0" office:value-type="string" calcext:value-type="string">
            <text:p><text:span text:style-name="T2">| |</text:span>.d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0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10"/>
          <table:table-cell table:style-name="Default"/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b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0" office:value-type="string" calcext:value-type="string">
            <text:p><text:span text:style-name="T2">|</text:span>.c.d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0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10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/>
          <table:table-cell table:style-name="ce10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0" office:value-type="string" calcext:value-type="string">
            <text:p>b.c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10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.a</text:p>
          </table:table-cell>
          <table:table-cell table:style-name="ce10" office:value-type="string" calcext:value-type="string">
            <text:p>b.c.d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0" office:value-type="string" calcext:value-type="string">
            <text:p><text:span text:style-name="T2">| | |</text:span>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10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.a.a</text:p>
          </table:table-cell>
          <table:table-cell table:style-name="ce10" office:value-type="string" calcext:value-type="string">
            <text:p>b.c.d.a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0" office:value-type="string" calcext:value-type="string">
            <text:p><text:span text:style-name="T2">| | |</text:span>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10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a.e</text:p>
          </table:table-cell>
          <table:table-cell table:style-name="ce10" office:value-type="string" calcext:value-type="string">
            <text:p>b.c.a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0" office:value-type="string" calcext:value-type="string">
            <text:p><text:span text:style-name="T2">| |</text:span>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10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a</text:p>
          </table:table-cell>
          <table:table-cell table:style-name="ce10" office:value-type="string" calcext:value-type="string">
            <text:p>b.c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0" office:value-type="string" calcext:value-type="string">
            <text:p><text:span text:style-name="T2">| |</text:span>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10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n&gt;n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b.c</text:p>
            <text:p>a.d</text:p>
          </table:table-cell>
          <table:table-cell table:style-name="ce10" office:value-type="string" calcext:value-type="string">
            <text:p>a.b.c</text:p>
            <text:p><text:span text:style-name="T2">|</text:span>.d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b.c</text:p>
            <text:p>b.a.c</text:p>
          </table:table-cell>
          <table:table-cell table:style-name="ce10" office:value-type="string" calcext:value-type="string">
            <text:p>a.b.c</text:p>
            <text:p>b.a.c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a.d.e</text:p>
            <text:p>a.f</text:p>
          </table:table-cell>
          <table:table-cell table:style-name="ce10" office:value-type="string" calcext:value-type="string">
            <text:p><text:span text:style-name="T2">| |</text:span>.e</text:p>
            <text:p><text:span text:style-name="T2">|</text:span>.f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d.e</text:p>
            <text:p>d.b.e</text:p>
          </table:table-cell>
          <table:table-cell table:style-name="ce10" office:value-type="string" calcext:value-type="string">
            <text:p><text:span text:style-name="T2">|</text:span>.d.e</text:p>
            <text:p>d.b.e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Full nodes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refs.code.short.parse</text:p>
          </table:table-cell>
          <table:table-cell table:number-columns-repeated="2"/>
          <table:table-cell table:style-name="ce10" office:value-type="string" calcext:value-type="string">
            <text:p>refs.code.short.par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2">|    |    |</text:span>    .disp</text:p>
          </table:table-cell>
          <table:table-cell table:number-columns-repeated="2"/>
          <table:table-cell table:style-name="ce10" office:value-type="string" calcext:value-type="string">
            <text:p><text:span text:style-name="T2">| |  |</text:span>.di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restore</text:p>
          </table:table-cell>
          <table:table-cell table:number-columns-repeated="2"/>
          <table:table-cell office:value-type="string" calcext:value-type="string">
            <text:p><text:span text:style-name="T2">|    |</text:span>    .change.restore</text:p>
          </table:table-cell>
          <table:table-cell table:number-columns-repeated="2"/>
          <table:table-cell table:style-name="ce10" office:value-type="string" calcext:value-type="string">
            <text:p><text:span text:style-name="T2">| |</text:span> .change.res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2">|    |    |</text:span>      .update</text:p>
          </table:table-cell>
          <table:table-cell table:number-columns-repeated="2"/>
          <table:table-cell table:style-name="ce10" office:value-type="string" calcext:value-type="string">
            <text:p><text:span text:style-name="T2">| | |</text:span> .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2">|    |    |</text:span>      .warn</text:p>
          </table:table-cell>
          <table:table-cell table:number-columns-repeated="2"/>
          <table:table-cell table:style-name="ce10" office:value-type="string" calcext:value-type="string">
            <text:p><text:span text:style-name="T2">| | |</text:span> .war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2">|    |</text:span>    .display</text:p>
          </table:table-cell>
          <table:table-cell table:number-columns-repeated="2"/>
          <table:table-cell table:style-name="ce10" office:value-type="string" calcext:value-type="string">
            <text:p><text:span text:style-name="T2">| |</text:span> .display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/>
          <table:table-cell table:style-name="ce7" office:value-type="string" calcext:value-type="string">
            <text:p>↖</text:p>
          </table:table-cell>
          <table:table-cell table:style-name="ce11" office:value-type="string" calcext:value-type="string">
            <text:p>↑ <text:s text:c="4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/>
          <table:table-cell table:style-name="ce11" office:value-type="string" calcext:value-type="string">
            <text:p>too much space <text:s text:c="3"/></text:p>
          </table:table-cell>
          <table:table-cell table:style-name="ce7" office:value-type="string" calcext:value-type="string">
            <text:p><text:s text:c="11"/>indentation misleadi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2">|</text:span> 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2">| |</text:span> .short.parse</text:p>
          </table:table-cell>
          <table:table-cell/>
          <table:table-cell table:style-name="ce2" office:value-type="string" calcext:value-type="string">
            <text:p>←much be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2">| |</text:span> <text:span text:style-name="T2">|</text:span>     .disp</text:p>
          </table:table-cell>
          <table:table-cell/>
          <table:table-cell table:style-name="ce2" office:value-type="string" calcext:value-type="string">
            <text:p><text:s text:c="4"/>ident sz = 2 when direct descen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2">| |</text:span> .change</text:p>
          </table:table-cell>
          <table:table-cell/>
          <table:table-cell table:style-name="ce7" office:value-type="string" calcext:value-type="string">
            <text:p><text:s text:c="4"/>indentation improved be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2">| | |</text:span> 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2">| | |</text:span> 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2">| |</text:span> 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2">|</text:span>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2">||</text:span>.short.parse</text:p>
          </table:table-cell>
          <table:table-cell/>
          <table:table-cell table:style-name="ce7" office:value-type="string" calcext:value-type="string">
            <text:p>←ident sz = 1 too sm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2">||| 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2">||</text:span>.ch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2">||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2">||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2">||</text:span>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2"> |</text:span>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2"> | |</text:span>.short.pa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2"> | |</text:span> <text:span text:style-name="T2">|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2"> | |</text:span>.change</text:p>
          </table:table-cell>
          <table:table-cell/>
          <table:table-cell table:style-name="ce2" office:value-type="string" calcext:value-type="string">
            <text:p>←“ <text:s/>|” is clearer than “| <text:s/>“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2"> | | 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2"> | | 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2"> | |</text:span>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2"> |</text:span><text:span text:style-name="T3">.code</text:span>.short.parse</text:p>
          </table:table-cell>
          <table:table-cell/>
          <table:table-cell table:style-name="ce2" office:value-type="string" calcext:value-type="string">
            <text:p>←Here there is no refs.code so .code gets full expan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2"> | |   </text:span> <text:span text:style-name="T2">|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2"> | |</text:span>   .chang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2"> | |    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2"> | |    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2"> | |</text:span>   .displa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3P0" style:volatile="true">
      <style:text-properties fo:color="#ff0000"/>
      <number:number number:decimal-places="0" number:min-integer-digits="1"/>
    </number:number-style>
    <number:number-style style:name="N123">
      <number:text>-</number:text>
      <number:number number:decimal-places="0" number:min-integer-digits="1"/>
      <style:map style:condition="value()&gt;=0" style:apply-style-name="N123P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08:46:34.020558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2:40:14.793429355</meta:creation-date>
    <dc:date>2015-04-27T17:58:56.842700165</dc:date>
    <meta:editing-duration>PT4H2M28S</meta:editing-duration>
    <meta:editing-cycles>17</meta:editing-cycles>
    <meta:generator>LibreOffice/4.3.7.2$Linux_X86_64 LibreOffice_project/430m0$Build-2</meta:generator>
    <meta:document-statistic meta:table-count="2" meta:cell-count="274" meta:object-count="0"/>
  </office:meta>
</office:document-meta>
</file>
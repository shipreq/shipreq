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4.9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5.89cm"/>
    </style:style>
    <style:style style:name="co11" style:family="table-column">
      <style:table-column-properties fo:break-before="auto" style:column-width="1.739cm"/>
    </style:style>
    <style:style style:name="co12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288cm" fo:break-before="auto" style:use-optimal-row-height="true"/>
    </style:style>
    <style:style style:name="ro5" style:family="table-row">
      <style:table-row-properties style:row-height="1.718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style:font-name="Arimo" style:font-name-asian="Lucida Sans Unicode" style:font-name-complex="FreeSans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Inconsolat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T1" style:family="text">
      <style:text-properties style:font-name="Arimo" style:font-name-asian="Lucida Sans Unicode"/>
    </style:style>
    <style:style style:name="T2" style:family="text">
      <style:text-properties style:font-name="Arimo" style:font-name-asian="Lucida Sans Unicode" style:font-name-complex="FreeSans"/>
    </style:style>
    <style:style style:name="T3" style:family="text">
      <style:text-properties style:font-name-asian="Lucida Sans Unicode" style:font-name-complex="FreeSans"/>
    </style:style>
    <style:style style:name="T4" style:family="text">
      <style:text-properties fo:color="#e6e6e6"/>
    </style:style>
  </office:automatic-styles>
  <office:body>
    <office:spreadsheet>
      <table:table table:name="Req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6" office:value-type="string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5" office:value-type="string" calcext:value-type="string">
            <text:p>Update 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5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0</text:p>
          </table:table-cell>
          <table:table-cell table:formula="of:=[.B11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n+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5" office:value-type="string" calcext:value-type="string">
            <text:p>must remember orig 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6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1">ReqCode</text:span></text:p>
          </table:table-cell>
          <table:table-cell table:style-name="ce9" office:value-type="string" calcext:value-type="string">
            <text:p>Req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revity over the wire &gt; memory in 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in JS &gt; memory in J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torage:</text:p>
          </table:table-cell>
          <table:table-cell table:style-name="ce1" office:value-type="string" calcext:value-type="string">
            <text:p>Actio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reqcodes – lots of node &amp; prefix repetition</text:p>
          </table:table-cell>
          <table:table-cell table:style-name="ce2" office:value-type="string" calcext:value-type="string">
            <text:p>sort: Vector[ReqCode] ⇒ 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may have a target Req or RCGroup</text:p>
          </table:table-cell>
          <table:table-cell table:style-name="ce2" office:value-type="string" calcext:value-type="string">
            <text:p>ReqCode.Id ⇒ Must Req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has id</text:p>
          </table:table-cell>
          <table:table-cell table:style-name="ce2" office:value-type="string" calcext:value-type="string">
            <text:p>ReqCode.Id ⇒ Must 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store a reqcode id</text:p>
          </table:table-cell>
          <table:table-cell table:style-name="ce2" office:value-type="string" calcext:value-type="string">
            <text:p>ReqCode ⇒ Option ReqCode.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need to know req target</text:p>
          </table:table-cell>
          <table:table-cell office:value-type="string" calcext:value-type="string">
            <text:p>active: ReqCode ⇒ Boo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rget ⇒ Set[ReqCode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[ReqCode]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rget = Req.Id | class RCG | Tombstone</text:p>
          </table:table-cell>
          <table:table-cell office:value-type="string" calcext:value-type="string">
            <text:p>Update ref: (NEV[ReqCode.Id], ReqCode.Id) ⇒ 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cg lens: RCG ⊕ Option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fTarget = Req.Id | obj RCG</text:p>
          </table:table-cell>
          <table:table-cell office:value-type="string" calcext:value-type="string">
            <text:p>req lens: Req.Id ⊕ Set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qCodeRef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qCode.I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fTarg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ype ReqCode = NEV[ReqCode.Node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1) Flat #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(ReqCode, Target)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ReqCode, ReqCode.Id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7" office:value-type="string" calcext:value-type="string">
            <text:p>☒ No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) T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ie{</text:p>
          </table:table-cell>
          <table:table-cell office:value-type="string" calcext:value-type="string">
            <text:p>☑ Concise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k = ReqCode.Node</text:p>
          </table:table-cell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leaf has Option Target</text:p>
          </table:table-cell>
          <table:table-cell table:style-name="ce7" office:value-type="string" calcext:value-type="string">
            <text:p>☒ No ReqCode.id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erminal has Target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arget has ReqCode.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ReqCode.Id, ReqCode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3) Flat 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Target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ap[ReqCode, ReqCode.Id]</text:p>
          </table:table-cell>
          <table:table-cell table:style-name="ce7" office:value-type="string" calcext:value-type="string">
            <text:p>☒ ReqCode.Id repetition in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</table:table>
      <table:table table:name="ref logic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8" table:default-cell-style-name="Default"/>
        <table:table-row table:style-name="ro1">
          <table:table-cell table:style-name="ce10" office:value-type="string" calcext:value-type="string">
            <text:p>RC view</text:p>
          </table:table-cell>
          <table:table-cell table:style-name="ce10" office:value-type="string" calcext:value-type="string">
            <text:p>Inactive</text:p>
          </table:table-cell>
          <table:table-cell table:style-name="ce10" office:value-type="string" calcext:value-type="string">
            <text:p>Active</text:p>
          </table:table-cell>
          <table:table-cell table:style-name="ce10" office:value-type="string" calcext:value-type="string">
            <text:p>Txt</text:p>
          </table:table-cell>
          <table:table-cell table:style-name="ce10" office:value-type="string" calcext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#3 – a.b.c [Grp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Create RCG re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#3 – a.x [Grp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name 1→1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3 – a.x [Grp]</text:p>
          </table:table-cell>
          <table:table-cell/>
          <table:table-cell office:value-type="string" calcext:value-type="string">
            <text:p>Ref(#3)</text:p>
          </table:table-cell>
          <table:table-cell office:value-type="string" calcext:value-type="string">
            <text:p>Delete RC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#3 – a.x [Grp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store RC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3 – a.x [Grp]</text:p>
          </table:table-cell>
          <table:table-cell/>
          <table:table-cell office:value-type="string" calcext:value-type="string">
            <text:p>Ref(#3)</text:p>
          </table:table-cell>
          <table:table-cell office:value-type="string" calcext:value-type="string">
            <text:p>Delete RCG</text:p>
          </table:table-cell>
          <table:table-cell table:number-columns-repeated="1019"/>
        </table:table-row>
        <table:table-row table:style-name="ro1">
          <table:table-cell table:style-name="ce9"/>
          <table:table-cell office:value-type="string" calcext:value-type="string">
            <text:p>#3 – a.x [Grp]</text:p>
          </table:table-cell>
          <table:table-cell table:style-name="ce9" office:value-type="string" calcext:value-type="string">
            <text:p>#4 – a.x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Create RCᵣ</text:p>
          </table:table-cell>
          <table:table-cell table:number-columns-repeated="1019"/>
        </table:table-row>
        <table:table-row table:style-name="ro1">
          <table:table-cell table:style-name="ce9"/>
          <table:table-cell office:value-type="string" calcext:value-type="string">
            <text:p>#3 – a.x [Grp]</text:p>
          </table:table-cell>
          <table:table-cell table:style-name="ce9" office:value-type="string" calcext:value-type="string">
            <text:p>#4 – y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name RCᵣ</text:p>
          </table:table-cell>
          <table:table-cell table:number-columns-repeated="1019"/>
        </table:table-row>
        <table:table-row table:style-name="ro3">
          <table:table-cell table:style-name="ce9"/>
          <table:table-cell/>
          <table:table-cell table:style-name="ce9" office:value-type="string" calcext:value-type="string">
            <text:p>#3 – a.x [Grp]</text:p>
            <text:p>#4 – y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store RCG</text:p>
          </table:table-cell>
          <table:table-cell office:value-type="string" calcext:value-type="string">
            <text:p>Each R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* Can only have 1 active targe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* Can have many old, inactive targe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.b.c: C[#1Req(#a)]</text:p>
          </table:table-cell>
          <table:table-cell/>
          <table:table-cell office:value-type="string" calcext:value-type="string">
            <text:p>#1 – a.b.c [Req(#a)]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Create RCᵣ r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.y.z: C[#1Req(#a)]</text:p>
          </table:table-cell>
          <table:table-cell/>
          <table:table-cell office:value-type="string" calcext:value-type="string">
            <text:p>#1 – y.y.z [Req(#a)]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name 1→1'</text:p>
          </table:table-cell>
          <table:table-cell office:value-type="string" calcext:value-type="string">
            <text:p>- current: Option[(Id, Target)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.y.z: R[#1Req(#a)]</text:p>
          </table:table-cell>
          <table:table-cell office:value-type="string" calcext:value-type="string">
            <text:p>#1 – y.y.z [Req(#a)]</text:p>
          </table:table-cell>
          <table:table-cell/>
          <table:table-cell office:value-type="string" calcext:value-type="string">
            <text:p>Ref(#1)</text:p>
          </table:table-cell>
          <table:table-cell office:value-type="string" calcext:value-type="string">
            <text:p>Delete RCᵣ</text:p>
          </table:table-cell>
          <table:table-cell office:value-type="string" calcext:value-type="string">
            <text:p>- referenced: Vector[(Id, Target)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.y.z: C[#1Req(#a)]</text:p>
          </table:table-cell>
          <table:table-cell/>
          <table:table-cell office:value-type="string" calcext:value-type="string">
            <text:p>#1 – y.y.z [Req(#a)]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store RCᵣ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pan text:style-name="T2">n.a: C[#2Req(#a)]</text:span></text:p>
            <text:p>y.y.z: C[#1Req(#a)]</text:p>
          </table:table-cell>
          <table:table-cell/>
          <table:table-cell office:value-type="string" calcext:value-type="string">
            <text:p>#1 – y.y.z [Req(#a)]</text:p>
            <text:p><text:span text:style-name="T2">#2 – n.a [Req(#a)]</text:span>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name 1→n+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.y.z: C[#1Req(#a)]</text:p>
          </table:table-cell>
          <table:table-cell/>
          <table:table-cell office:value-type="string" calcext:value-type="string">
            <text:p>#1 – y.y.z [Req(#a)]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name n+1→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pan text:style-name="T2">n.b: C[#3Req(#a)]</text:span></text:p>
            <text:p><text:span text:style-name="T2">n.c: C[#4Req(#a)]</text:span></text:p>
            <text:p>y.y.z: R[#1Req(#a)]</text:p>
          </table:table-cell>
          <table:table-cell office:value-type="string" calcext:value-type="string">
            <text:p>#1 – y.y.z [Req(#a)]</text:p>
          </table:table-cell>
          <table:table-cell office:value-type="string" calcext:value-type="string">
            <text:p>#3 – n.b [Req(#a)]</text:p>
            <text:p><text:span text:style-name="T2">#4 – n.c [Req(#a)]</text:span>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name 1→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pan text:style-name="T2">n.b: C[#3Req(#a)]</text:span></text:p>
            <text:p><text:span text:style-name="T2">n.c: C[#4Req(#a)]</text:span></text:p>
            <text:p>y.y.z: C[#1Req(#a)]</text:p>
          </table:table-cell>
          <table:table-cell/>
          <table:table-cell office:value-type="string" calcext:value-type="string">
            <text:p>#1 – y.y.z [Req(#a)]</text:p>
            <text:p>#3 – n.b [Req(#a)]</text:p>
            <text:p><text:span text:style-name="T2">#4 – n.c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→n+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aa: C[#1Req(#a)]</text:p>
            <text:p>        R<text:span text:style-name="T2">[#3Req(#a)]</text:span></text:p>
          </table:table-cell>
          <table:table-cell/>
          <table:table-cell office:value-type="string" calcext:value-type="string">
            <text:p>#1,#3 – aaa [Req(#a)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+1→1'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nd: C[#5Req(#a)]</text:span></text:p>
          </table:table-cell>
          <table:table-cell/>
          <table:table-cell office:value-type="string" calcext:value-type="string">
            <text:p>#1,#3 – aaa [Req(#a)]</text:p>
            <text:p><text:span text:style-name="T2">#5 – n.d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1→n+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n.ee: C[#5Req(#a)]</text:span></text:p>
            <text:p><text:span text:style-name="T2">n.ef: C[#6Req(#a)]</text:span></text:p>
          </table:table-cell>
          <table:table-cell/>
          <table:table-cell office:value-type="string" calcext:value-type="string">
            <text:p>#1,#3 – aaa [Req(#a)]</text:p>
            <text:p><text:span text:style-name="T2">#5 – n.ee [Req(#a)]</text:span></text:p>
            <text:p><text:span text:style-name="T2">#6 – n.ef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+1→n+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R[#1Req(#a)]</text:p>
            <text:p>        R<text:span text:style-name="T2">[#3Req(#a)]</text:span></text:p>
            <text:p><text:span text:style-name="T2">n.ee: C[#5Req(#a)]</text:span></text:p>
            <text:p><text:span text:style-name="T2">n.ef: C[#6Req(#a)]</text:span></text:p>
          </table:table-cell>
          <table:table-cell office:value-type="string" calcext:value-type="string">
            <text:p>#1,#3 – aaa [Req(#a)]</text:p>
          </table:table-cell>
          <table:table-cell table:style-name="ce9" office:value-type="string" calcext:value-type="string">
            <text:p><text:span text:style-name="T3">#5 – n.ee [Req(#a)]</text:span></text:p>
            <text:p><text:span text:style-name="T3">#6 – n.ef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+1→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aa: C[#1Req(#a)]</text:p>
            <text:p>        R<text:span text:style-name="T2">[#3Req(#a)]</text:span></text:p>
          </table:table-cell>
          <table:table-cell/>
          <table:table-cell office:value-type="string" calcext:value-type="string">
            <text:p>#1,#3 – aaa [Req(#a)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→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n.f: C[#7Req(#a)]</text:span></text:p>
          </table:table-cell>
          <table:table-cell/>
          <table:table-cell office:value-type="string" calcext:value-type="string">
            <text:p>#1,#3 – aaa [Req(#a)]</text:p>
            <text:p><text:span text:style-name="T2">#7 – n.f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1→n+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aa: R[#1Req(#a)]</text:p>
            <text:p>        R<text:span text:style-name="T2">[#3Req(#a)]</text:span></text:p>
          </table:table-cell>
          <table:table-cell office:value-type="string" calcext:value-type="string">
            <text:p>#1,#3 – aaa [Req(#a)]</text:p>
          </table:table-cell>
          <table:table-cell/>
          <table:table-cell office:value-type="string" calcext:value-type="string">
            <text:p>Ref(#1)Ref(#3)</text:p>
          </table:table-cell>
          <table:table-cell office:value-type="string" calcext:value-type="string">
            <text:p>Rename n+1→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n.h: C[#8Req(#a)]</text:span></text:p>
          </table:table-cell>
          <table:table-cell/>
          <table:table-cell office:value-type="string" calcext:value-type="string">
            <text:p>#1,#3 – aaa [Req(#a)]</text:p>
            <text:p><text:span text:style-name="T2">#8 – n.h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store RCᵣ + 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aa: R[#1Req(#a)]</text:p>
            <text:p>        R<text:span text:style-name="T2">[#3Req(#a)]</text:span></text:p>
          </table:table-cell>
          <table:table-cell office:value-type="string" calcext:value-type="string">
            <text:p>#1,#3 – aaa [Req(#a)]</text:p>
          </table:table-cell>
          <table:table-cell/>
          <table:table-cell office:value-type="string" calcext:value-type="string">
            <text:p>Ref(#1)Ref(#3)</text:p>
          </table:table-cell>
          <table:table-cell office:value-type="string" calcext:value-type="string">
            <text:p>Delete RCᵣ + 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C[#9Grp]</text:p>
            <text:p>        R[#1Req(#a)]</text:p>
            <text:p>        R<text:span text:style-name="T2">[#3Req(#a)]</text:span></text:p>
          </table:table-cell>
          <table:table-cell office:value-type="string" calcext:value-type="string">
            <text:p>#1,#3 – aaa [Req(#a)]</text:p>
          </table:table-cell>
          <table:table-cell office:value-type="string" calcext:value-type="string">
            <text:p>#9 – aaa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Create RCG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R[#1Req(#a)]</text:p>
            <text:p>        R<text:span text:style-name="T2">[#3Req(#a)]</text:span></text:p>
            <text:p><text:span text:style-name="T2">ggg: C[#9Grp]</text:span></text:p>
          </table:table-cell>
          <table:table-cell office:value-type="string" calcext:value-type="string">
            <text:p>#1,#3 – aaa [Req(#a)]</text:p>
          </table:table-cell>
          <table:table-cell office:value-type="string" calcext:value-type="string">
            <text:p>#9 – ggg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RC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C[#10Req(#b)]</text:p>
            <text:p>        R[#1Req(#a)]</text:p>
            <text:p>        R<text:span text:style-name="T2">[#3Req(#a)]</text:span></text:p>
            <text:p><text:span text:style-name="T2">ggg: C[#9Grp]</text:span></text:p>
          </table:table-cell>
          <table:table-cell office:value-type="string" calcext:value-type="string">
            <text:p>#1,#3 – aaa [Req(#a)]</text:p>
          </table:table-cell>
          <table:table-cell office:value-type="string" calcext:value-type="string">
            <text:p>#10 – aaa [Req(#b)]</text:p>
            <text:p>#9 – ggg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Create RCᵣ #b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R[#1Req(#a)]</text:p>
            <text:p>        R<text:span text:style-name="T2">[#3Req(#a)]</text:span></text:p>
            <text:p><text:span text:style-name="T2">bbb: C[#10Req(#b)]</text:span></text:p>
            <text:p><text:span text:style-name="T2">ggg: C[#9Grp]</text:span></text:p>
          </table:table-cell>
          <table:table-cell office:value-type="string" calcext:value-type="string">
            <text:p>#1,#3 – aaa [Req(#a)]</text:p>
          </table:table-cell>
          <table:table-cell office:value-type="string" calcext:value-type="string">
            <text:p>#10 – bbb [Req(#b)]</text:p>
            <text:p>#9 – ggg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RCᵣ #b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bbb: C[#10Req(#b)]</text:span></text:p>
            <text:p><text:span text:style-name="T2">ggg: C[#9Grp]</text:span></text:p>
          </table:table-cell>
          <table:table-cell/>
          <table:table-cell office:value-type="string" calcext:value-type="string">
            <text:p>#1,#3 – aaa [Req(#a)]</text:p>
            <text:p>#10 – bbb [Req(#b)]</text:p>
            <text:p>#9 – ggg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store RCᵣ</text:p>
          </table:table-cell>
          <table:table-cell table:number-columns-repeated="1019"/>
        </table:table-row>
      </table:table>
      <table:table table:name="display" table:style-name="ta1">
        <table:table-column table:style-name="co11" table:default-cell-style-name="ce11"/>
        <table:table-column table:style-name="co12" table:number-columns-repeated="2" table:default-cell-style-name="Default"/>
        <table:table-column table:style-name="co5" table:default-cell-style-name="ce11"/>
        <table:table-column table:style-name="co5" table:number-columns-repeated="1020" table:default-cell-style-name="Default"/>
        <table:table-row table:style-name="ro1">
          <table:table-cell table:style-name="ce4" office:value-type="string" calcext:value-type="string">
            <text:p>1&gt;1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</text:p>
          </table:table-cell>
          <table:table-cell table:style-name="ce11" office:value-type="string" calcext:value-type="string">
            <text:p>b.c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c.d.e</text:p>
          </table:table-cell>
          <table:table-cell table:style-name="ce11" office:value-type="string" calcext:value-type="string">
            <text:p>a.c.d.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 |</text:span>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</text:p>
          </table:table-cell>
          <table:table-cell table:style-name="ce11" office:value-type="string" calcext:value-type="string">
            <text:p>b.c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a</text:p>
          </table:table-cell>
          <table:table-cell table:style-name="ce11" office:value-type="string" calcext:value-type="string">
            <text:p>a.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</text:span>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b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</text:span>.c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b.c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</text:p>
          </table:table-cell>
          <table:table-cell table:style-name="ce11" office:value-type="string" calcext:value-type="string">
            <text:p>b.c.d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.a</text:p>
          </table:table-cell>
          <table:table-cell table:style-name="ce11" office:value-type="string" calcext:value-type="string">
            <text:p>b.c.d.a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.e</text:p>
          </table:table-cell>
          <table:table-cell table:style-name="ce11" office:value-type="string" calcext:value-type="string">
            <text:p>b.c.a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</text:p>
          </table:table-cell>
          <table:table-cell table:style-name="ce11" office:value-type="string" calcext:value-type="string">
            <text:p>b.c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11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n&gt;n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a.d</text:p>
          </table:table-cell>
          <table:table-cell table:style-name="ce11" office:value-type="string" calcext:value-type="string">
            <text:p>a.b.c</text:p>
            <text:p><text:span text:style-name="T4">|</text:span>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b.a.c</text:p>
          </table:table-cell>
          <table:table-cell table:style-name="ce11" office:value-type="string" calcext:value-type="string">
            <text:p>a.b.c</text:p>
            <text:p>b.a.c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a.d.e</text:p>
            <text:p>a.f</text:p>
          </table:table-cell>
          <table:table-cell table:style-name="ce11" office:value-type="string" calcext:value-type="string">
            <text:p><text:span text:style-name="T4">| |</text:span>.e</text:p>
            <text:p><text:span text:style-name="T4">|</text:span>.f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d.e</text:p>
            <text:p>d.b.e</text:p>
          </table:table-cell>
          <table:table-cell table:style-name="ce11" office:value-type="string" calcext:value-type="string">
            <text:p><text:span text:style-name="T4">|</text:span>.d.e</text:p>
            <text:p>d.b.e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Full nodes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refs.code.short.parse</text:p>
          </table:table-cell>
          <table:table-cell table:number-columns-repeated="2"/>
          <table:table-cell table:style-name="ce11" office:value-type="string" calcext:value-type="string">
            <text:p>refs.code.short.par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|    |    |</text:span>    .disp</text:p>
          </table:table-cell>
          <table:table-cell table:number-columns-repeated="2"/>
          <table:table-cell table:style-name="ce11" office:value-type="string" calcext:value-type="string">
            <text:p><text:span text:style-name="T4">| |  |</text:span>.di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restore</text:p>
          </table:table-cell>
          <table:table-cell table:number-columns-repeated="2"/>
          <table:table-cell office:value-type="string" calcext:value-type="string">
            <text:p><text:span text:style-name="T4">|    |</text:span>    .change.restore</text:p>
          </table:table-cell>
          <table:table-cell table:number-columns-repeated="2"/>
          <table:table-cell table:style-name="ce11" office:value-type="string" calcext:value-type="string">
            <text:p><text:span text:style-name="T4">| |</text:span> .change.re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|    |    |</text:span>      .update</text:p>
          </table:table-cell>
          <table:table-cell table:number-columns-repeated="2"/>
          <table:table-cell table:style-name="ce11" office:value-type="string" calcext:value-type="string">
            <text:p><text:span text:style-name="T4">| | |</text:span> .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|    |    |</text:span>      .warn</text:p>
          </table:table-cell>
          <table:table-cell table:number-columns-repeated="2"/>
          <table:table-cell table:style-name="ce11" office:value-type="string" calcext:value-type="string">
            <text:p><text:span text:style-name="T4">| | |</text:span> .wa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|    |</text:span>    .display</text:p>
          </table:table-cell>
          <table:table-cell table:number-columns-repeated="2"/>
          <table:table-cell table:style-name="ce11" office:value-type="string" calcext:value-type="string">
            <text:p><text:span text:style-name="T4">| |</text:span> .display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↖</text:p>
          </table:table-cell>
          <table:table-cell table:style-name="ce12" office:value-type="string" calcext:value-type="string">
            <text:p>↑ <text:s text:c="4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/>
          <table:table-cell table:style-name="ce12" office:value-type="string" calcext:value-type="string">
            <text:p>too much space <text:s text:c="3"/></text:p>
          </table:table-cell>
          <table:table-cell table:style-name="ce7" office:value-type="string" calcext:value-type="string">
            <text:p><text:s text:c="11"/>indentation misleadi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4">|</text:span> 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4">| |</text:span> .short.parse</text:p>
          </table:table-cell>
          <table:table-cell/>
          <table:table-cell table:style-name="ce2" office:value-type="string" calcext:value-type="string">
            <text:p>←much be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| |</text:span> <text:span text:style-name="T4">|</text:span>     .disp</text:p>
          </table:table-cell>
          <table:table-cell/>
          <table:table-cell table:style-name="ce2" office:value-type="string" calcext:value-type="string">
            <text:p><text:s text:c="4"/>ident sz = 2 when direct descen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4">| |</text:span> .change</text:p>
          </table:table-cell>
          <table:table-cell/>
          <table:table-cell table:style-name="ce7" office:value-type="string" calcext:value-type="string">
            <text:p><text:s text:c="4"/>indentation improved be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| | |</text:span> 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| | |</text:span> 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| |</text:span> 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4">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4">||</text:span>.short.parse</text:p>
          </table:table-cell>
          <table:table-cell/>
          <table:table-cell table:style-name="ce7" office:value-type="string" calcext:value-type="string">
            <text:p>←ident sz = 1 too sm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||| 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4">||</text:span>.ch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||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||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|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4"> 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4"> | |</text:span>.short.pa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 | |</text:span> <text:span text:style-name="T4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4"> | |</text:span>.change</text:p>
          </table:table-cell>
          <table:table-cell/>
          <table:table-cell table:style-name="ce2" office:value-type="string" calcext:value-type="string">
            <text:p>←“ <text:s/>|” is clearer than “| <text:s/>“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 | |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 | |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 | 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4"> |</text:span>.code.short.parse</text:p>
          </table:table-cell>
          <table:table-cell/>
          <table:table-cell table:style-name="ce2" office:value-type="string" calcext:value-type="string">
            <text:p>←Here there is no refs.code so .code gets full expan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 | |   </text:span> <text:span text:style-name="T4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4"> | |</text:span>   .chang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 | |   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 | |   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 | |</text:span>   .displ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1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s.parse</text:p>
          </table:table-cell>
          <table:table-cell table:number-columns-repeated="2"/>
          <table:table-cell office:value-type="string" calcext:value-type="string">
            <text:p> <text:span text:style-name="T4">|</text:span>.c.s.parse</text:p>
          </table:table-cell>
          <table:table-cell/>
          <table:table-cell table:style-name="ce11" office:value-type="string" calcext:value-type="string">
            <text:p> <text:span text:style-name="T4">└</text:span>.c.s.par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s.disp</text:p>
          </table:table-cell>
          <table:table-cell table:number-columns-repeated="2"/>
          <table:table-cell office:value-type="string" calcext:value-type="string">
            <text:p><text:span text:style-name="T4"> | |</text:span> <text:span text:style-name="T4">|</text:span>.disp</text:p>
          </table:table-cell>
          <table:table-cell/>
          <table:table-cell table:style-name="ce11" office:value-type="string" calcext:value-type="string">
            <text:p><text:span text:style-name="T4">   │</text:span> <text:span text:style-name="T4">└</text:span>.di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</text:p>
          </table:table-cell>
          <table:table-cell table:number-columns-repeated="2"/>
          <table:table-cell office:value-type="string" calcext:value-type="string">
            <text:p><text:span text:style-name="T4"> | |</text:span>.h</text:p>
          </table:table-cell>
          <table:table-cell/>
          <table:table-cell table:style-name="ce11" office:value-type="string" calcext:value-type="string">
            <text:p><text:span text:style-name="T4">   ├</text:span>.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.update</text:p>
          </table:table-cell>
          <table:table-cell table:number-columns-repeated="2"/>
          <table:table-cell office:value-type="string" calcext:value-type="string">
            <text:p><text:span text:style-name="T4"> | | |</text:span>.update</text:p>
          </table:table-cell>
          <table:table-cell/>
          <table:table-cell table:style-name="ce11" office:value-type="string" calcext:value-type="string">
            <text:p><text:span text:style-name="T4">   │ │</text:span>.up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.warn</text:p>
          </table:table-cell>
          <table:table-cell table:number-columns-repeated="2"/>
          <table:table-cell office:value-type="string" calcext:value-type="string">
            <text:p><text:span text:style-name="T4"> | | |</text:span>.warn</text:p>
          </table:table-cell>
          <table:table-cell/>
          <table:table-cell table:style-name="ce11" office:value-type="string" calcext:value-type="string">
            <text:p><text:span text:style-name="T4">   │ └</text:span>.wa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display</text:p>
          </table:table-cell>
          <table:table-cell table:number-columns-repeated="2"/>
          <table:table-cell office:value-type="string" calcext:value-type="string">
            <text:p><text:span text:style-name="T4"> | |</text:span>.display</text:p>
          </table:table-cell>
          <table:table-cell/>
          <table:table-cell table:style-name="ce11" office:value-type="string" calcext:value-type="string">
            <text:p><text:span text:style-name="T4">   └</text:span>.display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21:54:44.49262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40:14.793429355</meta:creation-date>
    <dc:date>2015-04-28T22:54:55.218417689</dc:date>
    <meta:editing-duration>PT16H17M31S</meta:editing-duration>
    <meta:editing-cycles>23</meta:editing-cycles>
    <meta:generator>LibreOffice/4.3.7.2$Linux_X86_64 LibreOffice_project/430m0$Build-2</meta:generator>
    <meta:document-statistic meta:table-count="3" meta:cell-count="437" meta:object-count="0"/>
  </office:meta>
</office:document-meta>
</file>
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3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110"/>
  </office:automatic-styles>
  <office:body>
    <office:spreadsheet>
      <table:calculation-settings table:use-regular-expressions="false" table:use-wildcards="true"/>
      <table:table table:name="fast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ww</text:p>
          </table:table-cell>
        </table:table-row>
        <table:table-row table:style-name="ro1">
          <table:table-cell office:value-type="string" calcext:value-type="string">
            <text:p>home.js</text:p>
          </table:table-cell>
          <table:table-cell office:value-type="float" office:value="160464" calcext:value-type="float">
            <text:p>160,464</text:p>
          </table:table-cell>
          <table:table-cell/>
          <table:table-cell table:style-name="ce4" table:formula="of:=IF(ISNUMBER(SEARCH([.D$1];[.$A2]));[.$B2];0)" office:value-type="float" office:value="0" calcext:value-type="float">
            <text:p>0</text:p>
          </table:table-cell>
          <table:table-cell table:style-name="ce4" table:formula="of:=IF(ISNUMBER(SEARCH([.E$1];[.$A2]));[.$B2];0)" office:value-type="float" office:value="160464" calcext:value-type="float">
            <text:p>160464</text:p>
          </table:table-cell>
          <table:table-cell table:style-name="ce4" table:formula="of:=IF(ISNUMBER(SEARCH([.F$1];[.$A2]));[.$B2];0)" office:value-type="float" office:value="0" calcext:value-type="float">
            <text:p>0</text:p>
          </table:table-cell>
          <table:table-cell table:style-name="ce4" table:formula="of:=IF(ISNUMBER(SEARCH([.G$1];[.$A2]));[.$B2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-project.js</text:p>
          </table:table-cell>
          <table:table-cell office:value-type="float" office:value="2955960" calcext:value-type="float">
            <text:p>2,955,960</text:p>
          </table:table-cell>
          <table:table-cell/>
          <table:table-cell table:style-name="ce4" table:formula="of:=IF(ISNUMBER(SEARCH([.D$1];[.$A3]));[.$B3];0)" office:value-type="float" office:value="0" calcext:value-type="float">
            <text:p>0</text:p>
          </table:table-cell>
          <table:table-cell table:style-name="ce4" table:formula="of:=IF(ISNUMBER(SEARCH([.E$1];[.$A3]));[.$B3];0)" office:value-type="float" office:value="2955960" calcext:value-type="float">
            <text:p>2955960</text:p>
          </table:table-cell>
          <table:table-cell table:style-name="ce4" table:formula="of:=IF(ISNUMBER(SEARCH([.F$1];[.$A3]));[.$B3];0)" office:value-type="float" office:value="2955960" calcext:value-type="float">
            <text:p>2955960</text:p>
          </table:table-cell>
          <table:table-cell table:style-name="ce4" table:formula="of:=IF(ISNUMBER(SEARCH([.G$1];[.$A3]));[.$B3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-project-public.js</text:p>
          </table:table-cell>
          <table:table-cell office:value-type="float" office:value="794106" calcext:value-type="float">
            <text:p>794,106</text:p>
          </table:table-cell>
          <table:table-cell/>
          <table:table-cell table:style-name="ce4" table:formula="of:=IF(ISNUMBER(SEARCH([.D$1];[.$A4]));[.$B4];0)" office:value-type="float" office:value="794106" calcext:value-type="float">
            <text:p>794106</text:p>
          </table:table-cell>
          <table:table-cell table:style-name="ce4" table:formula="of:=IF(ISNUMBER(SEARCH([.E$1];[.$A4]));[.$B4];0)" office:value-type="float" office:value="794106" calcext:value-type="float">
            <text:p>794106</text:p>
          </table:table-cell>
          <table:table-cell table:style-name="ce4" table:formula="of:=IF(ISNUMBER(SEARCH([.F$1];[.$A4]));[.$B4];0)" office:value-type="float" office:value="794106" calcext:value-type="float">
            <text:p>794106</text:p>
          </table:table-cell>
          <table:table-cell table:style-name="ce4" table:formula="of:=IF(ISNUMBER(SEARCH([.G$1];[.$A4]));[.$B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-project-public-ww.js</text:p>
          </table:table-cell>
          <table:table-cell office:value-type="float" office:value="3978425" calcext:value-type="float">
            <text:p>3,978,425</text:p>
          </table:table-cell>
          <table:table-cell/>
          <table:table-cell table:style-name="ce4" table:formula="of:=IF(ISNUMBER(SEARCH([.D$1];[.$A5]));[.$B5];0)" office:value-type="float" office:value="3978425" calcext:value-type="float">
            <text:p>3978425</text:p>
          </table:table-cell>
          <table:table-cell table:style-name="ce4" table:formula="of:=IF(ISNUMBER(SEARCH([.E$1];[.$A5]));[.$B5];0)" office:value-type="float" office:value="3978425" calcext:value-type="float">
            <text:p>3978425</text:p>
          </table:table-cell>
          <table:table-cell table:style-name="ce4" table:formula="of:=IF(ISNUMBER(SEARCH([.F$1];[.$A5]));[.$B5];0)" office:value-type="float" office:value="3978425" calcext:value-type="float">
            <text:p>3978425</text:p>
          </table:table-cell>
          <table:table-cell table:style-name="ce4" table:formula="of:=IF(ISNUMBER(SEARCH([.G$1];[.$A5]));[.$B5];0)" office:value-type="float" office:value="3978425" calcext:value-type="float">
            <text:p>3978425</text:p>
          </table:table-cell>
        </table:table-row>
        <table:table-row table:style-name="ro1">
          <table:table-cell office:value-type="string" calcext:value-type="string">
            <text:p>home-project-ww.js</text:p>
          </table:table-cell>
          <table:table-cell office:value-type="float" office:value="9183839" calcext:value-type="float">
            <text:p>9,183,839</text:p>
          </table:table-cell>
          <table:table-cell/>
          <table:table-cell table:style-name="ce4" table:formula="of:=IF(ISNUMBER(SEARCH([.D$1];[.$A6]));[.$B6];0)" office:value-type="float" office:value="0" calcext:value-type="float">
            <text:p>0</text:p>
          </table:table-cell>
          <table:table-cell table:style-name="ce4" table:formula="of:=IF(ISNUMBER(SEARCH([.E$1];[.$A6]));[.$B6];0)" office:value-type="float" office:value="9183839" calcext:value-type="float">
            <text:p>9183839</text:p>
          </table:table-cell>
          <table:table-cell table:style-name="ce4" table:formula="of:=IF(ISNUMBER(SEARCH([.F$1];[.$A6]));[.$B6];0)" office:value-type="float" office:value="9183839" calcext:value-type="float">
            <text:p>9183839</text:p>
          </table:table-cell>
          <table:table-cell table:style-name="ce4" table:formula="of:=IF(ISNUMBER(SEARCH([.G$1];[.$A6]));[.$B6];0)" office:value-type="float" office:value="9183839" calcext:value-type="float">
            <text:p>9183839</text:p>
          </table:table-cell>
        </table:table-row>
        <table:table-row table:style-name="ro1">
          <table:table-cell office:value-type="string" calcext:value-type="string">
            <text:p>project.js</text:p>
          </table:table-cell>
          <table:table-cell office:value-type="float" office:value="16528129" calcext:value-type="float">
            <text:p>16,528,129</text:p>
          </table:table-cell>
          <table:table-cell/>
          <table:table-cell table:style-name="ce4" table:formula="of:=IF(ISNUMBER(SEARCH([.D$1];[.$A7]));[.$B7];0)" office:value-type="float" office:value="0" calcext:value-type="float">
            <text:p>0</text:p>
          </table:table-cell>
          <table:table-cell table:style-name="ce4" table:formula="of:=IF(ISNUMBER(SEARCH([.E$1];[.$A7]));[.$B7];0)" office:value-type="float" office:value="0" calcext:value-type="float">
            <text:p>0</text:p>
          </table:table-cell>
          <table:table-cell table:style-name="ce4" table:formula="of:=IF(ISNUMBER(SEARCH([.F$1];[.$A7]));[.$B7];0)" office:value-type="float" office:value="16528129" calcext:value-type="float">
            <text:p>16528129</text:p>
          </table:table-cell>
          <table:table-cell table:style-name="ce4" table:formula="of:=IF(ISNUMBER(SEARCH([.G$1];[.$A7]));[.$B7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ject-public.js</text:p>
          </table:table-cell>
          <table:table-cell office:value-type="float" office:value="683909" calcext:value-type="float">
            <text:p>683,909</text:p>
          </table:table-cell>
          <table:table-cell/>
          <table:table-cell table:style-name="ce4" table:formula="of:=IF(ISNUMBER(SEARCH([.D$1];[.$A8]));[.$B8];0)" office:value-type="float" office:value="683909" calcext:value-type="float">
            <text:p>683909</text:p>
          </table:table-cell>
          <table:table-cell table:style-name="ce4" table:formula="of:=IF(ISNUMBER(SEARCH([.E$1];[.$A8]));[.$B8];0)" office:value-type="float" office:value="0" calcext:value-type="float">
            <text:p>0</text:p>
          </table:table-cell>
          <table:table-cell table:style-name="ce4" table:formula="of:=IF(ISNUMBER(SEARCH([.F$1];[.$A8]));[.$B8];0)" office:value-type="float" office:value="683909" calcext:value-type="float">
            <text:p>683909</text:p>
          </table:table-cell>
          <table:table-cell table:style-name="ce4" table:formula="of:=IF(ISNUMBER(SEARCH([.G$1];[.$A8]));[.$B8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ject-ww.js</text:p>
          </table:table-cell>
          <table:table-cell office:value-type="float" office:value="1657654" calcext:value-type="float">
            <text:p>1,657,654</text:p>
          </table:table-cell>
          <table:table-cell/>
          <table:table-cell table:style-name="ce4" table:formula="of:=IF(ISNUMBER(SEARCH([.D$1];[.$A9]));[.$B9];0)" office:value-type="float" office:value="0" calcext:value-type="float">
            <text:p>0</text:p>
          </table:table-cell>
          <table:table-cell table:style-name="ce4" table:formula="of:=IF(ISNUMBER(SEARCH([.E$1];[.$A9]));[.$B9];0)" office:value-type="float" office:value="0" calcext:value-type="float">
            <text:p>0</text:p>
          </table:table-cell>
          <table:table-cell table:style-name="ce4" table:formula="of:=IF(ISNUMBER(SEARCH([.F$1];[.$A9]));[.$B9];0)" office:value-type="float" office:value="1657654" calcext:value-type="float">
            <text:p>1657654</text:p>
          </table:table-cell>
          <table:table-cell table:style-name="ce4" table:formula="of:=IF(ISNUMBER(SEARCH([.G$1];[.$A9]));[.$B9];0)" office:value-type="float" office:value="1657654" calcext:value-type="float">
            <text:p>1657654</text:p>
          </table:table-cell>
        </table:table-row>
        <table:table-row table:style-name="ro1">
          <table:table-cell office:value-type="string" calcext:value-type="string">
            <text:p>public.js</text:p>
          </table:table-cell>
          <table:table-cell office:value-type="float" office:value="1000911" calcext:value-type="float">
            <text:p>1,000,911</text:p>
          </table:table-cell>
          <table:table-cell/>
          <table:table-cell table:style-name="ce4" table:formula="of:=IF(ISNUMBER(SEARCH([.D$1];[.$A10]));[.$B10];0)" office:value-type="float" office:value="1000911" calcext:value-type="float">
            <text:p>1000911</text:p>
          </table:table-cell>
          <table:table-cell table:style-name="ce4" table:formula="of:=IF(ISNUMBER(SEARCH([.E$1];[.$A10]));[.$B10];0)" office:value-type="float" office:value="0" calcext:value-type="float">
            <text:p>0</text:p>
          </table:table-cell>
          <table:table-cell table:style-name="ce4" table:formula="of:=IF(ISNUMBER(SEARCH([.F$1];[.$A10]));[.$B10];0)" office:value-type="float" office:value="0" calcext:value-type="float">
            <text:p>0</text:p>
          </table:table-cell>
          <table:table-cell table:style-name="ce4" table:formula="of:=IF(ISNUMBER(SEARCH([.G$1];[.$A10]));[.$B10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w.js</text:p>
          </table:table-cell>
          <table:table-cell office:value-type="float" office:value="266871" calcext:value-type="float">
            <text:p>266,871</text:p>
          </table:table-cell>
          <table:table-cell/>
          <table:table-cell table:style-name="ce4" table:formula="of:=IF(ISNUMBER(SEARCH([.D$1];[.$A11]));[.$B11];0)" office:value-type="float" office:value="0" calcext:value-type="float">
            <text:p>0</text:p>
          </table:table-cell>
          <table:table-cell table:style-name="ce4" table:formula="of:=IF(ISNUMBER(SEARCH([.E$1];[.$A11]));[.$B11];0)" office:value-type="float" office:value="0" calcext:value-type="float">
            <text:p>0</text:p>
          </table:table-cell>
          <table:table-cell table:style-name="ce4" table:formula="of:=IF(ISNUMBER(SEARCH([.F$1];[.$A11]));[.$B11];0)" office:value-type="float" office:value="0" calcext:value-type="float">
            <text:p>0</text:p>
          </table:table-cell>
          <table:table-cell table:style-name="ce4" table:formula="of:=IF(ISNUMBER(SEARCH([.G$1];[.$A11]));[.$B11];0)" office:value-type="float" office:value="266871" calcext:value-type="float">
            <text:p>266871</text:p>
          </table:table-cell>
        </table:table-row>
        <table:table-row table:style-name="ro1">
          <table:table-cell/>
          <table:table-cell table:formula="of:=SUM([.B2:.B11])" office:value-type="float" office:value="37210268" calcext:value-type="float">
            <text:p>37,210,26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split</text:p>
          </table:table-cell>
          <table:table-cell table:style-name="ce3" office:value-type="string" calcext:value-type="string">
            <text:p>fastOptJS</text:p>
          </table:table-cell>
          <table:table-cell table:style-name="ce3" office:value-type="string" calcext:value-type="string">
            <text:p>redu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lic</text:p>
          </table:table-cell>
          <table:table-cell table:formula="of:=SUM([.D2:.D11])" office:value-type="float" office:value="6457351" calcext:value-type="float">
            <text:p>6,457,351</text:p>
          </table:table-cell>
          <table:table-cell table:style-name="ce1" office:value-type="float" office:value="3927283" calcext:value-type="float">
            <text:p>3,927,283</text:p>
          </table:table-cell>
          <table:table-cell table:style-name="ce5" table:formula="of:=([.C15]-[.B15])/[.C15]" office:value-type="percentage" office:value="-0.644228592642802" calcext:value-type="percentage">
            <text:p>-64.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e</text:p>
          </table:table-cell>
          <table:table-cell table:formula="of:=SUM([.E2:.E11])" office:value-type="float" office:value="17072794" calcext:value-type="float">
            <text:p>17,072,794</text:p>
          </table:table-cell>
          <table:table-cell table:style-name="ce1" office:value-type="float" office:value="4468949" calcext:value-type="float">
            <text:p>4,468,949</text:p>
          </table:table-cell>
          <table:table-cell table:style-name="ce5" table:formula="of:=([.C16]-[.B16])/[.C16]" office:value-type="percentage" office:value="-2.8203152463812" calcext:value-type="percentage">
            <text:p>-282.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</text:p>
          </table:table-cell>
          <table:table-cell table:formula="of:=SUM([.F2:.F11])" office:value-type="float" office:value="35782022" calcext:value-type="float">
            <text:p>35,782,022</text:p>
          </table:table-cell>
          <table:table-cell table:style-name="ce1" office:value-type="float" office:value="30411891" calcext:value-type="float">
            <text:p>30,411,891</text:p>
          </table:table-cell>
          <table:table-cell table:style-name="ce5" table:formula="of:=([.C17]-[.B17])/[.C17]" office:value-type="percentage" office:value="-0.176579976562457" calcext:value-type="percentage">
            <text:p>-17.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w</text:p>
          </table:table-cell>
          <table:table-cell table:formula="of:=SUM([.G2:.G11])" office:value-type="float" office:value="15086789" calcext:value-type="float">
            <text:p>15,086,789</text:p>
          </table:table-cell>
          <table:table-cell table:style-name="ce1" office:value-type="float" office:value="9130137" calcext:value-type="float">
            <text:p>9,130,137</text:p>
          </table:table-cell>
          <table:table-cell table:style-name="ce5" table:formula="of:=([.C18]-[.B18])/[.C18]" office:value-type="percentage" office:value="-0.652416497145662" calcext:value-type="percentage">
            <text:p>-65.2%</text:p>
          </table:table-cell>
          <table:table-cell table:number-columns-repeated="3"/>
        </table:table-row>
        <table:table-row table:style-name="ro1">
          <table:table-cell/>
          <table:table-cell table:formula="of:=[.B12]" office:value-type="float" office:value="37210268" calcext:value-type="float">
            <text:p>37,210,268</text:p>
          </table:table-cell>
          <table:table-cell table:style-name="ce1" table:formula="of:=SUM([.C15:.C18])" office:value-type="float" office:value="47938260" calcext:value-type="float">
            <text:p>47,938,260</text:p>
          </table:table-cell>
          <table:table-cell table:style-name="ce5" table:formula="of:=([.C19]-[.B19])/[.C19]" office:value-type="percentage" office:value="0.223787680237038" calcext:value-type="percentage">
            <text:p>22.4%</text:p>
          </table:table-cell>
          <table:table-cell table:number-columns-repeated="3"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ull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ww</text:p>
          </table:table-cell>
        </table:table-row>
        <table:table-row table:style-name="ro1">
          <table:table-cell office:value-type="string" calcext:value-type="string">
            <text:p>home.js</text:p>
          </table:table-cell>
          <table:table-cell office:value-type="float" office:value="149214" calcext:value-type="float">
            <text:p>149,214</text:p>
          </table:table-cell>
          <table:table-cell/>
          <table:table-cell table:style-name="ce4" table:formula="of:=IF(ISNUMBER(SEARCH([.D$1];[.$A2]));[.$B2];0)" office:value-type="float" office:value="0" calcext:value-type="float">
            <text:p>0</text:p>
          </table:table-cell>
          <table:table-cell table:style-name="ce4" table:formula="of:=IF(ISNUMBER(SEARCH([.E$1];[.$A2]));[.$B2];0)" office:value-type="float" office:value="149214" calcext:value-type="float">
            <text:p>149214</text:p>
          </table:table-cell>
          <table:table-cell table:style-name="ce4" table:formula="of:=IF(ISNUMBER(SEARCH([.F$1];[.$A2]));[.$B2];0)" office:value-type="float" office:value="0" calcext:value-type="float">
            <text:p>0</text:p>
          </table:table-cell>
          <table:table-cell table:style-name="ce4" table:formula="of:=IF(ISNUMBER(SEARCH([.G$1];[.$A2]));[.$B2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-project.js</text:p>
          </table:table-cell>
          <table:table-cell office:value-type="float" office:value="2732524" calcext:value-type="float">
            <text:p>2,732,524</text:p>
          </table:table-cell>
          <table:table-cell/>
          <table:table-cell table:style-name="ce4" table:formula="of:=IF(ISNUMBER(SEARCH([.D$1];[.$A3]));[.$B3];0)" office:value-type="float" office:value="0" calcext:value-type="float">
            <text:p>0</text:p>
          </table:table-cell>
          <table:table-cell table:style-name="ce4" table:formula="of:=IF(ISNUMBER(SEARCH([.E$1];[.$A3]));[.$B3];0)" office:value-type="float" office:value="2732524" calcext:value-type="float">
            <text:p>2732524</text:p>
          </table:table-cell>
          <table:table-cell table:style-name="ce4" table:formula="of:=IF(ISNUMBER(SEARCH([.F$1];[.$A3]));[.$B3];0)" office:value-type="float" office:value="2732524" calcext:value-type="float">
            <text:p>2732524</text:p>
          </table:table-cell>
          <table:table-cell table:style-name="ce4" table:formula="of:=IF(ISNUMBER(SEARCH([.G$1];[.$A3]));[.$B3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-project-public.js</text:p>
          </table:table-cell>
          <table:table-cell office:value-type="float" office:value="711412" calcext:value-type="float">
            <text:p>711,412</text:p>
          </table:table-cell>
          <table:table-cell/>
          <table:table-cell table:style-name="ce4" table:formula="of:=IF(ISNUMBER(SEARCH([.D$1];[.$A4]));[.$B4];0)" office:value-type="float" office:value="711412" calcext:value-type="float">
            <text:p>711412</text:p>
          </table:table-cell>
          <table:table-cell table:style-name="ce4" table:formula="of:=IF(ISNUMBER(SEARCH([.E$1];[.$A4]));[.$B4];0)" office:value-type="float" office:value="711412" calcext:value-type="float">
            <text:p>711412</text:p>
          </table:table-cell>
          <table:table-cell table:style-name="ce4" table:formula="of:=IF(ISNUMBER(SEARCH([.F$1];[.$A4]));[.$B4];0)" office:value-type="float" office:value="711412" calcext:value-type="float">
            <text:p>711412</text:p>
          </table:table-cell>
          <table:table-cell table:style-name="ce4" table:formula="of:=IF(ISNUMBER(SEARCH([.G$1];[.$A4]));[.$B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-project-public-ww.js</text:p>
          </table:table-cell>
          <table:table-cell office:value-type="float" office:value="3728400" calcext:value-type="float">
            <text:p>3,728,400</text:p>
          </table:table-cell>
          <table:table-cell/>
          <table:table-cell table:style-name="ce4" table:formula="of:=IF(ISNUMBER(SEARCH([.D$1];[.$A5]));[.$B5];0)" office:value-type="float" office:value="3728400" calcext:value-type="float">
            <text:p>3728400</text:p>
          </table:table-cell>
          <table:table-cell table:style-name="ce4" table:formula="of:=IF(ISNUMBER(SEARCH([.E$1];[.$A5]));[.$B5];0)" office:value-type="float" office:value="3728400" calcext:value-type="float">
            <text:p>3728400</text:p>
          </table:table-cell>
          <table:table-cell table:style-name="ce4" table:formula="of:=IF(ISNUMBER(SEARCH([.F$1];[.$A5]));[.$B5];0)" office:value-type="float" office:value="3728400" calcext:value-type="float">
            <text:p>3728400</text:p>
          </table:table-cell>
          <table:table-cell table:style-name="ce4" table:formula="of:=IF(ISNUMBER(SEARCH([.G$1];[.$A5]));[.$B5];0)" office:value-type="float" office:value="3728400" calcext:value-type="float">
            <text:p>3728400</text:p>
          </table:table-cell>
        </table:table-row>
        <table:table-row table:style-name="ro1">
          <table:table-cell office:value-type="string" calcext:value-type="string">
            <text:p>home-project-ww.js</text:p>
          </table:table-cell>
          <table:table-cell office:value-type="float" office:value="8204451" calcext:value-type="float">
            <text:p>8,204,451</text:p>
          </table:table-cell>
          <table:table-cell/>
          <table:table-cell table:style-name="ce4" table:formula="of:=IF(ISNUMBER(SEARCH([.D$1];[.$A6]));[.$B6];0)" office:value-type="float" office:value="0" calcext:value-type="float">
            <text:p>0</text:p>
          </table:table-cell>
          <table:table-cell table:style-name="ce4" table:formula="of:=IF(ISNUMBER(SEARCH([.E$1];[.$A6]));[.$B6];0)" office:value-type="float" office:value="8204451" calcext:value-type="float">
            <text:p>8204451</text:p>
          </table:table-cell>
          <table:table-cell table:style-name="ce4" table:formula="of:=IF(ISNUMBER(SEARCH([.F$1];[.$A6]));[.$B6];0)" office:value-type="float" office:value="8204451" calcext:value-type="float">
            <text:p>8204451</text:p>
          </table:table-cell>
          <table:table-cell table:style-name="ce4" table:formula="of:=IF(ISNUMBER(SEARCH([.G$1];[.$A6]));[.$B6];0)" office:value-type="float" office:value="8204451" calcext:value-type="float">
            <text:p>8204451</text:p>
          </table:table-cell>
        </table:table-row>
        <table:table-row table:style-name="ro1">
          <table:table-cell office:value-type="string" calcext:value-type="string">
            <text:p>project.js</text:p>
          </table:table-cell>
          <table:table-cell office:value-type="float" office:value="15097981" calcext:value-type="float">
            <text:p>15,097,981</text:p>
          </table:table-cell>
          <table:table-cell/>
          <table:table-cell table:style-name="ce4" table:formula="of:=IF(ISNUMBER(SEARCH([.D$1];[.$A7]));[.$B7];0)" office:value-type="float" office:value="0" calcext:value-type="float">
            <text:p>0</text:p>
          </table:table-cell>
          <table:table-cell table:style-name="ce4" table:formula="of:=IF(ISNUMBER(SEARCH([.E$1];[.$A7]));[.$B7];0)" office:value-type="float" office:value="0" calcext:value-type="float">
            <text:p>0</text:p>
          </table:table-cell>
          <table:table-cell table:style-name="ce4" table:formula="of:=IF(ISNUMBER(SEARCH([.F$1];[.$A7]));[.$B7];0)" office:value-type="float" office:value="15097981" calcext:value-type="float">
            <text:p>15097981</text:p>
          </table:table-cell>
          <table:table-cell table:style-name="ce4" table:formula="of:=IF(ISNUMBER(SEARCH([.G$1];[.$A7]));[.$B7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ject-public.js</text:p>
          </table:table-cell>
          <table:table-cell office:value-type="float" office:value="604218" calcext:value-type="float">
            <text:p>604,218</text:p>
          </table:table-cell>
          <table:table-cell/>
          <table:table-cell table:style-name="ce4" table:formula="of:=IF(ISNUMBER(SEARCH([.D$1];[.$A8]));[.$B8];0)" office:value-type="float" office:value="604218" calcext:value-type="float">
            <text:p>604218</text:p>
          </table:table-cell>
          <table:table-cell table:style-name="ce4" table:formula="of:=IF(ISNUMBER(SEARCH([.E$1];[.$A8]));[.$B8];0)" office:value-type="float" office:value="0" calcext:value-type="float">
            <text:p>0</text:p>
          </table:table-cell>
          <table:table-cell table:style-name="ce4" table:formula="of:=IF(ISNUMBER(SEARCH([.F$1];[.$A8]));[.$B8];0)" office:value-type="float" office:value="604218" calcext:value-type="float">
            <text:p>604218</text:p>
          </table:table-cell>
          <table:table-cell table:style-name="ce4" table:formula="of:=IF(ISNUMBER(SEARCH([.G$1];[.$A8]));[.$B8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ject-ww.js</text:p>
          </table:table-cell>
          <table:table-cell office:value-type="float" office:value="1516863" calcext:value-type="float">
            <text:p>1,516,863</text:p>
          </table:table-cell>
          <table:table-cell/>
          <table:table-cell table:style-name="ce4" table:formula="of:=IF(ISNUMBER(SEARCH([.D$1];[.$A9]));[.$B9];0)" office:value-type="float" office:value="0" calcext:value-type="float">
            <text:p>0</text:p>
          </table:table-cell>
          <table:table-cell table:style-name="ce4" table:formula="of:=IF(ISNUMBER(SEARCH([.E$1];[.$A9]));[.$B9];0)" office:value-type="float" office:value="0" calcext:value-type="float">
            <text:p>0</text:p>
          </table:table-cell>
          <table:table-cell table:style-name="ce4" table:formula="of:=IF(ISNUMBER(SEARCH([.F$1];[.$A9]));[.$B9];0)" office:value-type="float" office:value="1516863" calcext:value-type="float">
            <text:p>1516863</text:p>
          </table:table-cell>
          <table:table-cell table:style-name="ce4" table:formula="of:=IF(ISNUMBER(SEARCH([.G$1];[.$A9]));[.$B9];0)" office:value-type="float" office:value="1516863" calcext:value-type="float">
            <text:p>1516863</text:p>
          </table:table-cell>
        </table:table-row>
        <table:table-row table:style-name="ro1">
          <table:table-cell office:value-type="string" calcext:value-type="string">
            <text:p>public.js</text:p>
          </table:table-cell>
          <table:table-cell office:value-type="float" office:value="936844" calcext:value-type="float">
            <text:p>936,844</text:p>
          </table:table-cell>
          <table:table-cell/>
          <table:table-cell table:style-name="ce4" table:formula="of:=IF(ISNUMBER(SEARCH([.D$1];[.$A10]));[.$B10];0)" office:value-type="float" office:value="936844" calcext:value-type="float">
            <text:p>936844</text:p>
          </table:table-cell>
          <table:table-cell table:style-name="ce4" table:formula="of:=IF(ISNUMBER(SEARCH([.E$1];[.$A10]));[.$B10];0)" office:value-type="float" office:value="0" calcext:value-type="float">
            <text:p>0</text:p>
          </table:table-cell>
          <table:table-cell table:style-name="ce4" table:formula="of:=IF(ISNUMBER(SEARCH([.F$1];[.$A10]));[.$B10];0)" office:value-type="float" office:value="0" calcext:value-type="float">
            <text:p>0</text:p>
          </table:table-cell>
          <table:table-cell table:style-name="ce4" table:formula="of:=IF(ISNUMBER(SEARCH([.G$1];[.$A10]));[.$B10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w.js</text:p>
          </table:table-cell>
          <table:table-cell office:value-type="float" office:value="242978" calcext:value-type="float">
            <text:p>242,978</text:p>
          </table:table-cell>
          <table:table-cell/>
          <table:table-cell table:style-name="ce4" table:formula="of:=IF(ISNUMBER(SEARCH([.D$1];[.$A11]));[.$B11];0)" office:value-type="float" office:value="0" calcext:value-type="float">
            <text:p>0</text:p>
          </table:table-cell>
          <table:table-cell table:style-name="ce4" table:formula="of:=IF(ISNUMBER(SEARCH([.E$1];[.$A11]));[.$B11];0)" office:value-type="float" office:value="0" calcext:value-type="float">
            <text:p>0</text:p>
          </table:table-cell>
          <table:table-cell table:style-name="ce4" table:formula="of:=IF(ISNUMBER(SEARCH([.F$1];[.$A11]));[.$B11];0)" office:value-type="float" office:value="0" calcext:value-type="float">
            <text:p>0</text:p>
          </table:table-cell>
          <table:table-cell table:style-name="ce4" table:formula="of:=IF(ISNUMBER(SEARCH([.G$1];[.$A11]));[.$B11];0)" office:value-type="float" office:value="242978" calcext:value-type="float">
            <text:p>242978</text:p>
          </table:table-cell>
        </table:table-row>
        <table:table-row table:style-name="ro1">
          <table:table-cell/>
          <table:table-cell table:formula="of:=SUM([.B2:.B11])" office:value-type="float" office:value="33924885" calcext:value-type="float">
            <text:p>33,924,88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split</text:p>
          </table:table-cell>
          <table:table-cell table:style-name="ce3" office:value-type="string" calcext:value-type="string">
            <text:p>fastOptJS</text:p>
          </table:table-cell>
          <table:table-cell table:style-name="ce3" office:value-type="string" calcext:value-type="string">
            <text:p>redu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lic</text:p>
          </table:table-cell>
          <table:table-cell table:formula="of:=SUM([.D2:.D11])" office:value-type="float" office:value="5980874" calcext:value-type="float">
            <text:p>5,980,874</text:p>
          </table:table-cell>
          <table:table-cell table:style-name="ce1" office:value-type="float" office:value="709200" calcext:value-type="float">
            <text:p>709,200</text:p>
          </table:table-cell>
          <table:table-cell table:style-name="ce5" table:formula="of:=([.C15]-[.B15])/[.C15]" office:value-type="percentage" office:value="-7.4332684715172" calcext:value-type="percentage">
            <text:p>-743.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e</text:p>
          </table:table-cell>
          <table:table-cell table:formula="of:=SUM([.E2:.E11])" office:value-type="float" office:value="15526001" calcext:value-type="float">
            <text:p>15,526,001</text:p>
          </table:table-cell>
          <table:table-cell table:style-name="ce1" office:value-type="float" office:value="793157" calcext:value-type="float">
            <text:p>793,157</text:p>
          </table:table-cell>
          <table:table-cell table:style-name="ce5" table:formula="of:=([.C16]-[.B16])/[.C16]" office:value-type="percentage" office:value="-18.5749403964158" calcext:value-type="percentage">
            <text:p>-1857.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</text:p>
          </table:table-cell>
          <table:table-cell table:formula="of:=SUM([.F2:.F11])" office:value-type="float" office:value="32595849" calcext:value-type="float">
            <text:p>32,595,849</text:p>
          </table:table-cell>
          <table:table-cell table:style-name="ce1" office:value-type="float" office:value="28201948" calcext:value-type="float">
            <text:p>28,201,948</text:p>
          </table:table-cell>
          <table:table-cell table:style-name="ce5" table:formula="of:=([.C17]-[.B17])/[.C17]" office:value-type="percentage" office:value="-0.155801329752115" calcext:value-type="percentage">
            <text:p>-15.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w</text:p>
          </table:table-cell>
          <table:table-cell table:formula="of:=SUM([.G2:.G11])" office:value-type="float" office:value="13692692" calcext:value-type="float">
            <text:p>13,692,692</text:p>
          </table:table-cell>
          <table:table-cell table:style-name="ce1" office:value-type="float" office:value="8463662" calcext:value-type="float">
            <text:p>8,463,662</text:p>
          </table:table-cell>
          <table:table-cell table:style-name="ce5" table:formula="of:=([.C18]-[.B18])/[.C18]" office:value-type="percentage" office:value="-0.61782122206676" calcext:value-type="percentage">
            <text:p>-61.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[.B12]" office:value-type="float" office:value="33924885" calcext:value-type="float">
            <text:p>33,924,885</text:p>
          </table:table-cell>
          <table:table-cell table:style-name="ce1" table:formula="of:=SUM([.C15:.C18])" office:value-type="float" office:value="38167967" calcext:value-type="float">
            <text:p>38,167,967</text:p>
          </table:table-cell>
          <table:table-cell table:style-name="ce5" table:formula="of:=([.C19]-[.B19])/[.C19]" office:value-type="percentage" office:value="0.111168666646563" calcext:value-type="percentage">
            <text:p>11.1%</text:p>
          </table:table-cell>
          <table:table-cell table:number-columns-repeated="3"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0" number:min-decimal-places="0" number:min-integer-digits="0" number:grouping="true"/>
    </number:number-style>
    <number:percentage-style style:name="N110P0" style:volatile="true">
      <number:number number:decimal-places="1" number:min-decimal-places="1" number:min-integer-digits="1"/>
      <number:text>%</number:text>
    </number:percentage-style>
    <number:percentage-style style:name="N110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10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12:40:28.493134779</meta:creation-date>
    <dc:date>2020-10-17T15:57:41.396089218</dc:date>
    <meta:editing-duration>PT1H32M51S</meta:editing-duration>
    <meta:editing-cycles>1</meta:editing-cycles>
    <meta:document-statistic meta:table-count="2" meta:cell-count="175" meta:object-count="0"/>
    <meta:generator>LibreOffice/7.0.2.2$Linux_X86_64 LibreOffice_project/00$Build-2</meta:generator>
  </office:meta>
</office:document-meta>
</file>
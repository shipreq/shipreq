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11.6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707cm"/>
    </style:style>
    <style:style style:name="co5" style:family="table-column">
      <style:table-column-properties fo:break-before="auto" style:column-width="2.605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1.272cm"/>
    </style:style>
    <style:style style:name="co8" style:family="table-column">
      <style:table-column-properties fo:break-before="auto" style:column-width="17.191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761cm"/>
    </style:style>
    <style:style style:name="co11" style:family="table-column">
      <style:table-column-properties fo:break-before="auto" style:column-width="9.372cm"/>
    </style:style>
    <style:style style:name="co12" style:family="table-column">
      <style:table-column-properties fo:break-before="auto" style:column-width="4.075cm"/>
    </style:style>
    <style:style style:name="co13" style:family="table-column">
      <style:table-column-properties fo:break-before="auto" style:column-width="6.863cm"/>
    </style:style>
    <style:style style:name="co14" style:family="table-column">
      <style:table-column-properties fo:break-before="auto" style:column-width="7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style:font-name="Arimo" style:font-name-asian="Lucida Sans Unicode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Goals</text:p>
          </table:table-cell>
          <table:table-cell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Load entire project</text:p>
          </table:table-cell>
          <table:table-cell table:style-name="ce1"/>
          <table:table-cell office:value-type="string" calcext:value-type="string">
            <text:p>Per Task: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ContentUpdates: Validate</text:p>
          </table:table-cell>
          <table:table-cell/>
          <table:table-cell office:value-type="string" calcext:value-type="string">
            <text:p><text:s text:c="2"/>- Dev effort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ContentUpdates: Calculate RemoteDeltas</text:p>
          </table:table-cell>
          <table:table-cell/>
          <table:table-cell office:value-type="string" calcext:value-type="string">
            <text:p><text:s text:c="2"/>- DB impact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ProjectConfig changes: Validate</text:p>
          </table:table-cell>
          <table:table-cell/>
          <table:table-cell office:value-type="string" calcext:value-type="string">
            <text:p><text:s text:c="2"/>- Web server impact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ProjectConfig changes: Calculate RemoteDelta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Data structures will change often. (Data migration strateg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fer to minimise potential for illegal DB 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MF-8: View changes (maybe even annotat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MF-8: View project @ point-in-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refer a solution close to what already have to defer decision fur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Data backup &amp; recovery: May need manual intervention / correction of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MF-9: Broadcast Δs to other sessio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fer minimal DB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fer maximal DB 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fer maximal web server 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fer minimal web server 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fer stateless web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fer minimal dev effor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olut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I-1</text:p>
          </table:table-cell>
          <table:table-cell office:value-type="string" calcext:value-type="string">
            <text:p>Full DB sc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-2</text:p>
          </table:table-cell>
          <table:table-cell office:value-type="string" calcext:value-type="string">
            <text:p>Partition dumps [eg. each Project partition stored as (type,rev,blob)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-3</text:p>
          </table:table-cell>
          <table:table-cell table:style-name="ce2" office:value-type="string" calcext:value-type="string">
            <text:p>Event stream</text:p>
          </table:table-cell>
          <table:table-cell table:number-columns-repeated="2"/>
        </table:table-row>
      </table:table>
      <table:table table:name="eval" table:style-name="ta1"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3" table:default-cell-style-name="Default"/>
        <table:table-column table:style-name="co7" table:number-columns-repeated="3" table:default-cell-style-name="ce6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Range Min</text:p>
          </table:table-cell>
          <table:table-cell table:style-name="ce3" office:value-type="string" calcext:value-type="string">
            <text:p>Range Max</text:p>
          </table:table-cell>
          <table:table-cell table:style-name="ce1"/>
          <table:table-cell table:style-name="ce5" office:value-type="string" calcext:value-type="string">
            <text:p>SI-1</text:p>
          </table:table-cell>
          <table:table-cell table:style-name="ce5" office:value-type="string" calcext:value-type="string">
            <text:p>SI-2</text:p>
          </table:table-cell>
          <table:table-cell table:style-name="ce5" office:value-type="string" calcext:value-type="string">
            <text:p>SI-3</text:p>
          </table:table-cell>
          <table:table-cell table:style-name="ce1"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Load entire project, send to cli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- Dev effort (once schema exists)</text:p>
          </table:table-cell>
          <table:table-cell office:value-type="string" calcext:value-type="string">
            <text:p>0: done</text:p>
          </table:table-cell>
          <table:table-cell office:value-type="string" calcext:value-type="string">
            <text:p>5: ≥ 5 week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2"/>- DB impact (time+space)</text:p>
          </table:table-cell>
          <table:table-cell office:value-type="string" calcext:value-type="string">
            <text:p>0: no DB</text:p>
          </table:table-cell>
          <table:table-cell office:value-type="string" calcext:value-type="string">
            <text:p>5: mu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2"/>- Web server impact (time+space)</text:p>
          </table:table-cell>
          <table:table-cell office:value-type="string" calcext:value-type="string">
            <text:p>0: no WS work</text:p>
          </table:table-cell>
          <table:table-cell office:value-type="string" calcext:value-type="string">
            <text:p>5: muc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ContentUpdates: Validate</text:p>
          </table:table-cell>
          <table:table-cell table:number-columns-repeated="1022"/>
        </table:table-row>
        <table:table-row table:style-name="ro1">
          <table:table-cell table:formula="of:=[.A4]" office:value-type="string" office:string-value="  - Dev effort (once schema exists)" calcext:value-type="string">
            <text:p><text:s text:c="2"/>- Dev effort (once schema exists)</text:p>
          </table:table-cell>
          <table:table-cell table:formula="of:=[.B4]" office:value-type="string" office:string-value="0: done" calcext:value-type="string">
            <text:p>0: done</text:p>
          </table:table-cell>
          <table:table-cell table:formula="of:=[.C4]" office:value-type="string" office:string-value="5: ≥ 5 weeks" calcext:value-type="string">
            <text:p>5: ≥ 5 week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]" office:value-type="string" office:string-value="  - DB impact (time+space)" calcext:value-type="string">
            <text:p><text:s text:c="2"/>- DB impact (time+space)</text:p>
          </table:table-cell>
          <table:table-cell table:formula="of:=[.B5]" office:value-type="string" office:string-value="0: no DB" calcext:value-type="string">
            <text:p>0: no DB</text:p>
          </table:table-cell>
          <table:table-cell table:formula="of:=[.C5]" office:value-type="string" office:string-value="5: much" calcext:value-type="string">
            <text:p>5: mu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6]" office:value-type="string" office:string-value="  - Web server impact (time+space)" calcext:value-type="string">
            <text:p><text:s text:c="2"/>- Web server impact (time+space)</text:p>
          </table:table-cell>
          <table:table-cell table:formula="of:=[.B6]" office:value-type="string" office:string-value="0: no WS work" calcext:value-type="string">
            <text:p>0: no WS work</text:p>
          </table:table-cell>
          <table:table-cell table:formula="of:=[.C6]" office:value-type="string" office:string-value="5: much" calcext:value-type="string">
            <text:p>5: muc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F-8: View history (maybe even annotate)</text:p>
          </table:table-cell>
          <table:table-cell table:number-columns-repeated="1022"/>
        </table:table-row>
        <table:table-row table:style-name="ro1">
          <table:table-cell table:formula="of:=[.A9]" office:value-type="string" office:string-value="  - Dev effort (once schema exists)" calcext:value-type="string">
            <text:p><text:s text:c="2"/>- Dev effort (once schema exists)</text:p>
          </table:table-cell>
          <table:table-cell table:formula="of:=[.B9]" office:value-type="string" office:string-value="0: done" calcext:value-type="string">
            <text:p>0: done</text:p>
          </table:table-cell>
          <table:table-cell table:formula="of:=[.C9]" office:value-type="string" office:string-value="5: ≥ 5 weeks" calcext:value-type="string">
            <text:p>5: ≥ 5 weeks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A10]" office:value-type="string" office:string-value="  - DB impact (time+space)" calcext:value-type="string">
            <text:p><text:s text:c="2"/>- DB impact (time+space)</text:p>
          </table:table-cell>
          <table:table-cell table:formula="of:=[.B10]" office:value-type="string" office:string-value="0: no DB" calcext:value-type="string">
            <text:p>0: no DB</text:p>
          </table:table-cell>
          <table:table-cell table:formula="of:=[.C10]" office:value-type="string" office:string-value="5: much" calcext:value-type="string">
            <text:p>5: much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1]" office:value-type="string" office:string-value="  - Web server impact (time+space)" calcext:value-type="string">
            <text:p><text:s text:c="2"/>- Web server impact (time+space)</text:p>
          </table:table-cell>
          <table:table-cell table:formula="of:=[.B11]" office:value-type="string" office:string-value="0: no WS work" calcext:value-type="string">
            <text:p>0: no WS work</text:p>
          </table:table-cell>
          <table:table-cell table:formula="of:=[.C11]" office:value-type="string" office:string-value="5: much" calcext:value-type="string">
            <text:p>5: much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F-8: View project at point-in-time</text:p>
          </table:table-cell>
          <table:table-cell table:number-columns-repeated="1022"/>
        </table:table-row>
        <table:table-row table:style-name="ro1">
          <table:table-cell table:formula="of:=[.A14]" office:value-type="string" office:string-value="  - Dev effort (once schema exists)" calcext:value-type="string">
            <text:p><text:s text:c="2"/>- Dev effort (once schema exists)</text:p>
          </table:table-cell>
          <table:table-cell table:formula="of:=[.B14]" office:value-type="string" office:string-value="0: done" calcext:value-type="string">
            <text:p>0: done</text:p>
          </table:table-cell>
          <table:table-cell table:formula="of:=[.C14]" office:value-type="string" office:string-value="5: ≥ 5 weeks" calcext:value-type="string">
            <text:p>5: ≥ 5 weeks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A15]" office:value-type="string" office:string-value="  - DB impact (time+space)" calcext:value-type="string">
            <text:p><text:s text:c="2"/>- DB impact (time+space)</text:p>
          </table:table-cell>
          <table:table-cell table:formula="of:=[.B15]" office:value-type="string" office:string-value="0: no DB" calcext:value-type="string">
            <text:p>0: no DB</text:p>
          </table:table-cell>
          <table:table-cell table:formula="of:=[.C15]" office:value-type="string" office:string-value="5: much" calcext:value-type="string">
            <text:p>5: much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6]" office:value-type="string" office:string-value="  - Web server impact (time+space)" calcext:value-type="string">
            <text:p><text:s text:c="2"/>- Web server impact (time+space)</text:p>
          </table:table-cell>
          <table:table-cell table:formula="of:=[.B16]" office:value-type="string" office:string-value="0: no WS work" calcext:value-type="string">
            <text:p>0: no WS work</text:p>
          </table:table-cell>
          <table:table-cell table:formula="of:=[.C16]" office:value-type="string" office:string-value="5: much" calcext:value-type="string">
            <text:p>5: much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F-9: Broadcast Δs to other sessions</text:p>
          </table:table-cell>
          <table:table-cell table:number-columns-repeated="1022"/>
        </table:table-row>
        <table:table-row table:style-name="ro1">
          <table:table-cell table:formula="of:=[.A19]" office:value-type="string" office:string-value="  - Dev effort (once schema exists)" calcext:value-type="string">
            <text:p><text:s text:c="2"/>- Dev effort (once schema exists)</text:p>
          </table:table-cell>
          <table:table-cell table:formula="of:=[.B19]" office:value-type="string" office:string-value="0: done" calcext:value-type="string">
            <text:p>0: done</text:p>
          </table:table-cell>
          <table:table-cell table:formula="of:=[.C19]" office:value-type="string" office:string-value="5: ≥ 5 weeks" calcext:value-type="string">
            <text:p>5: ≥ 5 week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20]" office:value-type="string" office:string-value="  - DB impact (time+space)" calcext:value-type="string">
            <text:p><text:s text:c="2"/>- DB impact (time+space)</text:p>
          </table:table-cell>
          <table:table-cell table:formula="of:=[.B20]" office:value-type="string" office:string-value="0: no DB" calcext:value-type="string">
            <text:p>0: no DB</text:p>
          </table:table-cell>
          <table:table-cell table:formula="of:=[.C20]" office:value-type="string" office:string-value="5: much" calcext:value-type="string">
            <text:p>5: muc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21]" office:value-type="string" office:string-value="  - Web server impact (time+space)" calcext:value-type="string">
            <text:p><text:s text:c="2"/>- Web server impact (time+space)</text:p>
          </table:table-cell>
          <table:table-cell table:formula="of:=[.B21]" office:value-type="string" office:string-value="0: no WS work" calcext:value-type="string">
            <text:p>0: no WS work</text:p>
          </table:table-cell>
          <table:table-cell table:formula="of:=[.C21]" office:value-type="string" office:string-value="5: much" calcext:value-type="string">
            <text:p>5: muc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Data structures will change often. Data migration strategy effort.</text:p>
          </table:table-cell>
          <table:table-cell office:value-type="string" calcext:value-type="string">
            <text:p>0: invisible</text:p>
          </table:table-cell>
          <table:table-cell office:value-type="string" calcext:value-type="string">
            <text:p>5: shadow al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Data backup &amp; recovery: Effort for manual intervention / correction of data</text:p>
          </table:table-cell>
          <table:table-cell office:value-type="string" calcext:value-type="string">
            <text:p>1: manual sql</text:p>
          </table:table-cell>
          <table:table-cell office:value-type="string" calcext:value-type="string">
            <text:p>5: need ap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otential illegal DB state</text:p>
          </table:table-cell>
          <table:table-cell office:value-type="string" calcext:value-type="string">
            <text:p>0: none</text:p>
          </table:table-cell>
          <table:table-cell office:value-type="string" calcext:value-type="string">
            <text:p>5: muc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?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-3" table:style-name="ta1">
        <table:table-column table:style-name="co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Rebuild partitions in memory when needed.</text:p>
          </table:table-cell>
        </table:table-row>
        <table:table-row table:style-name="ro1">
          <table:table-cell table:style-name="ce7" office:value-type="string" calcext:value-type="string">
            <text:p>State initially not stored. Can easily be cached and/or snapshoted later (in binary or json).</text:p>
          </table:table-cell>
        </table:table-row>
        <table:table-row table:style-name="ro1">
          <table:table-cell table:style-name="ce7" office:value-type="string" calcext:value-type="string">
            <text:p>Each event type knows which partitions it impacts. Much optimisation can be done to filter events during rebuild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vents will need date</text:p>
          </table:table-cell>
        </table:table-row>
        <table:table-row table:style-name="ro1">
          <table:table-cell office:value-type="string" calcext:value-type="string">
            <text:p>Events will need atomic, inductive order (scope=project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w do we prove a change was legal to apply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ver-side validation build optimisation:</text:p>
          </table:table-cell>
        </table:table-row>
        <table:table-row table:style-name="ro1">
          <table:table-cell office:value-type="string" calcext:value-type="string">
            <text:p><text:s text:c="2"/>- store text &amp; req-codes separately and only SELECT when actually needed.</text:p>
          </table:table-cell>
        </table:table-row>
        <table:table-row table:style-name="ro1">
          <table:table-cell office:value-type="string" calcext:value-type="string">
            <text:p><text:s text:c="2"/>- filter out redundant events (cos only need latest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eparate traits for (DB↔WS) changes and (WS ↔ JS) chang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ta integrity. Would be good to know that if we skip msgs we still generate what's expected.</text:p>
          </table:table-cell>
        </table:table-row>
        <table:table-row table:style-name="ro1">
          <table:table-cell office:value-type="string" calcext:value-type="string">
            <text:p><text:s text:c="2"/>- Hash like merkle trees?</text:p>
          </table:table-cell>
        </table:table-row>
        <table:table-row table:style-name="ro1">
          <table:table-cell office:value-type="string" calcext:value-type="string">
            <text:p><text:s text:c="2"/>- Maybe have hash scheme versioned? eg. at first: value = (v1, hash), uses v1 algorithm to generate</text:p>
          </table:table-cell>
        </table:table-row>
        <table:table-row table:style-name="ro1">
          <table:table-cell office:value-type="string" calcext:value-type="string">
            <text:p><text:s text:c="2"/>- Hash algo should work on mutable ProjectBuilder &amp; immutable Project to produce same result</text:p>
          </table:table-cell>
        </table:table-row>
      </table:table>
      <table:table table:name="SI-2" table:style-name="ta1"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LO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_part</text:p>
          </table:table-cell>
          <table:table-cell office:value-type="string" calcext:value-type="string">
            <text:p>project_id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project_part</text:p>
          </table:table-cell>
          <table:table-cell office:value-type="string" calcext:value-type="string">
            <text:p>part_id</text:p>
          </table:table-cell>
          <table:table-cell office:value-type="string" calcext:value-type="string">
            <text:p>BIGINT</text:p>
          </table:table-cell>
        </table:table-row>
      </table:table>
      <table:table table:name="validation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From ContentUpdat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,Set</text:p>
          </table:table-cell>
          <table:table-cell office:value-type="string" calcext:value-type="string">
            <text:p>ReqId</text:p>
          </table:table-cell>
          <table:table-cell office:value-type="string" calcext:value-type="string">
            <text:p>Ensure exists, (sometimes) live.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ericReqId</text:p>
          </table:table-cell>
          <table:table-cell office:value-type="string" calcext:value-type="string">
            <text:p>Ensure exists, live.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ApplicableTagId</text:p>
          </table:table-cell>
          <table:table-cell office:value-type="string" calcext:value-type="string">
            <text:p>Ensure exist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sure no implication cycle</text:p>
          </table:table-cell>
        </table:table-row>
        <table:table-row table:style-name="ro1">
          <table:table-cell office:value-type="string" calcext:value-type="string">
            <text:p>Id,Set</text:p>
          </table:table-cell>
          <table:table-cell office:value-type="string" calcext:value-type="string">
            <text:p>ReqCode.Value</text:p>
          </table:table-cell>
          <table:table-cell office:value-type="string" calcext:value-type="string">
            <text:p>Ensure no assigned to different subject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stomReqTypeId</text:p>
          </table:table-cell>
          <table:table-cell office:value-type="string" calcext:value-type="string">
            <text:p>Ensure exists, live.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qCodeId</text:p>
          </table:table-cell>
          <table:table-cell office:value-type="string" calcext:value-type="string">
            <text:p>Ensure exists, is active RCGroup</text:p>
          </table:table-cell>
        </table:table-row>
        <table:table-row table:style-name="ro1">
          <table:table-cell/>
          <table:table-cell office:value-type="string" calcext:value-type="string">
            <text:p>AnyText</text:p>
          </table:table-cell>
          <table:table-cell office:value-type="string" calcext:value-type="string">
            <text:p>Atoms' ref-targets exist: {Req,Code,Tag}Refs, Issue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stomField.Text.Id</text:p>
          </table:table-cell>
          <table:table-cell office:value-type="string" calcext:value-type="string">
            <text:p>Ensure exists.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ODO: DataPr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: Cfg protocol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</table:table>
      <table:table table:name="calculation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Update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Knock-on?</text:p>
          </table:table-cell>
        </table:table-row>
        <table:table-row table:style-name="ro1">
          <table:table-cell office:value-type="string" calcext:value-type="string">
            <text:p>PatchReqTags <text:s text:c="7"/></text:p>
          </table:table-cell>
          <table:table-cell office:value-type="string" calcext:value-type="string">
            <text:p>ReqFieldData tags @ id = Set ATagI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tchImplication{Src,Tgt}</text:p>
          </table:table-cell>
          <table:table-cell office:value-type="string" calcext:value-type="string">
            <text:p>ReqFieldData implications (many:many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tchReqCodes <text:s text:c="6"/></text:p>
          </table:table-cell>
          <table:table-cell office:value-type="string" calcext:value-type="string">
            <text:p>Req code tr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GenericReqType <text:s text:c="2"/></text:p>
          </table:table-cell>
          <table:table-cell office:value-type="string" calcext:value-type="string">
            <text:p>GenericReq.pubid (virtual?) + pubid regis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tReqCodeGroupCode </text:p>
          </table:table-cell>
          <table:table-cell office:value-type="string" calcext:value-type="string">
            <text:p>Req code trie</text:p>
          </table:table-cell>
          <table:table-cell table:formula="of:=[.C4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eqCodeGroupTitle</text:p>
          </table:table-cell>
          <table:table-cell office:value-type="string" calcext:value-type="string">
            <text:p>ReqCode group title (by id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tGenericReqTitle <text:s/></text:p>
          </table:table-cell>
          <table:table-cell office:value-type="string" calcext:value-type="string">
            <text:p>GenericReq title (by id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tCustomTextField <text:s/></text:p>
          </table:table-cell>
          <table:table-cell office:value-type="string" calcext:value-type="string">
            <text:p>ReqFieldData text @ (id,fid)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5:21:44.628316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08:47:48.721372540</meta:creation-date>
    <dc:date>2015-06-25T08:15:59.677166039</dc:date>
    <meta:editing-duration>PT21M50S</meta:editing-duration>
    <meta:editing-cycles>7</meta:editing-cycles>
    <meta:generator>LibreOffice/4.3.7.2$Linux_X86_64 LibreOffice_project/430m0$Build-2</meta:generator>
    <meta:document-statistic meta:table-count="6" meta:cell-count="245" meta:object-count="0"/>
  </office:meta>
</office:document-meta>
</file>
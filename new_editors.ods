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74pt solid #000000"/>
    </style:style>
    <style:style style:name="ce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7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3" table:number-columns-repeated="3"/>
          <table:table-cell table:style-name="ce7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7:05:12.032118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8-14T17:05:19.441183530</dc:date>
    <meta:editing-duration>PT21H56M32S</meta:editing-duration>
    <meta:editing-cycles>10</meta:editing-cycles>
    <meta:generator>LibreOffice/5.2.0.4$Linux_X86_64 LibreOffice_project/20m0$Build-4</meta:generator>
    <meta:document-statistic meta:table-count="1" meta:cell-count="17" meta:object-count="0"/>
  </office:meta>
</office:document-meta>
</file>
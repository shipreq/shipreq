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46e" officeooo:paragraph-rsid="0018b46e"/>
    </style:style>
    <style:style style:name="P2" style:family="paragraph" style:parent-style-name="Standard">
      <style:text-properties officeooo:rsid="00199e48" officeooo:paragraph-rsid="00199e48"/>
    </style:style>
    <style:style style:name="P3" style:family="paragraph" style:parent-style-name="Standard" style:list-style-name="L1">
      <style:text-properties officeooo:rsid="00199e48" officeooo:paragraph-rsid="00199e48"/>
    </style:style>
    <style:style style:name="P4" style:family="paragraph" style:parent-style-name="Standard">
      <style:text-properties officeooo:rsid="00199e48" officeooo:paragraph-rsid="00199e48" fo:background-color="#ffff00"/>
    </style:style>
    <style:style style:name="P5" style:family="paragraph" style:parent-style-name="Standard" style:list-style-name="L1">
      <style:text-properties officeooo:paragraph-rsid="00199e48"/>
    </style:style>
    <style:style style:name="P6" style:family="paragraph" style:parent-style-name="Standard">
      <style:text-properties officeooo:rsid="0019c88d" officeooo:paragraph-rsid="0019c88d"/>
    </style:style>
    <style:style style:name="P7" style:family="paragraph" style:parent-style-name="Standard">
      <style:text-properties officeooo:rsid="001ac25b" officeooo:paragraph-rsid="001ac25b"/>
    </style:style>
    <style:style style:name="P8" style:family="paragraph" style:parent-style-name="Standard">
      <style:text-properties fo:font-weight="bold" officeooo:rsid="001ac25b" officeooo:paragraph-rsid="001ac25b" style:font-weight-asian="bold" style:font-weight-complex="bold"/>
    </style:style>
    <style:style style:name="P9" style:family="paragraph" style:parent-style-name="Standard">
      <style:text-properties fo:font-weight="normal" officeooo:rsid="001ac25b" officeooo:paragraph-rsid="001ac25b" style:font-weight-asian="normal" style:font-weight-complex="normal"/>
    </style:style>
    <style:style style:name="P10" style:family="paragraph" style:parent-style-name="Standard">
      <style:text-properties fo:font-weight="normal" officeooo:rsid="001b6b92" officeooo:paragraph-rsid="001b6b92" style:font-weight-asian="normal" style:font-weight-complex="normal"/>
    </style:style>
    <style:style style:name="P11" style:family="paragraph" style:parent-style-name="Standard">
      <style:text-properties fo:font-weight="normal" officeooo:rsid="001bf5a7" officeooo:paragraph-rsid="001bf5a7" style:font-weight-asian="normal" style:font-weight-complex="normal"/>
    </style:style>
    <style:style style:name="P12" style:family="paragraph" style:parent-style-name="Standard">
      <style:text-properties fo:font-weight="normal" officeooo:rsid="0021085e" officeooo:paragraph-rsid="0021085e" style:font-weight-asian="normal" style:font-weight-complex="normal"/>
    </style:style>
    <style:style style:name="P13" style:family="paragraph" style:parent-style-name="Standard">
      <style:text-properties fo:font-weight="normal" officeooo:rsid="0021cc2a" officeooo:paragraph-rsid="0021cc2a" style:font-weight-asian="normal" style:font-weight-complex="normal"/>
    </style:style>
    <style:style style:name="P14" style:family="paragraph" style:parent-style-name="Standard">
      <style:text-properties fo:color="#800000" fo:font-weight="normal" officeooo:rsid="001bf5a7" officeooo:paragraph-rsid="0021cc2a"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199e48"/>
    </style:style>
    <style:style style:name="T3" style:family="text">
      <style:text-properties fo:font-weight="bold" style:font-weight-asian="bold" style:font-weight-complex="bold"/>
    </style:style>
    <style:style style:name="T4" style:family="text">
      <style:text-properties fo:font-weight="bold" officeooo:rsid="00199e48" style:font-weight-asian="bold" style:font-weight-complex="bold"/>
    </style:style>
    <style:style style:name="T5" style:family="text">
      <style:text-properties officeooo:rsid="0019c88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1cc2a" style:font-style-asian="normal" style:font-style-complex="normal"/>
    </style:style>
    <style:style style:name="T9"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Chapter 1</text:span></text:p>
      <text:p text:style-name="P7"/>
      <text:p text:style-name="P1">pg4: Various studies suggest that errors introduced during requirements activities account for 40 to 50 percent of all defects found in a software product (Davis 2005).</text:p>
      <text:p text:style-name="P1"/>
      <text:p text:style-name="P1">pg5: Taking your requirements pulse. [List of poor req process symptoms. <text:span text:style-name="T4">ANALYSE</text:span>]</text:p>
      <text:p text:style-name="P1"/>
      <text:p text:style-name="P1">pg6: <text:span text:style-name="T1">Requirements are a specification of what should be implemented. They are descriptions of how the system should behave, or of a system property or attribute. They may be a constraint on the development process of the system.</text:span></text:p>
      <text:p text:style-name="P1"/>
      <text:p text:style-name="P1">pg6: Don't assume that all your project stakeholders share a common notion of what requirements are. Establish definitions up front so that you're all talking about the same things.</text:p>
      <text:p text:style-name="P1"/>
      <text:p text:style-name="P1">pg6: Software requirements include a time dimension. They could be present tense, describing the current system's capabilities. Or they could be for the near-term (high-priority), mid-term (medium-priority), or hypothetical (low-priority) future. They could even be past tense, referring to needs that were once specified and discarded. <text:span text:style-name="T2">[</text:span><text:span text:style-name="T4">ANALYSE</text:span><text:span text:style-name="T2">]</text:span></text:p>
      <text:p text:style-name="P1"/>
      <text:p text:style-name="P2">pg7: Types of requirements. [Describes req types and their relationships. <text:span text:style-name="T3">ANALYSE</text:span>]</text:p>
      <text:p text:style-name="P2"/>
      <text:p text:style-name="P4">BR-3 creates FR-60, FR-62. When BR-3 deleted, should show that FRs no longer necessary. Also FRs should be tracable back.</text:p>
      <text:p text:style-name="P4"/>
      <text:p text:style-name="P2"><text:span text:style-name="T5">p</text:span>g8: Example deliverables:</text:p>
      <text:list xml:id="list5268049344637899048" text:style-name="L1">
        <text:list-item>
          <text:p text:style-name="P5"><text:span text:style-name="T2">Business rule catalogue</text:span></text:p>
        </text:list-item>
        <text:list-item>
          <text:p text:style-name="P5"><text:span text:style-name="T2">System requirements catalogue</text:span></text:p>
        </text:list-item>
        <text:list-item>
          <text:p text:style-name="P3">V&amp;S Doc: Business requirements</text:p>
        </text:list-item>
        <text:list-item>
          <text:p text:style-name="P3">User Requirements Doc: User requirements</text:p>
        </text:list-item>
        <text:list-item>
          <text:p text:style-name="P3">SRS: FRs, EIs, constraints, QAs.</text:p>
        </text:list-item>
      </text:list>
      <text:p text:style-name="P2"/>
      <text:p text:style-name="P6">pg15: Requirements development = elicitation → analysis → specification → validation.</text:p>
      <text:p text:style-name="P6"/>
      <text:p text:style-name="P6">[<text:span text:style-name="T3">ANALYSE: </text:span><text:span text:style-name="T6">User classes and stakeholders. BA's wont be paying. PM etc are stakeholders.]</text:span></text:p>
      <text:p text:style-name="P6"/>
      <text:p text:style-name="P6">pg18: <text:span text:style-name="T1">The hardest single part of building a software system is deciding precisely what to build. No other part of the conceptual work is as difficult as establishing the detailed technical requirements, including all the interfaces to people, to machines, and to other software systems. No other part of the work so cripples the resulting system if done wrong. No other part is so difficult to rectify later.</text:span></text:p>
      <text:p text:style-name="P6"><text:span text:style-name="T7"/></text:p>
      <text:p text:style-name="P6"><text:span text:style-name="T7">pg19: </text:span><text:span text:style-name="T1">Iterating on code is more expensive than iterating on concepts.</text:span></text:p>
      <text:p text:style-name="P6"><text:span text:style-name="T7"/></text:p>
      <text:p text:style-name="P7"><text:span text:style-name="T7">pg19: Rework often consumes 30 to 50 percent of your total development cost (Shull, et al. 2002; GAO 2004), and requirements errors can account to 70 to 85 percent of the rework cost (Leffingwell 1997).</text:span></text:p>
      <text:p text:style-name="P7"><text:span text:style-name="T7"/></text:p>
      <text:p text:style-name="P7"><text:span text:style-name="T7">pg22: Benefits from a high-quality requirements process [</text:span><text:span text:style-name="T9">Memorise!</text:span><text:span text:style-name="T7">]</text:span></text:p>
      <text:p text:style-name="P7"><text:span text:style-name="T7"/></text:p>
      <text:p text:style-name="P8"><text:span text:style-name="T7">Chapter 2</text:span></text:p>
      <text:p text:style-name="P9"><text:span text:style-name="T7"/></text:p>
      <text:p text:style-name="P10"><text:span text:style-name="T7">pg28: Figure 2-2. [Great list of user-classes and potential stakeholders. Every item in this list should be considered for its relevance to a project. </text:span><text:span text:style-name="T9">ANALYSE</text:span><text:span text:style-name="T7">]</text:span></text:p>
      <text:p text:style-name="P10"><text:soft-page-break/><text:span text:style-name="T7"/></text:p>
      <text:p text:style-name="P11"><text:span text:style-name="T7">pg39: Good disclaimer for sign-off.</text:span></text:p>
      <text:p text:style-name="P11"><text:span text:style-name="T7"/></text:p>
      <text:p text:style-name="P12"><text:span text:style-name="T7">pg58: Reuse existing requirements. [</text:span><text:span text:style-name="T9">ANALYSE</text:span><text:span text:style-name="T7">]</text:span></text:p>
      <text:p text:style-name="P12"><text:span text:style-name="T7"/></text:p>
      <text:p text:style-name="P14"><text:span text:style-name="T7">End pg </text:span><text:span text:style-name="T8">75</text:span></text:p>
      <text:p text:style-name="P14"><text:span text:style-name="T7"/></text:p>
      <text:p text:style-name="P13">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1:49:33.552515444</meta:creation-date>
    <dc:date>2014-01-10T19:59:17.646425502</dc:date>
    <meta:editing-duration>PT8M4S</meta:editing-duration>
    <meta:editing-cycles>1</meta:editing-cycles>
    <meta:document-statistic meta:table-count="0" meta:image-count="0" meta:object-count="0" meta:page-count="2" meta:paragraph-count="26" meta:word-count="400" meta:character-count="2578" meta:non-whitespace-character-count="2209"/>
    <meta:generator>LibreOffice/4.1.4.2$Linux_x86 LibreOffice_project/410m0$Build-2</meta:generator>
  </office:meta>
</office:document-meta>
</file>
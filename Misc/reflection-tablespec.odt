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FreeSans2" svg:font-family="FreeSans" style:font-family-generic="swiss"/>
    <style:font-face style:name="DejaVu Sans Mono" svg:font-family="'DejaVu Sans Mono'" style:font-family-generic="modern" style:font-pitch="fixed"/>
    <style:font-face style:name="FreeSans1" svg:font-family="FreeSans"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cd5e" officeooo:paragraph-rsid="000ccd5e"/>
    </style:style>
    <style:style style:name="P2" style:family="paragraph" style:parent-style-name="Standard">
      <style:text-properties officeooo:rsid="000e2469" officeooo:paragraph-rsid="000e2469"/>
    </style:style>
    <style:style style:name="P3" style:family="paragraph" style:parent-style-name="Standard">
      <style:text-properties officeooo:rsid="000f1e45" officeooo:paragraph-rsid="000f1e45"/>
    </style:style>
    <style:style style:name="P4" style:family="paragraph" style:parent-style-name="Standard">
      <style:text-properties officeooo:rsid="000fde27" officeooo:paragraph-rsid="000fde27"/>
    </style:style>
    <style:style style:name="P5" style:family="paragraph" style:parent-style-name="Standard">
      <style:text-properties fo:font-weight="bold" officeooo:rsid="000fde27" officeooo:paragraph-rsid="000fde27" style:font-weight-asian="bold" style:font-weight-complex="bold"/>
    </style:style>
    <style:style style:name="P6" style:family="paragraph" style:parent-style-name="Standard" style:list-style-name="L1">
      <style:text-properties officeooo:rsid="000ccd5e" officeooo:paragraph-rsid="000ccd5e"/>
    </style:style>
    <style:style style:name="P7" style:family="paragraph" style:parent-style-name="Standard" style:list-style-name="L1">
      <style:text-properties officeooo:rsid="000e2469" officeooo:paragraph-rsid="000e2469"/>
    </style:style>
    <style:style style:name="P8" style:family="paragraph" style:parent-style-name="Standard" style:list-style-name="L2">
      <style:text-properties officeooo:rsid="000e2469" officeooo:paragraph-rsid="000e2469"/>
    </style:style>
    <style:style style:name="P9" style:family="paragraph" style:parent-style-name="Standard" style:list-style-name="L2">
      <style:text-properties officeooo:rsid="000f1e45" officeooo:paragraph-rsid="000f1e45"/>
    </style:style>
    <style:style style:name="P10" style:family="paragraph" style:parent-style-name="Standard" style:list-style-name="L2">
      <style:text-properties officeooo:rsid="000f1e45" officeooo:paragraph-rsid="000fde27"/>
    </style:style>
    <style:style style:name="P11" style:family="paragraph" style:parent-style-name="Standard" style:list-style-name="L2">
      <style:text-properties officeooo:rsid="000fde27" officeooo:paragraph-rsid="000fde27"/>
    </style:style>
    <style:style style:name="P12" style:family="paragraph" style:parent-style-name="Standard" style:list-style-name="L3">
      <style:text-properties officeooo:rsid="000fde27" officeooo:paragraph-rsid="000fde27"/>
    </style:style>
    <style:style style:name="P13" style:family="paragraph" style:parent-style-name="Standard" style:list-style-name="L5">
      <style:text-properties fo:font-weight="normal" officeooo:rsid="000fde27" officeooo:paragraph-rsid="000fde27" style:font-weight-asian="normal" style:font-weight-complex="normal"/>
    </style:style>
    <style:style style:name="P14" style:family="paragraph" style:parent-style-name="Standard" style:list-style-name="L5">
      <style:text-properties fo:font-weight="normal" officeooo:rsid="000fde27" officeooo:paragraph-rsid="0010fd01" style:font-weight-asian="normal" style:font-weight-complex="normal"/>
    </style:style>
    <style:style style:name="P15" style:family="paragraph" style:parent-style-name="Standard" style:list-style-name="L5">
      <style:text-properties fo:font-weight="normal" officeooo:rsid="0010fd01" officeooo:paragraph-rsid="0010fd01" style:font-weight-asian="normal" style:font-weight-complex="normal"/>
    </style:style>
    <style:style style:name="P16" style:family="paragraph" style:parent-style-name="Standard" style:list-style-name="L5">
      <style:text-properties fo:font-weight="normal" officeooo:rsid="0012a8c2" officeooo:paragraph-rsid="0012a8c2" style:font-weight-asian="normal" style:font-weight-complex="normal"/>
    </style:style>
    <style:style style:name="P17" style:family="paragraph" style:parent-style-name="Standard" style:list-style-name="L5">
      <style:text-properties fo:font-weight="normal" officeooo:rsid="0013cf88" officeooo:paragraph-rsid="0013cf88" style:font-weight-asian="normal" style:font-weight-complex="normal"/>
    </style:style>
    <style:style style:name="P18" style:family="paragraph" style:parent-style-name="Standard">
      <style:text-properties fo:font-weight="normal" officeooo:rsid="0017141c" officeooo:paragraph-rsid="0017141c" style:font-weight-asian="normal" style:font-weight-complex="normal"/>
    </style:style>
    <style:style style:name="P19" style:family="paragraph" style:parent-style-name="Standard" style:list-style-name="L5">
      <style:text-properties fo:font-weight="normal" officeooo:rsid="0017141c" officeooo:paragraph-rsid="0017141c" style:font-weight-asian="normal" style:font-weight-complex="normal"/>
    </style:style>
    <style:style style:name="P20" style:family="paragraph" style:parent-style-name="Standard" style:list-style-name="L6">
      <style:text-properties fo:font-weight="normal" officeooo:rsid="001b839a" officeooo:paragraph-rsid="001b839a" style:font-weight-asian="normal" style:font-weight-complex="normal"/>
    </style:style>
    <style:style style:name="P21" style:family="paragraph" style:parent-style-name="Standard" style:list-style-name="L6">
      <style:text-properties fo:font-weight="normal" officeooo:rsid="001c068c" officeooo:paragraph-rsid="001c068c" style:font-weight-asian="normal" style:font-weight-complex="normal"/>
    </style:style>
    <style:style style:name="P22" style:family="paragraph" style:parent-style-name="Standard" style:list-style-name="L6">
      <style:text-properties fo:font-weight="normal" officeooo:rsid="001cd48d" officeooo:paragraph-rsid="001cd48d" style:font-weight-asian="normal" style:font-weight-complex="normal"/>
    </style:style>
    <style:style style:name="P23" style:family="paragraph" style:parent-style-name="Standard" style:list-style-name="L6">
      <style:text-properties fo:font-weight="normal" officeooo:rsid="001d5634" officeooo:paragraph-rsid="001d5634" style:font-weight-asian="normal" style:font-weight-complex="normal"/>
    </style:style>
    <style:style style:name="P24" style:family="paragraph" style:parent-style-name="Standard" style:list-style-name="L6">
      <style:text-properties fo:font-weight="normal" officeooo:rsid="001ee29a" officeooo:paragraph-rsid="001ee29a" style:font-weight-asian="normal" style:font-weight-complex="normal"/>
    </style:style>
    <style:style style:name="P25" style:family="paragraph" style:parent-style-name="Standard">
      <style:text-properties fo:font-weight="normal" officeooo:rsid="001ee29a" officeooo:paragraph-rsid="001ee29a" style:font-weight-asian="normal" style:font-weight-complex="normal"/>
    </style:style>
    <style:style style:name="P26" style:family="paragraph" style:parent-style-name="Standard">
      <style:text-properties fo:font-weight="bold" officeooo:rsid="0019c54a" officeooo:paragraph-rsid="0019c54a" style:font-weight-asian="bold" style:font-weight-complex="bold"/>
    </style:style>
    <style:style style:name="P27" style:family="paragraph" style:parent-style-name="Standard">
      <style:text-properties fo:font-weight="bold" officeooo:rsid="00222119" officeooo:paragraph-rsid="00222119" style:font-weight-asian="bold" style:font-weight-complex="bold"/>
    </style:style>
    <style:style style:name="P28" style:family="paragraph" style:parent-style-name="Preformatted_20_Text" style:list-style-name="L8"/>
    <style:style style:name="T1" style:family="text">
      <style:text-properties officeooo:rsid="000ccd5e"/>
    </style:style>
    <style:style style:name="T2" style:family="text">
      <style:text-properties officeooo:rsid="000e2469"/>
    </style:style>
    <style:style style:name="T3" style:family="text">
      <style:text-properties officeooo:rsid="000fde27"/>
    </style:style>
    <style:style style:name="T4" style:family="text">
      <style:text-properties officeooo:rsid="0010fd01"/>
    </style:style>
    <style:style style:name="T5" style:family="text">
      <style:text-properties officeooo:rsid="0012a8c2"/>
    </style:style>
    <style:style style:name="T6" style:family="text">
      <style:text-properties officeooo:rsid="00156c9d"/>
    </style:style>
    <style:style style:name="T7" style:family="text">
      <style:text-properties officeooo:rsid="001913d4"/>
    </style:style>
    <style:style style:name="T8" style:family="text">
      <style:text-properties officeooo:rsid="001cd48d"/>
    </style:style>
    <style:style style:name="T9" style:family="text">
      <style:text-properties officeooo:rsid="001d5634"/>
    </style:style>
    <style:style style:name="T10" style:family="text">
      <style:text-properties officeooo:rsid="002046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P is not a silver bullet.</text:p>
      <text:p text:style-name="P1"/>
      <text:p text:style-name="P3">Warning. This is another experience sharing article. No code. You can jump to the conclusion for a tl;dr.</text:p>
      <text:p text:style-name="P1"/>
      <text:p text:style-name="P2">Titles are brief. More preceisly what I mean by “<text:span text:style-name="T1">FP is not a silver bullet” </text:span>is “”.</text:p>
      <text:p text:style-name="P2">fp(code) ⇏ easy_life</text:p>
      <text:p text:style-name="P2">∃code. fp(code) <text:span text:style-name="T3">∧</text:span> ¬easy_life</text:p>
      <text:p text:style-name="P1"/>
      <text:p text:style-name="P1">For a year now I've been writing FP. It's great: code always works, massive refactorings are flawless when it compiles, components form naturally. It's been a consistently smooth and happy experience... in all but one case...</text:p>
      <text:p text:style-name="P1"/>
      <text:p text:style-name="P1">There is one particular component in my code that I've become scared of. I fear to change it, not for fear of breaking stuff, but because I struggle to comprehend and reason about it. I struggle to remember what it does let alone how it works. In all other cases of my code I can remember what it does and how it works in seconds and change the hell of out of it if I need to, no matter how depended upon it is, but with this exceptional component I'm becoming scared to rely on it because it is very clearly not the case.</text:p>
      <text:p text:style-name="P1"/>
      <text:p text:style-name="P1">Yet it's all pure FP. What FP is preceisly has become vague so let me explicitly say what it is:</text:p>
      <text:list xml:id="list2764452814492830627" text:style-name="L1">
        <text:list-item>
          <text:p text:style-name="P6">Pure. No side-effects.</text:p>
        </text:list-item>
        <text:list-item>
          <text:p text:style-name="P6">All immutable.</text:p>
        </text:list-item>
        <text:list-item>
          <text:p text:style-name="P6">Referentially transparent. <text:span text:style-name="T2">Have equational reasoning.</text:span></text:p>
        </text:list-item>
        <text:list-item>
          <text:p text:style-name="P6">Highly (but not entirely) parametric. <text:span text:style-name="T2">(So A⇒B[C] instead of Foo⇒List[Bar]). By highly let's say... 70%? 80%?</text:span></text:p>
        </text:list-item>
        <text:list-item>
          <text:p text:style-name="P7">Lots of higher-order abstrction.</text:p>
        </text:list-item>
      </text:list>
      <text:p text:style-name="P2"/>
      <text:p text:style-name="P2">It ticks many important boxes but still causes me mental hell every time I deal with it. Why?</text:p>
      <text:list xml:id="list8500496025929753011" text:style-name="L2">
        <text:list-item>
          <text:p text:style-name="P8">Can't remember exactly what it does.</text:p>
        </text:list-item>
        <text:list-item>
          <text:p text:style-name="P8">Too hard to figure out how to change it.</text:p>
        </text:list-item>
        <text:list-item>
          <text:p text:style-name="P8">Most of it doesn't compose.</text:p>
        </text:list-item>
        <text:list-item>
          <text:p text:style-name="P9">Lots of <text:span text:style-name="T9">inherent</text:span> complexity.</text:p>
        </text:list-item>
        <text:list-item>
          <text:p text:style-name="P10">Feels like OO. I feel like I have to squash my desire into the existing structure. <text:span text:style-name="T3">I combine a bunch of small As into a B, provide a few more fns then turn into a C, provide a few more fns then turn into a D.</text:span></text:p>
        </text:list-item>
        <text:list-item>
          <text:p text:style-name="P11">Abstracts over arity. I generated code for each tuple case rather than using Shapeless's HList or similar.</text:p>
        </text:list-item>
      </text:list>
      <text:p text:style-name="P3"/>
      <text:p text:style-name="P4">What about all the other FP code I'm happy with? What's different?</text:p>
      <text:list xml:id="list6516058959301475430" text:style-name="L3">
        <text:list-item>
          <text:p text:style-name="P12">Smaller domain.</text:p>
        </text:list-item>
        <text:list-item>
          <text:p text:style-name="P12">Composable. Doesn't need to abstract over arity.</text:p>
          <text:p text:style-name="P12"/>
        </text:list-item>
      </text:list>
      <text:p text:style-name="P5">Why?</text:p>
      <text:list xml:id="list7191578482222065687" text:style-name="L5">
        <text:list-item>
          <text:p text:style-name="P13"><text:span text:style-name="T4">(1,2) </text:span>Feels like magic.</text:p>
        </text:list-item>
        <text:list-item>
          <text:p text:style-name="P14"><text:span text:style-name="T4">(1) </text:span>Has many methods, half private, hard to see what's public.</text:p>
        </text:list-item>
        <text:list-item>
          <text:p text:style-name="P14"><text:span text:style-name="T4">(1) </text:span>For the public methods, most don't have explicit return types.</text:p>
        </text:list-item>
        <text:list-item>
          <text:p text:style-name="P14"><text:span text:style-name="T4">(1) </text:span>No way of seeing a list of public methods in table with cols for name, parameters, return type. Only tools are grep &amp; scaladoc. Both suck.</text:p>
        </text:list-item>
        <text:list-item>
          <text:p text:style-name="P14"><text:span text:style-name="T4">(1,2,3) </text:span>Spaghetti types. <text:span text:style-name="T4">Handful of different classes, lots of abstract type members, classes feed into others and thus many of the types do too. </text:span>So many types all over the place. It's like a circuit board. <text:span text:style-name="T4">I've had to create a diagram showing all the classes and their type members, then which types in one class wire up to types in ones. I look at it and I understand, but then I'm at a loss at what to do about it.</text:span></text:p>
        </text:list-item>
        <text:list-item>
          <text:p text:style-name="P15">(2,3) Feels like it has a single purpose.</text:p>
        </text:list-item>
        <text:list-item>
          <text:p text:style-name="P15">(3) Abstracting over arity in a way that doesn't support composition.</text:p>
        </text:list-item>
        <text:list-item>
          <text:p text:style-name="P15">(3) Keep building stuff up (Build A, give to B, give to C, give to D). Each class depends on the other, they're not independant so I think some of the purpose/intent carries around too. Feel like that affects composability but why exactly? <text:span text:style-name="T5">Composability provides composition for everything else lower than it in its chain, and for it's next highest. If B composes, it doesn't matter if A or C does or not.</text:span></text:p>
        </text:list-item>
        <text:list-item>
          <text:p text:style-name="P16">(3,4,5) Problem itself is complex. Large amount of data with lots of dependencies on other horizontal and vertical slices of it. I've solved the problem by starting small, merging multiple small things into a single larger thing and repeating for a few levels. Like a mountain. Maybe I should try building things into smaller hills with bridges?</text:p>
        </text:list-item>
        <text:list-item>
          <text:p text:style-name="P17">(6) Shapeless seemed too complex. Also I need sets of types with same arity: (A,B), (A⇒A2,B⇒B2), (V,V), ((A,B)⇒C).</text:p>
        </text:list-item>
        <text:list-item>
          <text:p text:style-name="P17">(6) I could build composability into my code generation shit. <text:span text:style-name="T6">Does it help? Would I use it?</text:span></text:p>
        </text:list-item>
        <text:list-item>
          <text:p text:style-name="P19">(2,4,5,6) Can't model problem or intent directly. <text:span text:style-name="T7">Instead it's builders⁹. Builders give you a very inflexible path. </text:span>Ideally I'd say: these are all the different cells, these are the table constraints, this is how to save sutff, this is the row for each type of data (polymorphism).</text:p>
        </text:list-item>
      </text:list>
      <text:p text:style-name="P18"/>
      <text:p text:style-name="P26">Fixes</text:p>
      <text:list xml:id="list7111938924818100017" text:style-name="L6">
        <text:list-item>
          <text:p text:style-name="P20">(b,c,d) Give public methods explicit return types.</text:p>
        </text:list-item>
        <text:list-item>
          <text:p text:style-name="P20">(b,d) Separate public methods from non-public.</text:p>
        </text:list-item>
        <text:list-item>
          <text:p text:style-name="P20">(b,d) Create and maintain a separate doc which shows public methods in table format.</text:p>
        </text:list-item>
        <text:list-item>
          <text:p text:style-name="P21">(e,<text:span text:style-name="T8">f,g,h,i,l</text:span>) Change architecture so that I can have smaller separate things; less dependencies should mean less type wiring. Instead of builders building a single mountain, try to make s<text:span text:style-name="T5">maller hills with bridges. Maybe focus on a class per feature (?). This may remove the need for arity abstraction. Maybe ReactElements per cell or at least per row.</text:span></text:p>
        </text:list-item>
        <text:list-item>
          <text:p text:style-name="P22">(g,<text:span text:style-name="T9">j</text:span>) Fucking just learn how to Shapeless HList.</text:p>
        </text:list-item>
        <text:list-item>
          <text:p text:style-name="P22">(h,<text:span text:style-name="T9">i</text:span>) Once things are small, consider what composability would mean for each.</text:p>
        </text:list-item>
        <text:list-item>
          <text:p text:style-name="P23">(i) Reanalyse the types of the problem, but this time aim for max parametricity. Abstract my own goals. Eg. instead of table constraints, each cell has an abritrary external constraint.</text:p>
        </text:list-item>
        <text:list-item>
          <text:p text:style-name="P24">(k) <text:span text:style-name="T10">Try out above analyses on the other screens left to build for phase 2.</text:span></text:p>
        </text:list-item>
      </text:list>
      <text:p text:style-name="P25"/>
      <text:p text:style-name="P27">Features</text:p>
      <text:list xml:id="list3819380440061819979" text:style-name="L8">
        <text:list-item>
          <text:p text:style-name="P28">[5] create new</text:p>
        </text:list-item>
        <text:list-item>
          <text:p text:style-name="P28">[5] saves only when entire row is valid</text:p>
        </text:list-item>
        <text:list-item>
          <text:p text:style-name="P28">[5] delete</text:p>
        </text:list-item>
        <text:list-item>
          <text:p text:style-name="P28">[5] show/hide deleted</text:p>
        </text:list-item>
        <text:list-item>
          <text:p text:style-name="P28">[4] validation as you type</text:p>
        </text:list-item>
        <text:list-item>
          <text:p text:style-name="P28">[4] input correction (valid or not)</text:p>
        </text:list-item>
        <text:list-item>
          <text:p text:style-name="P28">[3] field validity depending on other fields (in same row)</text:p>
        </text:list-item>
        <text:list-item>
          <text:p text:style-name="P28">[3] field validity depending on other rows</text:p>
        </text:list-item>
        <text:list-item>
          <text:p text:style-name="P28">[2] escape to cancel change</text:p>
        </text:list-item>
        <text:list-item>
          <text:p text:style-name="P28">[2] visual indication of save-in-progress &amp; save-complete</text:p>
        </text:list-item>
        <text:list-item>
          <text:p text:style-name="P28">[1] avoid NOP sav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FreeSans2" svg:font-family="FreeSans" style:font-family-generic="swiss"/>
    <style:font-face style:name="DejaVu Sans Mono" svg:font-family="'DejaVu Sans Mono'" style:font-family-generic="modern" style:font-pitch="fixed"/>
    <style:font-face style:name="FreeSans1" svg:font-family="FreeSans"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TianZhen" style:font-family-asian="TianZhen" style:font-family-generic-asian="modern" style:font-pitch-asian="fixed" style:font-size-asian="10pt" style:font-name-complex="FreeSans1"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2:46:36.708791321</meta:creation-date>
    <dc:date>2014-11-07T20:24:17.137042347</dc:date>
    <meta:editing-duration>PT4H21M46S</meta:editing-duration>
    <meta:editing-cycles>9</meta:editing-cycles>
    <meta:generator>LibreOffice/4.2.7.2$Linux_X86_64 LibreOffice_project/420m0$Build-2</meta:generator>
    <meta:document-statistic meta:table-count="0" meta:image-count="0" meta:object-count="0" meta:page-count="1" meta:paragraph-count="58" meta:word-count="988" meta:character-count="5399" meta:non-whitespace-character-count="4515"/>
  </office:meta>
</office:document-meta>
</file>
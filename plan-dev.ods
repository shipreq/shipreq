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90.4" calcext:value-type="float">
            <text:p>29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3.2" calcext:value-type="float">
            <text:p>20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9401444788442" calcext:value-type="percentage">
            <text:p>41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28T03:16:48" calcext:value-type="date">
            <text:p>28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8.209122807018" calcext:value-type="float">
            <text:p>1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20T05:51:19.578947" calcext:value-type="date">
            <text:p>20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300275482093664" calcext:value-type="percentage">
            <text:p>30.0%</text:p>
          </table:table-cell>
          <table:table-cell table:style-name="ce50" table:formula="of:=SUM([.B5:.B51])" office:value-type="float" office:value="290.4" calcext:value-type="float">
            <text:p>290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7.2" calcext:value-type="float">
            <text:p>8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0:04:25.796274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03T10:04:33.709263439</dc:date>
    <meta:editing-duration>P11DT6H54M55S</meta:editing-duration>
    <meta:editing-cycles>156</meta:editing-cycles>
    <meta:generator>LibreOffice/5.1.1.3$Linux_X86_64 LibreOffice_project/10m0$Build-3</meta:generator>
    <meta:document-statistic meta:table-count="6" meta:cell-count="3537" meta:object-count="0"/>
  </office:meta>
</office:document-meta>
</file>
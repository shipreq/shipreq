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88.1" calcext:value-type="float">
            <text:p>28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3.2" calcext:value-type="float">
            <text:p>20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19401444788442" calcext:value-type="percentage">
            <text:p>41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25T03:16:48" calcext:value-type="date">
            <text:p>25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8.209122807018" calcext:value-type="float">
            <text:p>1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17T05:51:19.578947" calcext:value-type="date">
            <text:p>17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4689343977785" calcext:value-type="percentage">
            <text:p>29.5%</text:p>
          </table:table-cell>
          <table:table-cell table:style-name="ce50" table:formula="of:=SUM([.B5:.B51])" office:value-type="float" office:value="288.1" calcext:value-type="float">
            <text:p>288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>
            <text:p/>
          </table:table-cell>
          <table:table-cell table:style-name="ce75" table:formula="of:=IF(SUM([.PB5:.PB51])=0;&quot;&quot;;SUM([.PB5:.PB51]))">
            <text:p/>
          </table:table-cell>
          <table:table-cell table:style-name="ce75" table:formula="of:=IF(SUM([.PC5:.PC51])=0;&quot;&quot;;SUM([.PC5:.PC51]))">
            <text:p/>
          </table:table-cell>
          <table:table-cell table:style-name="ce81" table:formula="of:=IF(SUM([.PD5:.PD51])=0;&quot;&quot;;SUM([.PD5:.PD51]))">
            <text:p/>
          </table:table-cell>
          <table:table-cell table:style-name="ce81" table:formula="of:=IF(SUM([.PE5:.PE51])=0;&quot;&quot;;SUM([.PE5:.PE51]))">
            <text:p/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4.9" calcext:value-type="float">
            <text:p>84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0:51:32.955094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3-31T20:52:18.428371343</dc:date>
    <meta:editing-duration>P11DT6H54M27S</meta:editing-duration>
    <meta:editing-cycles>154</meta:editing-cycles>
    <meta:generator>LibreOffice/5.1.1.3$Linux_X86_64 LibreOffice_project/10m0$Build-3</meta:generator>
    <meta:document-statistic meta:table-count="6" meta:cell-count="3534" meta:object-count="0"/>
  </office:meta>
</office:document-meta>
</file>
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6.025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00.9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67" calcext:value-type="float">
            <text:p>67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3828689370485" calcext:value-type="percentage">
            <text:p>13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8-16T03:16:48" calcext:value-type="date">
            <text:p>16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65.3543859649123" calcext:value-type="float">
            <text:p>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9-06T05:55:22.105263" calcext:value-type="date">
            <text:p>06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3597621407334" calcext:value-type="percentage">
            <text:p>33.6%</text:p>
          </table:table-cell>
          <table:table-cell table:style-name="ce35" table:formula="of:=SUM([.B5:.B51])" office:value-type="float" office:value="100.9" calcext:value-type="float">
            <text:p>101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>
            <text:p/>
          </table:table-cell>
          <table:table-cell table:style-name="ce55" table:formula="of:=IF(SUM([.ED5:.ED51])=0;&quot;&quot;;SUM([.ED5:.ED51]))">
            <text:p/>
          </table:table-cell>
          <table:table-cell table:style-name="ce55" table:formula="of:=IF(SUM([.EE5:.EE51])=0;&quot;&quot;;SUM([.EE5:.EE51]))">
            <text:p/>
          </table:table-cell>
          <table:table-cell table:style-name="ce55" table:formula="of:=IF(SUM([.EF5:.EF51])=0;&quot;&quot;;SUM([.EF5:.EF51]))">
            <text:p/>
          </table:table-cell>
          <table:table-cell table:style-name="ce55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5" table:formula="of:=IF(SUM([.EJ5:.EJ51])=0;&quot;&quot;;SUM([.EJ5:.EJ51]))">
            <text:p/>
          </table:table-cell>
          <table:table-cell table:style-name="ce55" table:formula="of:=IF(SUM([.EK5:.EK51])=0;&quot;&quot;;SUM([.EK5:.EK51]))">
            <text:p/>
          </table:table-cell>
          <table:table-cell table:style-name="ce55" table:formula="of:=IF(SUM([.EL5:.EL51])=0;&quot;&quot;;SUM([.EL5:.EL51]))">
            <text:p/>
          </table:table-cell>
          <table:table-cell table:style-name="ce55" table:formula="of:=IF(SUM([.EM5:.EM51])=0;&quot;&quot;;SUM([.EM5:.EM51]))">
            <text:p/>
          </table:table-cell>
          <table:table-cell table:style-name="ce55" table:formula="of:=IF(SUM([.EN5:.EN51])=0;&quot;&quot;;SUM([.EN5:.EN51]))">
            <text:p/>
          </table:table-cell>
          <table:table-cell table:style-name="ce56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3.9" calcext:value-type="float">
            <text:p>3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1.2" calcext:value-type="float">
            <text:p>11.2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4:.ZZ24])=0;&quot;&quot;;SUM([.C24:.ZZ24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Real DB storage</text:p>
          </table:table-cell>
          <table:table-cell table:style-name="ce36" table:formula="of:=IF(SUM([.C25:.ZZ25])=0;&quot;&quot;;SUM([.C25:.ZZ25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29:.ZZ29])=0;&quot;&quot;;SUM([.C29:.ZZ29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30:.ZZ30])=0;&quot;&quot;;SUM([.C30:.ZZ30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31:.ZZ31])=0;&quot;&quot;;SUM([.C31:.ZZ31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32:.ZZ32])=0;&quot;&quot;;SUM([.C32:.ZZ32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9:51:02.542155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22T10:05:37.549379774</dc:date>
    <meta:editing-duration>P11DT5H58M37S</meta:editing-duration>
    <meta:editing-cycles>97</meta:editing-cycles>
    <meta:generator>LibreOffice/4.3.7.2$Linux_X86_64 LibreOffice_project/430m0$Build-2</meta:generator>
    <meta:document-statistic meta:table-count="6" meta:cell-count="1860" meta:object-count="0"/>
  </office:meta>
</office:document-meta>
</file>
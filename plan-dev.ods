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301.2" calcext:value-type="float">
            <text:p>30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11.1" calcext:value-type="float">
            <text:p>21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35706914344685" calcext:value-type="percentage">
            <text:p>43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6-14T03:16:48" calcext:value-type="date">
            <text:p>14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05.915087719298" calcext:value-type="float">
            <text:p>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2-16T05:37:20.842105" calcext:value-type="date">
            <text:p>16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9136786188579" calcext:value-type="percentage">
            <text:p>29.9%</text:p>
          </table:table-cell>
          <table:table-cell table:style-name="ce50" table:formula="of:=SUM([.B5:.B51])" office:value-type="float" office:value="301.2" calcext:value-type="float">
            <text:p>301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 office:value-type="float" office:value="0.5" calcext:value-type="float">
            <text:p>0.5</text:p>
          </table:table-cell>
          <table:table-cell table:style-name="ce81" table:formula="of:=IF(SUM([.PG5:.PG51])=0;&quot;&quot;;SUM([.PG5:.PG51]))" office:value-type="float" office:value="1" calcext:value-type="float">
            <text:p>1.0</text:p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 office:value-type="float" office:value="1" calcext:value-type="float">
            <text:p>1.0</text:p>
          </table:table-cell>
          <table:table-cell table:style-name="ce81" table:formula="of:=IF(SUM([.PL5:.PL51])=0;&quot;&quot;;SUM([.PL5:.PL51]))" office:value-type="float" office:value="1" calcext:value-type="float">
            <text:p>1.0</text:p>
          </table:table-cell>
          <table:table-cell table:style-name="ce81" table:formula="of:=IF(SUM([.PM5:.PM51])=0;&quot;&quot;;SUM([.PM5:.PM51]))" office:value-type="float" office:value="1" calcext:value-type="float">
            <text:p>1.0</text:p>
          </table:table-cell>
          <table:table-cell table:style-name="ce81" table:formula="of:=IF(SUM([.PN5:.PN51])=0;&quot;&quot;;SUM([.PN5:.PN51]))" office:value-type="float" office:value="1" calcext:value-type="float">
            <text:p>1.0</text:p>
          </table:table-cell>
          <table:table-cell table:style-name="ce81" table:formula="of:=IF(SUM([.PO5:.PO51])=0;&quot;&quot;;SUM([.PO5:.PO51]))" office:value-type="float" office:value="1" calcext:value-type="float">
            <text:p>1.0</text:p>
          </table:table-cell>
          <table:table-cell table:style-name="ce75" table:formula="of:=IF(SUM([.PP5:.PP51])=0;&quot;&quot;;SUM([.PP5:.PP51]))" office:value-type="float" office:value="0.4" calcext:value-type="float">
            <text:p>0.4</text:p>
          </table:table-cell>
          <table:table-cell table:style-name="ce75" table:formula="of:=IF(SUM([.PQ5:.PQ51])=0;&quot;&quot;;SUM([.PQ5:.PQ51]))" office:value-type="float" office:value="0.7" calcext:value-type="float">
            <text:p>0.7</text:p>
          </table:table-cell>
          <table:table-cell table:style-name="ce81" table:formula="of:=IF(SUM([.PR5:.PR51])=0;&quot;&quot;;SUM([.PR5:.PR51]))" office:value-type="float" office:value="0.6" calcext:value-type="float">
            <text:p>0.6</text:p>
          </table:table-cell>
          <table:table-cell table:style-name="ce81" table:formula="of:=IF(SUM([.PS5:.PS51])=0;&quot;&quot;;SUM([.PS5:.PS51]))" office:value-type="float" office:value="0.6" calcext:value-type="float">
            <text:p>0.6</text:p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90.1" calcext:value-type="float">
            <text:p>9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25.1" calcext:value-type="float">
            <text:p>25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7" calcext:value-type="float">
            <text:p>0.7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09:27:32.833665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20T09:28:07.473803687</dc:date>
    <meta:editing-duration>P11DT6H58M53S</meta:editing-duration>
    <meta:editing-cycles>161</meta:editing-cycles>
    <meta:generator>LibreOffice/5.1.2.2.0$Linux_X86_64 LibreOffice_project/10m0$Build-2</meta:generator>
    <meta:document-statistic meta:table-count="6" meta:cell-count="3552" meta:object-count="0"/>
  </office:meta>
</office:document-meta>
</file>
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0.57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7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8" style:family="table-cell" style:parent-style-name="Default" style:data-style-name="N118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9" style:family="table-cell" style:parent-style-name="Default" style:data-style-name="N109">
      <style:table-cell-properties fo:background-color="#ff00ff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1" style:family="table-cell" style:parent-style-name="Default">
      <style:table-cell-properties fo:background-color="#800000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fo:background-color="#ffff00"/>
      <style:text-properties fo:color="#999999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e6e6e6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9" style:family="table-cell" style:parent-style-name="Default">
      <style:text-properties fo:color="#800000" fo:font-style="italic" style:font-style-asian="italic" style:font-style-complex="italic"/>
    </style:style>
    <style:style style:name="ce80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92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93" style:family="table-cell" style:parent-style-name="Default">
      <style:table-cell-properties fo:background-color="#cfe7f5" fo:border="0.06pt solid #000000"/>
    </style:style>
    <style:style style:name="ce9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6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0.06pt solid #000000"/>
    </style:style>
    <style:style style:name="ce99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4" style:family="table-cell" style:parent-style-name="Default">
      <style:table-cell-properties fo:background-color="#ffffcc" fo:wrap-option="wrap" fo:border="0.06pt solid #000000"/>
    </style:style>
    <style:style style:name="ce105" style:family="table-cell" style:parent-style-name="Default">
      <style:table-cell-properties fo:background-color="#ffffcc" fo:border="0.06pt solid #000000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8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10" style:family="table-cell" style:parent-style-name="Default">
      <style:table-cell-properties fo:background-color="#ffcc99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4" style:family="table-cell" style:parent-style-name="Default">
      <style:table-cell-properties fo:background-color="#ff8080" fo:wrap-option="wrap" fo:border="0.06pt solid #000000"/>
    </style:style>
    <style:style style:name="ce11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7" style:family="table-cell" style:parent-style-name="Default">
      <style:table-cell-properties fo:background-color="#ff8080" fo:wrap-option="no-wrap" fo:border="0.06pt solid #000000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9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>
      <style:table-cell-properties fo:background-color="#3deb3d" fo:border="0.06pt solid #000000"/>
    </style:style>
    <style:style style:name="ce121" style:family="table-cell" style:parent-style-name="Default">
      <style:text-properties fo:color="#008000"/>
    </style:style>
    <style:style style:name="ce12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2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233.8" calcext:value-type="float">
            <text:p>23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77.2" calcext:value-type="float">
            <text:p>177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3.65737874097007" calcext:value-type="percentage">
            <text:p>36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6-03-02T03:16:48" calcext:value-type="date">
            <text:p>02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72.847719298246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7-26T15:44:10.105263" calcext:value-type="date">
            <text:p>26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style-name="ce46" table:formula="of:=[.LH2]" office:value-type="date" office:date-value="2015-12-26" calcext:value-type="date">
            <text:p>26</text:p>
          </table:table-cell>
          <table:table-cell table:style-name="ce52" table:formula="of:=[.LI2]" office:value-type="date" office:date-value="2015-12-27" calcext:value-type="date">
            <text:p>27</text:p>
          </table:table-cell>
          <table:table-cell table:style-name="ce42" table:formula="of:=[.LJ2]" office:value-type="date" office:date-value="2015-12-28" calcext:value-type="date">
            <text:p>28</text:p>
          </table:table-cell>
          <table:table-cell table:style-name="ce42" table:formula="of:=[.LK2]" office:value-type="date" office:date-value="2015-12-29" calcext:value-type="date">
            <text:p>29</text:p>
          </table:table-cell>
          <table:table-cell table:style-name="ce42" table:formula="of:=[.LL2]" office:value-type="date" office:date-value="2015-12-30" calcext:value-type="date">
            <text:p>30</text:p>
          </table:table-cell>
          <table:table-cell table:style-name="ce42" table:formula="of:=[.LM2]" office:value-type="date" office:date-value="2015-12-31" calcext:value-type="date">
            <text:p>31</text:p>
          </table:table-cell>
          <table:table-cell table:style-name="ce56" table:formula="of:=[.LN2]" office:value-type="date" office:date-value="2016-01-01" calcext:value-type="date">
            <text:p>01</text:p>
          </table:table-cell>
          <table:table-cell table:style-name="ce46" table:formula="of:=[.LO2]" office:value-type="date" office:date-value="2016-01-02" calcext:value-type="date">
            <text:p>02</text:p>
          </table:table-cell>
          <table:table-cell table:style-name="ce52" table:formula="of:=[.LP2]" office:value-type="date" office:date-value="2016-01-03" calcext:value-type="date">
            <text:p>03</text:p>
          </table:table-cell>
          <table:table-cell table:style-name="ce42" table:formula="of:=[.LQ2]" office:value-type="date" office:date-value="2016-01-04" calcext:value-type="date">
            <text:p>04</text:p>
          </table:table-cell>
          <table:table-cell table:style-name="ce42" table:formula="of:=[.LR2]" office:value-type="date" office:date-value="2016-01-05" calcext:value-type="date">
            <text:p>05</text:p>
          </table:table-cell>
          <table:table-cell table:style-name="ce42" table:formula="of:=[.LS2]" office:value-type="date" office:date-value="2016-01-06" calcext:value-type="date">
            <text:p>06</text:p>
          </table:table-cell>
          <table:table-cell table:style-name="ce42" table:formula="of:=[.LT2]" office:value-type="date" office:date-value="2016-01-07" calcext:value-type="date">
            <text:p>07</text:p>
          </table:table-cell>
          <table:table-cell table:style-name="ce42" table:formula="of:=[.LU2]" office:value-type="date" office:date-value="2016-01-08" calcext:value-type="date">
            <text:p>08</text:p>
          </table:table-cell>
          <table:table-cell table:style-name="ce46" table:formula="of:=[.LV2]" office:value-type="date" office:date-value="2016-01-09" calcext:value-type="date">
            <text:p>09</text:p>
          </table:table-cell>
          <table:table-cell table:style-name="ce52" table:formula="of:=[.LW2]" office:value-type="date" office:date-value="2016-01-10" calcext:value-type="date">
            <text:p>10</text:p>
          </table:table-cell>
          <table:table-cell table:style-name="ce42" table:formula="of:=[.LX2]" office:value-type="date" office:date-value="2016-01-11" calcext:value-type="date">
            <text:p>11</text:p>
          </table:table-cell>
          <table:table-cell table:style-name="ce42" table:formula="of:=[.LY2]" office:value-type="date" office:date-value="2016-01-12" calcext:value-type="date">
            <text:p>12</text:p>
          </table:table-cell>
          <table:table-cell table:style-name="ce42" table:formula="of:=[.LZ2]" office:value-type="date" office:date-value="2016-01-13" calcext:value-type="date">
            <text:p>13</text:p>
          </table:table-cell>
          <table:table-cell table:style-name="ce42" table:formula="of:=[.MA2]" office:value-type="date" office:date-value="2016-01-14" calcext:value-type="date">
            <text:p>14</text:p>
          </table:table-cell>
          <table:table-cell table:style-name="ce42" table:formula="of:=[.MB2]" office:value-type="date" office:date-value="2016-01-15" calcext:value-type="date">
            <text:p>15</text:p>
          </table:table-cell>
          <table:table-cell table:style-name="ce46" table:formula="of:=[.MC2]" office:value-type="date" office:date-value="2016-01-16" calcext:value-type="date">
            <text:p>16</text:p>
          </table:table-cell>
          <table:table-cell table:style-name="ce52" table:formula="of:=[.MD2]" office:value-type="date" office:date-value="2016-01-17" calcext:value-type="date">
            <text:p>17</text:p>
          </table:table-cell>
          <table:table-cell table:style-name="ce42" table:formula="of:=[.ME2]" office:value-type="date" office:date-value="2016-01-18" calcext:value-type="date">
            <text:p>18</text:p>
          </table:table-cell>
          <table:table-cell table:style-name="ce42" table:formula="of:=[.MF2]" office:value-type="date" office:date-value="2016-01-19" calcext:value-type="date">
            <text:p>19</text:p>
          </table:table-cell>
          <table:table-cell table:style-name="ce42" table:formula="of:=[.MG2]" office:value-type="date" office:date-value="2016-01-20" calcext:value-type="date">
            <text:p>20</text:p>
          </table:table-cell>
          <table:table-cell table:style-name="ce42" table:formula="of:=[.MH2]" office:value-type="date" office:date-value="2016-01-21" calcext:value-type="date">
            <text:p>21</text:p>
          </table:table-cell>
          <table:table-cell table:style-name="ce42" table:formula="of:=[.MI2]" office:value-type="date" office:date-value="2016-01-22" calcext:value-type="date">
            <text:p>22</text:p>
          </table:table-cell>
          <table:table-cell table:style-name="ce46" table:formula="of:=[.MJ2]" office:value-type="date" office:date-value="2016-01-23" calcext:value-type="date">
            <text:p>23</text:p>
          </table:table-cell>
          <table:table-cell table:style-name="ce52" table:formula="of:=[.MK2]" office:value-type="date" office:date-value="2016-01-24" calcext:value-type="date">
            <text:p>24</text:p>
          </table:table-cell>
          <table:table-cell table:style-name="ce42" table:formula="of:=[.ML2]" office:value-type="date" office:date-value="2016-01-25" calcext:value-type="date">
            <text:p>25</text:p>
          </table:table-cell>
          <table:table-cell table:style-name="ce42" table:formula="of:=[.MM2]" office:value-type="date" office:date-value="2016-01-26" calcext:value-type="date">
            <text:p>26</text:p>
          </table:table-cell>
          <table:table-cell table:style-name="ce42" table:formula="of:=[.MN2]" office:value-type="date" office:date-value="2016-01-27" calcext:value-type="date">
            <text:p>27</text:p>
          </table:table-cell>
          <table:table-cell table:style-name="ce42" table:formula="of:=[.MO2]" office:value-type="date" office:date-value="2016-01-28" calcext:value-type="date">
            <text:p>28</text:p>
          </table:table-cell>
          <table:table-cell table:style-name="ce42" table:formula="of:=[.MP2]" office:value-type="date" office:date-value="2016-01-29" calcext:value-type="date">
            <text:p>29</text:p>
          </table:table-cell>
          <table:table-cell table:style-name="ce46" table:formula="of:=[.MQ2]" office:value-type="date" office:date-value="2016-01-30" calcext:value-type="date">
            <text:p>30</text:p>
          </table:table-cell>
          <table:table-cell table:style-name="ce52" table:formula="of:=[.MR2]" office:value-type="date" office:date-value="2016-01-31" calcext:value-type="date">
            <text:p>31</text:p>
          </table:table-cell>
          <table:table-cell table:style-name="ce42" table:formula="of:=[.MS2]" office:value-type="date" office:date-value="2016-02-01" calcext:value-type="date">
            <text:p>01</text:p>
          </table:table-cell>
          <table:table-cell table:style-name="ce42" table:formula="of:=[.MT2]" office:value-type="date" office:date-value="2016-02-02" calcext:value-type="date">
            <text:p>02</text:p>
          </table:table-cell>
          <table:table-cell table:style-name="ce42" table:formula="of:=[.MU2]" office:value-type="date" office:date-value="2016-02-03" calcext:value-type="date">
            <text:p>03</text:p>
          </table:table-cell>
          <table:table-cell table:style-name="ce42" table:formula="of:=[.MV2]" office:value-type="date" office:date-value="2016-02-04" calcext:value-type="date">
            <text:p>04</text:p>
          </table:table-cell>
          <table:table-cell table:style-name="ce42" table:formula="of:=[.MW2]" office:value-type="date" office:date-value="2016-02-05" calcext:value-type="date">
            <text:p>05</text:p>
          </table:table-cell>
          <table:table-cell table:style-name="ce46" table:formula="of:=[.MX2]" office:value-type="date" office:date-value="2016-02-06" calcext:value-type="date">
            <text:p>06</text:p>
          </table:table-cell>
          <table:table-cell table:style-name="ce52" table:formula="of:=[.MY2]" office:value-type="date" office:date-value="2016-02-07" calcext:value-type="date">
            <text:p>07</text:p>
          </table:table-cell>
          <table:table-cell table:style-name="ce42" table:formula="of:=[.MZ2]" office:value-type="date" office:date-value="2016-02-08" calcext:value-type="date">
            <text:p>08</text:p>
          </table:table-cell>
          <table:table-cell table:style-name="ce42" table:formula="of:=[.NA2]" office:value-type="date" office:date-value="2016-02-09" calcext:value-type="date">
            <text:p>09</text:p>
          </table:table-cell>
          <table:table-cell table:style-name="ce42" table:formula="of:=[.NB2]" office:value-type="date" office:date-value="2016-02-10" calcext:value-type="date">
            <text:p>10</text:p>
          </table:table-cell>
          <table:table-cell table:style-name="ce42" table:formula="of:=[.NC2]" office:value-type="date" office:date-value="2016-02-11" calcext:value-type="date">
            <text:p>11</text:p>
          </table:table-cell>
          <table:table-cell table:style-name="ce42" table:formula="of:=[.ND2]" office:value-type="date" office:date-value="2016-02-12" calcext:value-type="date">
            <text:p>12</text:p>
          </table:table-cell>
          <table:table-cell table:style-name="ce46" table:formula="of:=[.NE2]" office:value-type="date" office:date-value="2016-02-13" calcext:value-type="date">
            <text:p>13</text:p>
          </table:table-cell>
          <table:table-cell table:style-name="ce52" table:formula="of:=[.NF2]" office:value-type="date" office:date-value="2016-02-14" calcext:value-type="date">
            <text:p>14</text:p>
          </table:table-cell>
          <table:table-cell table:style-name="ce42" table:formula="of:=[.NG2]" office:value-type="date" office:date-value="2016-02-15" calcext:value-type="date">
            <text:p>15</text:p>
          </table:table-cell>
          <table:table-cell table:style-name="ce42" table:formula="of:=[.NH2]" office:value-type="date" office:date-value="2016-02-16" calcext:value-type="date">
            <text:p>16</text:p>
          </table:table-cell>
          <table:table-cell table:style-name="ce42" table:formula="of:=[.NI2]" office:value-type="date" office:date-value="2016-02-17" calcext:value-type="date">
            <text:p>17</text:p>
          </table:table-cell>
          <table:table-cell table:style-name="ce42" table:formula="of:=[.NJ2]" office:value-type="date" office:date-value="2016-02-18" calcext:value-type="date">
            <text:p>18</text:p>
          </table:table-cell>
          <table:table-cell table:style-name="ce42" table:formula="of:=[.NK2]" office:value-type="date" office:date-value="2016-02-19" calcext:value-type="date">
            <text:p>19</text:p>
          </table:table-cell>
          <table:table-cell table:style-name="ce46" table:formula="of:=[.NL2]" office:value-type="date" office:date-value="2016-02-20" calcext:value-type="date">
            <text:p>20</text:p>
          </table:table-cell>
          <table:table-cell table:style-name="ce52" table:formula="of:=[.NM2]" office:value-type="date" office:date-value="2016-02-21" calcext:value-type="date">
            <text:p>21</text:p>
          </table:table-cell>
          <table:table-cell table:style-name="ce42" table:formula="of:=[.NN2]" office:value-type="date" office:date-value="2016-02-22" calcext:value-type="date">
            <text:p>22</text:p>
          </table:table-cell>
          <table:table-cell table:style-name="ce42" table:formula="of:=[.NO2]" office:value-type="date" office:date-value="2016-02-23" calcext:value-type="date">
            <text:p>23</text:p>
          </table:table-cell>
          <table:table-cell table:style-name="ce42" table:formula="of:=[.NP2]" office:value-type="date" office:date-value="2016-02-24" calcext:value-type="date">
            <text:p>24</text:p>
          </table:table-cell>
          <table:table-cell table:style-name="ce42" table:formula="of:=[.NQ2]" office:value-type="date" office:date-value="2016-02-25" calcext:value-type="date">
            <text:p>25</text:p>
          </table:table-cell>
          <table:table-cell table:style-name="ce42" table:formula="of:=[.NR2]" office:value-type="date" office:date-value="2016-02-26" calcext:value-type="date">
            <text:p>26</text:p>
          </table:table-cell>
          <table:table-cell table:style-name="ce46" table:formula="of:=[.NS2]" office:value-type="date" office:date-value="2016-02-27" calcext:value-type="date">
            <text:p>27</text:p>
          </table:table-cell>
          <table:table-cell table:style-name="ce52" table:formula="of:=[.NT2]" office:value-type="date" office:date-value="2016-02-28" calcext:value-type="date">
            <text:p>28</text:p>
          </table:table-cell>
          <table:table-cell table:style-name="ce42" table:formula="of:=[.NU2]" office:value-type="date" office:date-value="2016-02-29" calcext:value-type="date">
            <text:p>29</text:p>
          </table:table-cell>
          <table:table-cell table:style-name="ce42" table:formula="of:=[.NV2]" office:value-type="date" office:date-value="2016-03-01" calcext:value-type="date">
            <text:p>01</text:p>
          </table:table-cell>
          <table:table-cell table:style-name="ce42" table:formula="of:=[.NW2]" office:value-type="date" office:date-value="2016-03-02" calcext:value-type="date">
            <text:p>02</text:p>
          </table:table-cell>
          <table:table-cell table:style-name="ce42" table:formula="of:=[.NX2]" office:value-type="date" office:date-value="2016-03-03" calcext:value-type="date">
            <text:p>03</text:p>
          </table:table-cell>
          <table:table-cell table:style-name="ce42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style-name="ce47" table:formula="of:=[.LH3]" office:value-type="date" office:date-value="2015-12-26" calcext:value-type="date">
            <text:p>Dec</text:p>
          </table:table-cell>
          <table:table-cell table:style-name="ce53" table:formula="of:=[.LI3]" office:value-type="date" office:date-value="2015-12-27" calcext:value-type="date">
            <text:p>Dec</text:p>
          </table:table-cell>
          <table:table-cell table:style-name="ce43" table:formula="of:=[.LJ3]" office:value-type="date" office:date-value="2015-12-28" calcext:value-type="date">
            <text:p>Dec</text:p>
          </table:table-cell>
          <table:table-cell table:style-name="ce43" table:formula="of:=[.LK3]" office:value-type="date" office:date-value="2015-12-29" calcext:value-type="date">
            <text:p>Dec</text:p>
          </table:table-cell>
          <table:table-cell table:style-name="ce43" table:formula="of:=[.LL3]" office:value-type="date" office:date-value="2015-12-30" calcext:value-type="date">
            <text:p>Dec</text:p>
          </table:table-cell>
          <table:table-cell table:style-name="ce43" table:formula="of:=[.LM3]" office:value-type="date" office:date-value="2015-12-31" calcext:value-type="date">
            <text:p>Dec</text:p>
          </table:table-cell>
          <table:table-cell table:style-name="ce57" table:formula="of:=[.LN3]" office:value-type="date" office:date-value="2016-01-01" calcext:value-type="date">
            <text:p>Jan</text:p>
          </table:table-cell>
          <table:table-cell table:style-name="ce47" table:formula="of:=[.LO3]" office:value-type="date" office:date-value="2016-01-02" calcext:value-type="date">
            <text:p>Jan</text:p>
          </table:table-cell>
          <table:table-cell table:style-name="ce53" table:formula="of:=[.LP3]" office:value-type="date" office:date-value="2016-01-03" calcext:value-type="date">
            <text:p>Jan</text:p>
          </table:table-cell>
          <table:table-cell table:style-name="ce43" table:formula="of:=[.LQ3]" office:value-type="date" office:date-value="2016-01-04" calcext:value-type="date">
            <text:p>Jan</text:p>
          </table:table-cell>
          <table:table-cell table:style-name="ce43" table:formula="of:=[.LR3]" office:value-type="date" office:date-value="2016-01-05" calcext:value-type="date">
            <text:p>Jan</text:p>
          </table:table-cell>
          <table:table-cell table:style-name="ce43" table:formula="of:=[.LS3]" office:value-type="date" office:date-value="2016-01-06" calcext:value-type="date">
            <text:p>Jan</text:p>
          </table:table-cell>
          <table:table-cell table:style-name="ce43" table:formula="of:=[.LT3]" office:value-type="date" office:date-value="2016-01-07" calcext:value-type="date">
            <text:p>Jan</text:p>
          </table:table-cell>
          <table:table-cell table:style-name="ce43" table:formula="of:=[.LU3]" office:value-type="date" office:date-value="2016-01-08" calcext:value-type="date">
            <text:p>Jan</text:p>
          </table:table-cell>
          <table:table-cell table:style-name="ce47" table:formula="of:=[.LV3]" office:value-type="date" office:date-value="2016-01-09" calcext:value-type="date">
            <text:p>Jan</text:p>
          </table:table-cell>
          <table:table-cell table:style-name="ce53" table:formula="of:=[.LW3]" office:value-type="date" office:date-value="2016-01-10" calcext:value-type="date">
            <text:p>Jan</text:p>
          </table:table-cell>
          <table:table-cell table:style-name="ce43" table:formula="of:=[.LX3]" office:value-type="date" office:date-value="2016-01-11" calcext:value-type="date">
            <text:p>Jan</text:p>
          </table:table-cell>
          <table:table-cell table:style-name="ce43" table:formula="of:=[.LY3]" office:value-type="date" office:date-value="2016-01-12" calcext:value-type="date">
            <text:p>Jan</text:p>
          </table:table-cell>
          <table:table-cell table:style-name="ce43" table:formula="of:=[.LZ3]" office:value-type="date" office:date-value="2016-01-13" calcext:value-type="date">
            <text:p>Jan</text:p>
          </table:table-cell>
          <table:table-cell table:style-name="ce43" table:formula="of:=[.MA3]" office:value-type="date" office:date-value="2016-01-14" calcext:value-type="date">
            <text:p>Jan</text:p>
          </table:table-cell>
          <table:table-cell table:style-name="ce43" table:formula="of:=[.MB3]" office:value-type="date" office:date-value="2016-01-15" calcext:value-type="date">
            <text:p>Jan</text:p>
          </table:table-cell>
          <table:table-cell table:style-name="ce47" table:formula="of:=[.MC3]" office:value-type="date" office:date-value="2016-01-16" calcext:value-type="date">
            <text:p>Jan</text:p>
          </table:table-cell>
          <table:table-cell table:style-name="ce53" table:formula="of:=[.MD3]" office:value-type="date" office:date-value="2016-01-17" calcext:value-type="date">
            <text:p>Jan</text:p>
          </table:table-cell>
          <table:table-cell table:style-name="ce43" table:formula="of:=[.ME3]" office:value-type="date" office:date-value="2016-01-18" calcext:value-type="date">
            <text:p>Jan</text:p>
          </table:table-cell>
          <table:table-cell table:style-name="ce43" table:formula="of:=[.MF3]" office:value-type="date" office:date-value="2016-01-19" calcext:value-type="date">
            <text:p>Jan</text:p>
          </table:table-cell>
          <table:table-cell table:style-name="ce43" table:formula="of:=[.MG3]" office:value-type="date" office:date-value="2016-01-20" calcext:value-type="date">
            <text:p>Jan</text:p>
          </table:table-cell>
          <table:table-cell table:style-name="ce43" table:formula="of:=[.MH3]" office:value-type="date" office:date-value="2016-01-21" calcext:value-type="date">
            <text:p>Jan</text:p>
          </table:table-cell>
          <table:table-cell table:style-name="ce43" table:formula="of:=[.MI3]" office:value-type="date" office:date-value="2016-01-22" calcext:value-type="date">
            <text:p>Jan</text:p>
          </table:table-cell>
          <table:table-cell table:style-name="ce47" table:formula="of:=[.MJ3]" office:value-type="date" office:date-value="2016-01-23" calcext:value-type="date">
            <text:p>Jan</text:p>
          </table:table-cell>
          <table:table-cell table:style-name="ce53" table:formula="of:=[.MK3]" office:value-type="date" office:date-value="2016-01-24" calcext:value-type="date">
            <text:p>Jan</text:p>
          </table:table-cell>
          <table:table-cell table:style-name="ce43" table:formula="of:=[.ML3]" office:value-type="date" office:date-value="2016-01-25" calcext:value-type="date">
            <text:p>Jan</text:p>
          </table:table-cell>
          <table:table-cell table:style-name="ce43" table:formula="of:=[.MM3]" office:value-type="date" office:date-value="2016-01-26" calcext:value-type="date">
            <text:p>Jan</text:p>
          </table:table-cell>
          <table:table-cell table:style-name="ce43" table:formula="of:=[.MN3]" office:value-type="date" office:date-value="2016-01-27" calcext:value-type="date">
            <text:p>Jan</text:p>
          </table:table-cell>
          <table:table-cell table:style-name="ce43" table:formula="of:=[.MO3]" office:value-type="date" office:date-value="2016-01-28" calcext:value-type="date">
            <text:p>Jan</text:p>
          </table:table-cell>
          <table:table-cell table:style-name="ce43" table:formula="of:=[.MP3]" office:value-type="date" office:date-value="2016-01-29" calcext:value-type="date">
            <text:p>Jan</text:p>
          </table:table-cell>
          <table:table-cell table:style-name="ce47" table:formula="of:=[.MQ3]" office:value-type="date" office:date-value="2016-01-30" calcext:value-type="date">
            <text:p>Jan</text:p>
          </table:table-cell>
          <table:table-cell table:style-name="ce53" table:formula="of:=[.MR3]" office:value-type="date" office:date-value="2016-01-31" calcext:value-type="date">
            <text:p>Jan</text:p>
          </table:table-cell>
          <table:table-cell table:style-name="ce43" table:formula="of:=[.MS3]" office:value-type="date" office:date-value="2016-02-01" calcext:value-type="date">
            <text:p>Feb</text:p>
          </table:table-cell>
          <table:table-cell table:style-name="ce43" table:formula="of:=[.MT3]" office:value-type="date" office:date-value="2016-02-02" calcext:value-type="date">
            <text:p>Feb</text:p>
          </table:table-cell>
          <table:table-cell table:style-name="ce43" table:formula="of:=[.MU3]" office:value-type="date" office:date-value="2016-02-03" calcext:value-type="date">
            <text:p>Feb</text:p>
          </table:table-cell>
          <table:table-cell table:style-name="ce43" table:formula="of:=[.MV3]" office:value-type="date" office:date-value="2016-02-04" calcext:value-type="date">
            <text:p>Feb</text:p>
          </table:table-cell>
          <table:table-cell table:style-name="ce43" table:formula="of:=[.MW3]" office:value-type="date" office:date-value="2016-02-05" calcext:value-type="date">
            <text:p>Feb</text:p>
          </table:table-cell>
          <table:table-cell table:style-name="ce47" table:formula="of:=[.MX3]" office:value-type="date" office:date-value="2016-02-06" calcext:value-type="date">
            <text:p>Feb</text:p>
          </table:table-cell>
          <table:table-cell table:style-name="ce53" table:formula="of:=[.MY3]" office:value-type="date" office:date-value="2016-02-07" calcext:value-type="date">
            <text:p>Feb</text:p>
          </table:table-cell>
          <table:table-cell table:style-name="ce43" table:formula="of:=[.MZ3]" office:value-type="date" office:date-value="2016-02-08" calcext:value-type="date">
            <text:p>Feb</text:p>
          </table:table-cell>
          <table:table-cell table:style-name="ce43" table:formula="of:=[.NA3]" office:value-type="date" office:date-value="2016-02-09" calcext:value-type="date">
            <text:p>Feb</text:p>
          </table:table-cell>
          <table:table-cell table:style-name="ce43" table:formula="of:=[.NB3]" office:value-type="date" office:date-value="2016-02-10" calcext:value-type="date">
            <text:p>Feb</text:p>
          </table:table-cell>
          <table:table-cell table:style-name="ce43" table:formula="of:=[.NC3]" office:value-type="date" office:date-value="2016-02-11" calcext:value-type="date">
            <text:p>Feb</text:p>
          </table:table-cell>
          <table:table-cell table:style-name="ce43" table:formula="of:=[.ND3]" office:value-type="date" office:date-value="2016-02-12" calcext:value-type="date">
            <text:p>Feb</text:p>
          </table:table-cell>
          <table:table-cell table:style-name="ce47" table:formula="of:=[.NE3]" office:value-type="date" office:date-value="2016-02-13" calcext:value-type="date">
            <text:p>Feb</text:p>
          </table:table-cell>
          <table:table-cell table:style-name="ce53" table:formula="of:=[.NF3]" office:value-type="date" office:date-value="2016-02-14" calcext:value-type="date">
            <text:p>Feb</text:p>
          </table:table-cell>
          <table:table-cell table:style-name="ce43" table:formula="of:=[.NG3]" office:value-type="date" office:date-value="2016-02-15" calcext:value-type="date">
            <text:p>Feb</text:p>
          </table:table-cell>
          <table:table-cell table:style-name="ce43" table:formula="of:=[.NH3]" office:value-type="date" office:date-value="2016-02-16" calcext:value-type="date">
            <text:p>Feb</text:p>
          </table:table-cell>
          <table:table-cell table:style-name="ce43" table:formula="of:=[.NI3]" office:value-type="date" office:date-value="2016-02-17" calcext:value-type="date">
            <text:p>Feb</text:p>
          </table:table-cell>
          <table:table-cell table:style-name="ce43" table:formula="of:=[.NJ3]" office:value-type="date" office:date-value="2016-02-18" calcext:value-type="date">
            <text:p>Feb</text:p>
          </table:table-cell>
          <table:table-cell table:style-name="ce43" table:formula="of:=[.NK3]" office:value-type="date" office:date-value="2016-02-19" calcext:value-type="date">
            <text:p>Feb</text:p>
          </table:table-cell>
          <table:table-cell table:style-name="ce47" table:formula="of:=[.NL3]" office:value-type="date" office:date-value="2016-02-20" calcext:value-type="date">
            <text:p>Feb</text:p>
          </table:table-cell>
          <table:table-cell table:style-name="ce53" table:formula="of:=[.NM3]" office:value-type="date" office:date-value="2016-02-21" calcext:value-type="date">
            <text:p>Feb</text:p>
          </table:table-cell>
          <table:table-cell table:style-name="ce43" table:formula="of:=[.NN3]" office:value-type="date" office:date-value="2016-02-22" calcext:value-type="date">
            <text:p>Feb</text:p>
          </table:table-cell>
          <table:table-cell table:style-name="ce43" table:formula="of:=[.NO3]" office:value-type="date" office:date-value="2016-02-23" calcext:value-type="date">
            <text:p>Feb</text:p>
          </table:table-cell>
          <table:table-cell table:style-name="ce43" table:formula="of:=[.NP3]" office:value-type="date" office:date-value="2016-02-24" calcext:value-type="date">
            <text:p>Feb</text:p>
          </table:table-cell>
          <table:table-cell table:style-name="ce43" table:formula="of:=[.NQ3]" office:value-type="date" office:date-value="2016-02-25" calcext:value-type="date">
            <text:p>Feb</text:p>
          </table:table-cell>
          <table:table-cell table:style-name="ce43" table:formula="of:=[.NR3]" office:value-type="date" office:date-value="2016-02-26" calcext:value-type="date">
            <text:p>Feb</text:p>
          </table:table-cell>
          <table:table-cell table:style-name="ce47" table:formula="of:=[.NS3]" office:value-type="date" office:date-value="2016-02-27" calcext:value-type="date">
            <text:p>Feb</text:p>
          </table:table-cell>
          <table:table-cell table:style-name="ce53" table:formula="of:=[.NT3]" office:value-type="date" office:date-value="2016-02-28" calcext:value-type="date">
            <text:p>Feb</text:p>
          </table:table-cell>
          <table:table-cell table:style-name="ce43" table:formula="of:=[.NU3]" office:value-type="date" office:date-value="2016-02-29" calcext:value-type="date">
            <text:p>Feb</text:p>
          </table:table-cell>
          <table:table-cell table:style-name="ce43" table:formula="of:=[.NV3]" office:value-type="date" office:date-value="2016-03-01" calcext:value-type="date">
            <text:p>Mar</text:p>
          </table:table-cell>
          <table:table-cell table:style-name="ce43" table:formula="of:=[.NW3]" office:value-type="date" office:date-value="2016-03-02" calcext:value-type="date">
            <text:p>Mar</text:p>
          </table:table-cell>
          <table:table-cell table:style-name="ce43" table:formula="of:=[.NX3]" office:value-type="date" office:date-value="2016-03-03" calcext:value-type="date">
            <text:p>Mar</text:p>
          </table:table-cell>
          <table:table-cell table:style-name="ce43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style-name="ce48" table:formula="of:=[.LG3]+1" office:value-type="date" office:date-value="2015-12-26" calcext:value-type="date">
            <text:p>Sat</text:p>
          </table:table-cell>
          <table:table-cell table:style-name="ce54" table:formula="of:=[.LH3]+1" office:value-type="date" office:date-value="2015-12-27" calcext:value-type="date">
            <text:p>Sun</text:p>
          </table:table-cell>
          <table:table-cell table:style-name="ce44" table:formula="of:=[.LI3]+1" office:value-type="date" office:date-value="2015-12-28" calcext:value-type="date">
            <text:p>Mon</text:p>
          </table:table-cell>
          <table:table-cell table:style-name="ce44" table:formula="of:=[.LJ3]+1" office:value-type="date" office:date-value="2015-12-29" calcext:value-type="date">
            <text:p>Tue</text:p>
          </table:table-cell>
          <table:table-cell table:style-name="ce44" table:formula="of:=[.LK3]+1" office:value-type="date" office:date-value="2015-12-30" calcext:value-type="date">
            <text:p>Wed</text:p>
          </table:table-cell>
          <table:table-cell table:style-name="ce44" table:formula="of:=[.LL3]+1" office:value-type="date" office:date-value="2015-12-31" calcext:value-type="date">
            <text:p>Thu</text:p>
          </table:table-cell>
          <table:table-cell table:style-name="ce58" table:formula="of:=[.LM3]+1" office:value-type="date" office:date-value="2016-01-01" calcext:value-type="date">
            <text:p>Fri</text:p>
          </table:table-cell>
          <table:table-cell table:style-name="ce48" table:formula="of:=[.LN3]+1" office:value-type="date" office:date-value="2016-01-02" calcext:value-type="date">
            <text:p>Sat</text:p>
          </table:table-cell>
          <table:table-cell table:style-name="ce54" table:formula="of:=[.LO3]+1" office:value-type="date" office:date-value="2016-01-03" calcext:value-type="date">
            <text:p>Sun</text:p>
          </table:table-cell>
          <table:table-cell table:style-name="ce44" table:formula="of:=[.LP3]+1" office:value-type="date" office:date-value="2016-01-04" calcext:value-type="date">
            <text:p>Mon</text:p>
          </table:table-cell>
          <table:table-cell table:style-name="ce44" table:formula="of:=[.LQ3]+1" office:value-type="date" office:date-value="2016-01-05" calcext:value-type="date">
            <text:p>Tue</text:p>
          </table:table-cell>
          <table:table-cell table:style-name="ce44" table:formula="of:=[.LR3]+1" office:value-type="date" office:date-value="2016-01-06" calcext:value-type="date">
            <text:p>Wed</text:p>
          </table:table-cell>
          <table:table-cell table:style-name="ce44" table:formula="of:=[.LS3]+1" office:value-type="date" office:date-value="2016-01-07" calcext:value-type="date">
            <text:p>Thu</text:p>
          </table:table-cell>
          <table:table-cell table:style-name="ce44" table:formula="of:=[.LT3]+1" office:value-type="date" office:date-value="2016-01-08" calcext:value-type="date">
            <text:p>Fri</text:p>
          </table:table-cell>
          <table:table-cell table:style-name="ce48" table:formula="of:=[.LU3]+1" office:value-type="date" office:date-value="2016-01-09" calcext:value-type="date">
            <text:p>Sat</text:p>
          </table:table-cell>
          <table:table-cell table:style-name="ce54" table:formula="of:=[.LV3]+1" office:value-type="date" office:date-value="2016-01-10" calcext:value-type="date">
            <text:p>Sun</text:p>
          </table:table-cell>
          <table:table-cell table:style-name="ce44" table:formula="of:=[.LW3]+1" office:value-type="date" office:date-value="2016-01-11" calcext:value-type="date">
            <text:p>Mon</text:p>
          </table:table-cell>
          <table:table-cell table:style-name="ce44" table:formula="of:=[.LX3]+1" office:value-type="date" office:date-value="2016-01-12" calcext:value-type="date">
            <text:p>Tue</text:p>
          </table:table-cell>
          <table:table-cell table:style-name="ce44" table:formula="of:=[.LY3]+1" office:value-type="date" office:date-value="2016-01-13" calcext:value-type="date">
            <text:p>Wed</text:p>
          </table:table-cell>
          <table:table-cell table:style-name="ce44" table:formula="of:=[.LZ3]+1" office:value-type="date" office:date-value="2016-01-14" calcext:value-type="date">
            <text:p>Thu</text:p>
          </table:table-cell>
          <table:table-cell table:style-name="ce44" table:formula="of:=[.MA3]+1" office:value-type="date" office:date-value="2016-01-15" calcext:value-type="date">
            <text:p>Fri</text:p>
          </table:table-cell>
          <table:table-cell table:style-name="ce48" table:formula="of:=[.MB3]+1" office:value-type="date" office:date-value="2016-01-16" calcext:value-type="date">
            <text:p>Sat</text:p>
          </table:table-cell>
          <table:table-cell table:style-name="ce54" table:formula="of:=[.MC3]+1" office:value-type="date" office:date-value="2016-01-17" calcext:value-type="date">
            <text:p>Sun</text:p>
          </table:table-cell>
          <table:table-cell table:style-name="ce44" table:formula="of:=[.MD3]+1" office:value-type="date" office:date-value="2016-01-18" calcext:value-type="date">
            <text:p>Mon</text:p>
          </table:table-cell>
          <table:table-cell table:style-name="ce44" table:formula="of:=[.ME3]+1" office:value-type="date" office:date-value="2016-01-19" calcext:value-type="date">
            <text:p>Tue</text:p>
          </table:table-cell>
          <table:table-cell table:style-name="ce44" table:formula="of:=[.MF3]+1" office:value-type="date" office:date-value="2016-01-20" calcext:value-type="date">
            <text:p>Wed</text:p>
          </table:table-cell>
          <table:table-cell table:style-name="ce44" table:formula="of:=[.MG3]+1" office:value-type="date" office:date-value="2016-01-21" calcext:value-type="date">
            <text:p>Thu</text:p>
          </table:table-cell>
          <table:table-cell table:style-name="ce44" table:formula="of:=[.MH3]+1" office:value-type="date" office:date-value="2016-01-22" calcext:value-type="date">
            <text:p>Fri</text:p>
          </table:table-cell>
          <table:table-cell table:style-name="ce48" table:formula="of:=[.MI3]+1" office:value-type="date" office:date-value="2016-01-23" calcext:value-type="date">
            <text:p>Sat</text:p>
          </table:table-cell>
          <table:table-cell table:style-name="ce54" table:formula="of:=[.MJ3]+1" office:value-type="date" office:date-value="2016-01-24" calcext:value-type="date">
            <text:p>Sun</text:p>
          </table:table-cell>
          <table:table-cell table:style-name="ce44" table:formula="of:=[.MK3]+1" office:value-type="date" office:date-value="2016-01-25" calcext:value-type="date">
            <text:p>Mon</text:p>
          </table:table-cell>
          <table:table-cell table:style-name="ce44" table:formula="of:=[.ML3]+1" office:value-type="date" office:date-value="2016-01-26" calcext:value-type="date">
            <text:p>Tue</text:p>
          </table:table-cell>
          <table:table-cell table:style-name="ce44" table:formula="of:=[.MM3]+1" office:value-type="date" office:date-value="2016-01-27" calcext:value-type="date">
            <text:p>Wed</text:p>
          </table:table-cell>
          <table:table-cell table:style-name="ce44" table:formula="of:=[.MN3]+1" office:value-type="date" office:date-value="2016-01-28" calcext:value-type="date">
            <text:p>Thu</text:p>
          </table:table-cell>
          <table:table-cell table:style-name="ce44" table:formula="of:=[.MO3]+1" office:value-type="date" office:date-value="2016-01-29" calcext:value-type="date">
            <text:p>Fri</text:p>
          </table:table-cell>
          <table:table-cell table:style-name="ce48" table:formula="of:=[.MP3]+1" office:value-type="date" office:date-value="2016-01-30" calcext:value-type="date">
            <text:p>Sat</text:p>
          </table:table-cell>
          <table:table-cell table:style-name="ce54" table:formula="of:=[.MQ3]+1" office:value-type="date" office:date-value="2016-01-31" calcext:value-type="date">
            <text:p>Sun</text:p>
          </table:table-cell>
          <table:table-cell table:style-name="ce44" table:formula="of:=[.MR3]+1" office:value-type="date" office:date-value="2016-02-01" calcext:value-type="date">
            <text:p>Mon</text:p>
          </table:table-cell>
          <table:table-cell table:style-name="ce44" table:formula="of:=[.MS3]+1" office:value-type="date" office:date-value="2016-02-02" calcext:value-type="date">
            <text:p>Tue</text:p>
          </table:table-cell>
          <table:table-cell table:style-name="ce44" table:formula="of:=[.MT3]+1" office:value-type="date" office:date-value="2016-02-03" calcext:value-type="date">
            <text:p>Wed</text:p>
          </table:table-cell>
          <table:table-cell table:style-name="ce44" table:formula="of:=[.MU3]+1" office:value-type="date" office:date-value="2016-02-04" calcext:value-type="date">
            <text:p>Thu</text:p>
          </table:table-cell>
          <table:table-cell table:style-name="ce44" table:formula="of:=[.MV3]+1" office:value-type="date" office:date-value="2016-02-05" calcext:value-type="date">
            <text:p>Fri</text:p>
          </table:table-cell>
          <table:table-cell table:style-name="ce48" table:formula="of:=[.MW3]+1" office:value-type="date" office:date-value="2016-02-06" calcext:value-type="date">
            <text:p>Sat</text:p>
          </table:table-cell>
          <table:table-cell table:style-name="ce54" table:formula="of:=[.MX3]+1" office:value-type="date" office:date-value="2016-02-07" calcext:value-type="date">
            <text:p>Sun</text:p>
          </table:table-cell>
          <table:table-cell table:style-name="ce44" table:formula="of:=[.MY3]+1" office:value-type="date" office:date-value="2016-02-08" calcext:value-type="date">
            <text:p>Mon</text:p>
          </table:table-cell>
          <table:table-cell table:style-name="ce44" table:formula="of:=[.MZ3]+1" office:value-type="date" office:date-value="2016-02-09" calcext:value-type="date">
            <text:p>Tue</text:p>
          </table:table-cell>
          <table:table-cell table:style-name="ce44" table:formula="of:=[.NA3]+1" office:value-type="date" office:date-value="2016-02-10" calcext:value-type="date">
            <text:p>Wed</text:p>
          </table:table-cell>
          <table:table-cell table:style-name="ce44" table:formula="of:=[.NB3]+1" office:value-type="date" office:date-value="2016-02-11" calcext:value-type="date">
            <text:p>Thu</text:p>
          </table:table-cell>
          <table:table-cell table:style-name="ce44" table:formula="of:=[.NC3]+1" office:value-type="date" office:date-value="2016-02-12" calcext:value-type="date">
            <text:p>Fri</text:p>
          </table:table-cell>
          <table:table-cell table:style-name="ce48" table:formula="of:=[.ND3]+1" office:value-type="date" office:date-value="2016-02-13" calcext:value-type="date">
            <text:p>Sat</text:p>
          </table:table-cell>
          <table:table-cell table:style-name="ce54" table:formula="of:=[.NE3]+1" office:value-type="date" office:date-value="2016-02-14" calcext:value-type="date">
            <text:p>Sun</text:p>
          </table:table-cell>
          <table:table-cell table:style-name="ce44" table:formula="of:=[.NF3]+1" office:value-type="date" office:date-value="2016-02-15" calcext:value-type="date">
            <text:p>Mon</text:p>
          </table:table-cell>
          <table:table-cell table:style-name="ce44" table:formula="of:=[.NG3]+1" office:value-type="date" office:date-value="2016-02-16" calcext:value-type="date">
            <text:p>Tue</text:p>
          </table:table-cell>
          <table:table-cell table:style-name="ce44" table:formula="of:=[.NH3]+1" office:value-type="date" office:date-value="2016-02-17" calcext:value-type="date">
            <text:p>Wed</text:p>
          </table:table-cell>
          <table:table-cell table:style-name="ce44" table:formula="of:=[.NI3]+1" office:value-type="date" office:date-value="2016-02-18" calcext:value-type="date">
            <text:p>Thu</text:p>
          </table:table-cell>
          <table:table-cell table:style-name="ce44" table:formula="of:=[.NJ3]+1" office:value-type="date" office:date-value="2016-02-19" calcext:value-type="date">
            <text:p>Fri</text:p>
          </table:table-cell>
          <table:table-cell table:style-name="ce48" table:formula="of:=[.NK3]+1" office:value-type="date" office:date-value="2016-02-20" calcext:value-type="date">
            <text:p>Sat</text:p>
          </table:table-cell>
          <table:table-cell table:style-name="ce54" table:formula="of:=[.NL3]+1" office:value-type="date" office:date-value="2016-02-21" calcext:value-type="date">
            <text:p>Sun</text:p>
          </table:table-cell>
          <table:table-cell table:style-name="ce44" table:formula="of:=[.NM3]+1" office:value-type="date" office:date-value="2016-02-22" calcext:value-type="date">
            <text:p>Mon</text:p>
          </table:table-cell>
          <table:table-cell table:style-name="ce44" table:formula="of:=[.NN3]+1" office:value-type="date" office:date-value="2016-02-23" calcext:value-type="date">
            <text:p>Tue</text:p>
          </table:table-cell>
          <table:table-cell table:style-name="ce44" table:formula="of:=[.NO3]+1" office:value-type="date" office:date-value="2016-02-24" calcext:value-type="date">
            <text:p>Wed</text:p>
          </table:table-cell>
          <table:table-cell table:style-name="ce44" table:formula="of:=[.NP3]+1" office:value-type="date" office:date-value="2016-02-25" calcext:value-type="date">
            <text:p>Thu</text:p>
          </table:table-cell>
          <table:table-cell table:style-name="ce44" table:formula="of:=[.NQ3]+1" office:value-type="date" office:date-value="2016-02-26" calcext:value-type="date">
            <text:p>Fri</text:p>
          </table:table-cell>
          <table:table-cell table:style-name="ce48" table:formula="of:=[.NR3]+1" office:value-type="date" office:date-value="2016-02-27" calcext:value-type="date">
            <text:p>Sat</text:p>
          </table:table-cell>
          <table:table-cell table:style-name="ce54" table:formula="of:=[.NS3]+1" office:value-type="date" office:date-value="2016-02-28" calcext:value-type="date">
            <text:p>Sun</text:p>
          </table:table-cell>
          <table:table-cell table:style-name="ce44" table:formula="of:=[.NT3]+1" office:value-type="date" office:date-value="2016-02-29" calcext:value-type="date">
            <text:p>Mon</text:p>
          </table:table-cell>
          <table:table-cell table:style-name="ce44" table:formula="of:=[.NU3]+1" office:value-type="date" office:date-value="2016-03-01" calcext:value-type="date">
            <text:p>Tue</text:p>
          </table:table-cell>
          <table:table-cell table:style-name="ce44" table:formula="of:=[.NV3]+1" office:value-type="date" office:date-value="2016-03-02" calcext:value-type="date">
            <text:p>Wed</text:p>
          </table:table-cell>
          <table:table-cell table:style-name="ce44" table:formula="of:=[.NW3]+1" office:value-type="date" office:date-value="2016-03-03" calcext:value-type="date">
            <text:p>Thu</text:p>
          </table:table-cell>
          <table:table-cell table:style-name="ce44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34" table:formula="of:=[.B5]/[.B4]" office:value-type="percentage" office:value="0.242087254063302" calcext:value-type="percentage">
            <text:p>24.2%</text:p>
          </table:table-cell>
          <table:table-cell table:style-name="ce35" table:formula="of:=SUM([.B5:.B51])" office:value-type="float" office:value="233.8" calcext:value-type="float">
            <text:p>234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 office:value-type="float" office:value="0.7" calcext:value-type="float">
            <text:p>0.7</text:p>
          </table:table-cell>
          <table:table-cell table:style-name="ce49" table:formula="of:=IF(SUM([.IJ5:.IJ51])=0;&quot;&quot;;SUM([.IJ5:.IJ51]))" office:value-type="float" office:value="0.4" calcext:value-type="float">
            <text:p>0.4</text:p>
          </table:table-cell>
          <table:table-cell table:style-name="ce55" table:formula="of:=IF(SUM([.IK5:.IK51])=0;&quot;&quot;;SUM([.IK5:.IK51]))" office:value-type="float" office:value="0.9" calcext:value-type="float">
            <text:p>0.9</text:p>
          </table:table-cell>
          <table:table-cell table:style-name="ce55" table:formula="of:=IF(SUM([.IL5:.IL51])=0;&quot;&quot;;SUM([.IL5:.IL51]))" office:value-type="float" office:value="0.8" calcext:value-type="float">
            <text:p>0.8</text:p>
          </table:table-cell>
          <table:table-cell table:style-name="ce55" table:formula="of:=IF(SUM([.IM5:.IM51])=0;&quot;&quot;;SUM([.IM5:.IM51]))" office:value-type="float" office:value="0.6" calcext:value-type="float">
            <text:p>0.6</text:p>
          </table:table-cell>
          <table:table-cell table:style-name="ce55" table:formula="of:=IF(SUM([.IN5:.IN51])=0;&quot;&quot;;SUM([.IN5:.IN51]))" office:value-type="float" office:value="1" calcext:value-type="float">
            <text:p>1.0</text:p>
          </table:table-cell>
          <table:table-cell table:style-name="ce55" table:formula="of:=IF(SUM([.IO5:.IO51])=0;&quot;&quot;;SUM([.IO5:.IO51]))" office:value-type="float" office:value="1" calcext:value-type="float">
            <text:p>1.0</text:p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 office:value-type="float" office:value="0.6" calcext:value-type="float">
            <text:p>0.6</text:p>
          </table:table-cell>
          <table:table-cell table:style-name="ce55" table:formula="of:=IF(SUM([.IR5:.IR51])=0;&quot;&quot;;SUM([.IR5:.IR51]))" office:value-type="float" office:value="0.8" calcext:value-type="float">
            <text:p>0.8</text:p>
          </table:table-cell>
          <table:table-cell table:style-name="ce55" table:formula="of:=IF(SUM([.IS5:.IS51])=0;&quot;&quot;;SUM([.IS5:.IS51]))" office:value-type="float" office:value="0.5" calcext:value-type="float">
            <text:p>0.5</text:p>
          </table:table-cell>
          <table:table-cell table:style-name="ce55" table:formula="of:=IF(SUM([.IT5:.IT51])=0;&quot;&quot;;SUM([.IT5:.IT51]))" office:value-type="float" office:value="0.5" calcext:value-type="float">
            <text:p>0.5</text:p>
          </table:table-cell>
          <table:table-cell table:style-name="ce55" table:formula="of:=IF(SUM([.IU5:.IU51])=0;&quot;&quot;;SUM([.IU5:.IU51]))" office:value-type="float" office:value="0.6" calcext:value-type="float">
            <text:p>0.6</text:p>
          </table:table-cell>
          <table:table-cell table:style-name="ce55" table:formula="of:=IF(SUM([.IV5:.IV51])=0;&quot;&quot;;SUM([.IV5:.IV51]))" office:value-type="float" office:value="0.6" calcext:value-type="float">
            <text:p>0.6</text:p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 office:value-type="float" office:value="0.9" calcext:value-type="float">
            <text:p>0.9</text:p>
          </table:table-cell>
          <table:table-cell table:style-name="ce55" table:formula="of:=IF(SUM([.IZ5:.IZ51])=0;&quot;&quot;;SUM([.IZ5:.IZ51]))" office:value-type="float" office:value="1" calcext:value-type="float">
            <text:p>1.0</text:p>
          </table:table-cell>
          <table:table-cell table:style-name="ce55" table:formula="of:=IF(SUM([.JA5:.JA51])=0;&quot;&quot;;SUM([.JA5:.JA51]))" office:value-type="float" office:value="1" calcext:value-type="float">
            <text:p>1.0</text:p>
          </table:table-cell>
          <table:table-cell table:style-name="ce55" table:formula="of:=IF(SUM([.JB5:.JB51])=0;&quot;&quot;;SUM([.JB5:.JB51]))" office:value-type="float" office:value="1" calcext:value-type="float">
            <text:p>1.0</text:p>
          </table:table-cell>
          <table:table-cell table:style-name="ce55" table:formula="of:=IF(SUM([.JC5:.JC51])=0;&quot;&quot;;SUM([.JC5:.JC51]))" office:value-type="float" office:value="0.9" calcext:value-type="float">
            <text:p>0.9</text:p>
          </table:table-cell>
          <table:table-cell table:style-name="ce49" table:formula="of:=IF(SUM([.JD5:.JD51])=0;&quot;&quot;;SUM([.JD5:.JD51]))" office:value-type="float" office:value="0.3" calcext:value-type="float">
            <text:p>0.3</text:p>
          </table:table-cell>
          <table:table-cell table:style-name="ce49" table:formula="of:=IF(SUM([.JE5:.JE51])=0;&quot;&quot;;SUM([.JE5:.JE51]))" office:value-type="float" office:value="0.2" calcext:value-type="float">
            <text:p>0.2</text:p>
          </table:table-cell>
          <table:table-cell table:style-name="ce55" table:formula="of:=IF(SUM([.JF5:.JF51])=0;&quot;&quot;;SUM([.JF5:.JF51]))" office:value-type="float" office:value="1" calcext:value-type="float">
            <text:p>1.0</text:p>
          </table:table-cell>
          <table:table-cell table:style-name="ce55" table:formula="of:=IF(SUM([.JG5:.JG51])=0;&quot;&quot;;SUM([.JG5:.JG51]))" office:value-type="float" office:value="1" calcext:value-type="float">
            <text:p>1.0</text:p>
          </table:table-cell>
          <table:table-cell table:style-name="ce55" table:formula="of:=IF(SUM([.JH5:.JH51])=0;&quot;&quot;;SUM([.JH5:.JH51]))" office:value-type="float" office:value="1" calcext:value-type="float">
            <text:p>1.0</text:p>
          </table:table-cell>
          <table:table-cell table:style-name="ce55" table:formula="of:=IF(SUM([.JI5:.JI51])=0;&quot;&quot;;SUM([.JI5:.JI51]))" office:value-type="float" office:value="0.5" calcext:value-type="float">
            <text:p>0.5</text:p>
          </table:table-cell>
          <table:table-cell table:style-name="ce55" table:formula="of:=IF(SUM([.JJ5:.JJ51])=0;&quot;&quot;;SUM([.JJ5:.JJ51]))" office:value-type="float" office:value="0.7" calcext:value-type="float">
            <text:p>0.7</text:p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 office:value-type="float" office:value="0.3" calcext:value-type="float">
            <text:p>0.3</text:p>
          </table:table-cell>
          <table:table-cell table:style-name="ce55" table:formula="of:=IF(SUM([.JM5:.JM51])=0;&quot;&quot;;SUM([.JM5:.JM51]))" office:value-type="float" office:value="1" calcext:value-type="float">
            <text:p>1.0</text:p>
          </table:table-cell>
          <table:table-cell table:style-name="ce55" table:formula="of:=IF(SUM([.JN5:.JN51])=0;&quot;&quot;;SUM([.JN5:.JN51]))" office:value-type="float" office:value="1" calcext:value-type="float">
            <text:p>1.0</text:p>
          </table:table-cell>
          <table:table-cell table:style-name="ce55" table:formula="of:=IF(SUM([.JO5:.JO51])=0;&quot;&quot;;SUM([.JO5:.JO51]))" office:value-type="float" office:value="1" calcext:value-type="float">
            <text:p>1.0</text:p>
          </table:table-cell>
          <table:table-cell table:style-name="ce55" table:formula="of:=IF(SUM([.JP5:.JP51])=0;&quot;&quot;;SUM([.JP5:.JP51]))" office:value-type="float" office:value="1" calcext:value-type="float">
            <text:p>1.0</text:p>
          </table:table-cell>
          <table:table-cell table:style-name="ce55" table:formula="of:=IF(SUM([.JQ5:.JQ51])=0;&quot;&quot;;SUM([.JQ5:.JQ51]))" office:value-type="float" office:value="1" calcext:value-type="float">
            <text:p>1.0</text:p>
          </table:table-cell>
          <table:table-cell table:style-name="ce49" table:formula="of:=IF(SUM([.JR5:.JR51])=0;&quot;&quot;;SUM([.JR5:.JR51]))" office:value-type="float" office:value="1" calcext:value-type="float">
            <text:p>1.0</text:p>
          </table:table-cell>
          <table:table-cell table:style-name="ce49" table:formula="of:=IF(SUM([.JS5:.JS51])=0;&quot;&quot;;SUM([.JS5:.JS51]))" office:value-type="float" office:value="1" calcext:value-type="float">
            <text:p>1.0</text:p>
          </table:table-cell>
          <table:table-cell table:style-name="ce55" table:formula="of:=IF(SUM([.JT5:.JT51])=0;&quot;&quot;;SUM([.JT5:.JT51]))" office:value-type="float" office:value="1" calcext:value-type="float">
            <text:p>1.0</text:p>
          </table:table-cell>
          <table:table-cell table:style-name="ce55" table:formula="of:=IF(SUM([.JU5:.JU51])=0;&quot;&quot;;SUM([.JU5:.JU51]))" office:value-type="float" office:value="1" calcext:value-type="float">
            <text:p>1.0</text:p>
          </table:table-cell>
          <table:table-cell table:style-name="ce55" table:formula="of:=IF(SUM([.JV5:.JV51])=0;&quot;&quot;;SUM([.JV5:.JV51]))" office:value-type="float" office:value="1" calcext:value-type="float">
            <text:p>1.0</text:p>
          </table:table-cell>
          <table:table-cell table:style-name="ce55" table:formula="of:=IF(SUM([.JW5:.JW51])=0;&quot;&quot;;SUM([.JW5:.JW51]))" office:value-type="float" office:value="1" calcext:value-type="float">
            <text:p>1.0</text:p>
          </table:table-cell>
          <table:table-cell table:style-name="ce55" table:formula="of:=IF(SUM([.JX5:.JX51])=0;&quot;&quot;;SUM([.JX5:.JX51]))" office:value-type="float" office:value="0.6" calcext:value-type="float">
            <text:p>0.6</text:p>
          </table:table-cell>
          <table:table-cell table:style-name="ce49" table:formula="of:=IF(SUM([.JY5:.JY51])=0;&quot;&quot;;SUM([.JY5:.JY51]))" office:value-type="float" office:value="0.4" calcext:value-type="float">
            <text:p>0.4</text:p>
          </table:table-cell>
          <table:table-cell table:style-name="ce49" table:formula="of:=IF(SUM([.JZ5:.JZ51])=0;&quot;&quot;;SUM([.JZ5:.JZ51]))" office:value-type="float" office:value="0.3" calcext:value-type="float">
            <text:p>0.3</text:p>
          </table:table-cell>
          <table:table-cell table:style-name="ce55" table:formula="of:=IF(SUM([.KA5:.KA51])=0;&quot;&quot;;SUM([.KA5:.KA51]))" office:value-type="float" office:value="1" calcext:value-type="float">
            <text:p>1.0</text:p>
          </table:table-cell>
          <table:table-cell table:style-name="ce55" table:formula="of:=IF(SUM([.KB5:.KB51])=0;&quot;&quot;;SUM([.KB5:.KB51]))" office:value-type="float" office:value="1" calcext:value-type="float">
            <text:p>1.0</text:p>
          </table:table-cell>
          <table:table-cell table:style-name="ce55" table:formula="of:=IF(SUM([.KC5:.KC51])=0;&quot;&quot;;SUM([.KC5:.KC51]))" office:value-type="float" office:value="1" calcext:value-type="float">
            <text:p>1.0</text:p>
          </table:table-cell>
          <table:table-cell table:style-name="ce55" table:formula="of:=IF(SUM([.KD5:.KD51])=0;&quot;&quot;;SUM([.KD5:.KD51]))" office:value-type="float" office:value="1" calcext:value-type="float">
            <text:p>1.0</text:p>
          </table:table-cell>
          <table:table-cell table:style-name="ce55" table:formula="of:=IF(SUM([.KE5:.KE51])=0;&quot;&quot;;SUM([.KE5:.KE51]))" office:value-type="float" office:value="1" calcext:value-type="float">
            <text:p>1.0</text:p>
          </table:table-cell>
          <table:table-cell table:style-name="ce49" table:formula="of:=IF(SUM([.KF5:.KF51])=0;&quot;&quot;;SUM([.KF5:.KF51]))" office:value-type="float" office:value="0.8" calcext:value-type="float">
            <text:p>0.8</text:p>
          </table:table-cell>
          <table:table-cell table:style-name="ce49" table:formula="of:=IF(SUM([.KG5:.KG51])=0;&quot;&quot;;SUM([.KG5:.KG51]))" office:value-type="float" office:value="0.3" calcext:value-type="float">
            <text:p>0.3</text:p>
          </table:table-cell>
          <table:table-cell table:style-name="ce55" table:formula="of:=IF(SUM([.KH5:.KH51])=0;&quot;&quot;;SUM([.KH5:.KH51]))" office:value-type="float" office:value="0.6" calcext:value-type="float">
            <text:p>0.6</text:p>
          </table:table-cell>
          <table:table-cell table:style-name="ce55" table:formula="of:=IF(SUM([.KI5:.KI51])=0;&quot;&quot;;SUM([.KI5:.KI51]))" office:value-type="float" office:value="0.6" calcext:value-type="float">
            <text:p>0.6</text:p>
          </table:table-cell>
          <table:table-cell table:style-name="ce55" table:formula="of:=IF(SUM([.KJ5:.KJ51])=0;&quot;&quot;;SUM([.KJ5:.KJ51]))" office:value-type="float" office:value="0.4" calcext:value-type="float">
            <text:p>0.4</text:p>
          </table:table-cell>
          <table:table-cell table:style-name="ce55" table:formula="of:=IF(SUM([.KK5:.KK51])=0;&quot;&quot;;SUM([.KK5:.KK51]))" office:value-type="float" office:value="0.7" calcext:value-type="float">
            <text:p>0.7</text:p>
          </table:table-cell>
          <table:table-cell table:style-name="ce55" table:formula="of:=IF(SUM([.KL5:.KL51])=0;&quot;&quot;;SUM([.KL5:.KL51]))" office:value-type="float" office:value="0.4" calcext:value-type="float">
            <text:p>0.4</text:p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 office:value-type="float" office:value="0.6" calcext:value-type="float">
            <text:p>0.6</text:p>
          </table:table-cell>
          <table:table-cell table:style-name="ce49" table:formula="of:=IF(SUM([.LH5:.LH51])=0;&quot;&quot;;SUM([.LH5:.LH51]))" office:value-type="float" office:value="0.5" calcext:value-type="float">
            <text:p>0.5</text:p>
          </table:table-cell>
          <table:table-cell table:style-name="ce49" table:formula="of:=IF(SUM([.LI5:.LI51])=0;&quot;&quot;;SUM([.LI5:.LI51]))" office:value-type="float" office:value="0.5" calcext:value-type="float">
            <text:p>0.5</text:p>
          </table:table-cell>
          <table:table-cell table:style-name="ce55" table:formula="of:=IF(SUM([.LJ5:.LJ51])=0;&quot;&quot;;SUM([.LJ5:.LJ51]))" office:value-type="float" office:value="0.5" calcext:value-type="float">
            <text:p>0.5</text:p>
          </table:table-cell>
          <table:table-cell table:style-name="ce55" table:formula="of:=IF(SUM([.LK5:.LK51])=0;&quot;&quot;;SUM([.LK5:.LK51]))" office:value-type="float" office:value="0.7" calcext:value-type="float">
            <text:p>0.7</text:p>
          </table:table-cell>
          <table:table-cell table:style-name="ce55" table:formula="of:=IF(SUM([.LL5:.LL51])=0;&quot;&quot;;SUM([.LL5:.LL51]))" office:value-type="float" office:value="0.4" calcext:value-type="float">
            <text:p>0.4</text:p>
          </table:table-cell>
          <table:table-cell table:style-name="ce55" table:formula="of:=IF(SUM([.LM5:.LM51])=0;&quot;&quot;;SUM([.LM5:.LM51]))" office:value-type="float" office:value="0.4" calcext:value-type="float">
            <text:p>0.4</text:p>
          </table:table-cell>
          <table:table-cell table:style-name="ce55" table:formula="of:=IF(SUM([.LN5:.LN51])=0;&quot;&quot;;SUM([.LN5:.LN51]))" office:value-type="float" office:value="0.5" calcext:value-type="float">
            <text:p>0.5</text:p>
          </table:table-cell>
          <table:table-cell table:style-name="ce49" table:formula="of:=IF(SUM([.LO5:.LO51])=0;&quot;&quot;;SUM([.LO5:.LO51]))" office:value-type="float" office:value="0.4" calcext:value-type="float">
            <text:p>0.4</text:p>
          </table:table-cell>
          <table:table-cell table:style-name="ce49" table:formula="of:=IF(SUM([.LP5:.LP51])=0;&quot;&quot;;SUM([.LP5:.LP51]))" office:value-type="float" office:value="0.4" calcext:value-type="float">
            <text:p>0.4</text:p>
          </table:table-cell>
          <table:table-cell table:style-name="ce55" table:formula="of:=IF(SUM([.LQ5:.LQ51])=0;&quot;&quot;;SUM([.LQ5:.LQ51]))" office:value-type="float" office:value="0.4" calcext:value-type="float">
            <text:p>0.4</text:p>
          </table:table-cell>
          <table:table-cell table:style-name="ce55" table:formula="of:=IF(SUM([.LR5:.LR51])=0;&quot;&quot;;SUM([.LR5:.LR51]))" office:value-type="float" office:value="1" calcext:value-type="float">
            <text:p>1.0</text:p>
          </table:table-cell>
          <table:table-cell table:style-name="ce55" table:formula="of:=IF(SUM([.LS5:.LS51])=0;&quot;&quot;;SUM([.LS5:.LS51]))" office:value-type="float" office:value="1.4" calcext:value-type="float">
            <text:p>1.4</text:p>
          </table:table-cell>
          <table:table-cell table:style-name="ce55" table:formula="of:=IF(SUM([.LT5:.LT51])=0;&quot;&quot;;SUM([.LT5:.LT51]))" office:value-type="float" office:value="1" calcext:value-type="float">
            <text:p>1.0</text:p>
          </table:table-cell>
          <table:table-cell table:style-name="ce55" table:formula="of:=IF(SUM([.LU5:.LU51])=0;&quot;&quot;;SUM([.LU5:.LU51]))">
            <text:p/>
          </table:table-cell>
          <table:table-cell table:style-name="ce49" table:formula="of:=IF(SUM([.LV5:.LV51])=0;&quot;&quot;;SUM([.LV5:.LV51]))">
            <text:p/>
          </table:table-cell>
          <table:table-cell table:style-name="ce49" table:formula="of:=IF(SUM([.LW5:.LW51])=0;&quot;&quot;;SUM([.LW5:.LW51]))">
            <text:p/>
          </table:table-cell>
          <table:table-cell table:style-name="ce55" table:formula="of:=IF(SUM([.LX5:.LX51])=0;&quot;&quot;;SUM([.LX5:.LX51]))">
            <text:p/>
          </table:table-cell>
          <table:table-cell table:style-name="ce55" table:formula="of:=IF(SUM([.LY5:.LY51])=0;&quot;&quot;;SUM([.LY5:.LY51]))">
            <text:p/>
          </table:table-cell>
          <table:table-cell table:style-name="ce55" table:formula="of:=IF(SUM([.LZ5:.LZ51])=0;&quot;&quot;;SUM([.LZ5:.LZ51]))">
            <text:p/>
          </table:table-cell>
          <table:table-cell table:style-name="ce55" table:formula="of:=IF(SUM([.MA5:.MA51])=0;&quot;&quot;;SUM([.MA5:.MA51]))">
            <text:p/>
          </table:table-cell>
          <table:table-cell table:style-name="ce55" table:formula="of:=IF(SUM([.MB5:.MB51])=0;&quot;&quot;;SUM([.MB5:.MB51]))">
            <text:p/>
          </table:table-cell>
          <table:table-cell table:style-name="ce49" table:formula="of:=IF(SUM([.MC5:.MC51])=0;&quot;&quot;;SUM([.MC5:.MC51]))">
            <text:p/>
          </table:table-cell>
          <table:table-cell table:style-name="ce49" table:formula="of:=IF(SUM([.MD5:.MD51])=0;&quot;&quot;;SUM([.MD5:.MD51]))">
            <text:p/>
          </table:table-cell>
          <table:table-cell table:style-name="ce55" table:formula="of:=IF(SUM([.ME5:.ME51])=0;&quot;&quot;;SUM([.ME5:.ME51]))">
            <text:p/>
          </table:table-cell>
          <table:table-cell table:style-name="ce55" table:formula="of:=IF(SUM([.MF5:.MF51])=0;&quot;&quot;;SUM([.MF5:.MF51]))">
            <text:p/>
          </table:table-cell>
          <table:table-cell table:style-name="ce55" table:formula="of:=IF(SUM([.MG5:.MG51])=0;&quot;&quot;;SUM([.MG5:.MG51]))">
            <text:p/>
          </table:table-cell>
          <table:table-cell table:style-name="ce55" table:formula="of:=IF(SUM([.MH5:.MH51])=0;&quot;&quot;;SUM([.MH5:.MH51]))">
            <text:p/>
          </table:table-cell>
          <table:table-cell table:style-name="ce55" table:formula="of:=IF(SUM([.MI5:.MI51])=0;&quot;&quot;;SUM([.MI5:.MI51]))">
            <text:p/>
          </table:table-cell>
          <table:table-cell table:style-name="ce49" table:formula="of:=IF(SUM([.MJ5:.MJ51])=0;&quot;&quot;;SUM([.MJ5:.MJ51]))">
            <text:p/>
          </table:table-cell>
          <table:table-cell table:style-name="ce49" table:formula="of:=IF(SUM([.MK5:.MK51])=0;&quot;&quot;;SUM([.MK5:.MK51]))">
            <text:p/>
          </table:table-cell>
          <table:table-cell table:style-name="ce55" table:formula="of:=IF(SUM([.ML5:.ML51])=0;&quot;&quot;;SUM([.ML5:.ML51]))">
            <text:p/>
          </table:table-cell>
          <table:table-cell table:style-name="ce55" table:formula="of:=IF(SUM([.MM5:.MM51])=0;&quot;&quot;;SUM([.MM5:.MM51]))">
            <text:p/>
          </table:table-cell>
          <table:table-cell table:style-name="ce55" table:formula="of:=IF(SUM([.MN5:.MN51])=0;&quot;&quot;;SUM([.MN5:.MN51]))">
            <text:p/>
          </table:table-cell>
          <table:table-cell table:style-name="ce55" table:formula="of:=IF(SUM([.MO5:.MO51])=0;&quot;&quot;;SUM([.MO5:.MO51]))">
            <text:p/>
          </table:table-cell>
          <table:table-cell table:style-name="ce55" table:formula="of:=IF(SUM([.MP5:.MP51])=0;&quot;&quot;;SUM([.MP5:.MP51]))">
            <text:p/>
          </table:table-cell>
          <table:table-cell table:style-name="ce49" table:formula="of:=IF(SUM([.MQ5:.MQ51])=0;&quot;&quot;;SUM([.MQ5:.MQ51]))">
            <text:p/>
          </table:table-cell>
          <table:table-cell table:style-name="ce49" table:formula="of:=IF(SUM([.MR5:.MR51])=0;&quot;&quot;;SUM([.MR5:.MR51]))">
            <text:p/>
          </table:table-cell>
          <table:table-cell table:style-name="ce55" table:formula="of:=IF(SUM([.MS5:.MS51])=0;&quot;&quot;;SUM([.MS5:.MS51]))">
            <text:p/>
          </table:table-cell>
          <table:table-cell table:style-name="ce55" table:formula="of:=IF(SUM([.MT5:.MT51])=0;&quot;&quot;;SUM([.MT5:.MT51]))">
            <text:p/>
          </table:table-cell>
          <table:table-cell table:style-name="ce55" table:formula="of:=IF(SUM([.MU5:.MU51])=0;&quot;&quot;;SUM([.MU5:.MU51]))">
            <text:p/>
          </table:table-cell>
          <table:table-cell table:style-name="ce55" table:formula="of:=IF(SUM([.MV5:.MV51])=0;&quot;&quot;;SUM([.MV5:.MV51]))">
            <text:p/>
          </table:table-cell>
          <table:table-cell table:style-name="ce55" table:formula="of:=IF(SUM([.MW5:.MW51])=0;&quot;&quot;;SUM([.MW5:.MW51]))">
            <text:p/>
          </table:table-cell>
          <table:table-cell table:style-name="ce49" table:formula="of:=IF(SUM([.MX5:.MX51])=0;&quot;&quot;;SUM([.MX5:.MX51]))">
            <text:p/>
          </table:table-cell>
          <table:table-cell table:style-name="ce49" table:formula="of:=IF(SUM([.MY5:.MY51])=0;&quot;&quot;;SUM([.MY5:.MY51]))">
            <text:p/>
          </table:table-cell>
          <table:table-cell table:style-name="ce55" table:formula="of:=IF(SUM([.MZ5:.MZ51])=0;&quot;&quot;;SUM([.MZ5:.MZ51]))">
            <text:p/>
          </table:table-cell>
          <table:table-cell table:style-name="ce55" table:formula="of:=IF(SUM([.NA5:.NA51])=0;&quot;&quot;;SUM([.NA5:.NA51]))">
            <text:p/>
          </table:table-cell>
          <table:table-cell table:style-name="ce55" table:formula="of:=IF(SUM([.NB5:.NB51])=0;&quot;&quot;;SUM([.NB5:.NB51]))">
            <text:p/>
          </table:table-cell>
          <table:table-cell table:style-name="ce55" table:formula="of:=IF(SUM([.NC5:.NC51])=0;&quot;&quot;;SUM([.NC5:.NC51]))">
            <text:p/>
          </table:table-cell>
          <table:table-cell table:style-name="ce55" table:formula="of:=IF(SUM([.ND5:.ND51])=0;&quot;&quot;;SUM([.ND5:.ND51]))">
            <text:p/>
          </table:table-cell>
          <table:table-cell table:style-name="ce49" table:formula="of:=IF(SUM([.NE5:.NE51])=0;&quot;&quot;;SUM([.NE5:.NE51]))">
            <text:p/>
          </table:table-cell>
          <table:table-cell table:style-name="ce49" table:formula="of:=IF(SUM([.NF5:.NF51])=0;&quot;&quot;;SUM([.NF5:.NF51]))">
            <text:p/>
          </table:table-cell>
          <table:table-cell table:style-name="ce55" table:formula="of:=IF(SUM([.NG5:.NG51])=0;&quot;&quot;;SUM([.NG5:.NG51]))">
            <text:p/>
          </table:table-cell>
          <table:table-cell table:style-name="ce55" table:formula="of:=IF(SUM([.NH5:.NH51])=0;&quot;&quot;;SUM([.NH5:.NH51]))">
            <text:p/>
          </table:table-cell>
          <table:table-cell table:style-name="ce55" table:formula="of:=IF(SUM([.NI5:.NI51])=0;&quot;&quot;;SUM([.NI5:.NI51]))">
            <text:p/>
          </table:table-cell>
          <table:table-cell table:style-name="ce55" table:formula="of:=IF(SUM([.NJ5:.NJ51])=0;&quot;&quot;;SUM([.NJ5:.NJ51]))">
            <text:p/>
          </table:table-cell>
          <table:table-cell table:style-name="ce55" table:formula="of:=IF(SUM([.NK5:.NK51])=0;&quot;&quot;;SUM([.NK5:.NK51]))">
            <text:p/>
          </table:table-cell>
          <table:table-cell table:style-name="ce49" table:formula="of:=IF(SUM([.NL5:.NL51])=0;&quot;&quot;;SUM([.NL5:.NL51]))">
            <text:p/>
          </table:table-cell>
          <table:table-cell table:style-name="ce49" table:formula="of:=IF(SUM([.NM5:.NM51])=0;&quot;&quot;;SUM([.NM5:.NM51]))">
            <text:p/>
          </table:table-cell>
          <table:table-cell table:style-name="ce55" table:formula="of:=IF(SUM([.NN5:.NN51])=0;&quot;&quot;;SUM([.NN5:.NN51]))">
            <text:p/>
          </table:table-cell>
          <table:table-cell table:style-name="ce55" table:formula="of:=IF(SUM([.NO5:.NO51])=0;&quot;&quot;;SUM([.NO5:.NO51]))">
            <text:p/>
          </table:table-cell>
          <table:table-cell table:style-name="ce55" table:formula="of:=IF(SUM([.NP5:.NP51])=0;&quot;&quot;;SUM([.NP5:.NP51]))">
            <text:p/>
          </table:table-cell>
          <table:table-cell table:style-name="ce55" table:formula="of:=IF(SUM([.NQ5:.NQ51])=0;&quot;&quot;;SUM([.NQ5:.NQ51]))">
            <text:p/>
          </table:table-cell>
          <table:table-cell table:style-name="ce55" table:formula="of:=IF(SUM([.NR5:.NR51])=0;&quot;&quot;;SUM([.NR5:.NR51]))">
            <text:p/>
          </table:table-cell>
          <table:table-cell table:style-name="ce49" table:formula="of:=IF(SUM([.NS5:.NS51])=0;&quot;&quot;;SUM([.NS5:.NS51]))">
            <text:p/>
          </table:table-cell>
          <table:table-cell table:style-name="ce49" table:formula="of:=IF(SUM([.NT5:.NT51])=0;&quot;&quot;;SUM([.NT5:.NT51]))">
            <text:p/>
          </table:table-cell>
          <table:table-cell table:style-name="ce55" table:formula="of:=IF(SUM([.NU5:.NU51])=0;&quot;&quot;;SUM([.NU5:.NU51]))">
            <text:p/>
          </table:table-cell>
          <table:table-cell table:style-name="ce55" table:formula="of:=IF(SUM([.NV5:.NV51])=0;&quot;&quot;;SUM([.NV5:.NV51]))">
            <text:p/>
          </table:table-cell>
          <table:table-cell table:style-name="ce55" table:formula="of:=IF(SUM([.NW5:.NW51])=0;&quot;&quot;;SUM([.NW5:.NW51]))">
            <text:p/>
          </table:table-cell>
          <table:table-cell table:style-name="ce55" table:formula="of:=IF(SUM([.NX5:.NX51])=0;&quot;&quot;;SUM([.NX5:.NX51]))">
            <text:p/>
          </table:table-cell>
          <table:table-cell table:style-name="ce55" table:formula="of:=IF(SUM([.NY5:.NY51])=0;&quot;&quot;;SUM([.NY5:.NY51]))">
            <text:p/>
          </table:table-cell>
          <table:table-cell table:style-name="ce60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56.6" calcext:value-type="float">
            <text:p>56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/>
          <table:table-cell table:style-name="ce50" office:value-type="float" office:value="0.6" calcext:value-type="float">
            <text:p>0.6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40.4" calcext:value-type="float">
            <text:p>40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number-columns-repeated="3"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6" calcext:value-type="float">
            <text:p>0.6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4" calcext:value-type="float">
            <text:p>0.4</text:p>
          </table:table-cell>
          <table:table-cell table:style-name="ce59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7" calcext:value-type="float">
            <text:p>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20.7" calcext:value-type="float">
            <text:p>2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number-columns-repeated="2"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9.2" calcext:value-type="float">
            <text:p>19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3"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6" table:formula="of:=IF(SUM([.C31:.ZZ31])=0;&quot;&quot;;SUM([.C31:.ZZ31]))" office:value-type="float" office:value="14.1" calcext:value-type="float">
            <text:p>14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style-name="ce50"/>
          <table:table-cell table:style-name="ce50" office:value-type="float" office:value="0.3" calcext:value-type="float">
            <text:p>0.3</text:p>
          </table:table-cell>
          <table:table-cell table:number-columns-repeated="3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8" office:value-type="string" calcext:value-type="string">
            <text:p>Worth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Dev issues</text:p>
          </table:table-cell>
          <table:table-cell table:style-name="ce82" table:formula="of:=SUM([.B3:.B7])" office:value-type="float" office:value="-20" calcext:value-type="float">
            <text:p>-20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9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2">
          <table:table-cell table:style-name="ce73" office:value-type="string" calcext:value-type="string">
            <text:p><text:s text:c="2"/>- Throw-away [changes will later come thru as project updates]</text:p>
          </table:table-cell>
          <table:table-cell table:style-name="ce83" office:value-type="float" office:value="-10" calcext:value-type="float">
            <text:p>-10</text:p>
          </table:table-cell>
          <table:table-cell table:style-name="ce69" table:number-columns-repeated="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0.1" calcext:value-type="float">
            <text:p>0.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3" office:value-type="float" office:value="-10" calcext:value-type="float">
            <text:p>-1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3" office:value-type="float" office:value="-3" calcext:value-type="float">
            <text:p>-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3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3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UX</text:p>
          </table:table-cell>
          <table:table-cell table:style-name="ce84" table:formula="of:=SUM([.B10:.B14])" office:value-type="float" office:value="18" calcext:value-type="float">
            <text:p>18</text:p>
          </table:table-cell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3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103" table:number-columns-repeated="4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4"/>
          <table:table-cell table:style-name="ce109" table:number-columns-repeated="3"/>
          <table:table-cell table:style-name="ce69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table:style-name="ce72" office:value-type="string" calcext:value-type="string">
            <text:p>Logical/Temporal Complexity</text:p>
          </table:table-cell>
          <table:table-cell table:style-name="ce71" table:formula="of:=SUM([.B18:.B19])" office:value-type="float" office:value="-8" calcext:value-type="float">
            <text:p>-8</text:p>
          </table:table-cell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9" table:number-columns-repeated="15"/>
          <table:table-cell table:number-columns-repeated="1007"/>
        </table:table-row>
        <table:table-row table:style-name="ro1">
          <table:table-cell table:style-name="ce74" office:value-type="string" calcext:value-type="string">
            <text:p>A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2"/>
          <table:table-cell table:style-name="ce85" office:value-type="string" calcext:value-type="string">
            <text:p>req: sync</text:p>
          </table:table-cell>
          <table:table-cell table:style-name="ce85" office:value-type="string" calcext:value-type="string">
            <text:p>req: async</text:p>
          </table:table-cell>
          <table:table-cell table:style-name="ce85" table:number-columns-repeated="5"/>
          <table:table-cell table:number-columns-repeated="2" table:style-name="ce85" office:value-type="string" calcext:value-type="string">
            <text:p>Rej: 3</text:p>
          </table:table-cell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B: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sync</text:p>
          </table:table-cell>
          <table:table-cell table:number-columns-repeated="2" table:style-name="ce86" office:value-type="string" calcext:value-type="string">
            <text:p>Async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number-columns-repeated="7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C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8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table:number-columns-repeated="4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D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1"/>
          <table:table-cell table:style-name="ce10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75" table:number-columns-repeated="1007"/>
        </table:table-row>
        <table:table-row table:style-name="ro1">
          <table:table-cell table:style-name="ce76" office:value-type="string" calcext:value-type="string">
            <text:p>E: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13"/>
          <table:table-cell table:style-name="ce11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76" table:number-columns-repeated="1007"/>
        </table:table-row>
        <table:table-row table:style-name="ro9">
          <table:table-cell table:style-name="ce73" office:value-type="string" calcext:value-type="string">
            <text:p>P on ajax start</text:p>
          </table:table-cell>
          <table:table-cell table:style-name="ce88"/>
          <table:table-cell table:style-name="ce73" table:number-columns-repeated="4"/>
          <table:table-cell table:style-name="ce104" office:value-type="string" calcext:value-type="string">
            <text:p>Store selfgen</text:p>
          </table:table-cell>
          <table:table-cell table:number-columns-repeated="3" table:style-name="ce104" office:value-type="string" calcext:value-type="string">
            <text:p>-</text:p>
          </table:table-cell>
          <table:table-cell table:number-columns-repeated="2" table:style-name="ce110" office:value-type="string" calcext:value-type="string">
            <text:p>Store selfgen</text:p>
          </table:table-cell>
          <table:table-cell table:style-name="ce110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14" office:value-type="string" calcext:value-type="string">
            <text:p>Store selfgen</text:p>
          </table:table-cell>
          <table:table-cell table:style-name="ce73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2" office:value-type="string" calcext:value-type="string">
            <text:p>(P,X|Y)</text:p>
          </table:table-cell>
          <table:table-cell table:style-name="ce93" office:value-type="string" calcext:value-type="string">
            <text:p>-</text:p>
          </table:table-cell>
          <table:table-cell table:style-name="ce92" office:value-type="string" calcext:value-type="string">
            <text:p>(P,X|Y)</text:p>
          </table:table-cell>
          <table:table-cell table:number-columns-repeated="9"/>
          <table:table-cell table:number-columns-repeated="2" table:style-name="ce120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3" office:value-type="string" calcext:value-type="string">
            <text:p>Disable fields.</text:p>
            <text:p><text:span text:style-name="T1">Spinner.</text:span></text:p>
          </table:table-cell>
          <table:table-cell table:style-name="ce93" office:value-type="string" calcext:value-type="string">
            <text:p>Deny I⇒I</text:p>
            <text:p>changes.</text:p>
            <text:p>Spinner.</text:p>
          </table:table-cell>
          <table:table-cell table:style-name="ce99" office:value-type="string" calcext:value-type="string">
            <text:p>Fields still editable.</text:p>
          </table:table-cell>
          <table:table-cell table:style-name="ce99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3" office:value-type="string" calcext:value-type="string">
            <text:p>Enable fields</text:p>
          </table:table-cell>
          <table:table-cell table:style-name="ce93" office:value-type="string" calcext:value-type="string">
            <text:p>Allow changes</text:p>
          </table:table-cell>
          <table:table-cell table:number-columns-repeated="2" table:style-name="ce93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4" office:value-type="string" calcext:value-type="string">
            <text:p>Store selfgen P</text:p>
          </table:table-cell>
          <table:table-cell table:style-name="ce104" office:value-type="string" calcext:value-type="string">
            <text:p>Store recv P</text:p>
          </table:table-cell>
          <table:table-cell table:style-name="ce105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10" office:value-type="string" calcext:value-type="string">
            <text:p>Store recv P</text:p>
          </table:table-cell>
          <table:table-cell table:style-name="ce110" office:value-type="string" calcext:value-type="string">
            <text:p>Store last confirmed P</text:p>
          </table:table-cell>
          <table:table-cell table:style-name="ce110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4" office:value-type="string" calcext:value-type="string">
            <text:p>-</text:p>
          </table:table-cell>
          <table:table-cell table:style-name="ce117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1"/>
          <table:table-cell table:number-columns-repeated="1008"/>
        </table:table-row>
        <table:table-row table:style-name="ro1">
          <table:table-cell table:number-columns-repeated="2"/>
          <table:table-cell table:style-name="ce94" table:formula="of:=SUM([.C42:.C88])*[.$B$23]" office:value-type="float" office:value="21" calcext:value-type="float">
            <text:p>21</text:p>
          </table:table-cell>
          <table:table-cell table:style-name="ce94" table:formula="of:=SUM([.D42:.D88])*[.$B$23]" office:value-type="float" office:value="66" calcext:value-type="float">
            <text:p>66</text:p>
          </table:table-cell>
          <table:table-cell table:style-name="ce94" table:formula="of:=SUM([.E42:.E88])*[.$B$23]" office:value-type="float" office:value="64" calcext:value-type="float">
            <text:p>64</text:p>
          </table:table-cell>
          <table:table-cell table:style-name="ce94" table:formula="of:=SUM([.F42:.F88])*[.$B$23]" office:value-type="float" office:value="56" calcext:value-type="float">
            <text:p>56</text:p>
          </table:table-cell>
          <table:table-cell table:style-name="ce106" table:formula="of:=SUM([.G42:.G88])*[.$B$24]" office:value-type="float" office:value="-20" calcext:value-type="float">
            <text:p>-20</text:p>
          </table:table-cell>
          <table:table-cell table:style-name="ce106" table:formula="of:=SUM([.H42:.H88])*[.$B$24]" office:value-type="float" office:value="-29" calcext:value-type="float">
            <text:p>-29</text:p>
          </table:table-cell>
          <table:table-cell table:style-name="ce106" table:formula="of:=SUM([.I42:.I88])*[.$B$24]" office:value-type="float" office:value="16" calcext:value-type="float">
            <text:p>16</text:p>
          </table:table-cell>
          <table:table-cell table:style-name="ce106" table:formula="of:=SUM([.J42:.J88])*[.$B$24]" office:value-type="float" office:value="7" calcext:value-type="float">
            <text:p>7</text:p>
          </table:table-cell>
          <table:table-cell table:style-name="ce111" table:formula="of:=SUM([.K42:.K88])*[.$B$25]" office:value-type="float" office:value="-30" calcext:value-type="float">
            <text:p>-30</text:p>
          </table:table-cell>
          <table:table-cell table:style-name="ce111" table:formula="of:=SUM([.L42:.L88])*[.$B$25]" office:value-type="float" office:value="-71" calcext:value-type="float">
            <text:p>-71</text:p>
          </table:table-cell>
          <table:table-cell table:style-name="ce111" table:formula="of:=SUM([.M42:.M88])*[.$B$25]" office:value-type="float" office:value="-10" calcext:value-type="float">
            <text:p>-10</text:p>
          </table:table-cell>
          <table:table-cell table:style-name="ce115" table:formula="of:=SUM([.N42:.N88])*[.$B$26]" office:value-type="float" office:value="15" calcext:value-type="float">
            <text:p>15</text:p>
          </table:table-cell>
          <table:table-cell table:style-name="ce115" table:formula="of:=SUM([.O42:.O88])*[.$B$26]" office:value-type="float" office:value="-20" calcext:value-type="float">
            <text:p>-20</text:p>
          </table:table-cell>
          <table:table-cell table:style-name="ce122" table:formula="of:=SUM([.P42:.P88])*[.$B$27]" office:value-type="float" office:value="9" calcext:value-type="float">
            <text:p>9</text:p>
          </table:table-cell>
          <table:table-cell table:style-name="ce122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3]);&quot;&quot;;[.$B3]*[.C3])">
            <text:p/>
          </table:table-cell>
          <table:table-cell table:style-name="ce95" table:formula="of:=IF(ISBLANK([.D3]);&quot;&quot;;[.$B3]*[.D3])">
            <text:p/>
          </table:table-cell>
          <table:table-cell table:style-name="ce95" table:formula="of:=IF(ISBLANK([.E3]);&quot;&quot;;[.$B3]*[.E3])">
            <text:p/>
          </table:table-cell>
          <table:table-cell table:style-name="ce95" table:formula="of:=IF(ISBLANK([.F3]);&quot;&quot;;[.$B3]*[.F3])">
            <text:p/>
          </table:table-cell>
          <table:table-cell table:style-name="ce107" table:formula="of:=IF(ISBLANK([.G3]);&quot;&quot;;[.$B3]*[.G3])">
            <text:p/>
          </table:table-cell>
          <table:table-cell table:style-name="ce107" table:formula="of:=IF(ISBLANK([.H3]);&quot;&quot;;[.$B3]*[.H3])">
            <text:p/>
          </table:table-cell>
          <table:table-cell table:style-name="ce107" table:formula="of:=IF(ISBLANK([.I3]);&quot;&quot;;[.$B3]*[.I3])">
            <text:p/>
          </table:table-cell>
          <table:table-cell table:style-name="ce107" table:formula="of:=IF(ISBLANK([.J3]);&quot;&quot;;[.$B3]*[.J3])">
            <text:p/>
          </table:table-cell>
          <table:table-cell table:style-name="ce112" table:formula="of:=IF(ISBLANK([.K3]);&quot;&quot;;[.$B3]*[.K3])">
            <text:p/>
          </table:table-cell>
          <table:table-cell table:style-name="ce112" table:formula="of:=IF(ISBLANK([.L3]);&quot;&quot;;[.$B3]*[.L3])">
            <text:p/>
          </table:table-cell>
          <table:table-cell table:style-name="ce112" table:formula="of:=IF(ISBLANK([.M3]);&quot;&quot;;[.$B3]*[.M3])">
            <text:p/>
          </table:table-cell>
          <table:table-cell table:style-name="ce116" table:formula="of:=IF(ISBLANK([.N3]);&quot;&quot;;[.$B3]*[.N3])">
            <text:p/>
          </table:table-cell>
          <table:table-cell table:style-name="ce116" table:formula="of:=IF(ISBLANK([.O3]);&quot;&quot;;[.$B3]*[.O3])">
            <text:p/>
          </table:table-cell>
          <table:table-cell table:style-name="ce123" table:formula="of:=IF(ISBLANK([.P3]);&quot;&quot;;[.$B3]*[.P3])">
            <text:p/>
          </table:table-cell>
          <table:table-cell table:style-name="ce123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4]);&quot;&quot;;[.$B4]*[.C4])">
            <text:p/>
          </table:table-cell>
          <table:table-cell table:style-name="ce95" table:formula="of:=IF(ISBLANK([.D4]);&quot;&quot;;[.$B4]*[.D4])">
            <text:p/>
          </table:table-cell>
          <table:table-cell table:style-name="ce95" table:formula="of:=IF(ISBLANK([.E4]);&quot;&quot;;[.$B4]*[.E4])">
            <text:p/>
          </table:table-cell>
          <table:table-cell table:style-name="ce95" table:formula="of:=IF(ISBLANK([.F4]);&quot;&quot;;[.$B4]*[.F4])">
            <text:p/>
          </table:table-cell>
          <table:table-cell table:style-name="ce107" table:formula="of:=IF(ISBLANK([.G4]);&quot;&quot;;[.$B4]*[.G4])" office:value-type="float" office:value="-10" calcext:value-type="float">
            <text:p>-10</text:p>
          </table:table-cell>
          <table:table-cell table:style-name="ce107" table:formula="of:=IF(ISBLANK([.H4]);&quot;&quot;;[.$B4]*[.H4])" office:value-type="float" office:value="-20" calcext:value-type="float">
            <text:p>-20</text:p>
          </table:table-cell>
          <table:table-cell table:style-name="ce107" table:formula="of:=IF(ISBLANK([.I4]);&quot;&quot;;[.$B4]*[.I4])" office:value-type="float" office:value="-0" calcext:value-type="float">
            <text:p>0</text:p>
          </table:table-cell>
          <table:table-cell table:style-name="ce107" table:formula="of:=IF(ISBLANK([.J4]);&quot;&quot;;[.$B4]*[.J4])" office:value-type="float" office:value="-0" calcext:value-type="float">
            <text:p>0</text:p>
          </table:table-cell>
          <table:table-cell table:style-name="ce112" table:formula="of:=IF(ISBLANK([.K4]);&quot;&quot;;[.$B4]*[.K4])" office:value-type="float" office:value="-20" calcext:value-type="float">
            <text:p>-20</text:p>
          </table:table-cell>
          <table:table-cell table:style-name="ce112" table:formula="of:=IF(ISBLANK([.L4]);&quot;&quot;;[.$B4]*[.L4])" office:value-type="float" office:value="-20" calcext:value-type="float">
            <text:p>-20</text:p>
          </table:table-cell>
          <table:table-cell table:style-name="ce112" table:formula="of:=IF(ISBLANK([.M4]);&quot;&quot;;[.$B4]*[.M4])" office:value-type="float" office:value="-1" calcext:value-type="float">
            <text:p>-1</text:p>
          </table:table-cell>
          <table:table-cell table:style-name="ce116" table:formula="of:=IF(ISBLANK([.N4]);&quot;&quot;;[.$B4]*[.N4])" office:value-type="float" office:value="-0" calcext:value-type="float">
            <text:p>0</text:p>
          </table:table-cell>
          <table:table-cell table:style-name="ce116" table:formula="of:=IF(ISBLANK([.O4]);&quot;&quot;;[.$B4]*[.O4])" office:value-type="float" office:value="-20" calcext:value-type="float">
            <text:p>-20</text:p>
          </table:table-cell>
          <table:table-cell table:style-name="ce123" table:formula="of:=IF(ISBLANK([.P4]);&quot;&quot;;[.$B4]*[.P4])">
            <text:p/>
          </table:table-cell>
          <table:table-cell table:style-name="ce123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5]);&quot;&quot;;[.$B5]*[.C5])" office:value-type="float" office:value="-20" calcext:value-type="float">
            <text:p>-20</text:p>
          </table:table-cell>
          <table:table-cell table:style-name="ce95" table:formula="of:=IF(ISBLANK([.D5]);&quot;&quot;;[.$B5]*[.D5])" office:value-type="float" office:value="-20" calcext:value-type="float">
            <text:p>-20</text:p>
          </table:table-cell>
          <table:table-cell table:style-name="ce95" table:formula="of:=IF(ISBLANK([.E5]);&quot;&quot;;[.$B5]*[.E5])" office:value-type="float" office:value="-0" calcext:value-type="float">
            <text:p>0</text:p>
          </table:table-cell>
          <table:table-cell table:style-name="ce95" table:formula="of:=IF(ISBLANK([.F5]);&quot;&quot;;[.$B5]*[.F5])" office:value-type="float" office:value="-10" calcext:value-type="float">
            <text:p>-10</text:p>
          </table:table-cell>
          <table:table-cell table:style-name="ce107" table:formula="of:=IF(ISBLANK([.G5]);&quot;&quot;;[.$B5]*[.G5])" office:value-type="float" office:value="-50" calcext:value-type="float">
            <text:p>-50</text:p>
          </table:table-cell>
          <table:table-cell table:style-name="ce107" table:formula="of:=IF(ISBLANK([.H5]);&quot;&quot;;[.$B5]*[.H5])" office:value-type="float" office:value="-20" calcext:value-type="float">
            <text:p>-20</text:p>
          </table:table-cell>
          <table:table-cell table:style-name="ce107" table:formula="of:=IF(ISBLANK([.I5]);&quot;&quot;;[.$B5]*[.I5])" office:value-type="float" office:value="-0" calcext:value-type="float">
            <text:p>0</text:p>
          </table:table-cell>
          <table:table-cell table:style-name="ce107" table:formula="of:=IF(ISBLANK([.J5]);&quot;&quot;;[.$B5]*[.J5])" office:value-type="float" office:value="-0" calcext:value-type="float">
            <text:p>0</text:p>
          </table:table-cell>
          <table:table-cell table:style-name="ce112" table:formula="of:=IF(ISBLANK([.K5]);&quot;&quot;;[.$B5]*[.K5])" office:value-type="float" office:value="-10" calcext:value-type="float">
            <text:p>-10</text:p>
          </table:table-cell>
          <table:table-cell table:style-name="ce112" table:formula="of:=IF(ISBLANK([.L5]);&quot;&quot;;[.$B5]*[.L5])" office:value-type="float" office:value="-30" calcext:value-type="float">
            <text:p>-30</text:p>
          </table:table-cell>
          <table:table-cell table:style-name="ce112" table:formula="of:=IF(ISBLANK([.M5]);&quot;&quot;;[.$B5]*[.M5])" office:value-type="float" office:value="-0" calcext:value-type="float">
            <text:p>0</text:p>
          </table:table-cell>
          <table:table-cell table:style-name="ce116" table:formula="of:=IF(ISBLANK([.N5]);&quot;&quot;;[.$B5]*[.N5])">
            <text:p/>
          </table:table-cell>
          <table:table-cell table:style-name="ce116" table:formula="of:=IF(ISBLANK([.O5]);&quot;&quot;;[.$B5]*[.O5])">
            <text:p/>
          </table:table-cell>
          <table:table-cell table:style-name="ce123" table:formula="of:=IF(ISBLANK([.P5]);&quot;&quot;;[.$B5]*[.P5])">
            <text:p/>
          </table:table-cell>
          <table:table-cell table:style-name="ce123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7]);&quot;&quot;;[.$B7]*[.C7])" office:value-type="float" office:value="6" calcext:value-type="float">
            <text:p>6</text:p>
          </table:table-cell>
          <table:table-cell table:style-name="ce95" table:formula="of:=IF(ISBLANK([.D7]);&quot;&quot;;[.$B7]*[.D7])" office:value-type="float" office:value="9" calcext:value-type="float">
            <text:p>9</text:p>
          </table:table-cell>
          <table:table-cell table:style-name="ce95" table:formula="of:=IF(ISBLANK([.E7]);&quot;&quot;;[.$B7]*[.E7])" office:value-type="float" office:value="15" calcext:value-type="float">
            <text:p>15</text:p>
          </table:table-cell>
          <table:table-cell table:style-name="ce95" table:formula="of:=IF(ISBLANK([.F7]);&quot;&quot;;[.$B7]*[.F7])" office:value-type="float" office:value="9" calcext:value-type="float">
            <text:p>9</text:p>
          </table:table-cell>
          <table:table-cell table:style-name="ce107" table:formula="of:=IF(ISBLANK([.G7]);&quot;&quot;;[.$B7]*[.G7])" office:value-type="float" office:value="15" calcext:value-type="float">
            <text:p>15</text:p>
          </table:table-cell>
          <table:table-cell table:style-name="ce107" table:formula="of:=IF(ISBLANK([.H7]);&quot;&quot;;[.$B7]*[.H7])" office:value-type="float" office:value="9" calcext:value-type="float">
            <text:p>9</text:p>
          </table:table-cell>
          <table:table-cell table:style-name="ce107" table:formula="of:=IF(ISBLANK([.I7]);&quot;&quot;;[.$B7]*[.I7])" office:value-type="float" office:value="9" calcext:value-type="float">
            <text:p>9</text:p>
          </table:table-cell>
          <table:table-cell table:style-name="ce107" table:formula="of:=IF(ISBLANK([.J7]);&quot;&quot;;[.$B7]*[.J7])" office:value-type="float" office:value="6" calcext:value-type="float">
            <text:p>6</text:p>
          </table:table-cell>
          <table:table-cell table:style-name="ce112" table:formula="of:=IF(ISBLANK([.K7]);&quot;&quot;;[.$B7]*[.K7])" office:value-type="float" office:value="12" calcext:value-type="float">
            <text:p>12</text:p>
          </table:table-cell>
          <table:table-cell table:style-name="ce112" table:formula="of:=IF(ISBLANK([.L7]);&quot;&quot;;[.$B7]*[.L7])" office:value-type="float" office:value="3" calcext:value-type="float">
            <text:p>3</text:p>
          </table:table-cell>
          <table:table-cell table:style-name="ce112" table:formula="of:=IF(ISBLANK([.M7]);&quot;&quot;;[.$B7]*[.M7])" office:value-type="float" office:value="9" calcext:value-type="float">
            <text:p>9</text:p>
          </table:table-cell>
          <table:table-cell table:style-name="ce116" table:formula="of:=IF(ISBLANK([.N7]);&quot;&quot;;[.$B7]*[.N7])" office:value-type="float" office:value="15" calcext:value-type="float">
            <text:p>15</text:p>
          </table:table-cell>
          <table:table-cell table:style-name="ce116" table:formula="of:=IF(ISBLANK([.O7]);&quot;&quot;;[.$B7]*[.O7])" office:value-type="float" office:value="6" calcext:value-type="float">
            <text:p>6</text:p>
          </table:table-cell>
          <table:table-cell table:style-name="ce123" table:formula="of:=IF(ISBLANK([.P7]);&quot;&quot;;[.$B7]*[.P7])" office:value-type="float" office:value="15" calcext:value-type="float">
            <text:p>15</text:p>
          </table:table-cell>
          <table:table-cell table:style-name="ce123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8]);&quot;&quot;;[.$B8]*[.C8])">
            <text:p/>
          </table:table-cell>
          <table:table-cell table:style-name="ce95" table:formula="of:=IF(ISBLANK([.D8]);&quot;&quot;;[.$B8]*[.D8])">
            <text:p/>
          </table:table-cell>
          <table:table-cell table:style-name="ce95" table:formula="of:=IF(ISBLANK([.E8]);&quot;&quot;;[.$B8]*[.E8])">
            <text:p/>
          </table:table-cell>
          <table:table-cell table:style-name="ce95" table:formula="of:=IF(ISBLANK([.F8]);&quot;&quot;;[.$B8]*[.F8])">
            <text:p/>
          </table:table-cell>
          <table:table-cell table:style-name="ce107" table:formula="of:=IF(ISBLANK([.G8]);&quot;&quot;;[.$B8]*[.G8])">
            <text:p/>
          </table:table-cell>
          <table:table-cell table:style-name="ce107" table:formula="of:=IF(ISBLANK([.H8]);&quot;&quot;;[.$B8]*[.H8])">
            <text:p/>
          </table:table-cell>
          <table:table-cell table:style-name="ce107" table:formula="of:=IF(ISBLANK([.I8]);&quot;&quot;;[.$B8]*[.I8])">
            <text:p/>
          </table:table-cell>
          <table:table-cell table:style-name="ce107" table:formula="of:=IF(ISBLANK([.J8]);&quot;&quot;;[.$B8]*[.J8])">
            <text:p/>
          </table:table-cell>
          <table:table-cell table:style-name="ce112" table:formula="of:=IF(ISBLANK([.K8]);&quot;&quot;;[.$B8]*[.K8])">
            <text:p/>
          </table:table-cell>
          <table:table-cell table:style-name="ce112" table:formula="of:=IF(ISBLANK([.L8]);&quot;&quot;;[.$B8]*[.L8])">
            <text:p/>
          </table:table-cell>
          <table:table-cell table:style-name="ce112" table:formula="of:=IF(ISBLANK([.M8]);&quot;&quot;;[.$B8]*[.M8])">
            <text:p/>
          </table:table-cell>
          <table:table-cell table:style-name="ce116" table:formula="of:=IF(ISBLANK([.N8]);&quot;&quot;;[.$B8]*[.N8])">
            <text:p/>
          </table:table-cell>
          <table:table-cell table:style-name="ce116" table:formula="of:=IF(ISBLANK([.O8]);&quot;&quot;;[.$B8]*[.O8])">
            <text:p/>
          </table:table-cell>
          <table:table-cell table:style-name="ce123" table:formula="of:=IF(ISBLANK([.P8]);&quot;&quot;;[.$B8]*[.P8])">
            <text:p/>
          </table:table-cell>
          <table:table-cell table:style-name="ce123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9]);&quot;&quot;;[.$B9]*[.C9])">
            <text:p/>
          </table:table-cell>
          <table:table-cell table:style-name="ce95" table:formula="of:=IF(ISBLANK([.D9]);&quot;&quot;;[.$B9]*[.D9])">
            <text:p/>
          </table:table-cell>
          <table:table-cell table:style-name="ce95" table:formula="of:=IF(ISBLANK([.E9]);&quot;&quot;;[.$B9]*[.E9])">
            <text:p/>
          </table:table-cell>
          <table:table-cell table:style-name="ce95" table:formula="of:=IF(ISBLANK([.F9]);&quot;&quot;;[.$B9]*[.F9])">
            <text:p/>
          </table:table-cell>
          <table:table-cell table:style-name="ce107" table:formula="of:=IF(ISBLANK([.G9]);&quot;&quot;;[.$B9]*[.G9])">
            <text:p/>
          </table:table-cell>
          <table:table-cell table:style-name="ce107" table:formula="of:=IF(ISBLANK([.H9]);&quot;&quot;;[.$B9]*[.H9])">
            <text:p/>
          </table:table-cell>
          <table:table-cell table:style-name="ce107" table:formula="of:=IF(ISBLANK([.I9]);&quot;&quot;;[.$B9]*[.I9])">
            <text:p/>
          </table:table-cell>
          <table:table-cell table:style-name="ce107" table:formula="of:=IF(ISBLANK([.J9]);&quot;&quot;;[.$B9]*[.J9])">
            <text:p/>
          </table:table-cell>
          <table:table-cell table:style-name="ce112" table:formula="of:=IF(ISBLANK([.K9]);&quot;&quot;;[.$B9]*[.K9])">
            <text:p/>
          </table:table-cell>
          <table:table-cell table:style-name="ce112" table:formula="of:=IF(ISBLANK([.L9]);&quot;&quot;;[.$B9]*[.L9])">
            <text:p/>
          </table:table-cell>
          <table:table-cell table:style-name="ce112" table:formula="of:=IF(ISBLANK([.M9]);&quot;&quot;;[.$B9]*[.M9])">
            <text:p/>
          </table:table-cell>
          <table:table-cell table:style-name="ce116" table:formula="of:=IF(ISBLANK([.N9]);&quot;&quot;;[.$B9]*[.N9])">
            <text:p/>
          </table:table-cell>
          <table:table-cell table:style-name="ce116" table:formula="of:=IF(ISBLANK([.O9]);&quot;&quot;;[.$B9]*[.O9])">
            <text:p/>
          </table:table-cell>
          <table:table-cell table:style-name="ce123" table:formula="of:=IF(ISBLANK([.P9]);&quot;&quot;;[.$B9]*[.P9])">
            <text:p/>
          </table:table-cell>
          <table:table-cell table:style-name="ce123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0]);&quot;&quot;;[.$B10]*[.C10])" office:value-type="float" office:value="0" calcext:value-type="float">
            <text:p>0</text:p>
          </table:table-cell>
          <table:table-cell table:style-name="ce95" table:formula="of:=IF(ISBLANK([.D10]);&quot;&quot;;[.$B10]*[.D10])" office:value-type="float" office:value="25" calcext:value-type="float">
            <text:p>25</text:p>
          </table:table-cell>
          <table:table-cell table:style-name="ce95" table:formula="of:=IF(ISBLANK([.E10]);&quot;&quot;;[.$B10]*[.E10])" office:value-type="float" office:value="25" calcext:value-type="float">
            <text:p>25</text:p>
          </table:table-cell>
          <table:table-cell table:style-name="ce95" table:formula="of:=IF(ISBLANK([.F10]);&quot;&quot;;[.$B10]*[.F10])" office:value-type="float" office:value="25" calcext:value-type="float">
            <text:p>25</text:p>
          </table:table-cell>
          <table:table-cell table:style-name="ce107" table:formula="of:=IF(ISBLANK([.G10]);&quot;&quot;;[.$B10]*[.G10])">
            <text:p/>
          </table:table-cell>
          <table:table-cell table:style-name="ce107" table:formula="of:=IF(ISBLANK([.H10]);&quot;&quot;;[.$B10]*[.H10])">
            <text:p/>
          </table:table-cell>
          <table:table-cell table:style-name="ce107" table:formula="of:=IF(ISBLANK([.I10]);&quot;&quot;;[.$B10]*[.I10])">
            <text:p/>
          </table:table-cell>
          <table:table-cell table:style-name="ce107" table:formula="of:=IF(ISBLANK([.J10]);&quot;&quot;;[.$B10]*[.J10])">
            <text:p/>
          </table:table-cell>
          <table:table-cell table:style-name="ce112" table:formula="of:=IF(ISBLANK([.K10]);&quot;&quot;;[.$B10]*[.K10])">
            <text:p/>
          </table:table-cell>
          <table:table-cell table:style-name="ce112" table:formula="of:=IF(ISBLANK([.L10]);&quot;&quot;;[.$B10]*[.L10])">
            <text:p/>
          </table:table-cell>
          <table:table-cell table:style-name="ce112" table:formula="of:=IF(ISBLANK([.M10]);&quot;&quot;;[.$B10]*[.M10])">
            <text:p/>
          </table:table-cell>
          <table:table-cell table:style-name="ce116" table:formula="of:=IF(ISBLANK([.N10]);&quot;&quot;;[.$B10]*[.N10])">
            <text:p/>
          </table:table-cell>
          <table:table-cell table:style-name="ce116" table:formula="of:=IF(ISBLANK([.O10]);&quot;&quot;;[.$B10]*[.O10])">
            <text:p/>
          </table:table-cell>
          <table:table-cell table:style-name="ce123" table:formula="of:=IF(ISBLANK([.P10]);&quot;&quot;;[.$B10]*[.P10])">
            <text:p/>
          </table:table-cell>
          <table:table-cell table:style-name="ce123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1]);&quot;&quot;;[.$B11]*[.C11])" office:value-type="float" office:value="0" calcext:value-type="float">
            <text:p>0</text:p>
          </table:table-cell>
          <table:table-cell table:style-name="ce95" table:formula="of:=IF(ISBLANK([.D11]);&quot;&quot;;[.$B11]*[.D11])" office:value-type="float" office:value="0" calcext:value-type="float">
            <text:p>0</text:p>
          </table:table-cell>
          <table:table-cell table:style-name="ce95" table:formula="of:=IF(ISBLANK([.E11]);&quot;&quot;;[.$B11]*[.E11])" office:value-type="float" office:value="10" calcext:value-type="float">
            <text:p>10</text:p>
          </table:table-cell>
          <table:table-cell table:style-name="ce95" table:formula="of:=IF(ISBLANK([.F11]);&quot;&quot;;[.$B11]*[.F11])" office:value-type="float" office:value="10" calcext:value-type="float">
            <text:p>10</text:p>
          </table:table-cell>
          <table:table-cell table:style-name="ce107" table:formula="of:=IF(ISBLANK([.G11]);&quot;&quot;;[.$B11]*[.G11])">
            <text:p/>
          </table:table-cell>
          <table:table-cell table:style-name="ce107" table:formula="of:=IF(ISBLANK([.H11]);&quot;&quot;;[.$B11]*[.H11])">
            <text:p/>
          </table:table-cell>
          <table:table-cell table:style-name="ce107" table:formula="of:=IF(ISBLANK([.I11]);&quot;&quot;;[.$B11]*[.I11])">
            <text:p/>
          </table:table-cell>
          <table:table-cell table:style-name="ce107" table:formula="of:=IF(ISBLANK([.J11]);&quot;&quot;;[.$B11]*[.J11])">
            <text:p/>
          </table:table-cell>
          <table:table-cell table:style-name="ce112" table:formula="of:=IF(ISBLANK([.K11]);&quot;&quot;;[.$B11]*[.K11])">
            <text:p/>
          </table:table-cell>
          <table:table-cell table:style-name="ce112" table:formula="of:=IF(ISBLANK([.L11]);&quot;&quot;;[.$B11]*[.L11])">
            <text:p/>
          </table:table-cell>
          <table:table-cell table:style-name="ce112" table:formula="of:=IF(ISBLANK([.M11]);&quot;&quot;;[.$B11]*[.M11])">
            <text:p/>
          </table:table-cell>
          <table:table-cell table:style-name="ce116" table:formula="of:=IF(ISBLANK([.N11]);&quot;&quot;;[.$B11]*[.N11])">
            <text:p/>
          </table:table-cell>
          <table:table-cell table:style-name="ce116" table:formula="of:=IF(ISBLANK([.O11]);&quot;&quot;;[.$B11]*[.O11])">
            <text:p/>
          </table:table-cell>
          <table:table-cell table:style-name="ce123" table:formula="of:=IF(ISBLANK([.P11]);&quot;&quot;;[.$B11]*[.P11])">
            <text:p/>
          </table:table-cell>
          <table:table-cell table:style-name="ce123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2]);&quot;&quot;;[.$B12]*[.C12])" office:value-type="float" office:value="25" calcext:value-type="float">
            <text:p>25</text:p>
          </table:table-cell>
          <table:table-cell table:style-name="ce95" table:formula="of:=IF(ISBLANK([.D12]);&quot;&quot;;[.$B12]*[.D12])" office:value-type="float" office:value="25" calcext:value-type="float">
            <text:p>25</text:p>
          </table:table-cell>
          <table:table-cell table:style-name="ce95" table:formula="of:=IF(ISBLANK([.E12]);&quot;&quot;;[.$B12]*[.E12])" office:value-type="float" office:value="25" calcext:value-type="float">
            <text:p>25</text:p>
          </table:table-cell>
          <table:table-cell table:style-name="ce95" table:formula="of:=IF(ISBLANK([.F12]);&quot;&quot;;[.$B12]*[.F12])" office:value-type="float" office:value="25" calcext:value-type="float">
            <text:p>25</text:p>
          </table:table-cell>
          <table:table-cell table:style-name="ce107" table:formula="of:=IF(ISBLANK([.G12]);&quot;&quot;;[.$B12]*[.G12])" office:value-type="float" office:value="25" calcext:value-type="float">
            <text:p>25</text:p>
          </table:table-cell>
          <table:table-cell table:style-name="ce107" table:formula="of:=IF(ISBLANK([.H12]);&quot;&quot;;[.$B12]*[.H12])" office:value-type="float" office:value="20" calcext:value-type="float">
            <text:p>20</text:p>
          </table:table-cell>
          <table:table-cell table:style-name="ce107" table:formula="of:=IF(ISBLANK([.I12]);&quot;&quot;;[.$B12]*[.I12])" office:value-type="float" office:value="25" calcext:value-type="float">
            <text:p>25</text:p>
          </table:table-cell>
          <table:table-cell table:style-name="ce107" table:formula="of:=IF(ISBLANK([.J12]);&quot;&quot;;[.$B12]*[.J12])" office:value-type="float" office:value="25" calcext:value-type="float">
            <text:p>25</text:p>
          </table:table-cell>
          <table:table-cell table:style-name="ce112" table:formula="of:=IF(ISBLANK([.K12]);&quot;&quot;;[.$B12]*[.K12])">
            <text:p/>
          </table:table-cell>
          <table:table-cell table:style-name="ce112" table:formula="of:=IF(ISBLANK([.L12]);&quot;&quot;;[.$B12]*[.L12])">
            <text:p/>
          </table:table-cell>
          <table:table-cell table:style-name="ce112" table:formula="of:=IF(ISBLANK([.M12]);&quot;&quot;;[.$B12]*[.M12])">
            <text:p/>
          </table:table-cell>
          <table:table-cell table:style-name="ce116" table:formula="of:=IF(ISBLANK([.N12]);&quot;&quot;;[.$B12]*[.N12])">
            <text:p/>
          </table:table-cell>
          <table:table-cell table:style-name="ce116" table:formula="of:=IF(ISBLANK([.O12]);&quot;&quot;;[.$B12]*[.O12])">
            <text:p/>
          </table:table-cell>
          <table:table-cell table:style-name="ce123" table:formula="of:=IF(ISBLANK([.P12]);&quot;&quot;;[.$B12]*[.P12])">
            <text:p/>
          </table:table-cell>
          <table:table-cell table:style-name="ce123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3]);&quot;&quot;;[.$B13]*[.C13])" office:value-type="float" office:value="10" calcext:value-type="float">
            <text:p>10</text:p>
          </table:table-cell>
          <table:table-cell table:style-name="ce95" table:formula="of:=IF(ISBLANK([.D13]);&quot;&quot;;[.$B13]*[.D13])" office:value-type="float" office:value="10" calcext:value-type="float">
            <text:p>10</text:p>
          </table:table-cell>
          <table:table-cell table:style-name="ce95" table:formula="of:=IF(ISBLANK([.E13]);&quot;&quot;;[.$B13]*[.E13])" office:value-type="float" office:value="4" calcext:value-type="float">
            <text:p>4</text:p>
          </table:table-cell>
          <table:table-cell table:style-name="ce95" table:formula="of:=IF(ISBLANK([.F13]);&quot;&quot;;[.$B13]*[.F13])" office:value-type="float" office:value="4" calcext:value-type="float">
            <text:p>4</text:p>
          </table:table-cell>
          <table:table-cell table:style-name="ce107" table:formula="of:=IF(ISBLANK([.G13]);&quot;&quot;;[.$B13]*[.G13])">
            <text:p/>
          </table:table-cell>
          <table:table-cell table:style-name="ce107" table:formula="of:=IF(ISBLANK([.H13]);&quot;&quot;;[.$B13]*[.H13])">
            <text:p/>
          </table:table-cell>
          <table:table-cell table:style-name="ce107" table:formula="of:=IF(ISBLANK([.I13]);&quot;&quot;;[.$B13]*[.I13])">
            <text:p/>
          </table:table-cell>
          <table:table-cell table:style-name="ce107" table:formula="of:=IF(ISBLANK([.J13]);&quot;&quot;;[.$B13]*[.J13])">
            <text:p/>
          </table:table-cell>
          <table:table-cell table:style-name="ce112" table:formula="of:=IF(ISBLANK([.K13]);&quot;&quot;;[.$B13]*[.K13])" office:value-type="float" office:value="0" calcext:value-type="float">
            <text:p>0</text:p>
          </table:table-cell>
          <table:table-cell table:style-name="ce112" table:formula="of:=IF(ISBLANK([.L13]);&quot;&quot;;[.$B13]*[.L13])" office:value-type="float" office:value="6" calcext:value-type="float">
            <text:p>6</text:p>
          </table:table-cell>
          <table:table-cell table:style-name="ce112" table:formula="of:=IF(ISBLANK([.M13]);&quot;&quot;;[.$B13]*[.M13])" office:value-type="float" office:value="6" calcext:value-type="float">
            <text:p>6</text:p>
          </table:table-cell>
          <table:table-cell table:style-name="ce116" table:formula="of:=IF(ISBLANK([.N13]);&quot;&quot;;[.$B13]*[.N13])">
            <text:p/>
          </table:table-cell>
          <table:table-cell table:style-name="ce116" table:formula="of:=IF(ISBLANK([.O13]);&quot;&quot;;[.$B13]*[.O13])">
            <text:p/>
          </table:table-cell>
          <table:table-cell table:style-name="ce123" table:formula="of:=IF(ISBLANK([.P13]);&quot;&quot;;[.$B13]*[.P13])">
            <text:p/>
          </table:table-cell>
          <table:table-cell table:style-name="ce123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4]);&quot;&quot;;[.$B14]*[.C14])" office:value-type="float" office:value="20" calcext:value-type="float">
            <text:p>20</text:p>
          </table:table-cell>
          <table:table-cell table:style-name="ce95" table:formula="of:=IF(ISBLANK([.D14]);&quot;&quot;;[.$B14]*[.D14])" office:value-type="float" office:value="20" calcext:value-type="float">
            <text:p>20</text:p>
          </table:table-cell>
          <table:table-cell table:style-name="ce95" table:formula="of:=IF(ISBLANK([.E14]);&quot;&quot;;[.$B14]*[.E14])" office:value-type="float" office:value="0" calcext:value-type="float">
            <text:p>0</text:p>
          </table:table-cell>
          <table:table-cell table:style-name="ce95" table:formula="of:=IF(ISBLANK([.F14]);&quot;&quot;;[.$B14]*[.F14])" office:value-type="float" office:value="20" calcext:value-type="float">
            <text:p>20</text:p>
          </table:table-cell>
          <table:table-cell table:style-name="ce107" table:formula="of:=IF(ISBLANK([.G14]);&quot;&quot;;[.$B14]*[.G14])">
            <text:p/>
          </table:table-cell>
          <table:table-cell table:style-name="ce107" table:formula="of:=IF(ISBLANK([.H14]);&quot;&quot;;[.$B14]*[.H14])">
            <text:p/>
          </table:table-cell>
          <table:table-cell table:style-name="ce107" table:formula="of:=IF(ISBLANK([.I14]);&quot;&quot;;[.$B14]*[.I14])">
            <text:p/>
          </table:table-cell>
          <table:table-cell table:style-name="ce107" table:formula="of:=IF(ISBLANK([.J14]);&quot;&quot;;[.$B14]*[.J14])">
            <text:p/>
          </table:table-cell>
          <table:table-cell table:style-name="ce112" table:formula="of:=IF(ISBLANK([.K14]);&quot;&quot;;[.$B14]*[.K14])">
            <text:p/>
          </table:table-cell>
          <table:table-cell table:style-name="ce112" table:formula="of:=IF(ISBLANK([.L14]);&quot;&quot;;[.$B14]*[.L14])">
            <text:p/>
          </table:table-cell>
          <table:table-cell table:style-name="ce112" table:formula="of:=IF(ISBLANK([.M14]);&quot;&quot;;[.$B14]*[.M14])">
            <text:p/>
          </table:table-cell>
          <table:table-cell table:style-name="ce116" table:formula="of:=IF(ISBLANK([.N14]);&quot;&quot;;[.$B14]*[.N14])">
            <text:p/>
          </table:table-cell>
          <table:table-cell table:style-name="ce116" table:formula="of:=IF(ISBLANK([.O14]);&quot;&quot;;[.$B14]*[.O14])">
            <text:p/>
          </table:table-cell>
          <table:table-cell table:style-name="ce123" table:formula="of:=IF(ISBLANK([.P14]);&quot;&quot;;[.$B14]*[.P14])">
            <text:p/>
          </table:table-cell>
          <table:table-cell table:style-name="ce123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5]);&quot;&quot;;[.$B15]*[.C15])" office:value-type="float" office:value="10" calcext:value-type="float">
            <text:p>10</text:p>
          </table:table-cell>
          <table:table-cell table:style-name="ce95" table:formula="of:=IF(ISBLANK([.D15]);&quot;&quot;;[.$B15]*[.D15])" office:value-type="float" office:value="15" calcext:value-type="float">
            <text:p>15</text:p>
          </table:table-cell>
          <table:table-cell table:style-name="ce95" table:formula="of:=IF(ISBLANK([.E15]);&quot;&quot;;[.$B15]*[.E15])" office:value-type="float" office:value="25" calcext:value-type="float">
            <text:p>25</text:p>
          </table:table-cell>
          <table:table-cell table:style-name="ce95" table:formula="of:=IF(ISBLANK([.F15]);&quot;&quot;;[.$B15]*[.F15])" office:value-type="float" office:value="25" calcext:value-type="float">
            <text:p>25</text:p>
          </table:table-cell>
          <table:table-cell table:style-name="ce107" table:formula="of:=IF(ISBLANK([.G15]);&quot;&quot;;[.$B15]*[.G15])">
            <text:p/>
          </table:table-cell>
          <table:table-cell table:style-name="ce107" table:formula="of:=IF(ISBLANK([.H15]);&quot;&quot;;[.$B15]*[.H15])">
            <text:p/>
          </table:table-cell>
          <table:table-cell table:style-name="ce107" table:formula="of:=IF(ISBLANK([.I15]);&quot;&quot;;[.$B15]*[.I15])">
            <text:p/>
          </table:table-cell>
          <table:table-cell table:style-name="ce107" table:formula="of:=IF(ISBLANK([.J15]);&quot;&quot;;[.$B15]*[.J15])">
            <text:p/>
          </table:table-cell>
          <table:table-cell table:style-name="ce112" table:formula="of:=IF(ISBLANK([.K15]);&quot;&quot;;[.$B15]*[.K15])">
            <text:p/>
          </table:table-cell>
          <table:table-cell table:style-name="ce112" table:formula="of:=IF(ISBLANK([.L15]);&quot;&quot;;[.$B15]*[.L15])">
            <text:p/>
          </table:table-cell>
          <table:table-cell table:style-name="ce112" table:formula="of:=IF(ISBLANK([.M15]);&quot;&quot;;[.$B15]*[.M15])">
            <text:p/>
          </table:table-cell>
          <table:table-cell table:style-name="ce116" table:formula="of:=IF(ISBLANK([.N15]);&quot;&quot;;[.$B15]*[.N15])">
            <text:p/>
          </table:table-cell>
          <table:table-cell table:style-name="ce116" table:formula="of:=IF(ISBLANK([.O15]);&quot;&quot;;[.$B15]*[.O15])">
            <text:p/>
          </table:table-cell>
          <table:table-cell table:style-name="ce123" table:formula="of:=IF(ISBLANK([.P15]);&quot;&quot;;[.$B15]*[.P15])">
            <text:p/>
          </table:table-cell>
          <table:table-cell table:style-name="ce123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6]);&quot;&quot;;[.$B16]*[.C16])">
            <text:p/>
          </table:table-cell>
          <table:table-cell table:style-name="ce95" table:formula="of:=IF(ISBLANK([.D16]);&quot;&quot;;[.$B16]*[.D16])">
            <text:p/>
          </table:table-cell>
          <table:table-cell table:style-name="ce95" table:formula="of:=IF(ISBLANK([.E16]);&quot;&quot;;[.$B16]*[.E16])">
            <text:p/>
          </table:table-cell>
          <table:table-cell table:style-name="ce95" table:formula="of:=IF(ISBLANK([.F16]);&quot;&quot;;[.$B16]*[.F16])">
            <text:p/>
          </table:table-cell>
          <table:table-cell table:style-name="ce107" table:formula="of:=IF(ISBLANK([.G16]);&quot;&quot;;[.$B16]*[.G16])">
            <text:p/>
          </table:table-cell>
          <table:table-cell table:style-name="ce107" table:formula="of:=IF(ISBLANK([.H16]);&quot;&quot;;[.$B16]*[.H16])">
            <text:p/>
          </table:table-cell>
          <table:table-cell table:style-name="ce107" table:formula="of:=IF(ISBLANK([.I16]);&quot;&quot;;[.$B16]*[.I16])">
            <text:p/>
          </table:table-cell>
          <table:table-cell table:style-name="ce107" table:formula="of:=IF(ISBLANK([.J16]);&quot;&quot;;[.$B16]*[.J16])">
            <text:p/>
          </table:table-cell>
          <table:table-cell table:style-name="ce112" table:formula="of:=IF(ISBLANK([.K16]);&quot;&quot;;[.$B16]*[.K16])">
            <text:p/>
          </table:table-cell>
          <table:table-cell table:style-name="ce112" table:formula="of:=IF(ISBLANK([.L16]);&quot;&quot;;[.$B16]*[.L16])">
            <text:p/>
          </table:table-cell>
          <table:table-cell table:style-name="ce112" table:formula="of:=IF(ISBLANK([.M16]);&quot;&quot;;[.$B16]*[.M16])">
            <text:p/>
          </table:table-cell>
          <table:table-cell table:style-name="ce116" table:formula="of:=IF(ISBLANK([.N16]);&quot;&quot;;[.$B16]*[.N16])">
            <text:p/>
          </table:table-cell>
          <table:table-cell table:style-name="ce116" table:formula="of:=IF(ISBLANK([.O16]);&quot;&quot;;[.$B16]*[.O16])">
            <text:p/>
          </table:table-cell>
          <table:table-cell table:style-name="ce123" table:formula="of:=IF(ISBLANK([.P16]);&quot;&quot;;[.$B16]*[.P16])">
            <text:p/>
          </table:table-cell>
          <table:table-cell table:style-name="ce123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7]);&quot;&quot;;[.$B17]*[.C17])">
            <text:p/>
          </table:table-cell>
          <table:table-cell table:style-name="ce95" table:formula="of:=IF(ISBLANK([.D17]);&quot;&quot;;[.$B17]*[.D17])">
            <text:p/>
          </table:table-cell>
          <table:table-cell table:style-name="ce95" table:formula="of:=IF(ISBLANK([.E17]);&quot;&quot;;[.$B17]*[.E17])">
            <text:p/>
          </table:table-cell>
          <table:table-cell table:style-name="ce95" table:formula="of:=IF(ISBLANK([.F17]);&quot;&quot;;[.$B17]*[.F17])">
            <text:p/>
          </table:table-cell>
          <table:table-cell table:style-name="ce107" table:formula="of:=IF(ISBLANK([.G20]);&quot;&quot;;[.$B20]*[.G20])">
            <text:p/>
          </table:table-cell>
          <table:table-cell table:style-name="ce107" table:formula="of:=IF(ISBLANK([.H20]);&quot;&quot;;[.$B20]*[.H20])">
            <text:p/>
          </table:table-cell>
          <table:table-cell table:style-name="ce107" table:formula="of:=IF(ISBLANK([.I20]);&quot;&quot;;[.$B20]*[.I20])">
            <text:p/>
          </table:table-cell>
          <table:table-cell table:style-name="ce107" table:formula="of:=IF(ISBLANK([.J20]);&quot;&quot;;[.$B20]*[.J20])">
            <text:p/>
          </table:table-cell>
          <table:table-cell table:style-name="ce112" table:formula="of:=IF(ISBLANK([.K20]);&quot;&quot;;[.$B20]*[.K20])">
            <text:p/>
          </table:table-cell>
          <table:table-cell table:style-name="ce112" table:formula="of:=IF(ISBLANK([.L20]);&quot;&quot;;[.$B20]*[.L20])">
            <text:p/>
          </table:table-cell>
          <table:table-cell table:style-name="ce112" table:formula="of:=IF(ISBLANK([.M20]);&quot;&quot;;[.$B20]*[.M20])">
            <text:p/>
          </table:table-cell>
          <table:table-cell table:style-name="ce116" table:formula="of:=IF(ISBLANK([.N20]);&quot;&quot;;[.$B20]*[.N20])">
            <text:p/>
          </table:table-cell>
          <table:table-cell table:style-name="ce116" table:formula="of:=IF(ISBLANK([.O20]);&quot;&quot;;[.$B20]*[.O20])">
            <text:p/>
          </table:table-cell>
          <table:table-cell table:style-name="ce123" table:formula="of:=IF(ISBLANK([.P20]);&quot;&quot;;[.$B20]*[.P20])">
            <text:p/>
          </table:table-cell>
          <table:table-cell table:style-name="ce123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8]);&quot;&quot;;[.$B18]*[.C18])" office:value-type="float" office:value="-0" calcext:value-type="float">
            <text:p>0</text:p>
          </table:table-cell>
          <table:table-cell table:style-name="ce95" table:formula="of:=IF(ISBLANK([.D18]);&quot;&quot;;[.$B18]*[.D18])" office:value-type="float" office:value="-0" calcext:value-type="float">
            <text:p>0</text:p>
          </table:table-cell>
          <table:table-cell table:style-name="ce95" table:formula="of:=IF(ISBLANK([.E18]);&quot;&quot;;[.$B18]*[.E18])" office:value-type="float" office:value="-20" calcext:value-type="float">
            <text:p>-20</text:p>
          </table:table-cell>
          <table:table-cell table:style-name="ce95" table:formula="of:=IF(ISBLANK([.F18]);&quot;&quot;;[.$B18]*[.F18])" office:value-type="float" office:value="-20" calcext:value-type="float">
            <text:p>-20</text:p>
          </table:table-cell>
          <table:table-cell table:style-name="ce107" table:formula="of:=IF(ISBLANK([.G21]);&quot;&quot;;[.$B21]*[.G21])">
            <text:p/>
          </table:table-cell>
          <table:table-cell table:style-name="ce107" table:formula="of:=IF(ISBLANK([.H21]);&quot;&quot;;[.$B21]*[.H21])">
            <text:p/>
          </table:table-cell>
          <table:table-cell table:style-name="ce107" table:formula="of:=IF(ISBLANK([.I21]);&quot;&quot;;[.$B21]*[.I21])">
            <text:p/>
          </table:table-cell>
          <table:table-cell table:style-name="ce107" table:formula="of:=IF(ISBLANK([.J21]);&quot;&quot;;[.$B21]*[.J21])">
            <text:p/>
          </table:table-cell>
          <table:table-cell table:style-name="ce112" table:formula="of:=IF(ISBLANK([.K21]);&quot;&quot;;[.$B21]*[.K21])">
            <text:p/>
          </table:table-cell>
          <table:table-cell table:style-name="ce112" table:formula="of:=IF(ISBLANK([.L21]);&quot;&quot;;[.$B21]*[.L21])">
            <text:p/>
          </table:table-cell>
          <table:table-cell table:style-name="ce112" table:formula="of:=IF(ISBLANK([.M21]);&quot;&quot;;[.$B21]*[.M21])">
            <text:p/>
          </table:table-cell>
          <table:table-cell table:style-name="ce116" table:formula="of:=IF(ISBLANK([.N21]);&quot;&quot;;[.$B21]*[.N21])">
            <text:p/>
          </table:table-cell>
          <table:table-cell table:style-name="ce116" table:formula="of:=IF(ISBLANK([.O21]);&quot;&quot;;[.$B21]*[.O21])">
            <text:p/>
          </table:table-cell>
          <table:table-cell table:style-name="ce123" table:formula="of:=IF(ISBLANK([.P21]);&quot;&quot;;[.$B21]*[.P21])">
            <text:p/>
          </table:table-cell>
          <table:table-cell table:style-name="ce123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9]);&quot;&quot;;[.$B19]*[.C19])" office:value-type="float" office:value="-0" calcext:value-type="float">
            <text:p>0</text:p>
          </table:table-cell>
          <table:table-cell table:style-name="ce95" table:formula="of:=IF(ISBLANK([.D19]);&quot;&quot;;[.$B19]*[.D19])" office:value-type="float" office:value="-0" calcext:value-type="float">
            <text:p>0</text:p>
          </table:table-cell>
          <table:table-cell table:style-name="ce95" table:formula="of:=IF(ISBLANK([.E19]);&quot;&quot;;[.$B19]*[.E19])" office:value-type="float" office:value="-20" calcext:value-type="float">
            <text:p>-20</text:p>
          </table:table-cell>
          <table:table-cell table:style-name="ce95" table:formula="of:=IF(ISBLANK([.F19]);&quot;&quot;;[.$B19]*[.F19])" office:value-type="float" office:value="-20" calcext:value-type="float">
            <text:p>-20</text:p>
          </table:table-cell>
          <table:table-cell table:style-name="ce107" table:formula="of:=IF(ISBLANK([.G22]);&quot;&quot;;[.$B22]*[.G22])">
            <text:p/>
          </table:table-cell>
          <table:table-cell table:style-name="ce107" table:formula="of:=IF(ISBLANK([.H22]);&quot;&quot;;[.$B22]*[.H22])">
            <text:p/>
          </table:table-cell>
          <table:table-cell table:style-name="ce107" table:formula="of:=IF(ISBLANK([.I22]);&quot;&quot;;[.$B22]*[.I22])">
            <text:p/>
          </table:table-cell>
          <table:table-cell table:style-name="ce107" table:formula="of:=IF(ISBLANK([.J22]);&quot;&quot;;[.$B22]*[.J22])">
            <text:p/>
          </table:table-cell>
          <table:table-cell table:style-name="ce112" table:formula="of:=IF(ISBLANK([.K22]);&quot;&quot;;[.$B22]*[.K22])">
            <text:p/>
          </table:table-cell>
          <table:table-cell table:style-name="ce112" table:formula="of:=IF(ISBLANK([.L22]);&quot;&quot;;[.$B22]*[.L22])">
            <text:p/>
          </table:table-cell>
          <table:table-cell table:style-name="ce112" table:formula="of:=IF(ISBLANK([.M22]);&quot;&quot;;[.$B22]*[.M22])">
            <text:p/>
          </table:table-cell>
          <table:table-cell table:style-name="ce116" table:formula="of:=IF(ISBLANK([.N22]);&quot;&quot;;[.$B22]*[.N22])">
            <text:p/>
          </table:table-cell>
          <table:table-cell table:style-name="ce116" table:formula="of:=IF(ISBLANK([.O22]);&quot;&quot;;[.$B22]*[.O22])">
            <text:p/>
          </table:table-cell>
          <table:table-cell table:style-name="ce123" table:formula="of:=IF(ISBLANK([.P22]);&quot;&quot;;[.$B22]*[.P22])">
            <text:p/>
          </table:table-cell>
          <table:table-cell table:style-name="ce123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7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9"/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Next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9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9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9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9"/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9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9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9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9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9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9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9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9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9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Option[(D,P)] → U → IO[(D,P)]</text:p>
          </table:table-cell>
          <table:table-cell table:style-name="ce90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9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79" office:value-type="string" calcext:value-type="string">
            <text:p>D → A → IO[Unit]</text:p>
          </table:table-cell>
          <table:table-cell table:style-name="ce90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X → D → A → IO[Unit]</text:p>
          </table:table-cell>
          <table:table-cell table:style-name="ce89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Plan</text:p>
          </table:table-cell>
          <table:table-cell table:style-name="ce89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2"/>
          <table:table-cell table:style-name="ce100" office:value-type="string" calcext:value-type="string" table:number-columns-spanned="2" table:number-rows-spanned="1">
            <text:p>in progress</text:p>
          </table:table-cell>
          <table:covered-table-cell/>
          <table:table-cell table:style-name="ce100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1" office:value-type="string" calcext:value-type="string">
            <text:p>RowState = no-effect | effect-in-progress | effect-retry ReactST[IO]</text:p>
          </table:table-cell>
          <table:table-cell table:style-name="ce89"/>
          <table:table-cell/>
          <table:table-cell table:style-name="ce97" office:value-type="string" calcext:value-type="string">
            <text:p>action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cre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upd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del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restor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81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Project (filtered) listening &amp; broadcasting</text:p>
          </table:table-cell>
          <table:table-cell table:style-name="ce89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6:22:28.915214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1-07T16:30:01.269744386</dc:date>
    <meta:editing-duration>P11DT6H32M30S</meta:editing-duration>
    <meta:editing-cycles>129</meta:editing-cycles>
    <meta:generator>LibreOffice/4.4.7.2$Linux_X86_64 LibreOffice_project/40m0$Build-2</meta:generator>
    <meta:document-statistic meta:table-count="6" meta:cell-count="3073" meta:object-count="0"/>
  </office:meta>
</office:document-meta>
</file>
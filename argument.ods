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27cm"/>
    </style:style>
    <style:style style:name="co2" style:family="table-column">
      <style:table-column-properties fo:break-before="auto" style:column-width="9.3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>
            <text:p>Many software projects fail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 of changing requirements increases with time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quirements can be discovered early.</text:p>
          </table:table-cell>
          <table:table-cell office:value-type="string">
            <text:p>So what?</text:p>
          </table:table-cell>
          <table:table-cell office:value-type="string">
            <text:p>Earlier than what?</text:p>
          </table:table-cell>
        </table:table-row>
        <table:table-row table:style-name="ro1">
          <table:table-cell/>
          <table:table-cell office:value-type="string">
            <text:p>Not many modern tools for requirements.</text:p>
          </table:table-cell>
          <table:table-cell/>
          <table:table-cell office:value-type="string">
            <text:p>What is “modern”?</text:p>
          </table:table-cell>
        </table:table-row>
        <table:table-row table:style-name="ro1">
          <table:table-cell/>
          <table:table-cell office:value-type="string">
            <text:p>Use cases save time.</text:p>
          </table:table-cell>
          <table:table-cell office:value-type="string">
            <text:p>Why?</text:p>
          </table:table-cell>
          <table:table-cell/>
        </table:table-row>
        <table:table-row table:style-name="ro1">
          <table:table-cell/>
          <table:table-cell office:value-type="string">
            <text:p>Use cases save money.</text:p>
          </table:table-cell>
          <table:table-cell office:value-type="string">
            <text:p>Why?</text:p>
          </table:table-cell>
          <table:table-cell/>
        </table:table-row>
        <table:table-row table:style-name="ro1">
          <table:table-cell/>
          <table:table-cell office:value-type="string">
            <text:p>Use cases improve quality.</text:p>
          </table:table-cell>
          <table:table-cell office:value-type="string">
            <text:p>Why?</text:p>
          </table:table-cell>
          <table:table-cell/>
        </table:table-row>
        <table:table-row table:style-name="ro1">
          <table:table-cell/>
          <table:table-cell office:value-type="string">
            <text:p>Agile isn't enough.</text:p>
          </table:table-cell>
          <table:table-cell office:value-type="string">
            <text:p>Why?</text:p>
          </table:table-cell>
          <table:table-cell office:value-type="string">
            <text:p>What is “enough”?</text:p>
          </table:table-cell>
        </table:table-row>
        <table:table-row table:style-name="ro1">
          <table:table-cell/>
          <table:table-cell office:value-type="string">
            <text:p>User stories aren't enough.</text:p>
          </table:table-cell>
          <table:table-cell office:value-type="string">
            <text:p>Why?</text:p>
          </table:table-cell>
          <table:table-cell office:value-type="string">
            <text:p>What is “enough”?</text:p>
          </table:table-cell>
        </table:table-row>
        <table:table-row table:style-name="ro1">
          <table:table-cell/>
          <table:table-cell office:value-type="string">
            <text:p>Many software projects don't have proper requirements.</text:p>
          </table:table-cell>
          <table:table-cell/>
          <table:table-cell office:value-type="string">
            <text:p>What is “proper”?</text:p>
          </table:table-cell>
        </table:table-row>
        <table:table-row table:style-name="ro2">
          <table:table-cell office:value-type="string">
            <text:p>Enthymeme</text:p>
          </table:table-cell>
          <table:table-cell office:value-type="string">
            <text:p>We want to save money.</text:p>
          </table:table-cell>
          <table:table-cell table:number-columns-repeated="2"/>
        </table:table-row>
        <table:table-row table:style-name="ro2">
          <table:table-cell office:value-type="string">
            <text:p>Enthymeme</text:p>
          </table:table-cell>
          <table:table-cell office:value-type="string">
            <text:p>We want to save time.</text:p>
          </table:table-cell>
          <table:table-cell table:number-columns-repeated="2"/>
        </table:table-row>
        <table:table-row table:style-name="ro2">
          <table:table-cell office:value-type="string">
            <text:p>Enthymeme</text:p>
          </table:table-cell>
          <table:table-cell office:value-type="string">
            <text:p>We want a quality product.</text:p>
          </table:table-cell>
          <table:table-cell table:number-columns-repeated="2"/>
        </table:table-row>
        <table:table-row table:style-name="ro1">
          <table:table-cell office:value-type="string">
            <text:p>Antithesis</text:p>
          </table:table-cell>
          <table:table-cell office:value-type="string">
            <text:p>Requirements are hard.</text:p>
          </table:table-cell>
          <table:table-cell table:number-columns-repeated="2"/>
        </table:table-row>
        <table:table-row table:style-name="ro1">
          <table:table-cell office:value-type="string">
            <text:p>Antithesis</text:p>
          </table:table-cell>
          <table:table-cell office:value-type="string">
            <text:p>Requirements are a waste of time.</text:p>
          </table:table-cell>
          <table:table-cell table:number-columns-repeated="2"/>
        </table:table-row>
        <table:table-row table:style-name="ro1">
          <table:table-cell office:value-type="string">
            <text:p>Antithesis</text:p>
          </table:table-cell>
          <table:table-cell office:value-type="string">
            <text:p>I'm safe with agile &amp; [TBX]DD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ur requirements are always moving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've been doing fine without requirements for ages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ere is no perfect process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 don't have much time/money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 don't have much time/money to spend on requirements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 have strict deadlines. No time for requirements.</text:p>
          </table:table-cell>
          <table:table-cell table:number-columns-repeated="2"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5:28:16</meta:creation-date>
    <dc:date>2013-06-18T15:46:02</dc:date>
    <meta:editing-duration>PT1M55S</meta:editing-duration>
    <meta:editing-cycles>1</meta:editing-cycles>
    <meta:document-statistic meta:table-count="1" meta:cell-count="39" meta:object-count="0"/>
    <meta:generator>LibreOffice/4.0.3.3$Linux_x86 LibreOffice_project/400m0$Build-3</meta:generator>
  </office:meta>
</office:document-meta>
</file>
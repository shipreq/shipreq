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8.6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778cm"/>
    </style:style>
    <style:style style:name="co7" style:family="table-column">
      <style:table-column-properties fo:break-before="auto" style:column-width="3.231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color="#800000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color="#008000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color="#c0c0c0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800000" fo:font-size="12pt" style:font-size-asian="12pt" style:font-size-complex="12pt"/>
    </style:style>
    <style:style style:name="ce7" style:family="table-cell" style:parent-style-name="Default">
      <style:text-properties fo:color="#008000" fo:font-size="12pt" style:font-size-asian="12pt" style:font-size-complex="12pt"/>
    </style:style>
    <style:style style:name="ce8" style:family="table-cell" style:parent-style-name="Default">
      <style:text-properties fo:color="#c0c0c0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800000" fo:font-size="12pt" style:font-size-asian="12pt" style:font-size-complex="12pt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000" fo:font-size="12pt" style:font-size-asian="12pt" style:font-size-complex="12pt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c0c0c0" fo:font-size="12pt" style:font-size-asian="12pt" style:font-size-complex="12pt"/>
    </style:style>
    <style:style style:name="ce1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110"/>
    <style:style style:name="ce18" style:family="table-cell" style:parent-style-name="Default" style:data-style-name="N3"/>
    <style:style style:name="ce19" style:family="table-cell" style:parent-style-name="Default" style:data-style-name="N111"/>
    <style:style style:name="ce20" style:family="table-cell" style:parent-style-name="Default" style:data-style-name="N114"/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4"/>
        <table:table-column table:style-name="co4" table:default-cell-style-name="ce9"/>
        <table:table-column table:style-name="co5" table:number-columns-repeated="1019" table:default-cell-style-name="ce9"/>
        <table:table-row table:style-name="ro1">
          <table:table-cell/>
          <table:table-cell table:style-name="ce5"/>
          <table:table-cell table:style-name="ce10" office:value-type="string" calcext:value-type="string">
            <text:p>Comple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UC-1</text:p>
          </table:table-cell>
          <table:table-cell table:style-name="ce6" office:value-type="string" calcext:value-type="string">
            <text:p>Delete a Use Case</text:p>
          </table:table-cell>
          <table:table-cell table:style-name="ce11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C-2</text:p>
          </table:table-cell>
          <table:table-cell table:style-name="ce7" office:value-type="string" calcext:value-type="string">
            <text:p>Reference an entire UC</text:p>
          </table:table-cell>
          <table:table-cell table:style-name="ce12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C-3</text:p>
          </table:table-cell>
          <table:table-cell table:style-name="ce8" office:value-type="string" calcext:value-type="string">
            <text:p>Reference a step in another UC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8" office:value-type="string" calcext:value-type="string">
            <text:p>Maybe omit this completely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C-4</text:p>
          </table:table-cell>
          <table:table-cell table:style-name="ce7" office:value-type="string" calcext:value-type="string">
            <text:p>View UCs in Presentation Mode</text:p>
          </table:table-cell>
          <table:table-cell table:style-name="ce12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C-5</text:p>
          </table:table-cell>
          <table:table-cell table:style-name="ce7" office:value-type="string" calcext:value-type="string">
            <text:p>Allow Friends to read UCs</text:p>
          </table:table-cell>
          <table:table-cell table:style-name="ce12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C-6</text:p>
          </table:table-cell>
          <table:table-cell table:style-name="ce8" office:value-type="string" calcext:value-type="string">
            <text:p>Download a PDF of UCs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8" office:value-type="string" calcext:value-type="string">
            <text:p>Removed from 1.0 scop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C-7</text:p>
          </table:table-cell>
          <table:table-cell table:style-name="ce7" office:value-type="string" calcext:value-type="string">
            <text:p>Create a Project</text:p>
          </table:table-cell>
          <table:table-cell table:style-name="ce12" office:value-type="percentage" office:value="0.98" calcext:value-type="percentage">
            <text:p>98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C-8</text:p>
          </table:table-cell>
          <table:table-cell table:style-name="ce7" office:value-type="string" calcext:value-type="string">
            <text:p>Modify a Share</text:p>
          </table:table-cell>
          <table:table-cell table:style-name="ce12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System shall show a Project Owner the list of the project's shares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each share's name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each share's URL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clicking the share name shall display the share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each share URL shall have an adjacent button to copy the URL to the clipboard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how many times each share has been viewed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when each share was last viewed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project owner shall be able to create a new share.</text:p>
          </table:table-cell>
          <table:table-cell office:value-type="string" calcext:value-type="string">
            <text:p>5.0.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hen creating a new share, System shall prompt for the share name.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2">
          <table:table-cell/>
          <table:table-cell table:style-name="ce15" office:value-type="string" calcext:value-type="string">
            <text:p>Changabilit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Mod/Add/Del share attributes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Mod/Add/Del UC selection criteria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Set viewing options (eg. hide flow clauses, hide fields)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Expiry of: password, entire share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Restict IPs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sage restrictions: share count, UC count, view count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Filter composit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BA can disable sha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Different types of shares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5" office:value-type="string" calcext:value-type="string">
            <text:p>Share Entit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projec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nam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ur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view_coun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last_viewed_a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passwor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welcome_tex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UCs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5"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sha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roject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rl_tok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na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asswo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assword_sal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welcome_tex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c_filt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view_cou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last_viewed_at</text:p>
          </table:table-cell>
          <table:table-cell/>
          <table:table-cell table:style-name="ce18" table:formula="of:=[.D50]/1000000" office:value-type="float" office:value="20000" calcext:value-type="float">
            <text:p>20,000</text:p>
          </table:table-cell>
        </table:table-row>
        <table:table-row table:style-name="ro2">
          <table:table-cell/>
          <table:table-cell office:value-type="string" calcext:value-type="string">
            <text:p>- created_at</text:p>
          </table:table-cell>
          <table:table-cell/>
          <table:table-cell table:style-name="ce18" office:value-type="float" office:value="20000000000" calcext:value-type="float">
            <text:p>20,000,000,000</text:p>
          </table:table-cell>
        </table:table-row>
        <table:table-row table:style-name="ro2">
          <table:table-cell table:number-columns-repeated="3"/>
          <table:table-cell table:style-name="ce18" table:formula="of:=[.D51]/[.D52]" office:value-type="float" office:value="20000000000" calcext:value-type="float">
            <text:p>20,000,000,000</text:p>
          </table:table-cell>
        </table:table-row>
        <table:table-row table:style-name="ro2">
          <table:table-cell/>
          <table:table-cell table:style-name="ce16" office:value-type="string" calcext:value-type="string">
            <text:p>share_access_log</text:p>
          </table:table-cell>
          <table:table-cell/>
          <table:table-cell table:style-name="ce18" office:value-type="float" office:value="200000" calcext:value-type="float">
            <text:p>200,000</text:p>
          </table:table-cell>
        </table:table-row>
        <table:table-row table:style-name="ro3">
          <table:table-cell/>
          <table:table-cell office:value-type="string" calcext:value-type="string">
            <text:p>- when</text:p>
          </table:table-cell>
          <table:table-cell/>
          <table:table-cell table:style-name="ce19" office:value-type="percentage" office:value="0.00001" calcext:value-type="percentage">
            <text:p>0.001%</text:p>
          </table:table-cell>
        </table:table-row>
        <table:table-row table:style-name="ro3">
          <table:table-cell/>
          <table:table-cell office:value-type="string" calcext:value-type="string">
            <text:p>- ip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share_id <text:span text:style-name="T1">(</text:span>not a FK, will exist after shares deleted<text:span text:style-name="T1">)</text:span></text:p>
          </table:table-cell>
          <table:table-cell table:number-columns-repeated="2"/>
        </table:table-row>
        <table:table-row table:style-name="ro3">
          <table:table-cell/>
          <table:table-cell table:formula="of:=26*2+10-8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/>
          <table:table-cell table:style-name="ce17" table:formula="of:=[.B$55]^[.C56]/1000000" office:value-type="float" office:value="8.503056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table:style-name="ce20" table:formula="of:=[.D$51]/[.B56]/1000000" office:value-type="percentage" office:value="0.0235209552894865" calcext:value-type="percentage">
            <text:p>2.352095528949%</text:p>
          </table:table-cell>
        </table:table-row>
        <table:table-row table:style-name="ro2">
          <table:table-cell/>
          <table:table-cell table:style-name="ce17" table:formula="of:=[.B$55]^[.C57]/1000000" office:value-type="float" office:value="459.165024" calcext:value-type="float">
            <text:p>459.2</text:p>
          </table:table-cell>
          <table:table-cell table:formula="of:=[.C56]+1" office:value-type="float" office:value="5" calcext:value-type="float">
            <text:p>5</text:p>
          </table:table-cell>
          <table:table-cell table:style-name="ce20" table:formula="of:=[.D$51]/[.B57]/1000000" office:value-type="percentage" office:value="0.000435573246101602" calcext:value-type="percentage">
            <text:p>0.043557324610%</text:p>
          </table:table-cell>
        </table:table-row>
        <table:table-row table:style-name="ro2">
          <table:table-cell/>
          <table:table-cell table:style-name="ce17" table:formula="of:=[.B$55]^[.C58]/1000000" office:value-type="float" office:value="24794.911296" calcext:value-type="float">
            <text:p>24,794.9</text:p>
          </table:table-cell>
          <table:table-cell table:formula="of:=[.C57]+1" office:value-type="float" office:value="6" calcext:value-type="float">
            <text:p>6</text:p>
          </table:table-cell>
          <table:table-cell table:style-name="ce20" table:formula="of:=[.D$51]/[.B58]/1000000" office:value-type="percentage" office:value="0.00000806617122410374" calcext:value-type="percentage">
            <text:p>0.000806617122%</text:p>
          </table:table-cell>
        </table:table-row>
        <table:table-row table:style-name="ro2">
          <table:table-cell/>
          <table:table-cell table:style-name="ce17" table:formula="of:=[.B$55]^[.C59]/1000000" office:value-type="float" office:value="1338925.209984" calcext:value-type="float">
            <text:p>1,338,925.2</text:p>
          </table:table-cell>
          <table:table-cell table:formula="of:=[.C58]+1" office:value-type="float" office:value="7" calcext:value-type="float">
            <text:p>7</text:p>
          </table:table-cell>
          <table:table-cell table:style-name="ce20" table:formula="of:=[.D$51]/[.B59]/1000000" office:value-type="percentage" office:value="0.000000149373541187106" calcext:value-type="percentage">
            <text:p>0.000014937354%</text:p>
          </table:table-cell>
        </table:table-row>
        <table:table-row table:style-name="ro2">
          <table:table-cell/>
          <table:table-cell table:style-name="ce17" table:formula="of:=[.B$55]^[.C60]/1000000" office:value-type="float" office:value="72301961.339136" calcext:value-type="float">
            <text:p>72,301,961.3</text:p>
          </table:table-cell>
          <table:table-cell table:formula="of:=[.C59]+1" office:value-type="float" office:value="8" calcext:value-type="float">
            <text:p>8</text:p>
          </table:table-cell>
          <table:table-cell table:style-name="ce20" table:formula="of:=[.D$51]/[.B60]/1000000" office:value-type="percentage" office:value="0.00000000276617668865012" calcext:value-type="percentage">
            <text:p>0.000000276618%</text:p>
          </table:table-cell>
        </table:table-row>
        <table:table-row table:style-name="ro2">
          <table:table-cell/>
          <table:table-cell table:style-name="ce17" table:formula="of:=[.B$55]^[.C61]/1000000" office:value-type="float" office:value="3904305912.31334" calcext:value-type="float">
            <text:p>3,904,305,912.3</text:p>
          </table:table-cell>
          <table:table-cell table:formula="of:=[.C60]+1" office:value-type="float" office:value="9" calcext:value-type="float">
            <text:p>9</text:p>
          </table:table-cell>
          <table:table-cell table:style-name="ce20" table:formula="of:=[.D$51]/[.B61]/1000000" office:value-type="percentage" office:value="0.0000000000512254942342614" calcext:value-type="percentage">
            <text:p>0.000000005123%</text:p>
          </table:table-cell>
        </table:table-row>
        <table:table-row table:style-name="ro2">
          <table:table-cell/>
          <table:table-cell table:style-name="ce17" table:formula="of:=[.B$55]^[.C62]/1000000" office:value-type="float" office:value="210832519264.921" calcext:value-type="float">
            <text:p>210,832,519,264.9</text:p>
          </table:table-cell>
          <table:table-cell table:formula="of:=[.C61]+1" office:value-type="float" office:value="10" calcext:value-type="float">
            <text:p>10</text:p>
          </table:table-cell>
          <table:table-cell table:style-name="ce20" table:formula="of:=[.D$51]/[.B62]/1000000" office:value-type="percentage" office:value="0.000000000000948620263597434" calcext:value-type="percentage">
            <text:p>0.000000000095%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5" office:value-type="string" calcext:value-type="string">
            <text:p>Invariants &amp; Constraints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project_id – FK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url_token – unique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name -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password -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password_salt -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welcome_tex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uc_filter – match form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view_count &gt;=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last_viewed_at &lt;= now(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created_at &lt;= now(), not null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5" office:value-type="string" calcext:value-type="string">
            <text:p>Model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ha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roject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rl_tok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name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- welcome_tex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c_filt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view_cou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last_viewed_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reated_at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5" office:value-type="string" calcext:value-type="string">
            <text:p>Proces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: non-existant → exis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1" number:grouping="true"/>
    </number:number-style>
    <number:percentage-style style:name="N111">
      <number:number number:decimal-places="3" number:min-integer-digits="1"/>
      <number:text>%</number:text>
    </number:percentage-style>
    <number:number-style style:name="N112">
      <number:number number:decimal-places="12" number:min-integer-digits="1"/>
    </number:number-style>
    <number:percentage-style style:name="N113">
      <number:number number:decimal-places="10" number:min-integer-digits="1"/>
      <number:text>%</number:text>
    </number:percentage-style>
    <number:percentage-style style:name="N114">
      <number:number number:decimal-places="12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 style:data-style-name="N2" text:time-value="0000-00-00T00:00:03.461355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3:37:02.273047662</meta:creation-date>
    <dc:date>2013-11-08T10:45:15.166955777</dc:date>
    <meta:editing-duration>PT3H34M51S</meta:editing-duration>
    <meta:editing-cycles>11</meta:editing-cycles>
    <meta:generator>LibreOffice/4.1.3.2$Linux_X86_64 LibreOffice_project/410m0$Build-2</meta:generator>
    <meta:document-statistic meta:table-count="2" meta:cell-count="134" meta:object-count="0"/>
  </office:meta>
</office:document-meta>
</file>
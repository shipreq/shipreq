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table:formula="of:=&quot;Est days: &quot;&amp;SUM([.A2:.A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ix bug with autocompletion popup not closing on blur and then blocking the whole UI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Misc</text:p>
          </table:table-cell>
          <table:table-cell office:value-type="string" calcext:value-type="string">
            <text:p>UseCase exception levels are off-by-one. 4.E.1.a.i should be 4.E.1.1.a (should it though?)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ctrl-enter in NewForm editors to create and close.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alt-enter in NewForm editors to create and not close.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fgReqTypes restore button allows icon/text wrap. Fix CSS.</text:p>
          </table:table-cell>
          <table:table-cell table:number-columns-repeated="102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wForm is opening at the wrong row! Move up one! Should be above sort,filter,cols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3T18:14:21.308428370</dc:date>
    <meta:editing-duration>PT56M8S</meta:editing-duration>
    <meta:editing-cycles>5</meta:editing-cycles>
    <meta:generator>LibreOffice/5.4.1.2.0$Linux_X86_64 LibreOffice_project/40m0$Build-2</meta:generator>
    <meta:document-statistic meta:table-count="1" meta:cell-count="92" meta:object-count="0"/>
  </office:meta>
</office:document-meta>
</file>
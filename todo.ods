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co1" style:family="table-column">
      <style:table-column-properties fo:break-before="auto" style:column-width="22.12mm"/>
    </style:style>
    <style:style style:name="co2" style:family="table-column">
      <style:table-column-properties fo:break-before="auto" style:column-width="25.72mm"/>
    </style:style>
    <style:style style:name="co3" style:family="table-column">
      <style:table-column-properties fo:break-before="auto" style:column-width="28.5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81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9">
      <style:table-cell-properties fo:background-color="#ed1c24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color="#cccccc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" style:family="table-cell" style:parent-style-name="Default">
      <style:text-properties fo:color="#cccccc"/>
    </style:style>
    <style:style style:name="ce5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table:formula="of:=&quot;Done: &quot;&amp;SUM([.A2:.A203])" office:value-type="string" office:string-value="Done: 4.8" calcext:value-type="string">
            <text:p>Done: 4.8</text:p>
          </table:table-cell>
          <table:table-cell table:style-name="ce1" table:formula="of:=&quot;To Do: &quot;&amp;SUM([.B2:.B203])" office:value-type="string" office:string-value="To Do: 19.6" calcext:value-type="string">
            <text:p>To Do: 19.6</text:p>
          </table:table-cell>
          <table:table-cell table:style-name="ce1" table:formula="of:=&quot;Est days: &quot;&amp;SUM([.C2:.C203])" office:value-type="string" office:string-value="Est days: 23.6" calcext:value-type="string">
            <text:p>Est days: 23.6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Item</text:p>
          </table:table-cell>
          <table:table-cell table:style-name="ce5" table:number-columns-repeated="1019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9"/>
          <table:table-cell table:style-name="ce9" office:value-type="float" office:value="0.3" calcext:value-type="float">
            <text:p>0.3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Fix bug with autocompletion popup not closing on blur and then blocking the whole UI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UseCase exception levels are off-by-one. 4.E.1.a.i should be 4.E.1.1.a (should it though?)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Revise default columns: on new project, only NewForm is visible; default columns are shit and can't be changed.</text:p>
          </table:table-cell>
          <table:table-cell table:number-columns-repeated="1019"/>
        </table:table-row>
        <table:table-row table:style-name="ro1">
          <table:table-cell/>
          <table:table-cell table:formula="of:=[.C5]-[.A5]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vise ProjectTemplate - reduce reqtypes, BL without BR is weird</text:p>
          </table:table-cell>
          <table:table-cell table:number-columns-repeated="1019"/>
        </table:table-row>
        <table:table-row table:style-name="ro1">
          <table:table-cell/>
          <table:table-cell table:formula="of:=[.C6]-[.A6]" office:value-type="float" office:value="0.3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Upgrade JDK and audit crypto mechanisms (pending next Jetty release)</text:p>
          </table:table-cell>
          <table:table-cell table:number-columns-repeated="1019"/>
        </table:table-row>
        <table:table-row table:style-name="ro1">
          <table:table-cell/>
          <table:table-cell table:formula="of:=[.C7]-[.A7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qDetail KB shortcuts: ↑, ↓, F2, Tab in/out</text:p>
          </table:table-cell>
          <table:table-cell table:number-columns-repeated="1019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llow ctrl-enter in NewForm editors to create and close.</text:p>
          </table:table-cell>
          <table:table-cell table:number-columns-repeated="1019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llow alt-enter in NewForm editors to create and not close.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.0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CfgReqTypes restore button allows icon/text wrap. Fix CSS.</text:p>
          </table:table-cell>
          <table:table-cell table:number-columns-repeated="1019"/>
        </table:table-row>
        <table:table-row table:style-name="ro1">
          <table:table-cell/>
          <table:table-cell table:formula="of:=[.C11]-[.A11]" office:value-type="float" office:value="2.8" calcext:value-type="float">
            <text:p>2.8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dd and use RestorationForm just like the DeletionForm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.0</text:p>
          </table:table-cell>
          <table:table-cell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NewForm is opening at the wrong row! Move up one! Should be above sort,filter,cols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/>
          <table:table-cell table:style-name="ce9" office:value-type="float" office:value="0.2" calcext:value-type="float">
            <text:p>0.2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dd icons to project navbar dropdown (reqtable,impgraph etc) and sync to dashboard order (not A-Z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1" table:number-columns-repeated="2"/>
          <table:table-cell table:number-columns-repeated="1019"/>
        </table:table-row>
        <table:table-row table:style-name="ro1">
          <table:table-cell/>
          <table:table-cell table:formula="of:=[.C15]-[.A15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Screenshot (capture, to webapp, to taskman, to FreshDesk)</text:p>
          </table:table-cell>
          <table:table-cell table:number-columns-repeated="1019"/>
        </table:table-row>
        <table:table-row table:style-name="ro1">
          <table:table-cell/>
          <table:table-cell table:formula="of:=[.C16]-[.A16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UI &amp; protocol</text:p>
          </table:table-cell>
          <table:table-cell table:number-columns-repeated="1019"/>
        </table:table-row>
        <table:table-row table:style-name="ro1">
          <table:table-cell/>
          <table:table-cell table:formula="of:=[.C17]-[.A17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Webapp → Taskman → FreshDes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.2" calcext:value-type="float">
            <text:p>1.2</text:p>
          </table:table-cell>
          <table:table-cell/>
          <table:table-cell table:style-name="ce9" office:value-type="float" office:value="0.5" calcext:value-type="float">
            <text:p>0.5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Data model (+DataProp)</text:p>
          </table:table-cell>
          <table:table-cell table:number-columns-repeated="1019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C20]-[.A20]" office:value-type="float" office:value="-1.9" calcext:value-type="float">
            <text:p>-1.9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Events (bin &amp; db codecs, hash, gen(arb+RES), validation, ap, tests)</text:p>
          </table:table-cell>
          <table:table-cell table:number-columns-repeated="1019"/>
        </table:table-row>
        <table:table-row table:style-name="ro1">
          <table:table-cell/>
          <table:table-cell table:formula="of:=[.C21]-[.A21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Logic (+tests)</text:p>
          </table:table-cell>
          <table:table-cell table:number-columns-repeated="1019"/>
        </table:table-row>
        <table:table-row table:style-name="ro1">
          <table:table-cell/>
          <table:table-cell table:formula="of:=[.C22]-[.A22]" office:value-type="float" office:value="1.6" calcext:value-type="float">
            <text:p>1.6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UI (+protocol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C24]-[.A24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Update dashboard (with other UI fixes)</text:p>
          </table:table-cell>
          <table:table-cell table:number-columns-repeated="1019"/>
        </table:table-row>
        <table:table-row table:style-name="ro1">
          <table:table-cell/>
          <table:table-cell table:formula="of:=[.C25]-[.A25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rack and capture (+tests)</text:p>
          </table:table-cell>
          <table:table-cell table:number-columns-repeated="1019"/>
        </table:table-row>
        <table:table-row table:style-name="ro1">
          <table:table-cell/>
          <table:table-cell table:formula="of:=[.C26]-[.A26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dd each issue type to filter DSL (+autocomplete +interpreter)</text:p>
          </table:table-cell>
          <table:table-cell table:number-columns-repeated="1019"/>
        </table:table-row>
        <table:table-row table:style-name="ro1">
          <table:table-cell/>
          <table:table-cell table:formula="of:=[.C27]-[.A27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Highlighting everywhere</text:p>
          </table:table-cell>
          <table:table-cell table:number-columns-repeated="1019"/>
        </table:table-row>
        <table:table-row table:style-name="ro1">
          <table:table-cell/>
          <table:table-cell table:formula="of:=[.C28]-[.A28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table model</text:p>
          </table:table-cell>
          <table:table-cell table:number-columns-repeated="1019"/>
        </table:table-row>
        <table:table-row table:style-name="ro1">
          <table:table-cell/>
          <table:table-cell table:formula="of:=[.C29]-[.A29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gather/filter/sort/merge (+tests)</text:p>
          </table:table-cell>
          <table:table-cell table:number-columns-repeated="1019"/>
        </table:table-row>
        <table:table-row table:style-name="ro1">
          <table:table-cell/>
          <table:table-cell table:formula="of:=[.C30]-[.A30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able column/order/sort freedom (possibly reuse from ReqTable)</text:p>
          </table:table-cell>
          <table:table-cell table:number-columns-repeated="1019"/>
        </table:table-row>
        <table:table-row table:style-name="ro1">
          <table:table-cell/>
          <table:table-cell table:formula="of:=[.C31]-[.A31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New loose button &amp; form</text:p>
          </table:table-cell>
          <table:table-cell table:number-columns-repeated="1019"/>
        </table:table-row>
        <table:table-row table:style-name="ro1">
          <table:table-cell/>
          <table:table-cell table:formula="of:=[.C32]-[.A32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/>
          <table:table-cell table:formula="of:=[.C33]-[.A33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nder table with editors &amp; buttons</text:p>
          </table:table-cell>
          <table:table-cell table:number-columns-repeated="1019"/>
        </table:table-row>
        <table:table-row table:style-name="ro1">
          <table:table-cell/>
          <table:table-cell table:formula="of:=[.C34]-[.A34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lternate states (empty, all filtered out)</text:p>
          </table:table-cell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Ek Mukta" style:font-family-complex="'Ek Mukta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9">00/00/0000</text:date>, <text:time style:data-style-name="N2" text:time-value="21:46:01.2401733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7:18:12.305879112</meta:creation-date>
    <dc:date>2017-10-19T22:13:15.587791507</dc:date>
    <meta:editing-duration>P1DT12H32M40S</meta:editing-duration>
    <meta:editing-cycles>18</meta:editing-cycles>
    <meta:generator>LibreOffice/5.4.2.2.0$Linux_X86_64 LibreOffice_project/40m0$Build-2</meta:generator>
    <meta:document-statistic meta:table-count="1" meta:cell-count="124" meta:object-count="0"/>
  </office:meta>
</office:document-meta>
</file>
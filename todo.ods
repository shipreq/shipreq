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&quot;Done: &quot;&amp;SUM([.A2:.A200])" office:value-type="string" office:string-value="Done: 0.3" calcext:value-type="string">
            <text:p>Done: 0.3</text:p>
          </table:table-cell>
          <table:table-cell table:style-name="ce1" table:formula="of:=&quot;To Do: &quot;&amp;SUM([.B2:.B200])" office:value-type="string" office:string-value="To Do: 22.6" calcext:value-type="string">
            <text:p>To Do: 22.6</text:p>
          </table:table-cell>
          <table:table-cell table:style-name="ce1" table:formula="of:=&quot;Est days: &quot;&amp;SUM([.C2:.C200])" office:value-type="string" office:string-value="Est days: 23" calcext:value-type="string">
            <text:p>Est days: 23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0" office:value-type="string" calcext:value-type="string">
            <text:p>Misc</text:p>
          </table:table-cell>
          <table:table-cell table:style-name="ce10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0" office:value-type="string" calcext:value-type="string">
            <text:p>Misc</text:p>
          </table:table-cell>
          <table:table-cell table:style-name="ce10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0" office:value-type="string" calcext:value-type="string">
            <text:p>Misc</text:p>
          </table:table-cell>
          <table:table-cell table:style-name="ce10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/>
          <table:table-cell table:formula="of:=[.C8]-[.A8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/>
          <table:table-cell table:formula="of:=[.C9]-[.A9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/>
          <table:table-cell table:formula="of:=[.C10]-[.A10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/>
          <table:table-cell table:formula="of:=[.C12]-[.A12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/>
          <table:table-cell table:formula="of:=[.C13]-[.A13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/>
          <table:table-cell table:formula="of:=[.C14]-[.A1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Data mode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+ap +tests)</text:p>
          </table:table-cell>
          <table:table-cell table:number-columns-repeated="1019"/>
        </table:table-row>
        <table:table-row table:style-name="ro1">
          <table:table-cell/>
          <table:table-cell table:formula="of:=[.C19]-[.A1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0]-[.A2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3]-[.A23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4]-[.A2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15:36:03.94468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4T16:51:07.385900705</dc:date>
    <meta:editing-duration>PT2H59S</meta:editing-duration>
    <meta:editing-cycles>8</meta:editing-cycles>
    <meta:generator>LibreOffice/5.4.1.2.0$Linux_X86_64 LibreOffice_project/40m0$Build-2</meta:generator>
    <meta:document-statistic meta:table-count="1" meta:cell-count="123" meta:object-count="0"/>
  </office:meta>
</office:document-meta>
</file>
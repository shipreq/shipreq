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5.72mm"/>
    </style:style>
    <style:style style:name="co3" style:family="table-column">
      <style:table-column-properties fo:break-before="auto" style:column-width="28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ed1c24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16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table:formula="of:=&quot;Done: &quot;&amp;SUM([.A2:.A204])" office:value-type="string" office:string-value="Done: 9.9" calcext:value-type="string">
            <text:p>Done: 9.9</text:p>
          </table:table-cell>
          <table:table-cell table:style-name="ce1" table:formula="of:=&quot;To Do: &quot;&amp;SUM([.B2:.B204])" office:value-type="string" office:string-value="To Do: 14.5" calcext:value-type="string">
            <text:p>To Do: 14.5</text:p>
          </table:table-cell>
          <table:table-cell table:style-name="ce1" table:formula="of:=&quot;Est days: &quot;&amp;SUM([.C2:.C204])" office:value-type="string" office:string-value="Est days: 23.6" calcext:value-type="string">
            <text:p>Est days: 23.6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</text:p>
          </table:table-cell>
          <table:table-cell table:style-name="ce12" table:formula="of:=[.C20]-[.A20]" office:value-type="float" office:value="-2.4" calcext:value-type="float">
            <text:p>-2.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 table:formula="of:=0.2+1+0.7" office:value-type="float" office:value="1.9" calcext:value-type="float">
            <text:p>1.9</text:p>
          </table:table-cell>
          <table:table-cell table:formula="of:=[.C21]-[.A21]" office:value-type="float" office:value="-0.9" calcext:value-type="float">
            <text:p>-0.9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2" table:formula="of:=[.C22]-[.A22]" office:value-type="float" office:value="-2.5" calcext:value-type="float">
            <text:p>-2.5</text:p>
          </table:table-cell>
          <table:table-cell table:style-name="ce13" office:value-type="float" office:value="0" calcext:value-type="float">
            <text:p>0.0</text:p>
          </table:table-cell>
          <table:table-cell office:value-type="string" calcext:value-type="string">
            <text:p>SavedViews</text:p>
          </table:table-cell>
          <table:table-cell table:style-name="ce16" office:value-type="string" calcext:value-type="string">
            <text:p>Rewrite Filters, ValidFilter isn’t appropriate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23]-[.A23]"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5]-[.A25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5]-[.A35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6">00/00/0000</text:date>, <text:time style:data-style-name="N2" text:time-value="22:12:51.569062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26T22:15:27.819141744</dc:date>
    <meta:editing-duration>P1DT12H38M18S</meta:editing-duration>
    <meta:editing-cycles>21</meta:editing-cycles>
    <meta:generator>LibreOffice/5.4.2.2.0$Linux_X86_64 LibreOffice_project/40m0$Build-2</meta:generator>
    <meta:document-statistic meta:table-count="1" meta:cell-count="131" meta:object-count="0"/>
  </office:meta>
</office:document-meta>
</file>
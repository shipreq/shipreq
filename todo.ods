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4])" office:value-type="string" office:string-value="Done: 12.2" calcext:value-type="string">
            <text:p>Done: 12.2</text:p>
          </table:table-cell>
          <table:table-cell table:style-name="ce1" table:formula="of:=&quot;To Do: &quot;&amp;SUMIF([.B2:.B204];&quot;&gt;0&quot;)" office:value-type="string" office:string-value="To Do: 18.9" calcext:value-type="string">
            <text:p>To Do: 18.9</text:p>
          </table:table-cell>
          <table:table-cell table:style-name="ce1" table:formula="of:=&quot;Est days: &quot;&amp;SUM([.C2:.C204])" office:value-type="string" office:string-value="Est days: 23.6" calcext:value-type="string">
            <text:p>Est days: 23.6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2" table:formula="of:=[.C19]-[.A19]" office:value-type="float" office:value="-0.7" calcext:value-type="float">
            <text:p>-0.7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2" table:formula="of:=[.C20]-[.A20]" office:value-type="float" office:value="-2.4" calcext:value-type="float">
            <text:p>-2.4</text:p>
          </table:table-cell>
          <table:table-cell table:style-name="ce9" office:value-type="float" office:value="0.6" calcext:value-type="float">
            <text:p>0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style-name="ce15" table:formula="of:=[.C21]-[.A21]" office:value-type="float" office:value="-0.9" calcext:value-type="float">
            <text:p>-0.9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2" table:formula="of:=[.C22]-[.A22]" office:value-type="float" office:value="-2.5" calcext:value-type="float">
            <text:p>-2.5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table:formula="of:=0.2+0.8+1.5" office:value-type="float" office:value="2.5" calcext:value-type="float">
            <text:p>2.5</text:p>
          </table:table-cell>
          <table:table-cell table:style-name="ce15" table:formula="of:=[.C23]-[.A23]" office:value-type="float" office:value="-0.9" calcext:value-type="float">
            <text:p>-0.9</text:p>
          </table:table-cell>
          <table:table-cell table:style-name="ce9" office:value-type="float" office:value="1.6" calcext:value-type="float">
            <text:p>1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5]-[.A2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/00/0000</text:date>, <text:time style:data-style-name="N2" text:time-value="14:15:41.109491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30T14:19:10.048312448</dc:date>
    <meta:editing-duration>P3DT6H30M38S</meta:editing-duration>
    <meta:editing-cycles>25</meta:editing-cycles>
    <meta:generator>LibreOffice/5.4.2.2.0$Linux_X86_64 LibreOffice_project/40m0$Build-2</meta:generator>
    <meta:document-statistic meta:table-count="1" meta:cell-count="132" meta:object-count="0"/>
  </office:meta>
</office:document-meta>
</file>
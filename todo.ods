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formula="of:=&quot;Done: &quot;&amp;SUM([.A2:.A200])" office:value-type="string" office:string-value="Done: 1" calcext:value-type="string">
            <text:p>Done: 1</text:p>
          </table:table-cell>
          <table:table-cell table:style-name="ce1" table:formula="of:=&quot;To Do: &quot;&amp;SUMIF([.B2:.B200];&quot;&gt;0&quot;)" office:value-type="string" office:string-value="To Do: 22.5" calcext:value-type="string">
            <text:p>To Do: 22.5</text:p>
          </table:table-cell>
          <table:table-cell table:style-name="ce1" table:formula="of:=&quot;Est days: &quot;&amp;SUM([.C2:.C200])" office:value-type="string" office:string-value="Est days: 23" calcext:value-type="string">
            <text:p>Est days: 23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 table:formula="of:=[.C2]-[.A2]" office:value-type="float" office:value="0.1" calcext:value-type="float">
            <text:p>0.1</text:p>
          </table:table-cell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 table:formula="of:=[.C4]-[.A4]" office:value-type="float" office:value="0" calcext:value-type="float">
            <text:p>0.0</text:p>
          </table:table-cell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 table:formula="of:=[.C8]-[.A8]" office:value-type="float" office:value="-0.3" calcext:value-type="float">
            <text:p>-0.3</text:p>
          </table:table-cell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 table:formula="of:=[.C9]-[.A9]" office:value-type="float" office:value="-0.2" calcext:value-type="float">
            <text:p>-0.2</text:p>
          </table:table-cell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 table:formula="of:=[.C10]-[.A10]" office:value-type="float" office:value="0.1" calcext:value-type="float">
            <text:p>0.1</text:p>
          </table:table-cell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/>
          <table:table-cell table:formula="of:=[.C12]-[.A12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/>
          <table:table-cell table:formula="of:=[.C13]-[.A13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/>
          <table:table-cell table:formula="of:=[.C14]-[.A14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Data mode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+ap +tests)</text:p>
          </table:table-cell>
          <table:table-cell table:number-columns-repeated="1019"/>
        </table:table-row>
        <table:table-row table:style-name="ro1">
          <table:table-cell/>
          <table:table-cell table:formula="of:=[.C19]-[.A19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/>
          <table:table-cell table:formula="of:=[.C20]-[.A2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</text:p>
          </table:table-cell>
          <table:table-cell table:number-columns-repeated="1019"/>
        </table:table-row>
        <table:table-row table:style-name="ro1">
          <table:table-cell/>
          <table:table-cell table:formula="of:=[.C21]-[.A2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2]-[.A2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3]-[.A23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4]-[.A24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5]-[.A2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5">00/00/0000</text:date>, <text:time style:data-style-name="N2" text:time-value="15:36:03.944686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15T15:38:50.118249144</dc:date>
    <meta:editing-duration>P1DT48M41S</meta:editing-duration>
    <meta:editing-cycles>11</meta:editing-cycles>
    <meta:generator>LibreOffice/5.4.1.2.0$Linux_X86_64 LibreOffice_project/40m0$Build-2</meta:generator>
    <meta:document-statistic meta:table-count="1" meta:cell-count="128" meta:object-count="0"/>
  </office:meta>
</office:document-meta>
</file>
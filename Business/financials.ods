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96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73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3"/>
    <style:style style:name="ce5" style:family="table-cell" style:parent-style-name="Default" style:data-style-name="N103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03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"/>
    <style:style style:name="ce10" style:family="table-cell" style:parent-style-name="Default" style:data-style-name="N1"/>
    <style:style style:name="ce11" style:family="table-cell" style:parent-style-name="Default" style:data-style-name="N103">
      <style:table-cell-properties fo:background-color="#cfe7f5"/>
    </style:style>
    <style:style style:name="ce1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04"/>
    <style:style style:name="ce14" style:family="table-cell" style:parent-style-name="Default" style:data-style-name="N108"/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mo1" style:font-name-asian="Arimo1" style:font-name-complex="Arimo1"/>
    </style:style>
  </office:automatic-styles>
  <office:body>
    <office:spreadsheet>
      <table:table table:name="Service costs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table:style-name="ce3" office:value-type="string" calcext:value-type="string">
            <text:p>Year 1</text:p>
          </table:table-cell>
          <table:table-cell table:style-name="ce7" office:value-type="string" calcext:value-type="string">
            <text:p>Year 2+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osting: Domain</text:p>
          </table:table-cell>
          <table:table-cell table:formula="of:=15/12" office:value-type="currency" office:currency="AUD" office:value="1.25" calcext:value-type="currency">
            <text:p>$1</text:p>
          </table:table-cell>
          <table:table-cell table:style-name="ce4" table:formula="of:=[.B3]" office:value-type="currency" office:currency="AUD" office:value="1.25" calcext:value-type="currency">
            <text:p>$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ng: SSL</text:p>
          </table:table-cell>
          <table:table-cell office:value-type="currency" office:currency="AUD" office:value="0" calcext:value-type="currency">
            <text:p>$0</text:p>
          </table:table-cell>
          <table:table-cell table:style-name="ce4" table:formula="of:=14/12" office:value-type="currency" office:currency="AUD" office:value="1.16666666666667" calcext:value-type="currency">
            <text:p>$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Hosting: AWS</text:p>
          </table:table-cell>
          <table:table-cell table:style-name="ce5" office:value-type="string" calcext:value-type="string" table:number-columns-spanned="2" table:number-rows-spanned="1">
            <text:p>Sydney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US East</text:p>
          </table:table-cell>
          <table:covered-table-cell table:style-name="ce8"/>
        </table:table-row>
        <table:table-row table:style-name="ro1">
          <table:table-cell office:value-type="string" calcext:value-type="string">
            <text:p><text:s text:c="4"/>App</text:p>
          </table:table-cell>
          <table:table-cell table:formula="of:=0.02*24*365/12" office:value-type="currency" office:currency="AUD" office:value="14.6" calcext:value-type="currency">
            <text:p>$15</text:p>
          </table:table-cell>
          <table:table-cell table:style-name="ce4" table:formula="of:=[.B7]" office:value-type="currency" office:currency="AUD" office:value="14.6" calcext:value-type="currency">
            <text:p>$15</text:p>
          </table:table-cell>
          <table:table-cell table:style-name="ce4" table:formula="of:=0.02*24*365/12" office:value-type="currency" office:currency="AUD" office:value="14.6" calcext:value-type="currency">
            <text:p>$15</text:p>
          </table:table-cell>
          <table:table-cell table:style-name="ce4" table:formula="of:=[.D7]" office:value-type="currency" office:currency="AUD" office:value="14.6" calcext:value-type="currency">
            <text:p>$15</text:p>
          </table:table-cell>
        </table:table-row>
        <table:table-row table:style-name="ro1">
          <table:table-cell office:value-type="string" calcext:value-type="string">
            <text:p><text:s text:c="4"/>DB</text:p>
          </table:table-cell>
          <table:table-cell office:value-type="currency" office:currency="AUD" office:value="0" calcext:value-type="currency">
            <text:p>$0</text:p>
          </table:table-cell>
          <table:table-cell table:style-name="ce4" table:formula="of:=0.038*24*365/12" office:value-type="currency" office:currency="AUD" office:value="27.74" calcext:value-type="currency">
            <text:p>$28</text:p>
          </table:table-cell>
          <table:table-cell table:style-name="ce4" office:value-type="currency" office:currency="AUD" office:value="0" calcext:value-type="currency">
            <text:p>$0</text:p>
          </table:table-cell>
          <table:table-cell table:style-name="ce4" table:formula="of:=0.026*24*365/12" office:value-type="currency" office:currency="AUD" office:value="18.98" calcext:value-type="currency">
            <text:p>$19</text:p>
          </table:table-cell>
        </table:table-row>
        <table:table-row table:style-name="ro1">
          <table:table-cell office:value-type="string" calcext:value-type="string">
            <text:p><text:s text:c="4"/>Route 53, data storage &amp; transfer.</text:p>
          </table:table-cell>
          <table:table-cell office:value-type="currency" office:currency="AUD" office:value="1" calcext:value-type="currency">
            <text:p>$1</text:p>
          </table:table-cell>
          <table:table-cell table:style-name="ce4" table:formula="of:=[.B9]" office:value-type="currency" office:currency="AUD" office:value="1" calcext:value-type="currency">
            <text:p>$1</text:p>
          </table:table-cell>
          <table:table-cell table:style-name="ce4" table:formula="of:=[.C9]" office:value-type="currency" office:currency="AUD" office:value="1" calcext:value-type="currency">
            <text:p>$1</text:p>
          </table:table-cell>
          <table:table-cell table:style-name="ce4" table:formula="of:=[.D9]" office:value-type="currency" office:currency="AUD" office:value="1" calcext:value-type="currency">
            <text:p>$1</text:p>
          </table:table-cell>
        </table:table-row>
        <table:table-row table:style-name="ro1">
          <table:table-cell office:value-type="string" calcext:value-type="string">
            <text:p><text:s text:c="4"/>Pre-Tax Total</text:p>
          </table:table-cell>
          <table:table-cell table:formula="of:=SUM([.B7:.B9])" office:value-type="currency" office:currency="AUD" office:value="15.6" calcext:value-type="currency">
            <text:p>$16</text:p>
          </table:table-cell>
          <table:table-cell table:style-name="ce4" table:formula="of:=SUM([.C7:.C9])" office:value-type="currency" office:currency="AUD" office:value="43.34" calcext:value-type="currency">
            <text:p>$43</text:p>
          </table:table-cell>
          <table:table-cell table:style-name="ce4" table:formula="of:=SUM([.D7:.D9])" office:value-type="currency" office:currency="AUD" office:value="15.6" calcext:value-type="currency">
            <text:p>$16</text:p>
          </table:table-cell>
          <table:table-cell table:style-name="ce4" table:formula="of:=SUM([.E7:.E9])" office:value-type="currency" office:currency="AUD" office:value="34.58" calcext:value-type="currency">
            <text:p>$35</text:p>
          </table:table-cell>
        </table:table-row>
        <table:table-row table:style-name="ro1">
          <table:table-cell office:value-type="string" calcext:value-type="string">
            <text:p><text:s text:c="4"/>Tax</text:p>
          </table:table-cell>
          <table:table-cell table:formula="of:=[.B10]*0.1" office:value-type="currency" office:currency="AUD" office:value="1.56" calcext:value-type="currency">
            <text:p>$2</text:p>
          </table:table-cell>
          <table:table-cell table:style-name="ce4" table:formula="of:=[.C10]*0.1" office:value-type="currency" office:currency="AUD" office:value="4.334" calcext:value-type="currency">
            <text:p>$4</text:p>
          </table:table-cell>
          <table:table-cell table:style-name="ce4" table:formula="of:=[.D10]*0.1" office:value-type="currency" office:currency="AUD" office:value="1.56" calcext:value-type="currency">
            <text:p>$2</text:p>
          </table:table-cell>
          <table:table-cell table:style-name="ce4" table:formula="of:=[.E10]*0.1" office:value-type="currency" office:currency="AUD" office:value="3.458" calcext:value-type="currency">
            <text:p>$3</text:p>
          </table:table-cell>
        </table:table-row>
        <table:table-row table:style-name="ro1">
          <table:table-cell table:style-name="ce2" office:value-type="string" calcext:value-type="string">
            <text:p><text:s text:c="4"/>Total</text:p>
          </table:table-cell>
          <table:table-cell table:style-name="ce6" table:formula="of:=[.B11]+[.B10]" office:value-type="currency" office:currency="AUD" office:value="17.16" calcext:value-type="currency">
            <text:p>$17</text:p>
          </table:table-cell>
          <table:table-cell table:style-name="ce6" table:formula="of:=[.C11]+[.C10]" office:value-type="currency" office:currency="AUD" office:value="47.674" calcext:value-type="currency">
            <text:p>$48</text:p>
          </table:table-cell>
          <table:table-cell table:style-name="ce6" table:formula="of:=[.D11]+[.D10]" office:value-type="currency" office:currency="AUD" office:value="17.16" calcext:value-type="currency">
            <text:p>$17</text:p>
          </table:table-cell>
          <table:table-cell table:style-name="ce6" table:formula="of:=[.E11]+[.E10]" office:value-type="currency" office:currency="AUD" office:value="38.038" calcext:value-type="currency">
            <text:p>$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rvice Up</text:p>
          </table:table-cell>
          <table:table-cell table:formula="of:=SUM([.B3:.B4])+[.B12]" office:value-type="currency" office:currency="AUD" office:value="18.41" calcext:value-type="currency">
            <text:p>$18</text:p>
          </table:table-cell>
          <table:table-cell table:style-name="ce4" table:formula="of:=SUM([.C3:.C4])+[.C12]" office:value-type="currency" office:currency="AUD" office:value="50.0906666666667" calcext:value-type="currency">
            <text:p>$50</text:p>
          </table:table-cell>
          <table:table-cell table:style-name="ce4" table:formula="of:=SUM([.D3:.D4])+[.D12]" office:value-type="currency" office:currency="AUD" office:value="17.16" calcext:value-type="currency">
            <text:p>$17</text:p>
          </table:table-cell>
          <table:table-cell table:style-name="ce4" table:formula="of:=SUM([.E3:.E4])+[.E12]" office:value-type="currency" office:currency="AUD" office:value="38.038" calcext:value-type="currency">
            <text:p>$38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2" table:number-rows-repeated="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sers &amp; Money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ultaneous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online simultaneously</text:p>
          </table:table-cell>
          <table:table-cell table:style-name="ce9" office:value-type="percentage" office:value="0.25" calcext:value-type="percentage">
            <text:p>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y</text:p>
          </table:table-cell>
          <table:table-cell table:style-name="ce10" table:formula="of:=[.B3]/[.B4]" office:value-type="float" office:value="2000" calcext:value-type="float">
            <text:p>2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ce Costs</text:p>
          </table:table-cell>
          <table:table-cell table:style-name="ce4" table:formula="of:=['Service costs'.B15]" office:value-type="currency" office:currency="AUD" office:value="18.41" calcext:value-type="currency">
            <text:p>$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 Existance Cost</text:p>
          </table:table-cell>
          <table:table-cell table:style-name="ce11" table:formula="of:=1800+[.B9]" office:value-type="currency" office:currency="AUD" office:value="1818.41" calcext:value-type="currency">
            <text:p>$1,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vice Cost/user</text:p>
          </table:table-cell>
          <table:table-cell table:style-name="ce13" table:formula="of:=[.$B9]/[.B11]" office:value-type="currency" office:currency="AUD" office:value="0.3682" calcext:value-type="currency">
            <text:p>$0.37</text:p>
          </table:table-cell>
          <table:table-cell table:style-name="ce13" table:formula="of:=[.$B9]/[.C11]" office:value-type="currency" office:currency="AUD" office:value="0.1841" calcext:value-type="currency">
            <text:p>$0.18</text:p>
          </table:table-cell>
          <table:table-cell table:style-name="ce13" table:formula="of:=[.$B9]/[.D11]" office:value-type="currency" office:currency="AUD" office:value="0.122733333333333" calcext:value-type="currency">
            <text:p>$0.12</text:p>
          </table:table-cell>
          <table:table-cell table:style-name="ce13" table:formula="of:=[.$B9]/[.E11]" office:value-type="currency" office:currency="AUD" office:value="0.09205" calcext:value-type="currency">
            <text:p>$0.09</text:p>
          </table:table-cell>
          <table:table-cell table:style-name="ce13" table:formula="of:=[.$B9]/[.F11]" office:value-type="currency" office:currency="AUD" office:value="0.03682" calcext:value-type="currency">
            <text:p>$0.04</text:p>
          </table:table-cell>
          <table:table-cell table:style-name="ce13" table:formula="of:=[.$B9]/[.G11]" office:value-type="currency" office:currency="AUD" office:value="0.01841" calcext:value-type="currency">
            <text:p>$0.02</text:p>
          </table:table-cell>
        </table:table-row>
        <table:table-row table:style-name="ro1">
          <table:table-cell office:value-type="string" calcext:value-type="string">
            <text:p>DB Existance Cost/user</text:p>
          </table:table-cell>
          <table:table-cell table:style-name="ce13" table:formula="of:=[.$B10]/[.B11]" office:value-type="currency" office:currency="AUD" office:value="36.3682" calcext:value-type="currency">
            <text:p>$36.37</text:p>
          </table:table-cell>
          <table:table-cell table:style-name="ce13" table:formula="of:=[.$B10]/[.C11]" office:value-type="currency" office:currency="AUD" office:value="18.1841" calcext:value-type="currency">
            <text:p>$18.18</text:p>
          </table:table-cell>
          <table:table-cell table:style-name="ce13" table:formula="of:=[.$B10]/[.D11]" office:value-type="currency" office:currency="AUD" office:value="12.1227333333333" calcext:value-type="currency">
            <text:p>$12.12</text:p>
          </table:table-cell>
          <table:table-cell table:style-name="ce13" table:formula="of:=[.$B10]/[.E11]" office:value-type="currency" office:currency="AUD" office:value="9.09205" calcext:value-type="currency">
            <text:p>$9.09</text:p>
          </table:table-cell>
          <table:table-cell table:style-name="ce13" table:formula="of:=[.$B10]/[.F11]" office:value-type="currency" office:currency="AUD" office:value="3.63682" calcext:value-type="currency">
            <text:p>$3.64</text:p>
          </table:table-cell>
          <table:table-cell table:style-name="ce13" table:formula="of:=[.$B10]/[.G11]" office:value-type="currency" office:currency="AUD" office:value="1.81841" calcext:value-type="currency">
            <text:p>$1.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scription fee</text:p>
          </table:table-cell>
          <table:table-cell table:style-name="ce11" office:value-type="currency" office:currency="AUD" office:value="12" calcext:value-type="currency">
            <text:p>$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enue</text:p>
          </table:table-cell>
          <table:table-cell table:style-name="ce4" table:formula="of:=[.$B15]*[.B11]" office:value-type="currency" office:currency="AUD" office:value="600" calcext:value-type="currency">
            <text:p>$600</text:p>
          </table:table-cell>
          <table:table-cell table:style-name="ce4" table:formula="of:=[.$B15]*[.C11]" office:value-type="currency" office:currency="AUD" office:value="1200" calcext:value-type="currency">
            <text:p>$1,200</text:p>
          </table:table-cell>
          <table:table-cell table:style-name="ce4" table:formula="of:=[.$B15]*[.D11]" office:value-type="currency" office:currency="AUD" office:value="1800" calcext:value-type="currency">
            <text:p>$1,800</text:p>
          </table:table-cell>
          <table:table-cell table:style-name="ce4" table:formula="of:=[.$B15]*[.E11]" office:value-type="currency" office:currency="AUD" office:value="2400" calcext:value-type="currency">
            <text:p>$2,400</text:p>
          </table:table-cell>
          <table:table-cell table:style-name="ce4" table:formula="of:=[.$B15]*[.F11]" office:value-type="currency" office:currency="AUD" office:value="6000" calcext:value-type="currency">
            <text:p>$6,000</text:p>
          </table:table-cell>
          <table:table-cell table:style-name="ce4" table:formula="of:=[.$B15]*[.G11]" office:value-type="currency" office:currency="AUD" office:value="12000" calcext:value-type="currency">
            <text:p>$12,000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table:style-name="ce4" table:formula="of:=[.B16]-[.$B10]" office:value-type="currency" office:currency="AUD" office:value="-1218.41" calcext:value-type="currency">
            <text:p>-$1,218</text:p>
          </table:table-cell>
          <table:table-cell table:style-name="ce4" table:formula="of:=[.C16]-[.$B10]" office:value-type="currency" office:currency="AUD" office:value="-618.41" calcext:value-type="currency">
            <text:p>-$618</text:p>
          </table:table-cell>
          <table:table-cell table:style-name="ce4" table:formula="of:=[.D16]-[.$B10]" office:value-type="currency" office:currency="AUD" office:value="-18.4100000000001" calcext:value-type="currency">
            <text:p>-$18</text:p>
          </table:table-cell>
          <table:table-cell table:style-name="ce4" table:formula="of:=[.E16]-[.$B10]" office:value-type="currency" office:currency="AUD" office:value="581.59" calcext:value-type="currency">
            <text:p>$582</text:p>
          </table:table-cell>
          <table:table-cell table:style-name="ce4" table:formula="of:=[.F16]-[.$B10]" office:value-type="currency" office:currency="AUD" office:value="4181.59" calcext:value-type="currency">
            <text:p>$4,182</text:p>
          </table:table-cell>
          <table:table-cell table:style-name="ce4" table:formula="of:=[.G16]-[.$B10]" office:value-type="currency" office:currency="AUD" office:value="10181.59" calcext:value-type="currency">
            <text:p>$10,182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WS" table:style-name="ta1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AWS Pric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 calcext:value-type="string">
            <text:p>Sydney</text:p>
          </table:table-cell>
          <table:table-cell office:value-type="string" calcext:value-type="string">
            <text:p>US East</text:p>
          </table:table-cell>
          <table:table-cell/>
          <table:table-cell office:value-type="string" calcext:value-type="string">
            <text:p>RAM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Micro</text:p>
          </table:table-cell>
          <table:table-cell table:style-name="ce14" office:value-type="currency" office:currency="AUD" office:value="0.038" calcext:value-type="currency">
            <text:p>$0.038</text:p>
          </table:table-cell>
          <table:table-cell table:style-name="ce14" office:value-type="currency" office:currency="AUD" office:value="0.026" calcext:value-type="currency">
            <text:p>$0.026</text:p>
          </table:table-cell>
          <table:table-cell/>
          <table:table-cell office:value-type="float" office:value="0.63" calcext:value-type="float">
            <text:p>0.63</text:p>
          </table:table-cell>
          <table:table-cell table:style-name="ce15" office:value-type="string" calcext:value-type="string">
            <text:p>≤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<text:s text:c="4"/>Small</text:p>
          </table:table-cell>
          <table:table-cell table:style-name="ce14" office:value-type="currency" office:currency="AUD" office:value="0.104" calcext:value-type="currency">
            <text:p>$0.104</text:p>
          </table:table-cell>
          <table:table-cell table:style-name="ce14" office:value-type="currency" office:currency="AUD" office:value="0.084" calcext:value-type="currency">
            <text:p>$0.08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string" calcext:value-type="string">
            <text:p><text:s text:c="4"/>Medium</text:p>
          </table:table-cell>
          <table:table-cell table:style-name="ce14" office:value-type="currency" office:currency="AUD" office:value="0.208" calcext:value-type="currency">
            <text:p>$0.208</text:p>
          </table:table-cell>
          <table:table-cell table:style-name="ce14" office:value-type="currency" office:currency="AUD" office:value="0.168" calcext:value-type="currency">
            <text:p>$0.168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r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08:42:58.613356467</meta:creation-date>
    <dc:date>2014-01-30T09:43:41.361038056</dc:date>
    <meta:editing-duration>PT2M18S</meta:editing-duration>
    <meta:editing-cycles>1</meta:editing-cycles>
    <meta:document-statistic meta:table-count="3" meta:cell-count="121" meta:object-count="0"/>
    <meta:generator>LibreOffice/4.1.4.2$Linux_X86_64 LibreOffice_project/410m0$Build-2</meta:generator>
  </office:meta>
</office:document-meta>
</file>
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cccc"/>
    </style:style>
    <style:style style:name="ce13" style:family="table-cell" style:parent-style-name="Default">
      <style:table-cell-properties fo:background-color="transparent"/>
      <style:text-properties fo:color="#cccccc"/>
    </style:style>
    <style:style style:name="ce14" style:family="table-cell" style:parent-style-name="Default" style:data-style-name="N104">
      <style:table-cell-properties fo:background-color="transparent"/>
      <style:text-properties fo:color="#cccccc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104">
      <style:table-cell-properties fo:background-color="#ffffcc"/>
    </style:style>
    <style:style style:name="ce5" style:family="table-cell" style:parent-style-name="Default" style:data-style-name="N10110">
      <style:table-cell-properties fo:background-color="transparent"/>
    </style:style>
    <style:style style:name="ce6" style:family="table-cell" style:parent-style-name="Default" style:data-style-name="N10112"/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4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4"/>
    <style:style style:name="ce9" style:family="table-cell" style:parent-style-name="Default" style:data-style-name="N10110">
      <style:table-cell-properties fo:background-color="#ffffcc"/>
    </style:style>
    <style:style style:name="ce10" style:family="table-cell" style:parent-style-name="Default" style:data-style-name="N10114"/>
    <style:style style:name="ce33" style:family="table-cell" style:parent-style-name="Default" style:data-style-name="N11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A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/>
          <table:table-cell table:style-name="ce1" office:value-type="string" calcext:value-type="string">
            <text:p>Taskman + Webap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12" office:value-type="string" calcext:value-type="string">
            <text:p>f1-micro</text:p>
          </table:table-cell>
          <table:table-cell table:style-name="ce20" office:value-type="string" calcext:value-type="string">
            <text:p>g1-small</text:p>
          </table:table-cell>
          <table:table-cell table:style-name="ce7" office:value-type="string" calcext:value-type="string">
            <text:p>n1-standard-1</text:p>
          </table:table-cell>
          <table:table-cell table:style-name="ce20" office:value-type="string" calcext:value-type="string">
            <text:p>custom</text:p>
          </table:table-cell>
          <table:table-cell table:style-name="ce2" office:value-type="string" calcext:value-type="string">
            <text:p>custom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12" office:value-type="string" calcext:value-type="string">
            <text:p>1⁻</text:p>
          </table:table-cell>
          <table:table-cell table:style-name="ce20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13" office:value-type="float" office:value="0.6" calcext:value-type="float">
            <text:p>0.6</text:p>
          </table:table-cell>
          <table:table-cell table:style-name="ce21"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table:style-name="ce21" office:value-type="float" office:value="2.5" calcext:value-type="float">
            <text:p>2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12" office:value-type="string" calcext:value-type="string">
            <office:annotation draw:style-name="gr1" draw:text-style-name="P2" svg:width="28.99mm" svg:height="9.39mm" svg:x="68.26mm" svg:y="16.6mm" draw:caption-point-x="-6.1mm" draw:caption-point-y="15.1mm">
              <dc:date>2017-08-01T00:00:00</dc:date>
              <text:p text:style-name="P1"><text:span text:style-name="T1">can't auto-restart</text:span></text:p>
            </office:annotation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14" office:value-type="currency" office:currency="AUD" office:value="3.36" calcext:value-type="currency">
            <text:p>$3.36</text:p>
          </table:table-cell>
          <table:table-cell table:style-name="ce22" office:value-type="currency" office:currency="AUD" office:value="18.24" calcext:value-type="currency">
            <text:p>$18.24</text:p>
          </table:table-cell>
          <table:table-cell table:style-name="ce8" office:value-type="currency" office:currency="AUD" office:value="34.45" calcext:value-type="currency">
            <text:p>$34.45</text:p>
          </table:table-cell>
          <table:table-cell table:style-name="ce22" table:formula="of:=[.E6]*22.93+[.E7]*3.07" office:value-type="currency" office:currency="AUD" office:value="30.605" calcext:value-type="currency">
            <text:p>$30.61</text:p>
          </table:table-cell>
          <table:table-cell table:style-name="ce4" table:formula="of:=[.F6]*22.93+[.F7]*3.07" office:value-type="currency" office:currency="AUD" office:value="53.535" calcext:value-type="currency">
            <text:p>$53.54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4" table:formula="of:=730*0.0142" office:value-type="currency" office:currency="AUD" office:value="10.366" calcext:value-type="currency">
            <text:p>$10.37</text:p>
          </table:table-cell>
          <table:table-cell table:style-name="ce8" table:formula="of:=730*0.0473" office:value-type="currency" office:currency="AUD" office:value="34.529" calcext:value-type="currency">
            <text:p>$34.53</text:p>
          </table:table-cell>
          <table:table-cell table:style-name="ce8" table:formula="of:=730*([.D14]*0.05576+[.D15]*0.00945)" office:value-type="currency" office:currency="AUD" office:value="47.6033" calcext:value-type="currency">
            <text:p>$47.60</text:p>
          </table:table-cell>
          <table:table-cell table:style-name="ce8" table:formula="of:=730*([.E14]*0.05576+[.E15]*0.00945)" office:value-type="currency" office:currency="AUD" office:value="88.3081" calcext:value-type="currency">
            <text:p>$88.31</text:p>
          </table:table-cell>
          <table:table-cell table:style-name="ce8" table:formula="of:=730*([.F14]*0.05576+[.F15]*0.00945)" office:value-type="currency" office:currency="AUD" office:value="95.2066" calcext:value-type="currency">
            <text:p>$95.2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Stackdriver</text:p>
            <text:p>Basic</text:p>
          </table:table-cell>
          <table:table-cell office:value-type="string" calcext:value-type="string">
            <text:p>Stackdriver</text:p>
            <text:p>Prem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9" table:formula="of:=8*2"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TP (G-Suite)</text:p>
          </table:table-cell>
          <table:table-cell table:style-name="ce4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3:.B25])+[.B16]+[.C20]+[.F9]" office:value-type="currency" office:currency="USD" office:value="86.901" calcext:value-type="currency">
            <text:p>86.90 USD</text:p>
          </table:table-cell>
          <table:table-cell table:style-name="ce10" table:formula="of:=[.B27]*1.26" office:value-type="currency" office:currency="AUD" office:value="109.49526" calcext:value-type="currency">
            <text:p>109.50 AUD</text:p>
          </table:table-cell>
          <table:table-cell table:number-columns-repeated="5"/>
        </table:table-row>
      </table:table>
      <table:table table:name="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skman</text:p>
          </table:table-cell>
          <table:table-cell table:style-name="ce1" office:value-type="string" calcext:value-type="string">
            <text:p>Webapp</text:p>
          </table:table-cell>
          <table:table-cell/>
          <table:table-cell table:style-name="ce1" office:value-type="string" calcext:value-type="string">
            <text:p>Taskman + Webap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12" office:value-type="string" calcext:value-type="string">
            <text:p>f1-micro</text:p>
          </table:table-cell>
          <table:table-cell table:style-name="ce20" office:value-type="string" calcext:value-type="string">
            <text:p>g1-small</text:p>
          </table:table-cell>
          <table:table-cell table:style-name="ce7" office:value-type="string" calcext:value-type="string">
            <text:p>n1-standard-1</text:p>
          </table:table-cell>
          <table:table-cell table:style-name="ce20" office:value-type="string" calcext:value-type="string">
            <text:p>custom</text:p>
          </table:table-cell>
          <table:table-cell table:style-name="ce2" office:value-type="string" calcext:value-type="string">
            <text:p>custom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PUs</text:p>
          </table:table-cell>
          <table:table-cell table:style-name="ce12" office:value-type="string" calcext:value-type="string">
            <text:p>1⁻</text:p>
          </table:table-cell>
          <table:table-cell table:style-name="ce20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13" office:value-type="float" office:value="0.6" calcext:value-type="float">
            <text:p>0.6</text:p>
          </table:table-cell>
          <table:table-cell table:style-name="ce21"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table:style-name="ce21" office:value-type="float" office:value="2.5" calcext:value-type="float">
            <text:p>2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ptible?</text:p>
          </table:table-cell>
          <table:table-cell table:style-name="ce12" office:value-type="string" calcext:value-type="string">
            <office:annotation draw:style-name="gr1" draw:text-style-name="P2" svg:width="28.99mm" svg:height="9.39mm" svg:x="68.26mm" svg:y="16.6mm" draw:caption-point-x="-6.1mm" draw:caption-point-y="15.1mm">
              <dc:date>2017-08-01T00:00:00</dc:date>
              <text:p text:style-name="P1"><text:span text:style-name="T1">can't auto-restart</text:span></text:p>
            </office:annotation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14" office:value-type="currency" office:currency="AUD" office:value="2.56" calcext:value-type="currency">
            <text:p>$2.56</text:p>
          </table:table-cell>
          <table:table-cell table:style-name="ce22" office:value-type="currency" office:currency="AUD" office:value="13.8" calcext:value-type="currency">
            <text:p>$13.80</text:p>
          </table:table-cell>
          <table:table-cell table:style-name="ce8" office:value-type="currency" office:currency="AUD" office:value="24.2725" calcext:value-type="currency">
            <text:p>$24.27</text:p>
          </table:table-cell>
          <table:table-cell table:style-name="ce22" table:formula="of:=[.E6]*16.95+[.E7]*2.35" office:value-type="currency" office:currency="AUD" office:value="22.825" calcext:value-type="currency">
            <text:p>$22.83</text:p>
          </table:table-cell>
          <table:table-cell table:style-name="ce4" table:formula="of:=[.F6]*16.95+[.F7]*2.35" office:value-type="currency" office:currency="AUD" office:value="39.775" calcext:value-type="currency">
            <text:p>$39.78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" office:value-type="string" calcext:value-type="string">
            <text:p>f1-micro</text:p>
          </table:table-cell>
          <table:table-cell table:style-name="ce7" office:value-type="string" calcext:value-type="string">
            <text:p>g1-small</text:p>
          </table:table-cell>
          <table:table-cell table:number-columns-repeated="3" table:style-name="ce7"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s</text:p>
          </table:table-cell>
          <table:table-cell table:style-name="ce2" office:value-type="string" calcext:value-type="string">
            <text:p>1⁻</text:p>
          </table:table-cell>
          <table:table-cell table:style-name="ce7" office:value-type="string" calcext:value-type="string">
            <text:p>1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4" table:formula="of:=730*0.0105" office:value-type="currency" office:currency="AUD" office:value="7.665" calcext:value-type="currency">
            <text:p>$7.67</text:p>
          </table:table-cell>
          <table:table-cell table:style-name="ce8" table:formula="of:=730*0.035" office:value-type="currency" office:currency="AUD" office:value="25.55" calcext:value-type="currency">
            <text:p>$25.55</text:p>
          </table:table-cell>
          <table:table-cell table:style-name="ce8" table:formula="of:=730*([.D14]*0.0413+[.D15]*0.007)" office:value-type="currency" office:currency="AUD" office:value="35.259" calcext:value-type="currency">
            <text:p>$35.26</text:p>
          </table:table-cell>
          <table:table-cell table:style-name="ce8" table:formula="of:=730*([.E14]*0.0413+[.E15]*0.007)" office:value-type="currency" office:currency="AUD" office:value="65.408" calcext:value-type="currency">
            <text:p>$65.41</text:p>
          </table:table-cell>
          <table:table-cell table:style-name="ce8" table:formula="of:=730*([.F14]*0.0413+[.F15]*0.007)" office:value-type="currency" office:currency="AUD" office:value="70.518" calcext:value-type="currency">
            <text:p>$70.5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nito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Stackdriver</text:p>
            <text:p>Basic</text:p>
          </table:table-cell>
          <table:table-cell office:value-type="string" calcext:value-type="string">
            <text:p>Stackdriver</text:p>
            <text:p>Prem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 (USD/month)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9" table:formula="of:=8*2"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gistry</text:p>
          </table:table-cell>
          <table:table-cell table:style-name="ce4" office:value-type="currency" office:currency="AUD" office:value="1" calcext:value-type="currency">
            <text:p>$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TP (G-Suite)</text:p>
          </table:table-cell>
          <table:table-cell table:style-name="ce4" office:value-type="currency" office:currency="AUD" office:value="5" calcext:value-type="currency">
            <text:p>$5.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SUM([.B23:.B25])+[.B16]+[.C20]+[.F9]" office:value-type="currency" office:currency="USD" office:value="70.44" calcext:value-type="currency">
            <text:p>70.44 USD</text:p>
          </table:table-cell>
          <table:table-cell table:style-name="ce10" table:formula="of:=[.B27]*1.26" office:value-type="currency" office:currency="AUD" office:value="88.7544" calcext:value-type="currency">
            <text:p>88.75 AU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U</text:p>
          </table:table-cell>
          <table:table-cell table:style-name="ce6" table:formula="of:=[AU.B27]" office:value-type="currency" office:currency="USD" office:value="86.901" calcext:value-type="currency">
            <text:p>86.90 USD</text:p>
          </table:table-cell>
          <table:table-cell table:style-name="ce10" table:formula="of:=[.B29]*1.26" office:value-type="currency" office:currency="AUD" office:value="109.49526" calcext:value-type="currency">
            <text:p>109.50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increase</text:p>
          </table:table-cell>
          <table:table-cell table:style-name="ce33" table:formula="of:=[.B29]/[.B27]-1" office:value-type="percentage" office:value="0.233688245315162" calcext:value-type="percentage">
            <text:p>23.4%</text:p>
          </table:table-cell>
          <table:table-cell table:style-name="ce10" table:formula="of:=[.C29]-[.C27]" office:value-type="currency" office:currency="AUD" office:value="20.74086" calcext:value-type="currency">
            <text:p>20.74 A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 reduction</text:p>
          </table:table-cell>
          <table:table-cell table:style-name="ce33" table:formula="of:=-1+[.B27]/[.B29]" office:value-type="percentage" office:value="-0.189422446231919" calcext:value-type="percentage">
            <text:p>-18.9%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1" loext:min-decimal-places="1" number:min-integer-digits="1"/>
      <number:text>%</number:text>
    </number:percentage-style>
    <number:currency-style style:name="N10110P0" style:volatile="true" number:language="en" number:country="AU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0" number:language="en" number:country="AU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en" number:country="AU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12" number:language="en" number:country="AU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12P0"/>
    </number:currency-style>
    <number:currency-style style:name="N10114P0" style:volatile="true" number:language="en" number:country="AU">
      <number:number number:decimal-places="2" loext:min-decimal-places="2" number:min-integer-digits="1" number:grouping="true"/>
      <number:text> </number:text>
      <number:currency-symbol>AUD</number:currency-symbol>
    </number:currency-style>
    <number:currency-style style:name="N10114" number:language="en" number:country="AU">
      <number:text>-</number:text>
      <number:number number:decimal-places="2" loext:min-decimal-places="2" number:min-integer-digits="1" number:grouping="true"/>
      <number:text> </number:text>
      <number:currency-symbol>AUD</number:currency-symbol>
      <style:map style:condition="value()&gt;=0" style:apply-style-name="N1011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8:36:15.89053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9:54.190874645</meta:creation-date>
    <dc:date>2017-08-02T08:59:51.481476538</dc:date>
    <meta:editing-duration>PT32M55S</meta:editing-duration>
    <meta:editing-cycles>7</meta:editing-cycles>
    <meta:generator>LibreOffice/5.3.4.2$Linux_X86_64 LibreOffice_project/30m0$Build-2</meta:generator>
    <meta:document-statistic meta:table-count="2" meta:cell-count="158" meta:object-count="0"/>
  </office:meta>
</office:document-meta>
</file>
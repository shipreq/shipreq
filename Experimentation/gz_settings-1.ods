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9cm"/>
    </style:style>
    <style:style style:name="co3" style:family="table-column">
      <style:table-column-properties fo:break-before="auto" style:column-width="3.156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"/>
    <style:style style:name="ce5" style:family="table-cell" style:parent-style-name="Default" style:data-style-name="N3">
      <style:table-cell-properties fo:background-color="#cfe7f5"/>
    </style:style>
    <style:style style:name="ce6" style:family="table-cell" style:parent-style-name="Default" style:data-style-name="N11"/>
    <style:style style:name="ce7" style:family="table-cell" style:parent-style-name="Default" style:data-style-name="N11">
      <style:table-cell-properties fo:background-color="#cfe7f5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ce6"/>
        <table:table-column table:style-name="co1" table:default-cell-style-name="ce4"/>
        <table:table-column table:style-name="co1" table:default-cell-style-name="ce6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Gzip Level</text:p>
          </table:table-cell>
          <table:table-cell table:style-name="ce3" office:value-type="string" calcext:value-type="string" table:number-columns-spanned="2" table:number-rows-spanned="1">
            <text:p>Size</text:p>
          </table:table-cell>
          <table:covered-table-cell table:style-name="ce1"/>
          <table:table-cell table:style-name="ce3" office:value-type="string" calcext:value-type="string" table:number-columns-spanned="2" table:number-rows-spanned="1">
            <text:p>Size cmp L1</text:p>
          </table:table-cell>
          <table:covered-table-cell table:style-name="ce1"/>
          <table:table-cell table:style-name="ce3" office:value-type="string" calcext:value-type="string">
            <text:p>Speed</text:p>
          </table:table-cell>
          <table:table-cell table:style-name="ce9" office:value-type="string" calcext:value-type="string">
            <text:p>Speed cmp L1</text:p>
          </table:table-cell>
          <table:table-cell table:style-name="ce1" office:value-type="string" calcext:value-type="string">
            <text:p>Reduction/sec</text:p>
          </table:table-cell>
          <table:table-cell table:style-name="ce1"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40295" calcext:value-type="float">
            <text:p>120,040,295</text:p>
          </table:table-cell>
          <table:table-cell table:formula="of:=[.B2]/[.B$2]" office:value-type="percentage" office:value="1" calcext:value-type="percentage">
            <text:p>100.00%</text:p>
          </table:table-cell>
          <table:table-cell table:number-columns-repeated="2" table:style-name="ce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23668" calcext:value-type="float">
            <text:p>8,723,668</text:p>
          </table:table-cell>
          <table:table-cell table:formula="of:=[.B3]/[.B$2]" office:value-type="percentage" office:value="0.0726728304024911" calcext:value-type="percentage">
            <text:p>7.27%</text:p>
          </table:table-cell>
          <table:table-cell table:formula="of:=[.B$3]-[.B3]" office:value-type="float" office:value="0" calcext:value-type="float">
            <text:p>0</text:p>
          </table:table-cell>
          <table:table-cell table:formula="of:=[.C3]/[.C$3]" office:value-type="percentage" office:value="1" calcext:value-type="percentage">
            <text:p>100.00%</text:p>
          </table:table-cell>
          <table:table-cell office:value-type="float" office:value="0.698" calcext:value-type="float">
            <text:p>0.698</text:p>
          </table:table-cell>
          <table:table-cell table:formula="of:=[.F3]/[.F$3]" office:value-type="percentage" office:value="1" calcext:value-type="percentage">
            <text:p>100.00%</text:p>
          </table:table-cell>
          <table:table-cell table:formula="of:=(1-[.C3])/[.F3]" office:value-type="float" office:value="1.32854895357809" calcext:value-type="float">
            <text:p>1.328548953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28435" calcext:value-type="float">
            <text:p>8,228,435</text:p>
          </table:table-cell>
          <table:table-cell table:formula="of:=[.B4]/[.B$2]" office:value-type="percentage" office:value="0.0685472740632635" calcext:value-type="percentage">
            <text:p>6.85%</text:p>
          </table:table-cell>
          <table:table-cell table:formula="of:=[.B$3]-[.B4]" office:value-type="float" office:value="495233" calcext:value-type="float">
            <text:p>495,233</text:p>
          </table:table-cell>
          <table:table-cell table:formula="of:=[.C4]/[.C$3]" office:value-type="percentage" office:value="0.943231104163982" calcext:value-type="percentage">
            <text:p>94.32%</text:p>
          </table:table-cell>
          <table:table-cell office:value-type="float" office:value="0.672" calcext:value-type="float">
            <text:p>0.672</text:p>
          </table:table-cell>
          <table:table-cell table:formula="of:=[.F4]/[.F$3]" office:value-type="percentage" office:value="0.962750716332378" calcext:value-type="percentage">
            <text:p>96.28%</text:p>
          </table:table-cell>
          <table:table-cell table:formula="of:=(1-[.C4])/[.F4]" office:value-type="float" office:value="1.38609036597729" calcext:value-type="float">
            <text:p>1.386090366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float" office:value="7788555" calcext:value-type="float">
            <text:p>7,788,555</text:p>
          </table:table-cell>
          <table:table-cell table:style-name="ce7" table:formula="of:=[.B5]/[.B$2]" office:value-type="percentage" office:value="0.064882837883729" calcext:value-type="percentage">
            <text:p>6.49%</text:p>
          </table:table-cell>
          <table:table-cell table:style-name="ce5" table:formula="of:=[.B$3]-[.B5]" office:value-type="float" office:value="935113" calcext:value-type="float">
            <text:p>935,113</text:p>
          </table:table-cell>
          <table:table-cell table:style-name="ce7" table:formula="of:=[.C5]/[.C$3]" office:value-type="percentage" office:value="0.892807360390148" calcext:value-type="percentage">
            <text:p>89.28%</text:p>
          </table:table-cell>
          <table:table-cell table:style-name="ce2" office:value-type="float" office:value="0.691" calcext:value-type="float">
            <text:p>0.691</text:p>
          </table:table-cell>
          <table:table-cell table:style-name="ce7" table:formula="of:=[.F5]/[.F$3]" office:value-type="percentage" office:value="0.989971346704871" calcext:value-type="percentage">
            <text:p>99.00%</text:p>
          </table:table-cell>
          <table:table-cell table:style-name="ce2" table:formula="of:=(1-[.C5])/[.F5]" office:value-type="float" office:value="1.35328098714366" calcext:value-type="float">
            <text:p>1.353280987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63687" calcext:value-type="float">
            <text:p>7,163,687</text:p>
          </table:table-cell>
          <table:table-cell table:formula="of:=[.B6]/[.B$2]" office:value-type="percentage" office:value="0.0596773525090054" calcext:value-type="percentage">
            <text:p>5.97%</text:p>
          </table:table-cell>
          <table:table-cell table:formula="of:=[.B$3]-[.B6]" office:value-type="float" office:value="1559981" calcext:value-type="float">
            <text:p>1,559,981</text:p>
          </table:table-cell>
          <table:table-cell table:formula="of:=[.C6]/[.C$3]" office:value-type="percentage" office:value="0.821178316277052" calcext:value-type="percentage">
            <text:p>82.12%</text:p>
          </table:table-cell>
          <table:table-cell office:value-type="float" office:value="0.852" calcext:value-type="float">
            <text:p>0.852</text:p>
          </table:table-cell>
          <table:table-cell table:formula="of:=[.F6]/[.F$3]" office:value-type="percentage" office:value="1.22063037249284" calcext:value-type="percentage">
            <text:p>122.06%</text:p>
          </table:table-cell>
          <table:table-cell table:formula="of:=(1-[.C6])/[.F6]" office:value-type="float" office:value="1.10366507921478" calcext:value-type="float">
            <text:p>1.103665079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56896" calcext:value-type="float">
            <text:p>6,356,896</text:p>
          </table:table-cell>
          <table:table-cell table:formula="of:=[.B7]/[.B$2]" office:value-type="percentage" office:value="0.0529563510319597" calcext:value-type="percentage">
            <text:p>5.30%</text:p>
          </table:table-cell>
          <table:table-cell table:formula="of:=[.B$3]-[.B7]" office:value-type="float" office:value="2366772" calcext:value-type="float">
            <text:p>2,366,772</text:p>
          </table:table-cell>
          <table:table-cell table:formula="of:=[.C7]/[.C$3]" office:value-type="percentage" office:value="0.728695314860676" calcext:value-type="percentage">
            <text:p>72.87%</text:p>
          </table:table-cell>
          <table:table-cell office:value-type="float" office:value="0.897" calcext:value-type="float">
            <text:p>0.897</text:p>
          </table:table-cell>
          <table:table-cell table:formula="of:=[.F7]/[.F$3]" office:value-type="percentage" office:value="1.28510028653295" calcext:value-type="percentage">
            <text:p>128.51%</text:p>
          </table:table-cell>
          <table:table-cell table:formula="of:=(1-[.C7])/[.F7]" office:value-type="float" office:value="1.05579002114609" calcext:value-type="float">
            <text:p>1.055790021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60101" calcext:value-type="float">
            <text:p>5,560,101</text:p>
          </table:table-cell>
          <table:table-cell table:formula="of:=[.B8]/[.B$2]" office:value-type="percentage" office:value="0.0463186215928576" calcext:value-type="percentage">
            <text:p>4.63%</text:p>
          </table:table-cell>
          <table:table-cell table:formula="of:=[.B$3]-[.B8]" office:value-type="float" office:value="3163567" calcext:value-type="float">
            <text:p>3,163,567</text:p>
          </table:table-cell>
          <table:table-cell table:formula="of:=[.C8]/[.C$3]" office:value-type="percentage" office:value="0.637358161727383" calcext:value-type="percentage">
            <text:p>63.74%</text:p>
          </table:table-cell>
          <table:table-cell office:value-type="float" office:value="1.075" calcext:value-type="float">
            <text:p>1.075</text:p>
          </table:table-cell>
          <table:table-cell table:formula="of:=[.F8]/[.F$3]" office:value-type="percentage" office:value="1.54011461318052" calcext:value-type="percentage">
            <text:p>154.01%</text:p>
          </table:table-cell>
          <table:table-cell table:formula="of:=(1-[.C8])/[.F8]" office:value-type="float" office:value="0.887145468285714" calcext:value-type="float">
            <text:p>0.8871454683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19051" calcext:value-type="float">
            <text:p>5,519,051</text:p>
          </table:table-cell>
          <table:table-cell table:formula="of:=[.B9]/[.B$2]" office:value-type="percentage" office:value="0.0459766530896979" calcext:value-type="percentage">
            <text:p>4.60%</text:p>
          </table:table-cell>
          <table:table-cell table:formula="of:=[.B$3]-[.B9]" office:value-type="float" office:value="3204617" calcext:value-type="float">
            <text:p>3,204,617</text:p>
          </table:table-cell>
          <table:table-cell table:formula="of:=[.C9]/[.C$3]" office:value-type="percentage" office:value="0.632652572289546" calcext:value-type="percentage">
            <text:p>63.27%</text:p>
          </table:table-cell>
          <table:table-cell office:value-type="float" office:value="1.168" calcext:value-type="float">
            <text:p>1.168</text:p>
          </table:table-cell>
          <table:table-cell table:formula="of:=[.F9]/[.F$3]" office:value-type="percentage" office:value="1.67335243553009" calcext:value-type="percentage">
            <text:p>167.34%</text:p>
          </table:table-cell>
          <table:table-cell table:formula="of:=(1-[.C9])/[.F9]" office:value-type="float" office:value="0.816800810710875" calcext:value-type="float">
            <text:p>0.8168008107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88759" calcext:value-type="float">
            <text:p>5,288,759</text:p>
          </table:table-cell>
          <table:table-cell table:formula="of:=[.B10]/[.B$2]" office:value-type="percentage" office:value="0.0440581972911679" calcext:value-type="percentage">
            <text:p>4.41%</text:p>
          </table:table-cell>
          <table:table-cell table:formula="of:=[.B$3]-[.B10]" office:value-type="float" office:value="3434909" calcext:value-type="float">
            <text:p>3,434,909</text:p>
          </table:table-cell>
          <table:table-cell table:formula="of:=[.C10]/[.C$3]" office:value-type="percentage" office:value="0.606254043597257" calcext:value-type="percentage">
            <text:p>60.63%</text:p>
          </table:table-cell>
          <table:table-cell office:value-type="float" office:value="1.574" calcext:value-type="float">
            <text:p>1.574</text:p>
          </table:table-cell>
          <table:table-cell table:formula="of:=[.F10]/[.F$3]" office:value-type="percentage" office:value="2.25501432664756" calcext:value-type="percentage">
            <text:p>225.50%</text:p>
          </table:table-cell>
          <table:table-cell table:formula="of:=(1-[.C10])/[.F10]" office:value-type="float" office:value="0.607332784440173" calcext:value-type="float">
            <text:p>0.6073327844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85404" calcext:value-type="float">
            <text:p>5,285,404</text:p>
          </table:table-cell>
          <table:table-cell table:formula="of:=[.B11]/[.B$2]" office:value-type="percentage" office:value="0.0440302483428585" calcext:value-type="percentage">
            <text:p>4.40%</text:p>
          </table:table-cell>
          <table:table-cell table:formula="of:=[.B$3]-[.B11]" office:value-type="float" office:value="3438264" calcext:value-type="float">
            <text:p>3,438,264</text:p>
          </table:table-cell>
          <table:table-cell table:formula="of:=[.C11]/[.C$3]" office:value-type="percentage" office:value="0.605869457663909" calcext:value-type="percentage">
            <text:p>60.59%</text:p>
          </table:table-cell>
          <table:table-cell office:value-type="float" office:value="1.755" calcext:value-type="float">
            <text:p>1.755</text:p>
          </table:table-cell>
          <table:table-cell table:formula="of:=[.F11]/[.F$3]" office:value-type="percentage" office:value="2.51432664756447" calcext:value-type="percentage">
            <text:p>251.43%</text:p>
          </table:table-cell>
          <table:table-cell table:formula="of:=(1-[.C11])/[.F11]" office:value-type="float" office:value="0.544712109206349" calcext:value-type="float">
            <text:p>0.5447121092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2T08:15:45.095935193</meta:creation-date>
    <dc:date>2013-12-02T08:26:22.695156967</dc:date>
    <meta:editing-duration>PT1M12S</meta:editing-duration>
    <meta:editing-cycles>1</meta:editing-cycles>
    <meta:document-statistic meta:table-count="1" meta:cell-count="86" meta:object-count="0"/>
    <meta:generator>LibreOffice/4.1.3.2$Linux_X86_64 LibreOffice_project/410m0$Build-2</meta:generator>
  </office:meta>
</office:document-meta>
</file>